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Class 08s</text:p>
          </table:table-cell>
          <table:table-cell office:value-type="string">
            <text:p>SEEN</text:p>
          </table:table-cell>
          <table:table-cell office:value-type="string">
            <text:p>H</text:p>
          </table:table-cell>
          <table:table-cell office:value-type="string">
            <text:p>PICS</text:p>
          </table:table-cell>
        </table:table-row>
        <table:table-row table:style-name="ro1">
          <table:table-cell office:value-type="string">
            <text:p>O82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3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3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3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3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01</text:p>
          </table:table-cell>
          <table:table-cell table:number-columns-repeated="3"/>
        </table:table-row>
        <table:table-row table:style-name="ro1">
          <table:table-cell office:value-type="string">
            <text:p>O04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18</text:p>
          </table:table-cell>
          <table:table-cell table:number-columns-repeated="3"/>
        </table:table-row>
        <table:table-row table:style-name="ro1">
          <table:table-cell office:value-type="string">
            <text:p>O8423</text:p>
          </table:table-cell>
          <table:table-cell table:number-columns-repeated="3"/>
        </table:table-row>
        <table:table-row table:style-name="ro1">
          <table:table-cell office:value-type="string">
            <text:p>O84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42</text:p>
          </table:table-cell>
          <table:table-cell table:number-columns-repeated="3"/>
        </table:table-row>
        <table:table-row table:style-name="ro1">
          <table:table-cell office:value-type="string">
            <text:p>O8445</text:p>
          </table:table-cell>
          <table:table-cell table:number-columns-repeated="3"/>
        </table:table-row>
        <table:table-row table:style-name="ro1">
          <table:table-cell office:value-type="string">
            <text:p>O8447</text:p>
          </table:table-cell>
          <table:table-cell table:number-columns-repeated="3"/>
        </table:table-row>
        <table:table-row table:style-name="ro1">
          <table:table-cell office:value-type="string">
            <text:p>O84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73 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O84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484</text:p>
          </table:table-cell>
          <table:table-cell table:number-columns-repeated="3"/>
        </table:table-row>
        <table:table-row table:style-name="ro1">
          <table:table-cell office:value-type="string">
            <text:p>O8485</text:p>
          </table:table-cell>
          <table:table-cell table:number-columns-repeated="3"/>
        </table:table-row>
        <table:table-row table:style-name="ro1">
          <table:table-cell office:value-type="string">
            <text:p>O84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16</text:p>
          </table:table-cell>
          <table:table-cell table:number-columns-repeated="3"/>
        </table:table-row>
        <table:table-row table:style-name="ro1">
          <table:table-cell office:value-type="string">
            <text:p>O8523</text:p>
          </table:table-cell>
          <table:table-cell table:number-columns-repeated="3"/>
        </table:table-row>
        <table:table-row table:style-name="ro1">
          <table:table-cell office:value-type="string">
            <text:p>O85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31</text:p>
          </table:table-cell>
          <table:table-cell table:number-columns-repeated="3"/>
        </table:table-row>
        <table:table-row table:style-name="ro1">
          <table:table-cell office:value-type="string">
            <text:p>O85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68</text:p>
          </table:table-cell>
          <table:table-cell table:number-columns-repeated="3"/>
        </table:table-row>
        <table:table-row table:style-name="ro1">
          <table:table-cell office:value-type="string">
            <text:p>O85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73</text:p>
          </table:table-cell>
          <table:table-cell table:number-columns-repeated="3"/>
        </table:table-row>
        <table:table-row table:style-name="ro1">
          <table:table-cell office:value-type="string">
            <text:p>O85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8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598</text:p>
          </table:table-cell>
          <table:table-cell table:number-columns-repeated="3"/>
        </table:table-row>
        <table:table-row table:style-name="ro1">
          <table:table-cell office:value-type="string">
            <text:p>O8600</text:p>
          </table:table-cell>
          <table:table-cell table:number-columns-repeated="3"/>
        </table:table-row>
        <table:table-row table:style-name="ro1">
          <table:table-cell office:value-type="string">
            <text:p>O8602</text:p>
          </table:table-cell>
          <table:table-cell table:number-columns-repeated="3"/>
        </table:table-row>
        <table:table-row table:style-name="ro1">
          <table:table-cell office:value-type="string">
            <text:p>O86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13</text:p>
          </table:table-cell>
          <table:table-cell table:number-columns-repeated="3"/>
        </table:table-row>
        <table:table-row table:style-name="ro1">
          <table:table-cell office:value-type="string">
            <text:p>O86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16 <text:s text:c="2"/>37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22</text:p>
          </table:table-cell>
          <table:table-cell table:number-columns-repeated="3"/>
        </table:table-row>
        <table:table-row table:style-name="ro1">
          <table:table-cell office:value-type="string">
            <text:p>O8623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29</text:p>
          </table:table-cell>
          <table:table-cell table:number-columns-repeated="3"/>
        </table:table-row>
        <table:table-row table:style-name="ro1">
          <table:table-cell office:value-type="string">
            <text:p>O86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43</text:p>
          </table:table-cell>
          <table:table-cell table:number-columns-repeated="3"/>
        </table:table-row>
        <table:table-row table:style-name="ro1">
          <table:table-cell office:value-type="string">
            <text:p>O86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50</text:p>
          </table:table-cell>
          <table:table-cell table:number-columns-repeated="3"/>
        </table:table-row>
        <table:table-row table:style-name="ro1">
          <table:table-cell office:value-type="string">
            <text:p>O8652</text:p>
          </table:table-cell>
          <table:table-cell table:number-columns-repeated="3"/>
        </table:table-row>
        <table:table-row table:style-name="ro1">
          <table:table-cell office:value-type="string">
            <text:p>O86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6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6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3905 <text:s/>O8737</text:p>
          </table:table-cell>
          <table:table-cell table:number-columns-repeated="3"/>
        </table:table-row>
        <table:table-row table:style-name="ro1">
          <table:table-cell office:value-type="string">
            <text:p>O87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74</text:p>
          </table:table-cell>
          <table:table-cell table:number-columns-repeated="3"/>
        </table:table-row>
        <table:table-row table:style-name="ro1">
          <table:table-cell office:value-type="string">
            <text:p><text:s/>D3948 O878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8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9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98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799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04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22</text:p>
          </table:table-cell>
          <table:table-cell table:number-columns-repeated="3"/>
        </table:table-row>
        <table:table-row table:style-name="ro1">
          <table:table-cell office:value-type="string">
            <text:p>O8823</text:p>
          </table:table-cell>
          <table:table-cell table:number-columns-repeated="3"/>
        </table:table-row>
        <table:table-row table:style-name="ro1">
          <table:table-cell office:value-type="string">
            <text:p>O88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46</text:p>
          </table:table-cell>
          <table:table-cell table:number-columns-repeated="3"/>
        </table:table-row>
        <table:table-row table:style-name="ro1">
          <table:table-cell office:value-type="string">
            <text:p>O88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70</text:p>
          </table:table-cell>
          <table:table-cell table:number-columns-repeated="3"/>
        </table:table-row>
        <table:table-row table:style-name="ro1">
          <table:table-cell office:value-type="string">
            <text:p>O88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72W</text:p>
          </table:table-cell>
          <table:table-cell table:number-columns-repeated="3"/>
        </table:table-row>
        <table:table-row table:style-name="ro1">
          <table:table-cell office:value-type="string">
            <text:p>O887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7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85</text:p>
          </table:table-cell>
          <table:table-cell table:number-columns-repeated="3"/>
        </table:table-row>
        <table:table-row table:style-name="ro1">
          <table:table-cell office:value-type="string">
            <text:p>O88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9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8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08</text:p>
          </table:table-cell>
          <table:table-cell table:number-columns-repeated="3"/>
        </table:table-row>
        <table:table-row table:style-name="ro1">
          <table:table-cell office:value-type="string">
            <text:p>O89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12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13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21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25</text:p>
          </table:table-cell>
          <table:table-cell table:number-columns-repeated="3"/>
        </table:table-row>
        <table:table-row table:style-name="ro1">
          <table:table-cell office:value-type="string">
            <text:p>O89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33</text:p>
          </table:table-cell>
          <table:table-cell table:number-columns-repeated="3"/>
        </table:table-row>
        <table:table-row table:style-name="ro1">
          <table:table-cell office:value-type="string">
            <text:p>O89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36</text:p>
          </table:table-cell>
          <table:table-cell table:number-columns-repeated="3"/>
        </table:table-row>
        <table:table-row table:style-name="ro1">
          <table:table-cell office:value-type="string">
            <text:p>O89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44W</text:p>
          </table:table-cell>
          <table:table-cell table:number-columns-repeated="3"/>
        </table:table-row>
        <table:table-row table:style-name="ro1">
          <table:table-cell office:value-type="string">
            <text:p>O8947</text:p>
          </table:table-cell>
          <table:table-cell table:number-columns-repeated="3"/>
        </table:table-row>
        <table:table-row table:style-name="ro1">
          <table:table-cell office:value-type="string">
            <text:p>O89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89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O9S</text:p>
          </table:table-cell>
          <table:table-cell table:number-columns-repeated="3"/>
        </table:table-row>
        <table:table-row table:style-name="ro1">
          <table:table-cell office:value-type="string">
            <text:p>O9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006</text:p>
          </table:table-cell>
          <table:table-cell table:number-columns-repeated="3"/>
        </table:table-row>
        <table:table-row table:style-name="ro1">
          <table:table-cell office:value-type="string">
            <text:p>O9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022</text:p>
          </table:table-cell>
          <table:table-cell table:number-columns-repeated="3"/>
        </table:table-row>
        <table:table-row table:style-name="ro1">
          <table:table-cell office:value-type="string">
            <text:p>O9023W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91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92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O920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2OS</text:p>
          </table:table-cell>
          <table:table-cell table:number-columns-repeated="3"/>
        </table:table-row>
        <table:table-row table:style-name="ro1">
          <table:table-cell office:value-type="string">
            <text:p>20001 D8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20007 D8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016">
            <text:p>20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20056 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20059 D80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081">
            <text:p>200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088">
            <text:p>200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096">
            <text:p>2009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107">
            <text:p>20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118">
            <text:p>201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121">
            <text:p>20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132">
            <text:p>20132</text:p>
          </table:table-cell>
          <table:table-cell table:number-columns-repeated="3"/>
        </table:table-row>
        <table:table-row table:style-name="ro1">
          <table:table-cell office:value-type="float" office:value="20142">
            <text:p>201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166">
            <text:p>201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20168 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189">
            <text:p>2018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205">
            <text:p>20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227">
            <text:p>202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20228 200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301">
            <text:p>203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2">
            <text:p>203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3">
            <text:p>203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4">
            <text:p>203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5">
            <text:p>203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8">
            <text:p>203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09">
            <text:p>203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11">
            <text:p>203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20312">
            <text:p>203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314">
            <text:p>203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901">
            <text:p>209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903">
            <text:p>209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904">
            <text:p>209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0905">
            <text:p>209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20906 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25</text:p>
          </table:table-cell>
          <table:table-cell table:number-columns-repeated="3"/>
        </table:table-row>
        <table:table-row table:style-name="ro1">
          <table:table-cell office:value-type="string">
            <text:p>D75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5235">
            <text:p>252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76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76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D76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26</text:p>
          </table:table-cell>
          <table:table-cell table:number-columns-repeated="3"/>
        </table:table-row>
        <table:table-row table:style-name="ro1">
          <table:table-cell office:value-type="float" office:value="26004">
            <text:p>26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6007">
            <text:p>26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6024">
            <text:p>26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6038">
            <text:p>260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27</text:p>
          </table:table-cell>
          <table:table-cell table:number-columns-repeated="3"/>
        </table:table-row>
        <table:table-row table:style-name="ro1">
          <table:table-cell office:value-type="float" office:value="27001">
            <text:p>27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27005">
            <text:p>27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54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31</text:p>
          </table:table-cell>
          <table:table-cell table:number-columns-repeated="3"/>
        </table:table-row>
        <table:table-row table:style-name="ro1">
          <table:table-cell office:value-type="float" office:value="31105">
            <text:p>31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1106">
            <text:p>311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128">
            <text:p>311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31162 D55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1190">
            <text:p>311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1255">
            <text:p>312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271">
            <text:p>312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1285">
            <text:p>312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289">
            <text:p>312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452">
            <text:p>314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459">
            <text:p>314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461">
            <text:p>314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465">
            <text:p>314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601">
            <text:p>316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ASS 33</text:p>
          </table:table-cell>
          <table:table-cell table:number-columns-repeated="3"/>
        </table:table-row>
        <table:table-row table:style-name="ro1">
          <table:table-cell office:value-type="float" office:value="33002">
            <text:p>33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08">
            <text:p>33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12">
            <text:p>33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3019">
            <text:p>33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25">
            <text:p>33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29">
            <text:p>33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30">
            <text:p>33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35">
            <text:p>330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3053">
            <text:p>330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207">
            <text:p>33207</text:p>
          </table:table-cell>
          <table:table-cell table:number-columns-repeated="3"/>
        </table:table-row>
        <table:table-row table:style-name="ro1">
          <table:table-cell office:value-type="string">
            <text:p>CLASS 37</text:p>
          </table:table-cell>
          <table:table-cell table:number-columns-repeated="3"/>
        </table:table-row>
        <table:table-row table:style-name="ro1">
          <table:table-cell office:value-type="float" office:value="37003">
            <text:p>37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025">
            <text:p>37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D6737 370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038">
            <text:p>370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057">
            <text:p>370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059">
            <text:p>370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069">
            <text:p>370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099">
            <text:p>370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116">
            <text:p>371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175">
            <text:p>371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190">
            <text:p>371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198">
            <text:p>371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207">
            <text:p>37207</text:p>
          </table:table-cell>
          <table:table-cell table:number-columns-repeated="3"/>
        </table:table-row>
        <table:table-row table:style-name="ro1">
          <table:table-cell office:value-type="float" office:value="37218">
            <text:p>372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219">
            <text:p>372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240">
            <text:p>372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254">
            <text:p>372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255">
            <text:p>372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259">
            <text:p>372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401">
            <text:p>374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02">
            <text:p>374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03">
            <text:p>374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05">
            <text:p>374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07">
            <text:p>374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09">
            <text:p>374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18">
            <text:p>374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19">
            <text:p>374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21">
            <text:p>374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22">
            <text:p>374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23">
            <text:p>374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558">
            <text:p>375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425">
            <text:p>374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37606 37508</text:p>
          </table:table-cell>
          <table:table-cell table:number-columns-repeated="3"/>
        </table:table-row>
        <table:table-row table:style-name="ro1">
          <table:table-cell office:value-type="float" office:value="37510">
            <text:p>375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516">
            <text:p>375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517">
            <text:p>375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518">
            <text:p>375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string">
            <text:p>37521 D67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601">
            <text:p>376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2">
            <text:p>376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3">
            <text:p>376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4">
            <text:p>376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7">
            <text:p>376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8">
            <text:p>376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09">
            <text:p>376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10">
            <text:p>376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11">
            <text:p>376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12">
            <text:p>376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6851 376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668">
            <text:p>37668</text:p>
          </table:table-cell>
          <table:table-cell table:number-columns-repeated="3"/>
        </table:table-row>
        <table:table-row table:style-name="ro1">
          <table:table-cell office:value-type="float" office:value="37669">
            <text:p>37669</text:p>
          </table:table-cell>
          <table:table-cell table:number-columns-repeated="3"/>
        </table:table-row>
        <table:table-row table:style-name="ro1">
          <table:table-cell office:value-type="float" office:value="37676">
            <text:p>376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706">
            <text:p>377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712">
            <text:p>377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716">
            <text:p>377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800">
            <text:p>378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7884">
            <text:p>3788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901">
            <text:p>379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905">
            <text:p>379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37906">
            <text:p>379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003">
            <text:p>43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04">
            <text:p>43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12">
            <text:p>43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13">
            <text:p>43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14">
            <text:p>43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15">
            <text:p>43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17">
            <text:p>43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20">
            <text:p>43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21">
            <text:p>43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23">
            <text:p>43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24">
            <text:p>43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25">
            <text:p>43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26">
            <text:p>43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27">
            <text:p>430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28">
            <text:p>43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29">
            <text:p>43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31">
            <text:p>43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32">
            <text:p>43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33">
            <text:p>430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34">
            <text:p>43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35">
            <text:p>43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36">
            <text:p>430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37">
            <text:p>43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42">
            <text:p>430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44">
            <text:p>43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45">
            <text:p>430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46">
            <text:p>430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47">
            <text:p>430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48">
            <text:p>430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49">
            <text:p>430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50">
            <text:p>430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54">
            <text:p>430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55">
            <text:p>430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56">
            <text:p>430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58">
            <text:p>430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59">
            <text:p>430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60">
            <text:p>430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62">
            <text:p>430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63">
            <text:p>430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66">
            <text:p>430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70">
            <text:p>430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71">
            <text:p>430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73">
            <text:p>430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76">
            <text:p>4307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79">
            <text:p>4307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81">
            <text:p>4308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82">
            <text:p>430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83">
            <text:p>4308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88">
            <text:p>430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89">
            <text:p>4308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91">
            <text:p>4309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92">
            <text:p>4309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93">
            <text:p>430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094">
            <text:p>4309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97">
            <text:p>4309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098">
            <text:p>430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122">
            <text:p>431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24">
            <text:p>431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25">
            <text:p>43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26">
            <text:p>431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27">
            <text:p>431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28">
            <text:p>431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29">
            <text:p>431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0">
            <text:p>43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1">
            <text:p>431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2">
            <text:p>431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33">
            <text:p>43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4">
            <text:p>431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35">
            <text:p>431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6">
            <text:p>431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7">
            <text:p>431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8">
            <text:p>431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39">
            <text:p>431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41">
            <text:p>431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2">
            <text:p>431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3">
            <text:p>431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4">
            <text:p>431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45">
            <text:p>431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6">
            <text:p>431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7">
            <text:p>431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48">
            <text:p>431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49">
            <text:p>431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0">
            <text:p>431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1">
            <text:p>431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2">
            <text:p>431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53">
            <text:p>431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4">
            <text:p>431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55">
            <text:p>431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6">
            <text:p>431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8">
            <text:p>431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59">
            <text:p>431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60">
            <text:p>431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61">
            <text:p>431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62">
            <text:p>431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63">
            <text:p>431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64">
            <text:p>431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65">
            <text:p>431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68">
            <text:p>431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69">
            <text:p>431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0">
            <text:p>431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2">
            <text:p>431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4">
            <text:p>431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5">
            <text:p>431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76">
            <text:p>431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7">
            <text:p>431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8">
            <text:p>431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79">
            <text:p>4317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81">
            <text:p>431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82">
            <text:p>431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83">
            <text:p>4318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86">
            <text:p>4318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87">
            <text:p>431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88">
            <text:p>431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89">
            <text:p>431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90">
            <text:p>431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91">
            <text:p>4319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192">
            <text:p>4319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94">
            <text:p>431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198">
            <text:p>431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006">
            <text:p>43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207">
            <text:p>432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38">
            <text:p>432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39">
            <text:p>432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51">
            <text:p>432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57">
            <text:p>432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72">
            <text:p>432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74">
            <text:p>432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77">
            <text:p>432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85">
            <text:p>432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290">
            <text:p>432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95">
            <text:p>4329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296">
            <text:p>432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299">
            <text:p>4329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0">
            <text:p>4330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1">
            <text:p>433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2">
            <text:p>433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3">
            <text:p>433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4">
            <text:p>433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5">
            <text:p>433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306">
            <text:p>433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7">
            <text:p>433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8">
            <text:p>433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09">
            <text:p>433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0">
            <text:p>433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2">
            <text:p>433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3">
            <text:p>433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4">
            <text:p>433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315">
            <text:p>433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6">
            <text:p>433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7">
            <text:p>433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8">
            <text:p>433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19">
            <text:p>433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20">
            <text:p>433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21">
            <text:p>433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57">
            <text:p>433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66">
            <text:p>433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67">
            <text:p>433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78">
            <text:p>433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43384">
            <text:p>4338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423">
            <text:p>434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465">
            <text:p>434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467">
            <text:p>434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468">
            <text:p>434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480">
            <text:p>4348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3484">
            <text:p>4348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237">
            <text:p>472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245">
            <text:p>472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270">
            <text:p>472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355">
            <text:p>473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488">
            <text:p>474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1944 475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526">
            <text:p>475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593">
            <text:p>475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614">
            <text:p>476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703">
            <text:p>477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12">
            <text:p>477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14">
            <text:p>477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15">
            <text:p>47715</text:p>
          </table:table-cell>
          <table:table-cell table:number-columns-repeated="3"/>
        </table:table-row>
        <table:table-row table:style-name="ro1">
          <table:table-cell office:value-type="float" office:value="47727">
            <text:p>477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39">
            <text:p>477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44">
            <text:p>477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46">
            <text:p>477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60">
            <text:p>477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68">
            <text:p>477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71">
            <text:p>477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72">
            <text:p>477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76">
            <text:p>477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86">
            <text:p>4778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787">
            <text:p>477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04">
            <text:p>478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1935 478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1924 478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12">
            <text:p>478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13">
            <text:p>47813</text:p>
          </table:table-cell>
          <table:table-cell table:number-columns-repeated="3"/>
        </table:table-row>
        <table:table-row table:style-name="ro1">
          <table:table-cell office:value-type="float" office:value="47815">
            <text:p>478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16">
            <text:p>478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18">
            <text:p>478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26">
            <text:p>478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28">
            <text:p>478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1645 478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32">
            <text:p>478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43">
            <text:p>478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47">
            <text:p>478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48">
            <text:p>478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51">
            <text:p>478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47854">
            <text:p>4785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009">
            <text:p>56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32">
            <text:p>560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49">
            <text:p>560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51">
            <text:p>560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77">
            <text:p>560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78">
            <text:p>560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81">
            <text:p>560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87">
            <text:p>560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0">
            <text:p>560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1">
            <text:p>560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4">
            <text:p>560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4">
            <text:p>560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6">
            <text:p>560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097">
            <text:p>5609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56098">
            <text:p>560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103">
            <text:p>561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104">
            <text:p>561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105">
            <text:p>561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113">
            <text:p>561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301">
            <text:p>563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302">
            <text:p>563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303">
            <text:p>563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6312">
            <text:p>563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001">
            <text:p>57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2">
            <text:p>57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3">
            <text:p>57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5">
            <text:p>57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6">
            <text:p>57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7">
            <text:p>57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8">
            <text:p>57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09">
            <text:p>57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10">
            <text:p>57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11">
            <text:p>57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012">
            <text:p>57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301">
            <text:p>573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2">
            <text:p>573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3">
            <text:p>573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4">
            <text:p>573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57305">
            <text:p>573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6">
            <text:p>573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7">
            <text:p>573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8">
            <text:p>573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09">
            <text:p>573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0">
            <text:p>573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311">
            <text:p>573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2">
            <text:p>573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3">
            <text:p>573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4">
            <text:p>573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5">
            <text:p>573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316">
            <text:p>573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601">
            <text:p>576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57602">
            <text:p>576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603">
            <text:p>57603</text:p>
          </table:table-cell>
          <table:table-cell table:number-columns-repeated="3"/>
        </table:table-row>
        <table:table-row table:style-name="ro1">
          <table:table-cell office:value-type="float" office:value="57604">
            <text:p>576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7605">
            <text:p>5760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9001">
            <text:p>59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002">
            <text:p>59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003">
            <text:p>59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004">
            <text:p>59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005">
            <text:p>59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9101">
            <text:p>591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102">
            <text:p>591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103">
            <text:p>591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104">
            <text:p>591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9201">
            <text:p>592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202">
            <text:p>592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203">
            <text:p>592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204">
            <text:p>592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205">
            <text:p>592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59206">
            <text:p>592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001">
            <text:p>60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0002">
            <text:p>60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03">
            <text:p>60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04">
            <text:p>60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05">
            <text:p>60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07">
            <text:p>60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0008">
            <text:p>60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09">
            <text:p>60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0">
            <text:p>60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1">
            <text:p>60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2">
            <text:p>60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3">
            <text:p>60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4">
            <text:p>60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5">
            <text:p>60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7">
            <text:p>60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8">
            <text:p>60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19">
            <text:p>60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0">
            <text:p>60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1">
            <text:p>600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2">
            <text:p>600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3">
            <text:p>60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4">
            <text:p>60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5">
            <text:p>60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6">
            <text:p>60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7">
            <text:p>600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8">
            <text:p>60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29">
            <text:p>60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0">
            <text:p>60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1">
            <text:p>60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2">
            <text:p>600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3">
            <text:p>600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4">
            <text:p>600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5">
            <text:p>600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6">
            <text:p>600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7">
            <text:p>60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8">
            <text:p>600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39">
            <text:p>600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0">
            <text:p>600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1">
            <text:p>600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2">
            <text:p>600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3">
            <text:p>600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4">
            <text:p>600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5">
            <text:p>600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6">
            <text:p>600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7">
            <text:p>600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8">
            <text:p>600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49">
            <text:p>600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1">
            <text:p>600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2">
            <text:p>600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3">
            <text:p>600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4">
            <text:p>600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5">
            <text:p>600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6">
            <text:p>600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7">
            <text:p>600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8">
            <text:p>600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59">
            <text:p>600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0">
            <text:p>600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1">
            <text:p>600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2">
            <text:p>600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3">
            <text:p>600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0064">
            <text:p>600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5">
            <text:p>600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6">
            <text:p>600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0067">
            <text:p>600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8">
            <text:p>600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69">
            <text:p>600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0">
            <text:p>600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1">
            <text:p>600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2">
            <text:p>600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3">
            <text:p>6007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4">
            <text:p>600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5">
            <text:p>600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6">
            <text:p>600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7">
            <text:p>600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8">
            <text:p>600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79">
            <text:p>6007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1">
            <text:p>600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2">
            <text:p>600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3">
            <text:p>600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4">
            <text:p>6008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5">
            <text:p>600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6">
            <text:p>6008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7">
            <text:p>600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8">
            <text:p>600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89">
            <text:p>600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0">
            <text:p>600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1">
            <text:p>600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2">
            <text:p>6009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0093">
            <text:p>600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4">
            <text:p>600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5">
            <text:p>6009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6">
            <text:p>600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8">
            <text:p>600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099">
            <text:p>600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100">
            <text:p>601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0500">
            <text:p>605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001">
            <text:p>66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2">
            <text:p>66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3">
            <text:p>66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4">
            <text:p>66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5">
            <text:p>66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6">
            <text:p>66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7">
            <text:p>66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09">
            <text:p>66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1">
            <text:p>66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2">
            <text:p>66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3">
            <text:p>66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4">
            <text:p>66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5">
            <text:p>66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7">
            <text:p>66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8">
            <text:p>66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19">
            <text:p>66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0">
            <text:p>66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1">
            <text:p>660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3">
            <text:p>66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4">
            <text:p>66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5">
            <text:p>66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27">
            <text:p>660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0">
            <text:p>66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1">
            <text:p>66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4">
            <text:p>660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5">
            <text:p>660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7">
            <text:p>66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39">
            <text:p>660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0">
            <text:p>660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1">
            <text:p>660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3">
            <text:p>660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4">
            <text:p>660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7">
            <text:p>660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48">
            <text:p>660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0">
            <text:p>660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1">
            <text:p>660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3">
            <text:p>660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4">
            <text:p>660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5">
            <text:p>660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6">
            <text:p>660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7">
            <text:p>660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59">
            <text:p>660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0">
            <text:p>660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1">
            <text:p>660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3">
            <text:p>660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5">
            <text:p>6606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066">
            <text:p>6606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7">
            <text:p>660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8">
            <text:p>660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69">
            <text:p>660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0">
            <text:p>660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4">
            <text:p>660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5">
            <text:p>660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6">
            <text:p>660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7">
            <text:p>660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8">
            <text:p>660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79">
            <text:p>6607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0">
            <text:p>6608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2">
            <text:p>660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3">
            <text:p>660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5">
            <text:p>660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6">
            <text:p>6608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7">
            <text:p>660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8">
            <text:p>660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89">
            <text:p>660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0">
            <text:p>660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1">
            <text:p>660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2">
            <text:p>6609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3">
            <text:p>660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4">
            <text:p>660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5">
            <text:p>6609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6">
            <text:p>660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7">
            <text:p>6609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8">
            <text:p>660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099">
            <text:p>660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100">
            <text:p>661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1">
            <text:p>661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2">
            <text:p>661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3">
            <text:p>661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4">
            <text:p>661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5">
            <text:p>661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6">
            <text:p>661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7">
            <text:p>661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8">
            <text:p>661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09">
            <text:p>661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0">
            <text:p>661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1">
            <text:p>661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2">
            <text:p>661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3">
            <text:p>661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4">
            <text:p>661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5">
            <text:p>661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6">
            <text:p>661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7">
            <text:p>661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8">
            <text:p>661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19">
            <text:p>661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0">
            <text:p>661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1">
            <text:p>661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2">
            <text:p>661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4">
            <text:p>661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5">
            <text:p>661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6">
            <text:p>661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7">
            <text:p>661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8">
            <text:p>661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29">
            <text:p>661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0">
            <text:p>661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1">
            <text:p>661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2">
            <text:p>661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3">
            <text:p>661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4">
            <text:p>661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5">
            <text:p>661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6">
            <text:p>661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7">
            <text:p>661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8">
            <text:p>661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39">
            <text:p>661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0">
            <text:p>661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2">
            <text:p>661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3">
            <text:p>661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4">
            <text:p>661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5">
            <text:p>661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7">
            <text:p>661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8">
            <text:p>661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49">
            <text:p>661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0">
            <text:p>661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1">
            <text:p>661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2">
            <text:p>661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4">
            <text:p>661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5">
            <text:p>661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6">
            <text:p>661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58">
            <text:p>661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0">
            <text:p>661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1">
            <text:p>661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2">
            <text:p>661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4">
            <text:p>661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5">
            <text:p>661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7">
            <text:p>661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8">
            <text:p>661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69">
            <text:p>661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0">
            <text:p>661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1">
            <text:p>661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2">
            <text:p>661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4">
            <text:p>661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5">
            <text:p>661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6">
            <text:p>661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77">
            <text:p>661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1">
            <text:p>661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2">
            <text:p>661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5">
            <text:p>661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6">
            <text:p>6618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7">
            <text:p>661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88">
            <text:p>661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92">
            <text:p>6619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94">
            <text:p>661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97">
            <text:p>6619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98">
            <text:p>661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199">
            <text:p>661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200">
            <text:p>6620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206">
            <text:p>662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207">
            <text:p>662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221">
            <text:p>662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230">
            <text:p>662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301">
            <text:p>663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2">
            <text:p>663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3">
            <text:p>663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4">
            <text:p>663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5">
            <text:p>663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6">
            <text:p>663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7">
            <text:p>663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8">
            <text:p>663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09">
            <text:p>66309</text:p>
          </table:table-cell>
          <table:table-cell table:number-columns-repeated="3"/>
        </table:table-row>
        <table:table-row table:style-name="ro1">
          <table:table-cell office:value-type="float" office:value="66310">
            <text:p>66310</text:p>
          </table:table-cell>
          <table:table-cell table:number-columns-repeated="3"/>
        </table:table-row>
        <table:table-row table:style-name="ro1">
          <table:table-cell office:value-type="float" office:value="66311">
            <text:p>663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12">
            <text:p>66312</text:p>
          </table:table-cell>
          <table:table-cell table:number-columns-repeated="3"/>
        </table:table-row>
        <table:table-row table:style-name="ro1">
          <table:table-cell office:value-type="float" office:value="66313">
            <text:p>663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14">
            <text:p>663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315">
            <text:p>66315</text:p>
          </table:table-cell>
          <table:table-cell table:number-columns-repeated="3"/>
        </table:table-row>
        <table:table-row table:style-name="ro1">
          <table:table-cell office:value-type="float" office:value="66316">
            <text:p>663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413">
            <text:p>664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14">
            <text:p>664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15">
            <text:p>664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16">
            <text:p>664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18">
            <text:p>664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19">
            <text:p>664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0">
            <text:p>664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1">
            <text:p>664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2">
            <text:p>664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3">
            <text:p>664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4">
            <text:p>664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5">
            <text:p>664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6">
            <text:p>664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7">
            <text:p>664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8">
            <text:p>664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29">
            <text:p>664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30">
            <text:p>664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31">
            <text:p>664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32">
            <text:p>664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33">
            <text:p>664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434">
            <text:p>664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501">
            <text:p>665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2">
            <text:p>665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3">
            <text:p>665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4">
            <text:p>665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5">
            <text:p>665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6">
            <text:p>665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7">
            <text:p>665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8">
            <text:p>665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09">
            <text:p>665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0">
            <text:p>665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1">
            <text:p>665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2">
            <text:p>665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3">
            <text:p>665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4">
            <text:p>665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5">
            <text:p>665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7">
            <text:p>665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8">
            <text:p>665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19">
            <text:p>665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0">
            <text:p>665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2">
            <text:p>665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3">
            <text:p>665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4">
            <text:p>665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5">
            <text:p>665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6">
            <text:p>665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7">
            <text:p>665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8">
            <text:p>665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29">
            <text:p>665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1">
            <text:p>665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2">
            <text:p>665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3">
            <text:p>665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4">
            <text:p>665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5">
            <text:p>665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6">
            <text:p>665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7">
            <text:p>665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8">
            <text:p>665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39">
            <text:p>665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0">
            <text:p>665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1">
            <text:p>665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2">
            <text:p>665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3">
            <text:p>665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4">
            <text:p>665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545">
            <text:p>665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6">
            <text:p>665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7">
            <text:p>665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8">
            <text:p>665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49">
            <text:p>665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0">
            <text:p>665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1">
            <text:p>665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2">
            <text:p>665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3">
            <text:p>665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4">
            <text:p>665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5">
            <text:p>665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6">
            <text:p>665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7">
            <text:p>665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8">
            <text:p>665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59">
            <text:p>665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0">
            <text:p>665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1">
            <text:p>665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2">
            <text:p>665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3">
            <text:p>665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4">
            <text:p>665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5">
            <text:p>665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6">
            <text:p>6656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7">
            <text:p>665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8">
            <text:p>665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69">
            <text:p>665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70">
            <text:p>665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71">
            <text:p>665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72">
            <text:p>665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85">
            <text:p>6658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87">
            <text:p>665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88">
            <text:p>665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89">
            <text:p>665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0">
            <text:p>665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1">
            <text:p>665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2">
            <text:p>6659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3">
            <text:p>6659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4">
            <text:p>665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6">
            <text:p>665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7">
            <text:p>6659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8">
            <text:p>6659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599">
            <text:p>665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601">
            <text:p>666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2">
            <text:p>666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3">
            <text:p>666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4">
            <text:p>666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5">
            <text:p>666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6">
            <text:p>666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07">
            <text:p>666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0">
            <text:p>666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3">
            <text:p>666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4">
            <text:p>666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5">
            <text:p>666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6">
            <text:p>666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7">
            <text:p>666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8">
            <text:p>666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19">
            <text:p>666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20">
            <text:p>666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21">
            <text:p>666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22">
            <text:p>666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623">
            <text:p>666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701">
            <text:p>667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2">
            <text:p>667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3">
            <text:p>667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4">
            <text:p>667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5">
            <text:p>667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6">
            <text:p>667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7">
            <text:p>667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8">
            <text:p>667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09">
            <text:p>667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0">
            <text:p>667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1">
            <text:p>667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2">
            <text:p>667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3">
            <text:p>667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4">
            <text:p>667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5">
            <text:p>667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6">
            <text:p>667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7">
            <text:p>667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8">
            <text:p>667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19">
            <text:p>667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0">
            <text:p>667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21">
            <text:p>667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2">
            <text:p>667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3">
            <text:p>667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24">
            <text:p>667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5">
            <text:p>667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6">
            <text:p>667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27">
            <text:p>667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28">
            <text:p>667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29">
            <text:p>667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0">
            <text:p>667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1">
            <text:p>667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2">
            <text:p>667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33">
            <text:p>667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5">
            <text:p>667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6">
            <text:p>667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7">
            <text:p>667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8">
            <text:p>667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39">
            <text:p>667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0">
            <text:p>667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1">
            <text:p>667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2">
            <text:p>667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3">
            <text:p>667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4">
            <text:p>667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5">
            <text:p>667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6">
            <text:p>667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7">
            <text:p>667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8">
            <text:p>667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49">
            <text:p>667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0">
            <text:p>667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1">
            <text:p>667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2">
            <text:p>667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3">
            <text:p>6675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6754">
            <text:p>6675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5">
            <text:p>667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6">
            <text:p>667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7">
            <text:p>667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8">
            <text:p>6675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59">
            <text:p>667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0">
            <text:p>6676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1">
            <text:p>667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2">
            <text:p>667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3">
            <text:p>667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4">
            <text:p>667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5">
            <text:p>667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6">
            <text:p>6676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7">
            <text:p>6676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8">
            <text:p>6676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69">
            <text:p>667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0">
            <text:p>667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1">
            <text:p>6677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2">
            <text:p>6677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3">
            <text:p>6677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4">
            <text:p>6677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5">
            <text:p>6677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6">
            <text:p>6677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7">
            <text:p>6677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8">
            <text:p>6677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79">
            <text:p>6677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0">
            <text:p>6678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1">
            <text:p>6678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2">
            <text:p>6678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3">
            <text:p>6678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4">
            <text:p>6678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5">
            <text:p>66785</text:p>
          </table:table-cell>
          <table:table-cell table:number-columns-repeated="3"/>
        </table:table-row>
        <table:table-row table:style-name="ro1">
          <table:table-cell office:value-type="float" office:value="66786">
            <text:p>66786</text:p>
          </table:table-cell>
          <table:table-cell table:number-columns-repeated="3"/>
        </table:table-row>
        <table:table-row table:style-name="ro1">
          <table:table-cell office:value-type="float" office:value="66787">
            <text:p>6678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8">
            <text:p>6678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89">
            <text:p>6678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0">
            <text:p>6679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1">
            <text:p>6679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2">
            <text:p>66792</text:p>
          </table:table-cell>
          <table:table-cell table:number-columns-repeated="3"/>
        </table:table-row>
        <table:table-row table:style-name="ro1">
          <table:table-cell office:value-type="float" office:value="66793">
            <text:p>66793</text:p>
          </table:table-cell>
          <table:table-cell table:number-columns-repeated="3"/>
        </table:table-row>
        <table:table-row table:style-name="ro1">
          <table:table-cell office:value-type="float" office:value="66794">
            <text:p>6679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5">
            <text:p>66795</text:p>
          </table:table-cell>
          <table:table-cell table:number-columns-repeated="3"/>
        </table:table-row>
        <table:table-row table:style-name="ro1">
          <table:table-cell office:value-type="float" office:value="66796">
            <text:p>6679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7">
            <text:p>6679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798">
            <text:p>66798</text:p>
          </table:table-cell>
          <table:table-cell table:number-columns-repeated="3"/>
        </table:table-row>
        <table:table-row table:style-name="ro1">
          <table:table-cell office:value-type="float" office:value="66799">
            <text:p>6679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846">
            <text:p>668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847">
            <text:p>668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848">
            <text:p>668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849">
            <text:p>668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850">
            <text:p>668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951">
            <text:p>669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952">
            <text:p>669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953">
            <text:p>6695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955">
            <text:p>6695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956">
            <text:p>6695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6957">
            <text:p>6695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7001">
            <text:p>67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02">
            <text:p>67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03">
            <text:p>67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04">
            <text:p>67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05">
            <text:p>67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06">
            <text:p>67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07">
            <text:p>67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08">
            <text:p>67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09">
            <text:p>67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0">
            <text:p>67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1">
            <text:p>67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2">
            <text:p>67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13">
            <text:p>67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4">
            <text:p>67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5">
            <text:p>67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6">
            <text:p>67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7">
            <text:p>67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18">
            <text:p>67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19">
            <text:p>67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0">
            <text:p>67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1">
            <text:p>670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2">
            <text:p>670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3">
            <text:p>67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4">
            <text:p>670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7025">
            <text:p>67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6">
            <text:p>67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7">
            <text:p>670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8">
            <text:p>67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29">
            <text:p>67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7030">
            <text:p>67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8001">
            <text:p>68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2">
            <text:p>68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3">
            <text:p>68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4">
            <text:p>68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8005">
            <text:p>68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6">
            <text:p>68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7">
            <text:p>68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8">
            <text:p>68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09">
            <text:p>68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0">
            <text:p>68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1">
            <text:p>68011</text:p>
          </table:table-cell>
          <table:table-cell table:number-columns-repeated="3"/>
        </table:table-row>
        <table:table-row table:style-name="ro1">
          <table:table-cell office:value-type="float" office:value="68012">
            <text:p>68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3">
            <text:p>68013</text:p>
          </table:table-cell>
          <table:table-cell table:number-columns-repeated="3"/>
        </table:table-row>
        <table:table-row table:style-name="ro1">
          <table:table-cell office:value-type="float" office:value="68014">
            <text:p>68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5">
            <text:p>68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6">
            <text:p>68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7">
            <text:p>68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8">
            <text:p>68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19">
            <text:p>68019</text:p>
          </table:table-cell>
          <table:table-cell table:number-columns-repeated="3"/>
        </table:table-row>
        <table:table-row table:style-name="ro1">
          <table:table-cell office:value-type="float" office:value="68020">
            <text:p>68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1">
            <text:p>680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2">
            <text:p>680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3">
            <text:p>68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4">
            <text:p>68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5">
            <text:p>68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6">
            <text:p>68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68027">
            <text:p>680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8">
            <text:p>68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29">
            <text:p>68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30">
            <text:p>68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31">
            <text:p>68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32">
            <text:p>680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8033">
            <text:p>68033</text:p>
          </table:table-cell>
          <table:table-cell table:number-columns-repeated="3"/>
        </table:table-row>
        <table:table-row table:style-name="ro1">
          <table:table-cell office:value-type="float" office:value="68034">
            <text:p>680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9001">
            <text:p>69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2">
            <text:p>69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3">
            <text:p>69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5">
            <text:p>69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6">
            <text:p>69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7">
            <text:p>69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8">
            <text:p>69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09">
            <text:p>69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10">
            <text:p>69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11">
            <text:p>69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12">
            <text:p>69012</text:p>
          </table:table-cell>
          <table:table-cell table:number-columns-repeated="3"/>
        </table:table-row>
        <table:table-row table:style-name="ro1">
          <table:table-cell office:value-type="float" office:value="69013">
            <text:p>69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69014">
            <text:p>69014</text:p>
          </table:table-cell>
          <table:table-cell table:number-columns-repeated="3"/>
        </table:table-row>
        <table:table-row table:style-name="ro1">
          <table:table-cell office:value-type="float" office:value="69015">
            <text:p>69015</text:p>
          </table:table-cell>
          <table:table-cell table:number-columns-repeated="3"/>
        </table:table-row>
        <table:table-row table:style-name="ro1">
          <table:table-cell office:value-type="float" office:value="69016">
            <text:p>690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001">
            <text:p>70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2">
            <text:p>70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3">
            <text:p>70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4">
            <text:p>70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5">
            <text:p>70005</text:p>
          </table:table-cell>
          <table:table-cell table:number-columns-repeated="3"/>
        </table:table-row>
        <table:table-row table:style-name="ro1">
          <table:table-cell office:value-type="float" office:value="70006">
            <text:p>70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7">
            <text:p>70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8">
            <text:p>70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09">
            <text:p>70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0">
            <text:p>70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1">
            <text:p>70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3">
            <text:p>70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4">
            <text:p>70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5">
            <text:p>70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6">
            <text:p>70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7">
            <text:p>70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8">
            <text:p>70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19">
            <text:p>70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020">
            <text:p>70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801">
            <text:p>708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2">
            <text:p>708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3">
            <text:p>708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4">
            <text:p>708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5">
            <text:p>708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6">
            <text:p>708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7">
            <text:p>708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8">
            <text:p>708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09">
            <text:p>708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0">
            <text:p>708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1">
            <text:p>708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2">
            <text:p>708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3">
            <text:p>70813</text:p>
          </table:table-cell>
          <table:table-cell table:number-columns-repeated="3"/>
        </table:table-row>
        <table:table-row table:style-name="ro1">
          <table:table-cell office:value-type="float" office:value="70814">
            <text:p>708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5">
            <text:p>708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6">
            <text:p>708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0817">
            <text:p>708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7301">
            <text:p>973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302">
            <text:p>973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303">
            <text:p>973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304">
            <text:p>973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001">
            <text:p>73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101">
            <text:p>731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07">
            <text:p>731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09">
            <text:p>731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string">
            <text:p>D6016 731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14">
            <text:p>731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19">
            <text:p>731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28">
            <text:p>731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33">
            <text:p>73133</text:p>
          </table:table-cell>
          <table:table-cell table:number-columns-repeated="3"/>
        </table:table-row>
        <table:table-row table:style-name="ro1">
          <table:table-cell office:value-type="float" office:value="73136">
            <text:p>731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38">
            <text:p>731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39">
            <text:p>731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141">
            <text:p>731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201">
            <text:p>732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202">
            <text:p>73202</text:p>
          </table:table-cell>
          <table:table-cell table:number-columns-repeated="3"/>
        </table:table-row>
        <table:table-row table:style-name="ro1">
          <table:table-cell office:value-type="float" office:value="73212">
            <text:p>732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213">
            <text:p>732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235">
            <text:p>732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951">
            <text:p>7395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52">
            <text:p>7395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961">
            <text:p>7396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2">
            <text:p>7396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3">
            <text:p>7396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4">
            <text:p>7396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6">
            <text:p>7396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67">
            <text:p>73967</text:p>
          </table:table-cell>
          <table:table-cell table:number-columns-repeated="3"/>
        </table:table-row>
        <table:table-row table:style-name="ro1">
          <table:table-cell office:value-type="float" office:value="73968">
            <text:p>73968</text:p>
          </table:table-cell>
          <table:table-cell table:number-columns-repeated="3"/>
        </table:table-row>
        <table:table-row table:style-name="ro1">
          <table:table-cell office:value-type="float" office:value="73969">
            <text:p>7396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70">
            <text:p>7397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73971">
            <text:p>7397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6101">
            <text:p>861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6259">
            <text:p>8625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6401">
            <text:p>864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002">
            <text:p>870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8001">
            <text:p>88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88002">
            <text:p>88002</text:p>
          </table:table-cell>
          <table:table-cell table:number-columns-repeated="3"/>
        </table:table-row>
        <table:table-row table:style-name="ro1">
          <table:table-cell office:value-type="float" office:value="88003">
            <text:p>880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88004">
            <text:p>88004</text:p>
          </table:table-cell>
          <table:table-cell table:number-columns-repeated="3"/>
        </table:table-row>
        <table:table-row table:style-name="ro1">
          <table:table-cell office:value-type="float" office:value="88005">
            <text:p>88005</text:p>
          </table:table-cell>
          <table:table-cell table:number-columns-repeated="3"/>
        </table:table-row>
        <table:table-row table:style-name="ro1">
          <table:table-cell office:value-type="float" office:value="88006">
            <text:p>88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88007">
            <text:p>88007</text:p>
          </table:table-cell>
          <table:table-cell table:number-columns-repeated="3"/>
        </table:table-row>
        <table:table-row table:style-name="ro1">
          <table:table-cell office:value-type="float" office:value="88008">
            <text:p>88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88009">
            <text:p>88009</text:p>
          </table:table-cell>
          <table:table-cell table:number-columns-repeated="3"/>
        </table:table-row>
        <table:table-row table:style-name="ro1">
          <table:table-cell office:value-type="float" office:value="88010">
            <text:p>88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9001">
            <text:p>89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0001">
            <text:p>9000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02">
            <text:p>90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03">
            <text:p>90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04">
            <text:p>90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05">
            <text:p>90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06">
            <text:p>9000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07">
            <text:p>90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08">
            <text:p>90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09">
            <text:p>90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0">
            <text:p>90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11">
            <text:p>90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2">
            <text:p>900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3">
            <text:p>90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4">
            <text:p>90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5">
            <text:p>90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6">
            <text:p>90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7">
            <text:p>90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8">
            <text:p>90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19">
            <text:p>90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0">
            <text:p>90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0021">
            <text:p>900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2">
            <text:p>900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3">
            <text:p>90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4">
            <text:p>9002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5">
            <text:p>900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6">
            <text:p>90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7">
            <text:p>9002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8">
            <text:p>90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29">
            <text:p>90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0">
            <text:p>9003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1">
            <text:p>90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2">
            <text:p>900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3">
            <text:p>900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4">
            <text:p>9003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5">
            <text:p>900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6">
            <text:p>900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7">
            <text:p>90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8">
            <text:p>900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39">
            <text:p>9003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0">
            <text:p>900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1">
            <text:p>900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2">
            <text:p>900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3">
            <text:p>900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4">
            <text:p>900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5">
            <text:p>900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6">
            <text:p>9004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7">
            <text:p>9004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8">
            <text:p>9004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50">
            <text:p>9005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1101">
            <text:p>91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05">
            <text:p>91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06">
            <text:p>91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07">
            <text:p>91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09">
            <text:p>91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10">
            <text:p>91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11">
            <text:p>91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14">
            <text:p>91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17">
            <text:p>911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19">
            <text:p>91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20">
            <text:p>91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24">
            <text:p>91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27">
            <text:p>911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office:value-type="float" office:value="91130">
            <text:p>911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2001">
            <text:p>92001</text:p>
          </table:table-cell>
          <table:table-cell table:number-columns-repeated="3"/>
        </table:table-row>
        <table:table-row table:style-name="ro1">
          <table:table-cell office:value-type="float" office:value="92002">
            <text:p>92002</text:p>
          </table:table-cell>
          <table:table-cell table:number-columns-repeated="3"/>
        </table:table-row>
        <table:table-row table:style-name="ro1">
          <table:table-cell office:value-type="float" office:value="92003">
            <text:p>92003</text:p>
          </table:table-cell>
          <table:table-cell table:number-columns-repeated="3"/>
        </table:table-row>
        <table:table-row table:style-name="ro1">
          <table:table-cell office:value-type="float" office:value="92004">
            <text:p>920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06">
            <text:p>92006</text:p>
          </table:table-cell>
          <table:table-cell table:number-columns-repeated="3"/>
        </table:table-row>
        <table:table-row table:style-name="ro1">
          <table:table-cell office:value-type="float" office:value="92007">
            <text:p>920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08">
            <text:p>920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09">
            <text:p>9200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0">
            <text:p>920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1">
            <text:p>92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3">
            <text:p>92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4">
            <text:p>920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5">
            <text:p>920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6">
            <text:p>920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7">
            <text:p>9201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8">
            <text:p>920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19">
            <text:p>9201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20">
            <text:p>920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21">
            <text:p>92021</text:p>
          </table:table-cell>
          <table:table-cell table:number-columns-repeated="3"/>
        </table:table-row>
        <table:table-row table:style-name="ro1">
          <table:table-cell office:value-type="float" office:value="92023">
            <text:p>9202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28">
            <text:p>9202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29">
            <text:p>92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1">
            <text:p>9203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2">
            <text:p>9203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3">
            <text:p>920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5">
            <text:p>920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6">
            <text:p>920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7">
            <text:p>92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38">
            <text:p>9203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0">
            <text:p>9204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1">
            <text:p>9204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2">
            <text:p>9204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3">
            <text:p>9204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4">
            <text:p>9204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5">
            <text:p>9204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2046">
            <text:p>9204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3001">
            <text:p>93001</text:p>
          </table:table-cell>
          <table:table-cell table:number-columns-repeated="3"/>
        </table:table-row>
        <table:table-row table:style-name="ro1">
          <table:table-cell office:value-type="float" office:value="93002">
            <text:p>93002</text:p>
          </table:table-cell>
          <table:table-cell table:number-columns-repeated="3"/>
        </table:table-row>
        <table:table-row table:style-name="ro1">
          <table:table-cell office:value-type="float" office:value="93003">
            <text:p>93003</text:p>
          </table:table-cell>
          <table:table-cell table:number-columns-repeated="3"/>
        </table:table-row>
        <table:table-row table:style-name="ro1">
          <table:table-cell office:value-type="float" office:value="93004">
            <text:p>93004</text:p>
          </table:table-cell>
          <table:table-cell table:number-columns-repeated="3"/>
        </table:table-row>
        <table:table-row table:style-name="ro1">
          <table:table-cell office:value-type="float" office:value="93005">
            <text:p>93005</text:p>
          </table:table-cell>
          <table:table-cell table:number-columns-repeated="3"/>
        </table:table-row>
        <table:table-row table:style-name="ro1">
          <table:table-cell office:value-type="float" office:value="93006">
            <text:p>93006</text:p>
          </table:table-cell>
          <table:table-cell table:number-columns-repeated="3"/>
        </table:table-row>
        <table:table-row table:style-name="ro1">
          <table:table-cell office:value-type="float" office:value="93007">
            <text:p>93007</text:p>
          </table:table-cell>
          <table:table-cell table:number-columns-repeated="3"/>
        </table:table-row>
        <table:table-row table:style-name="ro1">
          <table:table-cell office:value-type="float" office:value="93008">
            <text:p>93008</text:p>
          </table:table-cell>
          <table:table-cell table:number-columns-repeated="3"/>
        </table:table-row>
        <table:table-row table:style-name="ro1">
          <table:table-cell office:value-type="float" office:value="93009">
            <text:p>93009</text:p>
          </table:table-cell>
          <table:table-cell table:number-columns-repeated="3"/>
        </table:table-row>
        <table:table-row table:style-name="ro1">
          <table:table-cell office:value-type="float" office:value="93010">
            <text:p>93010</text:p>
          </table:table-cell>
          <table:table-cell table:number-columns-repeated="3"/>
        </table:table-row>
        <table:table-row table:style-name="ro1">
          <table:table-cell office:value-type="float" office:value="93011">
            <text:p>93011</text:p>
          </table:table-cell>
          <table:table-cell table:number-columns-repeated="3"/>
        </table:table-row>
        <table:table-row table:style-name="ro1">
          <table:table-cell office:value-type="float" office:value="93012">
            <text:p>93012</text:p>
          </table:table-cell>
          <table:table-cell table:number-columns-repeated="3"/>
        </table:table-row>
        <table:table-row table:style-name="ro1">
          <table:table-cell office:value-type="float" office:value="93013">
            <text:p>93013</text:p>
          </table:table-cell>
          <table:table-cell table:number-columns-repeated="3"/>
        </table:table-row>
        <table:table-row table:style-name="ro1">
          <table:table-cell office:value-type="float" office:value="93014">
            <text:p>93014</text:p>
          </table:table-cell>
          <table:table-cell table:number-columns-repeated="3"/>
        </table:table-row>
        <table:table-row table:style-name="ro1">
          <table:table-cell office:value-type="float" office:value="93015">
            <text:p>93015</text:p>
          </table:table-cell>
          <table:table-cell table:number-columns-repeated="3"/>
        </table:table-row>
        <table:table-row table:style-name="ro1">
          <table:table-cell office:value-type="float" office:value="93016">
            <text:p>93016</text:p>
          </table:table-cell>
          <table:table-cell table:number-columns-repeated="3"/>
        </table:table-row>
        <table:table-row table:style-name="ro1">
          <table:table-cell office:value-type="float" office:value="93017">
            <text:p>93017</text:p>
          </table:table-cell>
          <table:table-cell table:number-columns-repeated="3"/>
        </table:table-row>
        <table:table-row table:style-name="ro1">
          <table:table-cell office:value-type="float" office:value="93018">
            <text:p>93018</text:p>
          </table:table-cell>
          <table:table-cell table:number-columns-repeated="3"/>
        </table:table-row>
        <table:table-row table:style-name="ro1">
          <table:table-cell office:value-type="float" office:value="93019">
            <text:p>93019</text:p>
          </table:table-cell>
          <table:table-cell table:number-columns-repeated="3"/>
        </table:table-row>
        <table:table-row table:style-name="ro1">
          <table:table-cell office:value-type="float" office:value="93020">
            <text:p>93020</text:p>
          </table:table-cell>
          <table:table-cell table:number-columns-repeated="3"/>
        </table:table-row>
        <table:table-row table:style-name="ro1">
          <table:table-cell office:value-type="float" office:value="93021">
            <text:p>93021</text:p>
          </table:table-cell>
          <table:table-cell table:number-columns-repeated="3"/>
        </table:table-row>
        <table:table-row table:style-name="ro1">
          <table:table-cell office:value-type="float" office:value="93022">
            <text:p>93022</text:p>
          </table:table-cell>
          <table:table-cell table:number-columns-repeated="3"/>
        </table:table-row>
        <table:table-row table:style-name="ro1">
          <table:table-cell office:value-type="float" office:value="93023">
            <text:p>93023</text:p>
          </table:table-cell>
          <table:table-cell table:number-columns-repeated="3"/>
        </table:table-row>
        <table:table-row table:style-name="ro1">
          <table:table-cell office:value-type="float" office:value="93024">
            <text:p>93024</text:p>
          </table:table-cell>
          <table:table-cell table:number-columns-repeated="3"/>
        </table:table-row>
        <table:table-row table:style-name="ro1">
          <table:table-cell office:value-type="float" office:value="93025">
            <text:p>93025</text:p>
          </table:table-cell>
          <table:table-cell table:number-columns-repeated="3"/>
        </table:table-row>
        <table:table-row table:style-name="ro1">
          <table:table-cell office:value-type="float" office:value="93026">
            <text:p>93026</text:p>
          </table:table-cell>
          <table:table-cell table:number-columns-repeated="3"/>
        </table:table-row>
        <table:table-row table:style-name="ro1">
          <table:table-cell office:value-type="float" office:value="93027">
            <text:p>93027</text:p>
          </table:table-cell>
          <table:table-cell table:number-columns-repeated="3"/>
        </table:table-row>
        <table:table-row table:style-name="ro1">
          <table:table-cell office:value-type="float" office:value="93028">
            <text:p>93028</text:p>
          </table:table-cell>
          <table:table-cell table:number-columns-repeated="3"/>
        </table:table-row>
        <table:table-row table:style-name="ro1">
          <table:table-cell office:value-type="float" office:value="93029">
            <text:p>93029</text:p>
          </table:table-cell>
          <table:table-cell table:number-columns-repeated="3"/>
        </table:table-row>
        <table:table-row table:style-name="ro1">
          <table:table-cell office:value-type="float" office:value="93030">
            <text:p>9303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urotunnel Locomotives</text:p>
          </table:table-cell>
          <table:table-cell table:number-columns-repeated="3"/>
        </table:table-row>
        <table:table-row table:style-name="ro1">
          <table:table-cell office:value-type="float" office:value="21901">
            <text:p>21901</text:p>
          </table:table-cell>
          <table:table-cell table:number-columns-repeated="3"/>
        </table:table-row>
        <table:table-row table:style-name="ro1">
          <table:table-cell office:value-type="float" office:value="21902">
            <text:p>21902</text:p>
          </table:table-cell>
          <table:table-cell table:number-columns-repeated="3"/>
        </table:table-row>
        <table:table-row table:style-name="ro1">
          <table:table-cell office:value-type="float" office:value="21903">
            <text:p>21903</text:p>
          </table:table-cell>
          <table:table-cell table:number-columns-repeated="3"/>
        </table:table-row>
        <table:table-row table:style-name="ro1">
          <table:table-cell office:value-type="float" office:value="21904">
            <text:p>21904</text:p>
          </table:table-cell>
          <table:table-cell table:number-columns-repeated="3"/>
        </table:table-row>
        <table:table-row table:style-name="ro1">
          <table:table-cell office:value-type="float" office:value="21905">
            <text:p>21905</text:p>
          </table:table-cell>
          <table:table-cell table:number-columns-repeated="3"/>
        </table:table-row>
        <table:table-row table:style-name="ro1">
          <table:table-cell office:value-type="float" office:value="21906">
            <text:p>21906</text:p>
          </table:table-cell>
          <table:table-cell table:number-columns-repeated="3"/>
        </table:table-row>
        <table:table-row table:style-name="ro1">
          <table:table-cell office:value-type="float" office:value="21907">
            <text:p>21907</text:p>
          </table:table-cell>
          <table:table-cell table:number-columns-repeated="3"/>
        </table:table-row>
        <table:table-row table:style-name="ro1">
          <table:table-cell office:value-type="float" office:value="21908">
            <text:p>21908</text:p>
          </table:table-cell>
          <table:table-cell table:number-columns-repeated="3"/>
        </table:table-row>
        <table:table-row table:style-name="ro1">
          <table:table-cell office:value-type="float" office:value="21909">
            <text:p>21909</text:p>
          </table:table-cell>
          <table:table-cell table:number-columns-repeated="3"/>
        </table:table-row>
        <table:table-row table:style-name="ro1">
          <table:table-cell office:value-type="float" office:value="21910">
            <text:p>219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005">
            <text:p>900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07">
            <text:p>9007</text:p>
          </table:table-cell>
          <table:table-cell table:number-columns-repeated="3"/>
        </table:table-row>
        <table:table-row table:style-name="ro1">
          <table:table-cell office:value-type="float" office:value="9011">
            <text:p>901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13">
            <text:p>901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15">
            <text:p>9015</text:p>
          </table:table-cell>
          <table:table-cell table:number-columns-repeated="3"/>
        </table:table-row>
        <table:table-row table:style-name="ro1">
          <table:table-cell office:value-type="float" office:value="9018">
            <text:p>9018</text:p>
          </table:table-cell>
          <table:table-cell table:number-columns-repeated="3"/>
        </table:table-row>
        <table:table-row table:style-name="ro1">
          <table:table-cell office:value-type="float" office:value="9022">
            <text:p>9022</text:p>
          </table:table-cell>
          <table:table-cell table:number-columns-repeated="3"/>
        </table:table-row>
        <table:table-row table:style-name="ro1">
          <table:table-cell office:value-type="float" office:value="9024">
            <text:p>9024</text:p>
          </table:table-cell>
          <table:table-cell table:number-columns-repeated="3"/>
        </table:table-row>
        <table:table-row table:style-name="ro1">
          <table:table-cell office:value-type="float" office:value="9026">
            <text:p>902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29">
            <text:p>9029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33">
            <text:p>903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36">
            <text:p>903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037">
            <text:p>903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701">
            <text:p>9701</text:p>
          </table:table-cell>
          <table:table-cell table:number-columns-repeated="3"/>
        </table:table-row>
        <table:table-row table:style-name="ro1">
          <table:table-cell office:value-type="float" office:value="9702">
            <text:p>970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03">
            <text:p>9703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04">
            <text:p>97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05">
            <text:p>9705</text:p>
          </table:table-cell>
          <table:table-cell table:number-columns-repeated="3"/>
        </table:table-row>
        <table:table-row table:style-name="ro1">
          <table:table-cell office:value-type="float" office:value="9706">
            <text:p>9706</text:p>
          </table:table-cell>
          <table:table-cell table:number-columns-repeated="3"/>
        </table:table-row>
        <table:table-row table:style-name="ro1">
          <table:table-cell office:value-type="float" office:value="9707">
            <text:p>9707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11">
            <text:p>9711</text:p>
          </table:table-cell>
          <table:table-cell table:number-columns-repeated="3"/>
        </table:table-row>
        <table:table-row table:style-name="ro1">
          <table:table-cell office:value-type="float" office:value="9712">
            <text:p>97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13">
            <text:p>9713</text:p>
          </table:table-cell>
          <table:table-cell table:number-columns-repeated="3"/>
        </table:table-row>
        <table:table-row table:style-name="ro1">
          <table:table-cell office:value-type="float" office:value="9714">
            <text:p>9714</text:p>
          </table:table-cell>
          <table:table-cell table:number-columns-repeated="3"/>
        </table:table-row>
        <table:table-row table:style-name="ro1">
          <table:table-cell office:value-type="float" office:value="9715">
            <text:p>971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16">
            <text:p>9716</text:p>
          </table:table-cell>
          <table:table-cell table:number-columns-repeated="3"/>
        </table:table-row>
        <table:table-row table:style-name="ro1">
          <table:table-cell office:value-type="float" office:value="9717">
            <text:p>9717</text:p>
          </table:table-cell>
          <table:table-cell table:number-columns-repeated="3"/>
        </table:table-row>
        <table:table-row table:style-name="ro1">
          <table:table-cell office:value-type="float" office:value="9718">
            <text:p>971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19">
            <text:p>9719</text:p>
          </table:table-cell>
          <table:table-cell table:number-columns-repeated="3"/>
        </table:table-row>
        <table:table-row table:style-name="ro1">
          <table:table-cell office:value-type="float" office:value="9720">
            <text:p>9720</text:p>
          </table:table-cell>
          <table:table-cell table:number-columns-repeated="3"/>
        </table:table-row>
        <table:table-row table:style-name="ro1">
          <table:table-cell office:value-type="float" office:value="9721">
            <text:p>9721</text:p>
          </table:table-cell>
          <table:table-cell table:number-columns-repeated="3"/>
        </table:table-row>
        <table:table-row table:style-name="ro1">
          <table:table-cell office:value-type="float" office:value="9722">
            <text:p>972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723">
            <text:p>972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801">
            <text:p>9801</text:p>
          </table:table-cell>
          <table:table-cell table:number-columns-repeated="3"/>
        </table:table-row>
        <table:table-row table:style-name="ro1">
          <table:table-cell office:value-type="float" office:value="9802">
            <text:p>9802</text:p>
          </table:table-cell>
          <table:table-cell table:number-columns-repeated="3"/>
        </table:table-row>
        <table:table-row table:style-name="ro1">
          <table:table-cell office:value-type="float" office:value="9803">
            <text:p>9803</text:p>
          </table:table-cell>
          <table:table-cell table:number-columns-repeated="3"/>
        </table:table-row>
        <table:table-row table:style-name="ro1">
          <table:table-cell office:value-type="float" office:value="9804">
            <text:p>9804</text:p>
          </table:table-cell>
          <table:table-cell table:number-columns-repeated="3"/>
        </table:table-row>
        <table:table-row table:style-name="ro1">
          <table:table-cell office:value-type="float" office:value="9805">
            <text:p>9805</text:p>
          </table:table-cell>
          <table:table-cell table:number-columns-repeated="3"/>
        </table:table-row>
        <table:table-row table:style-name="ro1">
          <table:table-cell office:value-type="float" office:value="9806">
            <text:p>9806</text:p>
          </table:table-cell>
          <table:table-cell table:number-columns-repeated="3"/>
        </table:table-row>
        <table:table-row table:style-name="ro1">
          <table:table-cell office:value-type="float" office:value="9808">
            <text:p>9808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09">
            <text:p>9809</text:p>
          </table:table-cell>
          <table:table-cell table:number-columns-repeated="3"/>
        </table:table-row>
        <table:table-row table:style-name="ro1">
          <table:table-cell office:value-type="float" office:value="9810">
            <text:p>981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12">
            <text:p>9812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14">
            <text:p>981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16">
            <text:p>9816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19">
            <text:p>9819</text:p>
          </table:table-cell>
          <table:table-cell table:number-columns-repeated="3"/>
        </table:table-row>
        <table:table-row table:style-name="ro1">
          <table:table-cell office:value-type="float" office:value="9820">
            <text:p>9820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21">
            <text:p>9821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23">
            <text:p>9823</text:p>
          </table:table-cell>
          <table:table-cell table:number-columns-repeated="3"/>
        </table:table-row>
        <table:table-row table:style-name="ro1">
          <table:table-cell office:value-type="float" office:value="9825">
            <text:p>982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27">
            <text:p>9827</text:p>
          </table:table-cell>
          <table:table-cell table:number-columns-repeated="3"/>
        </table:table-row>
        <table:table-row table:style-name="ro1">
          <table:table-cell office:value-type="float" office:value="9828">
            <text:p>9828</text:p>
          </table:table-cell>
          <table:table-cell table:number-columns-repeated="3"/>
        </table:table-row>
        <table:table-row table:style-name="ro1">
          <table:table-cell office:value-type="float" office:value="9831">
            <text:p>9831</text:p>
          </table:table-cell>
          <table:table-cell table:number-columns-repeated="3"/>
        </table:table-row>
        <table:table-row table:style-name="ro1">
          <table:table-cell office:value-type="float" office:value="9832">
            <text:p>9832</text:p>
          </table:table-cell>
          <table:table-cell table:number-columns-repeated="3"/>
        </table:table-row>
        <table:table-row table:style-name="ro1">
          <table:table-cell office:value-type="float" office:value="9834">
            <text:p>9834</text:p>
          </table:table-cell>
          <table:table-cell table:number-columns-repeated="3"/>
        </table:table-row>
        <table:table-row table:style-name="ro1">
          <table:table-cell office:value-type="float" office:value="9835">
            <text:p>9835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1">
          <table:table-cell office:value-type="float" office:value="9838">
            <text:p>9838</text:p>
          </table:table-cell>
          <table:table-cell table:number-columns-repeated="3"/>
        </table:table-row>
        <table:table-row table:style-name="ro1">
          <table:table-cell office:value-type="float" office:value="9840">
            <text:p>984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20/08/2025</text:date>, <text:time>13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06-27T18:03:01.87</meta:creation-date>
    <dc:date>2025-08-20T13:59:31.70</dc:date>
    <dc:creator>David </dc:creator>
    <meta:editing-duration>P7DT13H7M6S</meta:editing-duration>
    <meta:editing-cycles>86</meta:editing-cycles>
    <meta:generator>OpenOffice/4.1.7$Win32 OpenOffice.org_project/417m1$Build-9800</meta:generator>
    <meta:document-statistic meta:table-count="1" meta:cell-count="2969" meta:object-count="0"/>
  </office:meta>
</office:document-meta>
</file>