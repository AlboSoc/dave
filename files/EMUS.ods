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318250">
            <text:p>3182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51">
            <text:p>31825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52">
            <text:p>31825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53">
            <text:p>31825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54">
            <text:p>3182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18255">
            <text:p>31825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56">
            <text:p>318256</text:p>
          </table:table-cell>
          <table:table-cell table:number-columns-repeated="9"/>
        </table:table-row>
        <table:table-row table:style-name="ro1">
          <table:table-cell office:value-type="float" office:value="318257">
            <text:p>31825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58">
            <text:p>31825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59">
            <text:p>3182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18260">
            <text:p>31826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61">
            <text:p>3182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62">
            <text:p>31826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63">
            <text:p>31826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65">
            <text:p>318265</text:p>
          </table:table-cell>
          <table:table-cell table:number-columns-repeated="9"/>
        </table:table-row>
        <table:table-row table:style-name="ro1">
          <table:table-cell office:value-type="float" office:value="318266">
            <text:p>31826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67">
            <text:p>318267</text:p>
          </table:table-cell>
          <table:table-cell table:number-columns-repeated="9"/>
        </table:table-row>
        <table:table-row table:style-name="ro1">
          <table:table-cell office:value-type="float" office:value="318268">
            <text:p>31826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69">
            <text:p>31826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8270">
            <text:p>31827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9220">
            <text:p>3192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9371">
            <text:p>31937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9377">
            <text:p>31937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19380">
            <text:p>31938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301">
            <text:p>320301</text:p>
          </table:table-cell>
          <table:table-cell table:number-columns-repeated="9"/>
        </table:table-row>
        <table:table-row table:style-name="ro1">
          <table:table-cell office:value-type="float" office:value="320302">
            <text:p>3203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03">
            <text:p>3203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04">
            <text:p>3203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05">
            <text:p>320305</text:p>
          </table:table-cell>
          <table:table-cell table:number-columns-repeated="9"/>
        </table:table-row>
        <table:table-row table:style-name="ro1">
          <table:table-cell office:value-type="float" office:value="320306">
            <text:p>3203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07">
            <text:p>320307</text:p>
          </table:table-cell>
          <table:table-cell table:number-columns-repeated="9"/>
        </table:table-row>
        <table:table-row table:style-name="ro1">
          <table:table-cell office:value-type="float" office:value="320308">
            <text:p>3203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09">
            <text:p>320309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0310">
            <text:p>3203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11">
            <text:p>3203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12">
            <text:p>3203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13">
            <text:p>320313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0314">
            <text:p>320314</text:p>
          </table:table-cell>
          <table:table-cell table:number-columns-repeated="9"/>
        </table:table-row>
        <table:table-row table:style-name="ro1">
          <table:table-cell office:value-type="float" office:value="320315">
            <text:p>3203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16">
            <text:p>3203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17">
            <text:p>3203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18">
            <text:p>3203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19">
            <text:p>3203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20">
            <text:p>320320</text:p>
          </table:table-cell>
          <table:table-cell table:number-columns-repeated="9"/>
        </table:table-row>
        <table:table-row table:style-name="ro1">
          <table:table-cell office:value-type="float" office:value="320321">
            <text:p>3203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0322">
            <text:p>3203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401">
            <text:p>320401</text:p>
          </table:table-cell>
          <table:table-cell table:number-columns-repeated="9"/>
        </table:table-row>
        <table:table-row table:style-name="ro1">
          <table:table-cell office:value-type="float" office:value="320403">
            <text:p>320403</text:p>
          </table:table-cell>
          <table:table-cell table:number-columns-repeated="9"/>
        </table:table-row>
        <table:table-row table:style-name="ro1">
          <table:table-cell office:value-type="float" office:value="320404">
            <text:p>320404</text:p>
          </table:table-cell>
          <table:table-cell table:number-columns-repeated="9"/>
        </table:table-row>
        <table:table-row table:style-name="ro1">
          <table:table-cell office:value-type="float" office:value="320411">
            <text:p>320411</text:p>
          </table:table-cell>
          <table:table-cell table:number-columns-repeated="9"/>
        </table:table-row>
        <table:table-row table:style-name="ro1">
          <table:table-cell office:value-type="float" office:value="320412">
            <text:p>320412</text:p>
          </table:table-cell>
          <table:table-cell table:number-columns-repeated="9"/>
        </table:table-row>
        <table:table-row table:style-name="ro1">
          <table:table-cell office:value-type="float" office:value="320413">
            <text:p>320413</text:p>
          </table:table-cell>
          <table:table-cell table:number-columns-repeated="9"/>
        </table:table-row>
        <table:table-row table:style-name="ro1">
          <table:table-cell office:value-type="float" office:value="320414">
            <text:p>320414</text:p>
          </table:table-cell>
          <table:table-cell table:number-columns-repeated="9"/>
        </table:table-row>
        <table:table-row table:style-name="ro1">
          <table:table-cell office:value-type="float" office:value="320415">
            <text:p>320415</text:p>
          </table:table-cell>
          <table:table-cell table:number-columns-repeated="9"/>
        </table:table-row>
        <table:table-row table:style-name="ro1">
          <table:table-cell office:value-type="float" office:value="320416">
            <text:p>320416</text:p>
          </table:table-cell>
          <table:table-cell table:number-columns-repeated="9"/>
        </table:table-row>
        <table:table-row table:style-name="ro1">
          <table:table-cell office:value-type="float" office:value="320417">
            <text:p>320417</text:p>
          </table:table-cell>
          <table:table-cell table:number-columns-repeated="9"/>
        </table:table-row>
        <table:table-row table:style-name="ro1">
          <table:table-cell office:value-type="float" office:value="320418">
            <text:p>320418</text:p>
          </table:table-cell>
          <table:table-cell table:number-columns-repeated="9"/>
        </table:table-row>
        <table:table-row table:style-name="ro1">
          <table:table-cell office:value-type="float" office:value="320419">
            <text:p>320419</text:p>
          </table:table-cell>
          <table:table-cell table:number-columns-repeated="9"/>
        </table:table-row>
        <table:table-row table:style-name="ro1">
          <table:table-cell office:value-type="float" office:value="320420">
            <text:p>3204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1309">
            <text:p>321309</text:p>
          </table:table-cell>
          <table:table-cell office:value-type="string">
            <text:p>SEEN</text:p>
          </table:table-cell>
          <table:table-cell table:number-columns-repeated="5"/>
          <table:table-cell office:value-type="float" office:value="321327">
            <text:p>321327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321323">
            <text:p>321323</text:p>
          </table:table-cell>
          <table:table-cell office:value-type="string">
            <text:p>SEEN</text:p>
          </table:table-cell>
          <table:table-cell table:number-columns-repeated="5"/>
          <table:table-cell office:value-type="float" office:value="321329">
            <text:p>3213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float" office:value="321332">
            <text:p>3213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334">
            <text:p>3213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337">
            <text:p>3213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338">
            <text:p>3213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339">
            <text:p>3213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341">
            <text:p>3213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342">
            <text:p>3213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350">
            <text:p>3213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351">
            <text:p>321351</text:p>
          </table:table-cell>
          <table:table-cell table:number-columns-repeated="9"/>
        </table:table-row>
        <table:table-row table:style-name="ro1">
          <table:table-cell office:value-type="float" office:value="321365">
            <text:p>32136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1407">
            <text:p>3214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1419">
            <text:p>321419</text:p>
          </table:table-cell>
          <table:table-cell table:number-columns-repeated="9"/>
        </table:table-row>
        <table:table-row table:style-name="ro1">
          <table:table-cell office:value-type="float" office:value="321428">
            <text:p>3214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1429">
            <text:p>3214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434">
            <text:p>3214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1440">
            <text:p>3214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1443">
            <text:p>3214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3201">
            <text:p>3232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02">
            <text:p>3232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03">
            <text:p>3232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04">
            <text:p>3232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05">
            <text:p>323205</text:p>
          </table:table-cell>
          <table:table-cell table:number-columns-repeated="9"/>
        </table:table-row>
        <table:table-row table:style-name="ro1">
          <table:table-cell office:value-type="float" office:value="323206">
            <text:p>3232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07">
            <text:p>3232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08">
            <text:p>3232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09">
            <text:p>3232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0">
            <text:p>3232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1">
            <text:p>3232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2">
            <text:p>3232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3">
            <text:p>3232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4">
            <text:p>323214</text:p>
          </table:table-cell>
          <table:table-cell table:number-columns-repeated="9"/>
        </table:table-row>
        <table:table-row table:style-name="ro1">
          <table:table-cell office:value-type="float" office:value="323215">
            <text:p>3232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6">
            <text:p>3232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7">
            <text:p>3232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8">
            <text:p>3232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19">
            <text:p>3232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0">
            <text:p>3232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1">
            <text:p>3232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2">
            <text:p>3232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3">
            <text:p>3232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4">
            <text:p>3232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5">
            <text:p>3232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3226">
            <text:p>3232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7">
            <text:p>3232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8">
            <text:p>3232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29">
            <text:p>3232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30">
            <text:p>3232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31">
            <text:p>3232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32">
            <text:p>3232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33">
            <text:p>3232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34">
            <text:p>3232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3235">
            <text:p>3232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3236">
            <text:p>3232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37">
            <text:p>3232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38">
            <text:p>3232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3239">
            <text:p>3232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3240">
            <text:p>3232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3241">
            <text:p>323241</text:p>
          </table:table-cell>
          <table:table-cell table:number-columns-repeated="9"/>
        </table:table-row>
        <table:table-row table:style-name="ro1">
          <table:table-cell office:value-type="float" office:value="323242">
            <text:p>3232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23243">
            <text:p>3232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5001">
            <text:p>325001</text:p>
          </table:table-cell>
          <table:table-cell table:number-columns-repeated="9"/>
        </table:table-row>
        <table:table-row table:style-name="ro1">
          <table:table-cell office:value-type="float" office:value="325002">
            <text:p>325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5005">
            <text:p>325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5011">
            <text:p>325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5014">
            <text:p>325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25015">
            <text:p>3250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1001">
            <text:p>331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02">
            <text:p>331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03">
            <text:p>331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04">
            <text:p>331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05">
            <text:p>331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06">
            <text:p>331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07">
            <text:p>331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08">
            <text:p>331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09">
            <text:p>331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10">
            <text:p>331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11">
            <text:p>331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12">
            <text:p>331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13">
            <text:p>331013</text:p>
          </table:table-cell>
          <table:table-cell table:number-columns-repeated="9"/>
        </table:table-row>
        <table:table-row table:style-name="ro1">
          <table:table-cell office:value-type="float" office:value="331014">
            <text:p>331014</text:p>
          </table:table-cell>
          <table:table-cell table:number-columns-repeated="9"/>
        </table:table-row>
        <table:table-row table:style-name="ro1">
          <table:table-cell office:value-type="float" office:value="331015">
            <text:p>331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16">
            <text:p>331016</text:p>
          </table:table-cell>
          <table:table-cell table:number-columns-repeated="9"/>
        </table:table-row>
        <table:table-row table:style-name="ro1">
          <table:table-cell office:value-type="float" office:value="331017">
            <text:p>331017</text:p>
          </table:table-cell>
          <table:table-cell table:number-columns-repeated="9"/>
        </table:table-row>
        <table:table-row table:style-name="ro1">
          <table:table-cell office:value-type="float" office:value="331018">
            <text:p>331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19">
            <text:p>331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20">
            <text:p>331020</text:p>
          </table:table-cell>
          <table:table-cell table:number-columns-repeated="9"/>
        </table:table-row>
        <table:table-row table:style-name="ro1">
          <table:table-cell office:value-type="float" office:value="331021">
            <text:p>331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22">
            <text:p>331022</text:p>
          </table:table-cell>
          <table:table-cell table:number-columns-repeated="9"/>
        </table:table-row>
        <table:table-row table:style-name="ro1">
          <table:table-cell office:value-type="float" office:value="331023">
            <text:p>331023</text:p>
          </table:table-cell>
          <table:table-cell table:number-columns-repeated="9"/>
        </table:table-row>
        <table:table-row table:style-name="ro1">
          <table:table-cell office:value-type="float" office:value="331024">
            <text:p>331024</text:p>
          </table:table-cell>
          <table:table-cell table:number-columns-repeated="9"/>
        </table:table-row>
        <table:table-row table:style-name="ro1">
          <table:table-cell office:value-type="float" office:value="331025">
            <text:p>331025</text:p>
          </table:table-cell>
          <table:table-cell table:number-columns-repeated="9"/>
        </table:table-row>
        <table:table-row table:style-name="ro1">
          <table:table-cell office:value-type="float" office:value="331026">
            <text:p>331026</text:p>
          </table:table-cell>
          <table:table-cell table:number-columns-repeated="9"/>
        </table:table-row>
        <table:table-row table:style-name="ro1">
          <table:table-cell office:value-type="float" office:value="331027">
            <text:p>331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28">
            <text:p>331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1029">
            <text:p>331029</text:p>
          </table:table-cell>
          <table:table-cell table:number-columns-repeated="9"/>
        </table:table-row>
        <table:table-row table:style-name="ro1">
          <table:table-cell office:value-type="float" office:value="331030">
            <text:p>331030</text:p>
          </table:table-cell>
          <table:table-cell table:number-columns-repeated="9"/>
        </table:table-row>
        <table:table-row table:style-name="ro1">
          <table:table-cell office:value-type="float" office:value="331031">
            <text:p>331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1101">
            <text:p>331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02">
            <text:p>331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03">
            <text:p>3311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04">
            <text:p>331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05">
            <text:p>331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06">
            <text:p>331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07">
            <text:p>331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08">
            <text:p>331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09">
            <text:p>331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10">
            <text:p>331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11">
            <text:p>331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1112">
            <text:p>331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3001">
            <text:p>333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02">
            <text:p>333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03">
            <text:p>333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04">
            <text:p>333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05">
            <text:p>333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06">
            <text:p>3330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07">
            <text:p>333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08">
            <text:p>333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09">
            <text:p>3330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10">
            <text:p>333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11">
            <text:p>333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12">
            <text:p>3330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13">
            <text:p>333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14">
            <text:p>3330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15">
            <text:p>333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3016">
            <text:p>333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4001">
            <text:p>334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02">
            <text:p>334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03">
            <text:p>334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04">
            <text:p>334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05">
            <text:p>334005</text:p>
          </table:table-cell>
          <table:table-cell table:number-columns-repeated="9"/>
        </table:table-row>
        <table:table-row table:style-name="ro1">
          <table:table-cell office:value-type="float" office:value="334006">
            <text:p>334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07">
            <text:p>334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4008">
            <text:p>344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09">
            <text:p>334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0">
            <text:p>334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1">
            <text:p>334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2">
            <text:p>334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3">
            <text:p>334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4">
            <text:p>334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5">
            <text:p>334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6">
            <text:p>334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7">
            <text:p>3340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8">
            <text:p>334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19">
            <text:p>334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0">
            <text:p>334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1">
            <text:p>334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2">
            <text:p>334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3">
            <text:p>3340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4024">
            <text:p>334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5">
            <text:p>3340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6">
            <text:p>334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7">
            <text:p>334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8">
            <text:p>334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29">
            <text:p>3340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30">
            <text:p>334030</text:p>
          </table:table-cell>
          <table:table-cell table:number-columns-repeated="9"/>
        </table:table-row>
        <table:table-row table:style-name="ro1">
          <table:table-cell office:value-type="float" office:value="334031">
            <text:p>334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32">
            <text:p>3340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33">
            <text:p>3340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34034">
            <text:p>3340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35">
            <text:p>3340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36">
            <text:p>3340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37">
            <text:p>334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38">
            <text:p>3340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39">
            <text:p>3340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34040">
            <text:p>3340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5001">
            <text:p>345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45002">
            <text:p>345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03">
            <text:p>345003</text:p>
          </table:table-cell>
          <table:table-cell table:number-columns-repeated="9"/>
        </table:table-row>
        <table:table-row table:style-name="ro1">
          <table:table-cell office:value-type="float" office:value="345004">
            <text:p>345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05">
            <text:p>345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06">
            <text:p>345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07">
            <text:p>345007</text:p>
          </table:table-cell>
          <table:table-cell table:number-columns-repeated="9"/>
        </table:table-row>
        <table:table-row table:style-name="ro1">
          <table:table-cell office:value-type="float" office:value="345008">
            <text:p>345008</text:p>
          </table:table-cell>
          <table:table-cell table:number-columns-repeated="9"/>
        </table:table-row>
        <table:table-row table:style-name="ro1">
          <table:table-cell office:value-type="float" office:value="345009">
            <text:p>3450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45010">
            <text:p>345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11">
            <text:p>345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12">
            <text:p>345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13">
            <text:p>345013</text:p>
          </table:table-cell>
          <table:table-cell table:number-columns-repeated="9"/>
        </table:table-row>
        <table:table-row table:style-name="ro1">
          <table:table-cell office:value-type="float" office:value="345014">
            <text:p>345014</text:p>
          </table:table-cell>
          <table:table-cell table:number-columns-repeated="9"/>
        </table:table-row>
        <table:table-row table:style-name="ro1">
          <table:table-cell office:value-type="float" office:value="345015">
            <text:p>345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16">
            <text:p>345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17">
            <text:p>345017</text:p>
          </table:table-cell>
          <table:table-cell table:number-columns-repeated="9"/>
        </table:table-row>
        <table:table-row table:style-name="ro1">
          <table:table-cell office:value-type="float" office:value="345018">
            <text:p>345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19">
            <text:p>345019</text:p>
          </table:table-cell>
          <table:table-cell table:number-columns-repeated="9"/>
        </table:table-row>
        <table:table-row table:style-name="ro1">
          <table:table-cell office:value-type="float" office:value="345020">
            <text:p>3450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45021">
            <text:p>345021</text:p>
          </table:table-cell>
          <table:table-cell table:number-columns-repeated="9"/>
        </table:table-row>
        <table:table-row table:style-name="ro1">
          <table:table-cell office:value-type="float" office:value="345022">
            <text:p>345022</text:p>
          </table:table-cell>
          <table:table-cell table:number-columns-repeated="9"/>
        </table:table-row>
        <table:table-row table:style-name="ro1">
          <table:table-cell office:value-type="float" office:value="345023">
            <text:p>345023</text:p>
          </table:table-cell>
          <table:table-cell table:number-columns-repeated="9"/>
        </table:table-row>
        <table:table-row table:style-name="ro1">
          <table:table-cell office:value-type="float" office:value="345024">
            <text:p>345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25">
            <text:p>3450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26">
            <text:p>345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27">
            <text:p>345027</text:p>
          </table:table-cell>
          <table:table-cell table:number-columns-repeated="9"/>
        </table:table-row>
        <table:table-row table:style-name="ro1">
          <table:table-cell office:value-type="float" office:value="345028">
            <text:p>345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29">
            <text:p>3450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30">
            <text:p>3450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31">
            <text:p>345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32">
            <text:p>3450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33">
            <text:p>345033</text:p>
          </table:table-cell>
          <table:table-cell table:number-columns-repeated="9"/>
        </table:table-row>
        <table:table-row table:style-name="ro1">
          <table:table-cell office:value-type="float" office:value="345034">
            <text:p>3450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35">
            <text:p>3450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36">
            <text:p>3450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37">
            <text:p>345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38">
            <text:p>345038</text:p>
          </table:table-cell>
          <table:table-cell table:number-columns-repeated="9"/>
        </table:table-row>
        <table:table-row table:style-name="ro1">
          <table:table-cell office:value-type="float" office:value="345039">
            <text:p>345039</text:p>
          </table:table-cell>
          <table:table-cell table:number-columns-repeated="9"/>
        </table:table-row>
        <table:table-row table:style-name="ro1">
          <table:table-cell office:value-type="float" office:value="345040">
            <text:p>3450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45041">
            <text:p>345041</text:p>
          </table:table-cell>
          <table:table-cell table:number-columns-repeated="9"/>
        </table:table-row>
        <table:table-row table:style-name="ro1">
          <table:table-cell office:value-type="float" office:value="345042">
            <text:p>345042</text:p>
          </table:table-cell>
          <table:table-cell table:number-columns-repeated="9"/>
        </table:table-row>
        <table:table-row table:style-name="ro1">
          <table:table-cell office:value-type="float" office:value="345043">
            <text:p>3450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44">
            <text:p>34504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45">
            <text:p>3450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45046">
            <text:p>345046</text:p>
          </table:table-cell>
          <table:table-cell table:number-columns-repeated="9"/>
        </table:table-row>
        <table:table-row table:style-name="ro1">
          <table:table-cell office:value-type="float" office:value="345047">
            <text:p>3450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48">
            <text:p>34504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49">
            <text:p>345049</text:p>
          </table:table-cell>
          <table:table-cell table:number-columns-repeated="9"/>
        </table:table-row>
        <table:table-row table:style-name="ro1">
          <table:table-cell office:value-type="float" office:value="345050">
            <text:p>3450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51">
            <text:p>345051</text:p>
          </table:table-cell>
          <table:table-cell table:number-columns-repeated="9"/>
        </table:table-row>
        <table:table-row table:style-name="ro1">
          <table:table-cell office:value-type="float" office:value="345052">
            <text:p>345052</text:p>
          </table:table-cell>
          <table:table-cell table:number-columns-repeated="9"/>
        </table:table-row>
        <table:table-row table:style-name="ro1">
          <table:table-cell office:value-type="float" office:value="345053">
            <text:p>345053</text:p>
          </table:table-cell>
          <table:table-cell table:number-columns-repeated="9"/>
        </table:table-row>
        <table:table-row table:style-name="ro1">
          <table:table-cell office:value-type="float" office:value="345054">
            <text:p>34505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55">
            <text:p>34505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56">
            <text:p>3450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45057">
            <text:p>34505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58">
            <text:p>345058</text:p>
          </table:table-cell>
          <table:table-cell table:number-columns-repeated="9"/>
        </table:table-row>
        <table:table-row table:style-name="ro1">
          <table:table-cell office:value-type="float" office:value="345059">
            <text:p>345059</text:p>
          </table:table-cell>
          <table:table-cell table:number-columns-repeated="9"/>
        </table:table-row>
        <table:table-row table:style-name="ro1">
          <table:table-cell office:value-type="float" office:value="345060">
            <text:p>34506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61">
            <text:p>3450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62">
            <text:p>34506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63">
            <text:p>34506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64">
            <text:p>345064</text:p>
          </table:table-cell>
          <table:table-cell table:number-columns-repeated="9"/>
        </table:table-row>
        <table:table-row table:style-name="ro1">
          <table:table-cell office:value-type="float" office:value="345065">
            <text:p>34506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45066">
            <text:p>34506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67">
            <text:p>345067</text:p>
          </table:table-cell>
          <table:table-cell table:number-columns-repeated="9"/>
        </table:table-row>
        <table:table-row table:style-name="ro1">
          <table:table-cell office:value-type="float" office:value="345068">
            <text:p>3450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45069">
            <text:p>34506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45070">
            <text:p>34507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0101">
            <text:p>3501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02">
            <text:p>3501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03">
            <text:p>350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04">
            <text:p>3501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05">
            <text:p>350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106">
            <text:p>350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07">
            <text:p>350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08">
            <text:p>3501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09">
            <text:p>3501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0">
            <text:p>3501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1">
            <text:p>3501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2">
            <text:p>3501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3">
            <text:p>3501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4">
            <text:p>3501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5">
            <text:p>3501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6">
            <text:p>3501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7">
            <text:p>3501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8">
            <text:p>3501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19">
            <text:p>3501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120">
            <text:p>3501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21">
            <text:p>350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122">
            <text:p>3501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123">
            <text:p>3501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24">
            <text:p>3501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25">
            <text:p>3501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26">
            <text:p>3501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27">
            <text:p>3501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128">
            <text:p>3501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129">
            <text:p>3501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130">
            <text:p>3501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0231">
            <text:p>3502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32">
            <text:p>3502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33">
            <text:p>3502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34">
            <text:p>3502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35">
            <text:p>3502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36">
            <text:p>3502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37">
            <text:p>3502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38">
            <text:p>3502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39">
            <text:p>3502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40">
            <text:p>3502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41">
            <text:p>3502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42">
            <text:p>3502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43">
            <text:p>3502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44">
            <text:p>35024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45">
            <text:p>3502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46">
            <text:p>35024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47">
            <text:p>3502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48">
            <text:p>35024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49">
            <text:p>3502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50">
            <text:p>3502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51">
            <text:p>3502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52">
            <text:p>3502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53">
            <text:p>3502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54">
            <text:p>35025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55">
            <text:p>350255</text:p>
          </table:table-cell>
          <table:table-cell table:number-columns-repeated="9"/>
        </table:table-row>
        <table:table-row table:style-name="ro1">
          <table:table-cell office:value-type="float" office:value="350256">
            <text:p>35025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57">
            <text:p>3502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58">
            <text:p>3502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59">
            <text:p>35025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60">
            <text:p>35026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61">
            <text:p>3502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62">
            <text:p>35026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63">
            <text:p>3502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64">
            <text:p>35026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0265">
            <text:p>35026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66">
            <text:p>35026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267">
            <text:p>35026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0368">
            <text:p>35036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369">
            <text:p>350369</text:p>
          </table:table-cell>
          <table:table-cell table:number-columns-repeated="9"/>
        </table:table-row>
        <table:table-row table:style-name="ro1">
          <table:table-cell office:value-type="float" office:value="350370">
            <text:p>35037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371">
            <text:p>35037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372">
            <text:p>35037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373">
            <text:p>350373</text:p>
          </table:table-cell>
          <table:table-cell table:number-columns-repeated="9"/>
        </table:table-row>
        <table:table-row table:style-name="ro1">
          <table:table-cell office:value-type="float" office:value="350374">
            <text:p>35037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375">
            <text:p>350375</text:p>
          </table:table-cell>
          <table:table-cell table:number-columns-repeated="9"/>
        </table:table-row>
        <table:table-row table:style-name="ro1">
          <table:table-cell office:value-type="float" office:value="350376">
            <text:p>35037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377">
            <text:p>35037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0401">
            <text:p>350401</text:p>
          </table:table-cell>
          <table:table-cell table:number-columns-repeated="9"/>
        </table:table-row>
        <table:table-row table:style-name="ro1">
          <table:table-cell office:value-type="float" office:value="350402">
            <text:p>350402</text:p>
          </table:table-cell>
          <table:table-cell table:number-columns-repeated="9"/>
        </table:table-row>
        <table:table-row table:style-name="ro1">
          <table:table-cell office:value-type="float" office:value="350403">
            <text:p>3504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404">
            <text:p>350404</text:p>
          </table:table-cell>
          <table:table-cell table:number-columns-repeated="9"/>
        </table:table-row>
        <table:table-row table:style-name="ro1">
          <table:table-cell office:value-type="float" office:value="350405">
            <text:p>350405</text:p>
          </table:table-cell>
          <table:table-cell table:number-columns-repeated="9"/>
        </table:table-row>
        <table:table-row table:style-name="ro1">
          <table:table-cell office:value-type="float" office:value="350406">
            <text:p>3504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407">
            <text:p>3504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408">
            <text:p>3504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0409">
            <text:p>350409</text:p>
          </table:table-cell>
          <table:table-cell table:number-columns-repeated="9"/>
        </table:table-row>
        <table:table-row table:style-name="ro1">
          <table:table-cell office:value-type="float" office:value="350410">
            <text:p>3504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7001">
            <text:p>357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02">
            <text:p>357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03">
            <text:p>357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04">
            <text:p>357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05">
            <text:p>357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06">
            <text:p>3570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07">
            <text:p>357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08">
            <text:p>357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09">
            <text:p>357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10">
            <text:p>357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11">
            <text:p>357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12">
            <text:p>357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13">
            <text:p>357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14">
            <text:p>357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15">
            <text:p>357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16">
            <text:p>357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17">
            <text:p>357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18">
            <text:p>3570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19">
            <text:p>357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20">
            <text:p>3570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21">
            <text:p>357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22">
            <text:p>357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23">
            <text:p>3570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24">
            <text:p>357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25">
            <text:p>3570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26">
            <text:p>357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27">
            <text:p>357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28">
            <text:p>357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29">
            <text:p>3570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30">
            <text:p>3570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31">
            <text:p>357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32">
            <text:p>357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33">
            <text:p>3570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34">
            <text:p>3570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035">
            <text:p>3570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36">
            <text:p>3570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37">
            <text:p>357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38">
            <text:p>3570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39">
            <text:p>3570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40">
            <text:p>3570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41">
            <text:p>3570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42">
            <text:p>357042</text:p>
          </table:table-cell>
          <table:table-cell table:number-columns-repeated="9"/>
        </table:table-row>
        <table:table-row table:style-name="ro1">
          <table:table-cell office:value-type="float" office:value="357043">
            <text:p>3570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44">
            <text:p>357044</text:p>
          </table:table-cell>
          <table:table-cell table:number-columns-repeated="9"/>
        </table:table-row>
        <table:table-row table:style-name="ro1">
          <table:table-cell office:value-type="float" office:value="357045">
            <text:p>35704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046">
            <text:p>35704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7201">
            <text:p>3572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202">
            <text:p>3572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203">
            <text:p>3572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204">
            <text:p>3572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205">
            <text:p>3572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206">
            <text:p>3572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207">
            <text:p>3572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208">
            <text:p>357208</text:p>
          </table:table-cell>
          <table:table-cell table:number-columns-repeated="9"/>
        </table:table-row>
        <table:table-row table:style-name="ro1">
          <table:table-cell office:value-type="float" office:value="357209">
            <text:p>3572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210">
            <text:p>3572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211">
            <text:p>3572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7312">
            <text:p>3573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13">
            <text:p>3573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314">
            <text:p>3573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15">
            <text:p>3573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316">
            <text:p>357316</text:p>
          </table:table-cell>
          <table:table-cell table:number-columns-repeated="9"/>
        </table:table-row>
        <table:table-row table:style-name="ro1">
          <table:table-cell office:value-type="float" office:value="357317">
            <text:p>357317</text:p>
          </table:table-cell>
          <table:table-cell table:number-columns-repeated="9"/>
        </table:table-row>
        <table:table-row table:style-name="ro1">
          <table:table-cell office:value-type="float" office:value="357318">
            <text:p>3573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19">
            <text:p>3573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20">
            <text:p>3573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21">
            <text:p>3573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22">
            <text:p>3573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323">
            <text:p>3573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24">
            <text:p>357324</text:p>
          </table:table-cell>
          <table:table-cell table:number-columns-repeated="9"/>
        </table:table-row>
        <table:table-row table:style-name="ro1">
          <table:table-cell office:value-type="float" office:value="357325">
            <text:p>3573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26">
            <text:p>3573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57327">
            <text:p>3573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57328">
            <text:p>3573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0101">
            <text:p>3601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02">
            <text:p>360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03">
            <text:p>3601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04">
            <text:p>360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05">
            <text:p>360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06">
            <text:p>360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07">
            <text:p>360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08">
            <text:p>3601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09">
            <text:p>360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10">
            <text:p>3601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11">
            <text:p>360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12">
            <text:p>360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13">
            <text:p>3601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14">
            <text:p>3601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15">
            <text:p>3601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16">
            <text:p>3601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60117">
            <text:p>3601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18">
            <text:p>3601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19">
            <text:p>3601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20">
            <text:p>3601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121">
            <text:p>3601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0201">
            <text:p>3602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202">
            <text:p>3602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60203">
            <text:p>3602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5301">
            <text:p>3753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302">
            <text:p>3753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303">
            <text:p>3753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304">
            <text:p>3753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305">
            <text:p>3753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306">
            <text:p>3753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307">
            <text:p>3753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308">
            <text:p>3753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309">
            <text:p>3753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310">
            <text:p>3753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5601">
            <text:p>375601</text:p>
          </table:table-cell>
          <table:table-cell table:number-columns-repeated="9"/>
        </table:table-row>
        <table:table-row table:style-name="ro1">
          <table:table-cell office:value-type="float" office:value="375602">
            <text:p>3756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03">
            <text:p>3756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04">
            <text:p>3756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05">
            <text:p>3756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06">
            <text:p>3756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607">
            <text:p>3756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08">
            <text:p>3756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09">
            <text:p>3756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10">
            <text:p>3756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11">
            <text:p>3756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12">
            <text:p>375612</text:p>
          </table:table-cell>
          <table:table-cell table:number-columns-repeated="9"/>
        </table:table-row>
        <table:table-row table:style-name="ro1">
          <table:table-cell office:value-type="float" office:value="375613">
            <text:p>3756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14">
            <text:p>3756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15">
            <text:p>3756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16">
            <text:p>3756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17">
            <text:p>3756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18">
            <text:p>3756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619">
            <text:p>3756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20">
            <text:p>3756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21">
            <text:p>3756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22">
            <text:p>3756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23">
            <text:p>3756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624">
            <text:p>3756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25">
            <text:p>3756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26">
            <text:p>3756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27">
            <text:p>3756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628">
            <text:p>3756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629">
            <text:p>3756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630">
            <text:p>3756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5701">
            <text:p>3757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702">
            <text:p>3757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703">
            <text:p>3757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704">
            <text:p>3757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705">
            <text:p>3757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706">
            <text:p>3757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707">
            <text:p>3757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708">
            <text:p>3757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709">
            <text:p>3757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710">
            <text:p>3757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711">
            <text:p>3757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712">
            <text:p>3757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713">
            <text:p>375713</text:p>
          </table:table-cell>
          <table:table-cell table:number-columns-repeated="9"/>
        </table:table-row>
        <table:table-row table:style-name="ro1">
          <table:table-cell office:value-type="float" office:value="375714">
            <text:p>3757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715">
            <text:p>3757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5801">
            <text:p>3758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02">
            <text:p>3758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03">
            <text:p>3758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04">
            <text:p>3758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05">
            <text:p>3758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06">
            <text:p>3758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07">
            <text:p>3758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08">
            <text:p>3758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09">
            <text:p>3758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10">
            <text:p>3758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11">
            <text:p>3758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12">
            <text:p>3758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13">
            <text:p>3758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14">
            <text:p>3758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15">
            <text:p>3758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16">
            <text:p>3758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17">
            <text:p>3758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18">
            <text:p>3758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19">
            <text:p>3758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20">
            <text:p>3758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21">
            <text:p>3758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22">
            <text:p>3758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23">
            <text:p>3758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24">
            <text:p>3758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25">
            <text:p>3758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26">
            <text:p>3758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27">
            <text:p>3758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828">
            <text:p>3758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29">
            <text:p>3758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830">
            <text:p>3758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5901">
            <text:p>375901</text:p>
          </table:table-cell>
          <table:table-cell table:number-columns-repeated="9"/>
        </table:table-row>
        <table:table-row table:style-name="ro1">
          <table:table-cell office:value-type="float" office:value="375902">
            <text:p>3759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03">
            <text:p>3759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904">
            <text:p>3759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905">
            <text:p>3759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906">
            <text:p>3759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07">
            <text:p>3759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08">
            <text:p>3759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09">
            <text:p>3759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10">
            <text:p>3759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911">
            <text:p>3759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12">
            <text:p>3759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913">
            <text:p>3759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14">
            <text:p>375914</text:p>
          </table:table-cell>
          <table:table-cell table:number-columns-repeated="9"/>
        </table:table-row>
        <table:table-row table:style-name="ro1">
          <table:table-cell office:value-type="float" office:value="375915">
            <text:p>3759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916">
            <text:p>3759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5917">
            <text:p>3759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18">
            <text:p>3759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19">
            <text:p>3759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20">
            <text:p>3759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21">
            <text:p>3759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22">
            <text:p>3759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5923">
            <text:p>3759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6001">
            <text:p>376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02">
            <text:p>376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03">
            <text:p>376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04">
            <text:p>376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05">
            <text:p>376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06">
            <text:p>376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07">
            <text:p>376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08">
            <text:p>376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09">
            <text:p>376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10">
            <text:p>376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11">
            <text:p>376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12">
            <text:p>376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13">
            <text:p>376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14">
            <text:p>3760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6015">
            <text:p>376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16">
            <text:p>376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17">
            <text:p>376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6018">
            <text:p>376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19">
            <text:p>376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20">
            <text:p>376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21">
            <text:p>376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22">
            <text:p>3760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6023">
            <text:p>3760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24">
            <text:p>376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25">
            <text:p>3760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26">
            <text:p>376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27">
            <text:p>376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28">
            <text:p>3760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6029">
            <text:p>3760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30">
            <text:p>3760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31">
            <text:p>376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32">
            <text:p>376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6033">
            <text:p>3760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34">
            <text:p>3760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6035">
            <text:p>3760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7101">
            <text:p>3771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02">
            <text:p>3771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03">
            <text:p>3771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04">
            <text:p>377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05">
            <text:p>3771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06">
            <text:p>377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07">
            <text:p>377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08">
            <text:p>377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09">
            <text:p>377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10">
            <text:p>377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11">
            <text:p>377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12">
            <text:p>3771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13">
            <text:p>3771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14">
            <text:p>3771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15">
            <text:p>3771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16">
            <text:p>3771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17">
            <text:p>3771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18">
            <text:p>3771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19">
            <text:p>3771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20">
            <text:p>3771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21">
            <text:p>377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22">
            <text:p>3771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23">
            <text:p>3771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24">
            <text:p>3771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25">
            <text:p>3771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26">
            <text:p>3771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27">
            <text:p>3771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28">
            <text:p>3771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29">
            <text:p>3771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30">
            <text:p>3771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31">
            <text:p>3771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32">
            <text:p>3771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33">
            <text:p>3771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34">
            <text:p>3771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35">
            <text:p>3771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36">
            <text:p>3771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37">
            <text:p>37713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38">
            <text:p>3771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39">
            <text:p>3771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40">
            <text:p>3771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41">
            <text:p>3771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42">
            <text:p>3771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43">
            <text:p>3771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44">
            <text:p>3771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45">
            <text:p>37714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46">
            <text:p>37714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47">
            <text:p>3771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48">
            <text:p>37714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49">
            <text:p>3771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50">
            <text:p>3771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51">
            <text:p>37715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52">
            <text:p>3771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53">
            <text:p>3771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54">
            <text:p>37715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55">
            <text:p>37715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56">
            <text:p>3771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57">
            <text:p>3771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58">
            <text:p>3771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59">
            <text:p>3771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60">
            <text:p>37716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61">
            <text:p>3771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62">
            <text:p>37716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163">
            <text:p>3771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164">
            <text:p>37716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7201">
            <text:p>3772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202">
            <text:p>3772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03">
            <text:p>3772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04">
            <text:p>3772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205">
            <text:p>3772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06">
            <text:p>3772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07">
            <text:p>3772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208">
            <text:p>377208</text:p>
          </table:table-cell>
          <table:table-cell table:number-columns-repeated="9"/>
        </table:table-row>
        <table:table-row table:style-name="ro1">
          <table:table-cell office:value-type="float" office:value="377209">
            <text:p>3772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10">
            <text:p>3772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11">
            <text:p>3772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12">
            <text:p>3772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13">
            <text:p>3772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14">
            <text:p>3772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215">
            <text:p>3772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7301">
            <text:p>3773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02">
            <text:p>3773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03">
            <text:p>3773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04">
            <text:p>3773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05">
            <text:p>3773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06">
            <text:p>3773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07">
            <text:p>3773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08">
            <text:p>3773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09">
            <text:p>3773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10">
            <text:p>3773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11">
            <text:p>3773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12">
            <text:p>3773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13">
            <text:p>3773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14">
            <text:p>3773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15">
            <text:p>3773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16">
            <text:p>3773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17">
            <text:p>3773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18">
            <text:p>3773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19">
            <text:p>3773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20">
            <text:p>3773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21">
            <text:p>3773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22">
            <text:p>3773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23">
            <text:p>3773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24">
            <text:p>3773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25">
            <text:p>3773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26">
            <text:p>3773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327">
            <text:p>3773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328">
            <text:p>3773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7401">
            <text:p>3774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02">
            <text:p>3774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03">
            <text:p>3774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04">
            <text:p>3774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05">
            <text:p>3774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06">
            <text:p>3774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07">
            <text:p>3774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08">
            <text:p>3774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09">
            <text:p>3774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10">
            <text:p>3774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11">
            <text:p>3774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12">
            <text:p>3774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13">
            <text:p>3774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14">
            <text:p>3774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15">
            <text:p>3774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16">
            <text:p>3774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17">
            <text:p>3774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18">
            <text:p>3774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19">
            <text:p>3774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20">
            <text:p>3774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21">
            <text:p>3774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22">
            <text:p>3774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23">
            <text:p>3774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24">
            <text:p>3774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25">
            <text:p>3774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26">
            <text:p>3774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27">
            <text:p>3774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28">
            <text:p>3774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29">
            <text:p>3774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30">
            <text:p>3774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31">
            <text:p>3774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32">
            <text:p>3774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33">
            <text:p>3774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34">
            <text:p>3774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35">
            <text:p>3774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36">
            <text:p>3774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37">
            <text:p>3774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38">
            <text:p>3774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39">
            <text:p>3774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40">
            <text:p>3774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41">
            <text:p>37744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42">
            <text:p>3774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43">
            <text:p>3774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44">
            <text:p>3774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45">
            <text:p>3774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46">
            <text:p>3774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47">
            <text:p>37744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48">
            <text:p>37744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49">
            <text:p>3774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50">
            <text:p>3774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51">
            <text:p>3774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52">
            <text:p>37745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53">
            <text:p>3774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54">
            <text:p>37745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55">
            <text:p>37745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56">
            <text:p>37745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57">
            <text:p>37745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58">
            <text:p>3774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59">
            <text:p>3774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60">
            <text:p>37746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61">
            <text:p>37746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62">
            <text:p>37746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63">
            <text:p>3774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64">
            <text:p>37746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65">
            <text:p>37746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66">
            <text:p>37746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67">
            <text:p>37746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68">
            <text:p>3774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69">
            <text:p>37746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70">
            <text:p>37747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71">
            <text:p>37747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72">
            <text:p>3774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73">
            <text:p>37747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474">
            <text:p>37747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475">
            <text:p>37747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7501">
            <text:p>3775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02">
            <text:p>3775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03">
            <text:p>3775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04">
            <text:p>3775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05">
            <text:p>3775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06">
            <text:p>3775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07">
            <text:p>3775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08">
            <text:p>3775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509">
            <text:p>3775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10">
            <text:p>3775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511">
            <text:p>3775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512">
            <text:p>3775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513">
            <text:p>3775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14">
            <text:p>3775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15">
            <text:p>3775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16">
            <text:p>3775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517">
            <text:p>3775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18">
            <text:p>3775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19">
            <text:p>3775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520">
            <text:p>3775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521">
            <text:p>3775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22">
            <text:p>3775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523">
            <text:p>3775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7601">
            <text:p>3776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02">
            <text:p>3776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03">
            <text:p>3776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04">
            <text:p>3776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05">
            <text:p>3776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06">
            <text:p>3776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607">
            <text:p>3776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08">
            <text:p>3776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09">
            <text:p>3776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610">
            <text:p>3776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11">
            <text:p>3776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12">
            <text:p>3776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13">
            <text:p>3776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14">
            <text:p>3776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15">
            <text:p>3776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616">
            <text:p>3776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617">
            <text:p>3776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18">
            <text:p>3776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619">
            <text:p>3776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620">
            <text:p>3776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21">
            <text:p>3776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22">
            <text:p>3776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623">
            <text:p>3776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24">
            <text:p>3776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625">
            <text:p>3776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626">
            <text:p>3776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7701">
            <text:p>3777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702">
            <text:p>3777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703">
            <text:p>3777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704">
            <text:p>3777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705">
            <text:p>3777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7706">
            <text:p>3777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707">
            <text:p>3777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7708">
            <text:p>3777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8135">
            <text:p>3781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136">
            <text:p>3781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37">
            <text:p>3781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138">
            <text:p>3781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39">
            <text:p>3781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0">
            <text:p>3781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1">
            <text:p>37814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2">
            <text:p>3781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3">
            <text:p>3781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4">
            <text:p>3781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5">
            <text:p>3781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6">
            <text:p>3781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7">
            <text:p>37814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48">
            <text:p>37814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149">
            <text:p>3781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150">
            <text:p>3781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51">
            <text:p>3781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52">
            <text:p>3781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153">
            <text:p>37815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154">
            <text:p>3781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8201">
            <text:p>3782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02">
            <text:p>3782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03">
            <text:p>3782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04">
            <text:p>3782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05">
            <text:p>3782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06">
            <text:p>3782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07">
            <text:p>3782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08">
            <text:p>3782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09">
            <text:p>3782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10">
            <text:p>3782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11">
            <text:p>3782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12">
            <text:p>3782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13">
            <text:p>3782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14">
            <text:p>3782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15">
            <text:p>3782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16">
            <text:p>3782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17">
            <text:p>3782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18">
            <text:p>3782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19">
            <text:p>3782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20">
            <text:p>3782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21">
            <text:p>3782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22">
            <text:p>3782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23">
            <text:p>3782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24">
            <text:p>3782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25">
            <text:p>3782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26">
            <text:p>3782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27">
            <text:p>3782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28">
            <text:p>3782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29">
            <text:p>3782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30">
            <text:p>3782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8231">
            <text:p>3782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32">
            <text:p>3782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33">
            <text:p>3782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34">
            <text:p>3782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55">
            <text:p>3782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56">
            <text:p>3782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78257">
            <text:p>3782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9001">
            <text:p>379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02">
            <text:p>379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03">
            <text:p>379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04">
            <text:p>379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05">
            <text:p>379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06">
            <text:p>379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07">
            <text:p>379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08">
            <text:p>379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09">
            <text:p>379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0">
            <text:p>379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1">
            <text:p>379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2">
            <text:p>379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3">
            <text:p>379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4">
            <text:p>379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5">
            <text:p>379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6">
            <text:p>379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7">
            <text:p>379017</text:p>
          </table:table-cell>
          <table:table-cell table:number-columns-repeated="9"/>
        </table:table-row>
        <table:table-row table:style-name="ro1">
          <table:table-cell office:value-type="float" office:value="379018">
            <text:p>379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19">
            <text:p>379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20">
            <text:p>379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21">
            <text:p>379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22">
            <text:p>379022</text:p>
          </table:table-cell>
          <table:table-cell table:number-columns-repeated="9"/>
        </table:table-row>
        <table:table-row table:style-name="ro1">
          <table:table-cell office:value-type="float" office:value="379023">
            <text:p>379023</text:p>
          </table:table-cell>
          <table:table-cell table:number-columns-repeated="9"/>
        </table:table-row>
        <table:table-row table:style-name="ro1">
          <table:table-cell office:value-type="float" office:value="379024">
            <text:p>379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25">
            <text:p>3790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26">
            <text:p>379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27">
            <text:p>379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28">
            <text:p>379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79029">
            <text:p>379029</text:p>
          </table:table-cell>
          <table:table-cell table:number-columns-repeated="9"/>
        </table:table-row>
        <table:table-row table:style-name="ro1">
          <table:table-cell office:value-type="float" office:value="379030">
            <text:p>3790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80001">
            <text:p>380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02">
            <text:p>380002</text:p>
          </table:table-cell>
          <table:table-cell table:number-columns-repeated="9"/>
        </table:table-row>
        <table:table-row table:style-name="ro1">
          <table:table-cell office:value-type="float" office:value="380003">
            <text:p>380003</text:p>
          </table:table-cell>
          <table:table-cell table:number-columns-repeated="9"/>
        </table:table-row>
        <table:table-row table:style-name="ro1">
          <table:table-cell office:value-type="float" office:value="380004">
            <text:p>380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05">
            <text:p>380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06">
            <text:p>380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07">
            <text:p>380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08">
            <text:p>380008</text:p>
          </table:table-cell>
          <table:table-cell table:number-columns-repeated="9"/>
        </table:table-row>
        <table:table-row table:style-name="ro1">
          <table:table-cell office:value-type="float" office:value="380009">
            <text:p>380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10">
            <text:p>380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11">
            <text:p>380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12">
            <text:p>380012</text:p>
          </table:table-cell>
          <table:table-cell table:number-columns-repeated="9"/>
        </table:table-row>
        <table:table-row table:style-name="ro1">
          <table:table-cell office:value-type="float" office:value="380013">
            <text:p>380013</text:p>
          </table:table-cell>
          <table:table-cell table:number-columns-repeated="9"/>
        </table:table-row>
        <table:table-row table:style-name="ro1">
          <table:table-cell office:value-type="float" office:value="380014">
            <text:p>380014</text:p>
          </table:table-cell>
          <table:table-cell table:number-columns-repeated="9"/>
        </table:table-row>
        <table:table-row table:style-name="ro1">
          <table:table-cell office:value-type="float" office:value="380015">
            <text:p>380015</text:p>
          </table:table-cell>
          <table:table-cell table:number-columns-repeated="9"/>
        </table:table-row>
        <table:table-row table:style-name="ro1">
          <table:table-cell office:value-type="float" office:value="380016">
            <text:p>380016</text:p>
          </table:table-cell>
          <table:table-cell table:number-columns-repeated="9"/>
        </table:table-row>
        <table:table-row table:style-name="ro1">
          <table:table-cell office:value-type="float" office:value="380017">
            <text:p>3800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18">
            <text:p>380018</text:p>
          </table:table-cell>
          <table:table-cell table:number-columns-repeated="9"/>
        </table:table-row>
        <table:table-row table:style-name="ro1">
          <table:table-cell office:value-type="float" office:value="380019">
            <text:p>380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20">
            <text:p>380020</text:p>
          </table:table-cell>
          <table:table-cell table:number-columns-repeated="9"/>
        </table:table-row>
        <table:table-row table:style-name="ro1">
          <table:table-cell office:value-type="float" office:value="380021">
            <text:p>380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022">
            <text:p>380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80101">
            <text:p>380101</text:p>
          </table:table-cell>
          <table:table-cell table:number-columns-repeated="9"/>
        </table:table-row>
        <table:table-row table:style-name="ro1">
          <table:table-cell office:value-type="float" office:value="380102">
            <text:p>3801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03">
            <text:p>380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04">
            <text:p>380104</text:p>
          </table:table-cell>
          <table:table-cell table:number-columns-repeated="9"/>
        </table:table-row>
        <table:table-row table:style-name="ro1">
          <table:table-cell office:value-type="float" office:value="380105">
            <text:p>3801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06">
            <text:p>380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07">
            <text:p>380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08">
            <text:p>380108</text:p>
          </table:table-cell>
          <table:table-cell table:number-columns-repeated="9"/>
        </table:table-row>
        <table:table-row table:style-name="ro1">
          <table:table-cell office:value-type="float" office:value="380109">
            <text:p>3801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10">
            <text:p>3801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11">
            <text:p>3801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12">
            <text:p>3801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13">
            <text:p>3801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14">
            <text:p>3801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0115">
            <text:p>380115</text:p>
          </table:table-cell>
          <table:table-cell table:number-columns-repeated="9"/>
        </table:table-row>
        <table:table-row table:style-name="ro1">
          <table:table-cell office:value-type="float" office:value="380116">
            <text:p>3801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85001">
            <text:p>385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02">
            <text:p>385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03">
            <text:p>385003</text:p>
          </table:table-cell>
          <table:table-cell table:number-columns-repeated="9"/>
        </table:table-row>
        <table:table-row table:style-name="ro1">
          <table:table-cell office:value-type="float" office:value="385004">
            <text:p>385004</text:p>
          </table:table-cell>
          <table:table-cell table:number-columns-repeated="9"/>
        </table:table-row>
        <table:table-row table:style-name="ro1">
          <table:table-cell office:value-type="float" office:value="385005">
            <text:p>385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06">
            <text:p>385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07">
            <text:p>385007</text:p>
          </table:table-cell>
          <table:table-cell table:number-columns-repeated="9"/>
        </table:table-row>
        <table:table-row table:style-name="ro1">
          <table:table-cell office:value-type="float" office:value="385008">
            <text:p>385008</text:p>
          </table:table-cell>
          <table:table-cell table:number-columns-repeated="9"/>
        </table:table-row>
        <table:table-row table:style-name="ro1">
          <table:table-cell office:value-type="float" office:value="385009">
            <text:p>385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10">
            <text:p>385010</text:p>
          </table:table-cell>
          <table:table-cell table:number-columns-repeated="9"/>
        </table:table-row>
        <table:table-row table:style-name="ro1">
          <table:table-cell office:value-type="float" office:value="385011">
            <text:p>385011</text:p>
          </table:table-cell>
          <table:table-cell table:number-columns-repeated="9"/>
        </table:table-row>
        <table:table-row table:style-name="ro1">
          <table:table-cell office:value-type="float" office:value="385012">
            <text:p>385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13">
            <text:p>385013</text:p>
          </table:table-cell>
          <table:table-cell table:number-columns-repeated="9"/>
        </table:table-row>
        <table:table-row table:style-name="ro1">
          <table:table-cell office:value-type="float" office:value="385014">
            <text:p>385014</text:p>
          </table:table-cell>
          <table:table-cell table:number-columns-repeated="9"/>
        </table:table-row>
        <table:table-row table:style-name="ro1">
          <table:table-cell office:value-type="float" office:value="385015">
            <text:p>385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16">
            <text:p>385016</text:p>
          </table:table-cell>
          <table:table-cell table:number-columns-repeated="9"/>
        </table:table-row>
        <table:table-row table:style-name="ro1">
          <table:table-cell office:value-type="float" office:value="385017">
            <text:p>385017</text:p>
          </table:table-cell>
          <table:table-cell table:number-columns-repeated="9"/>
        </table:table-row>
        <table:table-row table:style-name="ro1">
          <table:table-cell office:value-type="float" office:value="385018">
            <text:p>385018</text:p>
          </table:table-cell>
          <table:table-cell table:number-columns-repeated="9"/>
        </table:table-row>
        <table:table-row table:style-name="ro1">
          <table:table-cell office:value-type="float" office:value="385019">
            <text:p>385019</text:p>
          </table:table-cell>
          <table:table-cell table:number-columns-repeated="9"/>
        </table:table-row>
        <table:table-row table:style-name="ro1">
          <table:table-cell office:value-type="float" office:value="385020">
            <text:p>385020</text:p>
          </table:table-cell>
          <table:table-cell table:number-columns-repeated="9"/>
        </table:table-row>
        <table:table-row table:style-name="ro1">
          <table:table-cell office:value-type="float" office:value="385021">
            <text:p>385021</text:p>
          </table:table-cell>
          <table:table-cell table:number-columns-repeated="9"/>
        </table:table-row>
        <table:table-row table:style-name="ro1">
          <table:table-cell office:value-type="float" office:value="385022">
            <text:p>385022</text:p>
          </table:table-cell>
          <table:table-cell table:number-columns-repeated="9"/>
        </table:table-row>
        <table:table-row table:style-name="ro1">
          <table:table-cell office:value-type="float" office:value="385023">
            <text:p>385023</text:p>
          </table:table-cell>
          <table:table-cell table:number-columns-repeated="9"/>
        </table:table-row>
        <table:table-row table:style-name="ro1">
          <table:table-cell office:value-type="float" office:value="385024">
            <text:p>385024</text:p>
          </table:table-cell>
          <table:table-cell table:number-columns-repeated="9"/>
        </table:table-row>
        <table:table-row table:style-name="ro1">
          <table:table-cell office:value-type="float" office:value="385025">
            <text:p>385025</text:p>
          </table:table-cell>
          <table:table-cell table:number-columns-repeated="9"/>
        </table:table-row>
        <table:table-row table:style-name="ro1">
          <table:table-cell office:value-type="float" office:value="385026">
            <text:p>385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27">
            <text:p>385027</text:p>
          </table:table-cell>
          <table:table-cell table:number-columns-repeated="9"/>
        </table:table-row>
        <table:table-row table:style-name="ro1">
          <table:table-cell office:value-type="float" office:value="385028">
            <text:p>385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29">
            <text:p>3850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30">
            <text:p>385030</text:p>
          </table:table-cell>
          <table:table-cell table:number-columns-repeated="9"/>
        </table:table-row>
        <table:table-row table:style-name="ro1">
          <table:table-cell office:value-type="float" office:value="385031">
            <text:p>385031</text:p>
          </table:table-cell>
          <table:table-cell table:number-columns-repeated="9"/>
        </table:table-row>
        <table:table-row table:style-name="ro1">
          <table:table-cell office:value-type="float" office:value="385032">
            <text:p>385032</text:p>
          </table:table-cell>
          <table:table-cell table:number-columns-repeated="9"/>
        </table:table-row>
        <table:table-row table:style-name="ro1">
          <table:table-cell office:value-type="float" office:value="385033">
            <text:p>385033</text:p>
          </table:table-cell>
          <table:table-cell table:number-columns-repeated="9"/>
        </table:table-row>
        <table:table-row table:style-name="ro1">
          <table:table-cell office:value-type="float" office:value="385034">
            <text:p>385034</text:p>
          </table:table-cell>
          <table:table-cell table:number-columns-repeated="9"/>
        </table:table-row>
        <table:table-row table:style-name="ro1">
          <table:table-cell office:value-type="float" office:value="385035">
            <text:p>3850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36">
            <text:p>385036</text:p>
          </table:table-cell>
          <table:table-cell table:number-columns-repeated="9"/>
        </table:table-row>
        <table:table-row table:style-name="ro1">
          <table:table-cell office:value-type="float" office:value="385037">
            <text:p>385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038">
            <text:p>385038</text:p>
          </table:table-cell>
          <table:table-cell table:number-columns-repeated="9"/>
        </table:table-row>
        <table:table-row table:style-name="ro1">
          <table:table-cell office:value-type="float" office:value="385039">
            <text:p>385039</text:p>
          </table:table-cell>
          <table:table-cell table:number-columns-repeated="9"/>
        </table:table-row>
        <table:table-row table:style-name="ro1">
          <table:table-cell office:value-type="float" office:value="385040">
            <text:p>385040</text:p>
          </table:table-cell>
          <table:table-cell table:number-columns-repeated="9"/>
        </table:table-row>
        <table:table-row table:style-name="ro1">
          <table:table-cell office:value-type="float" office:value="385041">
            <text:p>385041</text:p>
          </table:table-cell>
          <table:table-cell table:number-columns-repeated="9"/>
        </table:table-row>
        <table:table-row table:style-name="ro1">
          <table:table-cell office:value-type="float" office:value="385042">
            <text:p>385042</text:p>
          </table:table-cell>
          <table:table-cell table:number-columns-repeated="9"/>
        </table:table-row>
        <table:table-row table:style-name="ro1">
          <table:table-cell office:value-type="float" office:value="385043">
            <text:p>385043</text:p>
          </table:table-cell>
          <table:table-cell table:number-columns-repeated="9"/>
        </table:table-row>
        <table:table-row table:style-name="ro1">
          <table:table-cell office:value-type="float" office:value="385044">
            <text:p>385044</text:p>
          </table:table-cell>
          <table:table-cell table:number-columns-repeated="9"/>
        </table:table-row>
        <table:table-row table:style-name="ro1">
          <table:table-cell office:value-type="float" office:value="385045">
            <text:p>385045</text:p>
          </table:table-cell>
          <table:table-cell table:number-columns-repeated="9"/>
        </table:table-row>
        <table:table-row table:style-name="ro1">
          <table:table-cell office:value-type="float" office:value="385046">
            <text:p>38504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85101">
            <text:p>385101</text:p>
          </table:table-cell>
          <table:table-cell table:number-columns-repeated="9"/>
        </table:table-row>
        <table:table-row table:style-name="ro1">
          <table:table-cell office:value-type="float" office:value="385102">
            <text:p>385102</text:p>
          </table:table-cell>
          <table:table-cell table:number-columns-repeated="9"/>
        </table:table-row>
        <table:table-row table:style-name="ro1">
          <table:table-cell office:value-type="float" office:value="385103">
            <text:p>385103</text:p>
          </table:table-cell>
          <table:table-cell table:number-columns-repeated="9"/>
        </table:table-row>
        <table:table-row table:style-name="ro1">
          <table:table-cell office:value-type="float" office:value="385104">
            <text:p>385104</text:p>
          </table:table-cell>
          <table:table-cell table:number-columns-repeated="9"/>
        </table:table-row>
        <table:table-row table:style-name="ro1">
          <table:table-cell office:value-type="float" office:value="385105">
            <text:p>385105</text:p>
          </table:table-cell>
          <table:table-cell table:number-columns-repeated="9"/>
        </table:table-row>
        <table:table-row table:style-name="ro1">
          <table:table-cell office:value-type="float" office:value="385106">
            <text:p>385106</text:p>
          </table:table-cell>
          <table:table-cell table:number-columns-repeated="9"/>
        </table:table-row>
        <table:table-row table:style-name="ro1">
          <table:table-cell office:value-type="float" office:value="385107">
            <text:p>385107</text:p>
          </table:table-cell>
          <table:table-cell table:number-columns-repeated="9"/>
        </table:table-row>
        <table:table-row table:style-name="ro1">
          <table:table-cell office:value-type="float" office:value="385108">
            <text:p>385108</text:p>
          </table:table-cell>
          <table:table-cell table:number-columns-repeated="9"/>
        </table:table-row>
        <table:table-row table:style-name="ro1">
          <table:table-cell office:value-type="float" office:value="385109">
            <text:p>385109</text:p>
          </table:table-cell>
          <table:table-cell table:number-columns-repeated="9"/>
        </table:table-row>
        <table:table-row table:style-name="ro1">
          <table:table-cell office:value-type="float" office:value="385110">
            <text:p>385110</text:p>
          </table:table-cell>
          <table:table-cell table:number-columns-repeated="9"/>
        </table:table-row>
        <table:table-row table:style-name="ro1">
          <table:table-cell office:value-type="float" office:value="385111">
            <text:p>385111</text:p>
          </table:table-cell>
          <table:table-cell table:number-columns-repeated="9"/>
        </table:table-row>
        <table:table-row table:style-name="ro1">
          <table:table-cell office:value-type="float" office:value="385112">
            <text:p>385112</text:p>
          </table:table-cell>
          <table:table-cell table:number-columns-repeated="9"/>
        </table:table-row>
        <table:table-row table:style-name="ro1">
          <table:table-cell office:value-type="float" office:value="385113">
            <text:p>385113</text:p>
          </table:table-cell>
          <table:table-cell table:number-columns-repeated="9"/>
        </table:table-row>
        <table:table-row table:style-name="ro1">
          <table:table-cell office:value-type="float" office:value="385114">
            <text:p>385114</text:p>
          </table:table-cell>
          <table:table-cell table:number-columns-repeated="9"/>
        </table:table-row>
        <table:table-row table:style-name="ro1">
          <table:table-cell office:value-type="float" office:value="385115">
            <text:p>385115</text:p>
          </table:table-cell>
          <table:table-cell table:number-columns-repeated="9"/>
        </table:table-row>
        <table:table-row table:style-name="ro1">
          <table:table-cell office:value-type="float" office:value="385116">
            <text:p>3851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5117">
            <text:p>385117</text:p>
          </table:table-cell>
          <table:table-cell table:number-columns-repeated="9"/>
        </table:table-row>
        <table:table-row table:style-name="ro1">
          <table:table-cell office:value-type="float" office:value="385118">
            <text:p>385118</text:p>
          </table:table-cell>
          <table:table-cell table:number-columns-repeated="9"/>
        </table:table-row>
        <table:table-row table:style-name="ro1">
          <table:table-cell office:value-type="float" office:value="385119">
            <text:p>385119</text:p>
          </table:table-cell>
          <table:table-cell table:number-columns-repeated="9"/>
        </table:table-row>
        <table:table-row table:style-name="ro1">
          <table:table-cell office:value-type="float" office:value="385120">
            <text:p>385120</text:p>
          </table:table-cell>
          <table:table-cell table:number-columns-repeated="9"/>
        </table:table-row>
        <table:table-row table:style-name="ro1">
          <table:table-cell office:value-type="float" office:value="385121">
            <text:p>385121</text:p>
          </table:table-cell>
          <table:table-cell table:number-columns-repeated="9"/>
        </table:table-row>
        <table:table-row table:style-name="ro1">
          <table:table-cell office:value-type="float" office:value="385122">
            <text:p>385122</text:p>
          </table:table-cell>
          <table:table-cell table:number-columns-repeated="9"/>
        </table:table-row>
        <table:table-row table:style-name="ro1">
          <table:table-cell office:value-type="float" office:value="385123">
            <text:p>385123</text:p>
          </table:table-cell>
          <table:table-cell table:number-columns-repeated="9"/>
        </table:table-row>
        <table:table-row table:style-name="ro1">
          <table:table-cell office:value-type="float" office:value="385124">
            <text:p>38512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87101">
            <text:p>387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02">
            <text:p>3871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03">
            <text:p>387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04">
            <text:p>387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05">
            <text:p>3871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06">
            <text:p>387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07">
            <text:p>387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08">
            <text:p>3871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09">
            <text:p>387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10">
            <text:p>387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11">
            <text:p>3871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12">
            <text:p>387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13">
            <text:p>3871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14">
            <text:p>3871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15">
            <text:p>3871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16">
            <text:p>3871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17">
            <text:p>3871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18">
            <text:p>3871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19">
            <text:p>3871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20">
            <text:p>3871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21">
            <text:p>3871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22">
            <text:p>3871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23">
            <text:p>3871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24">
            <text:p>3871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25">
            <text:p>3871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26">
            <text:p>3871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27">
            <text:p>3871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128">
            <text:p>3871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29">
            <text:p>3871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30">
            <text:p>387130</text:p>
          </table:table-cell>
          <table:table-cell table:number-columns-repeated="9"/>
        </table:table-row>
        <table:table-row table:style-name="ro1">
          <table:table-cell office:value-type="float" office:value="387131">
            <text:p>387131</text:p>
          </table:table-cell>
          <table:table-cell table:number-columns-repeated="9"/>
        </table:table-row>
        <table:table-row table:style-name="ro1">
          <table:table-cell office:value-type="float" office:value="387132">
            <text:p>387132</text:p>
          </table:table-cell>
          <table:table-cell table:number-columns-repeated="9"/>
        </table:table-row>
        <table:table-row table:style-name="ro1">
          <table:table-cell office:value-type="float" office:value="387133">
            <text:p>387133</text:p>
          </table:table-cell>
          <table:table-cell table:number-columns-repeated="9"/>
        </table:table-row>
        <table:table-row table:style-name="ro1">
          <table:table-cell office:value-type="float" office:value="387134">
            <text:p>387134</text:p>
          </table:table-cell>
          <table:table-cell table:number-columns-repeated="9"/>
        </table:table-row>
        <table:table-row table:style-name="ro1">
          <table:table-cell office:value-type="float" office:value="387135">
            <text:p>387135</text:p>
          </table:table-cell>
          <table:table-cell table:number-columns-repeated="9"/>
        </table:table-row>
        <table:table-row table:style-name="ro1">
          <table:table-cell office:value-type="float" office:value="387136">
            <text:p>387136</text:p>
          </table:table-cell>
          <table:table-cell table:number-columns-repeated="9"/>
        </table:table-row>
        <table:table-row table:style-name="ro1">
          <table:table-cell office:value-type="float" office:value="387137">
            <text:p>3871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38">
            <text:p>387138</text:p>
          </table:table-cell>
          <table:table-cell table:number-columns-repeated="9"/>
        </table:table-row>
        <table:table-row table:style-name="ro1">
          <table:table-cell office:value-type="float" office:value="387139">
            <text:p>387139</text:p>
          </table:table-cell>
          <table:table-cell table:number-columns-repeated="9"/>
        </table:table-row>
        <table:table-row table:style-name="ro1">
          <table:table-cell office:value-type="float" office:value="387140">
            <text:p>3871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41">
            <text:p>3871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42">
            <text:p>3871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43">
            <text:p>387143</text:p>
          </table:table-cell>
          <table:table-cell table:number-columns-repeated="9"/>
        </table:table-row>
        <table:table-row table:style-name="ro1">
          <table:table-cell office:value-type="float" office:value="387144">
            <text:p>387144</text:p>
          </table:table-cell>
          <table:table-cell table:number-columns-repeated="9"/>
        </table:table-row>
        <table:table-row table:style-name="ro1">
          <table:table-cell office:value-type="float" office:value="387145">
            <text:p>387145</text:p>
          </table:table-cell>
          <table:table-cell table:number-columns-repeated="9"/>
        </table:table-row>
        <table:table-row table:style-name="ro1">
          <table:table-cell office:value-type="float" office:value="387146">
            <text:p>38714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47">
            <text:p>387147</text:p>
          </table:table-cell>
          <table:table-cell table:number-columns-repeated="9"/>
        </table:table-row>
        <table:table-row table:style-name="ro1">
          <table:table-cell office:value-type="float" office:value="387148">
            <text:p>387148</text:p>
          </table:table-cell>
          <table:table-cell table:number-columns-repeated="9"/>
        </table:table-row>
        <table:table-row table:style-name="ro1">
          <table:table-cell office:value-type="float" office:value="387149">
            <text:p>387149</text:p>
          </table:table-cell>
          <table:table-cell table:number-columns-repeated="9"/>
        </table:table-row>
        <table:table-row table:style-name="ro1">
          <table:table-cell office:value-type="float" office:value="387150">
            <text:p>387150</text:p>
          </table:table-cell>
          <table:table-cell table:number-columns-repeated="9"/>
        </table:table-row>
        <table:table-row table:style-name="ro1">
          <table:table-cell office:value-type="float" office:value="387151">
            <text:p>387151</text:p>
          </table:table-cell>
          <table:table-cell table:number-columns-repeated="9"/>
        </table:table-row>
        <table:table-row table:style-name="ro1">
          <table:table-cell office:value-type="float" office:value="387152">
            <text:p>387152</text:p>
          </table:table-cell>
          <table:table-cell table:number-columns-repeated="9"/>
        </table:table-row>
        <table:table-row table:style-name="ro1">
          <table:table-cell office:value-type="float" office:value="387153">
            <text:p>38715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54">
            <text:p>38715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55">
            <text:p>387155</text:p>
          </table:table-cell>
          <table:table-cell table:number-columns-repeated="9"/>
        </table:table-row>
        <table:table-row table:style-name="ro1">
          <table:table-cell office:value-type="float" office:value="387156">
            <text:p>387156</text:p>
          </table:table-cell>
          <table:table-cell table:number-columns-repeated="9"/>
        </table:table-row>
        <table:table-row table:style-name="ro1">
          <table:table-cell office:value-type="float" office:value="387157">
            <text:p>387157</text:p>
          </table:table-cell>
          <table:table-cell table:number-columns-repeated="9"/>
        </table:table-row>
        <table:table-row table:style-name="ro1">
          <table:table-cell office:value-type="float" office:value="387158">
            <text:p>387158</text:p>
          </table:table-cell>
          <table:table-cell table:number-columns-repeated="9"/>
        </table:table-row>
        <table:table-row table:style-name="ro1">
          <table:table-cell office:value-type="float" office:value="387159">
            <text:p>387159</text:p>
          </table:table-cell>
          <table:table-cell table:number-columns-repeated="9"/>
        </table:table-row>
        <table:table-row table:style-name="ro1">
          <table:table-cell office:value-type="float" office:value="387160">
            <text:p>387160</text:p>
          </table:table-cell>
          <table:table-cell table:number-columns-repeated="9"/>
        </table:table-row>
        <table:table-row table:style-name="ro1">
          <table:table-cell office:value-type="float" office:value="387161">
            <text:p>3871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62">
            <text:p>38716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63">
            <text:p>387163</text:p>
          </table:table-cell>
          <table:table-cell table:number-columns-repeated="9"/>
        </table:table-row>
        <table:table-row table:style-name="ro1">
          <table:table-cell office:value-type="float" office:value="387164">
            <text:p>38716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65">
            <text:p>38716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66">
            <text:p>387166</text:p>
          </table:table-cell>
          <table:table-cell table:number-columns-repeated="9"/>
        </table:table-row>
        <table:table-row table:style-name="ro1">
          <table:table-cell office:value-type="float" office:value="387167">
            <text:p>38716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68">
            <text:p>387168</text:p>
          </table:table-cell>
          <table:table-cell table:number-columns-repeated="9"/>
        </table:table-row>
        <table:table-row table:style-name="ro1">
          <table:table-cell office:value-type="float" office:value="387169">
            <text:p>387169</text:p>
          </table:table-cell>
          <table:table-cell table:number-columns-repeated="9"/>
        </table:table-row>
        <table:table-row table:style-name="ro1">
          <table:table-cell office:value-type="float" office:value="387170">
            <text:p>387170</text:p>
          </table:table-cell>
          <table:table-cell table:number-columns-repeated="9"/>
        </table:table-row>
        <table:table-row table:style-name="ro1">
          <table:table-cell office:value-type="float" office:value="387171">
            <text:p>387171</text:p>
          </table:table-cell>
          <table:table-cell table:number-columns-repeated="9"/>
        </table:table-row>
        <table:table-row table:style-name="ro1">
          <table:table-cell office:value-type="float" office:value="387172">
            <text:p>38717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173">
            <text:p>387173</text:p>
          </table:table-cell>
          <table:table-cell table:number-columns-repeated="9"/>
        </table:table-row>
        <table:table-row table:style-name="ro1">
          <table:table-cell office:value-type="float" office:value="387174">
            <text:p>38717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87201">
            <text:p>3872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02">
            <text:p>3872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03">
            <text:p>3872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04">
            <text:p>3872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05">
            <text:p>3872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06">
            <text:p>3872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07">
            <text:p>3872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08">
            <text:p>3872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09">
            <text:p>3872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10">
            <text:p>3872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11">
            <text:p>3872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12">
            <text:p>3872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213">
            <text:p>3872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14">
            <text:p>3872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215">
            <text:p>3872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87216">
            <text:p>3872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17">
            <text:p>3872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18">
            <text:p>3872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19">
            <text:p>3872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20">
            <text:p>3872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21">
            <text:p>3872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22">
            <text:p>3872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23">
            <text:p>387223</text:p>
          </table:table-cell>
          <table:table-cell table:number-columns-repeated="9"/>
        </table:table-row>
        <table:table-row table:style-name="ro1">
          <table:table-cell office:value-type="float" office:value="387224">
            <text:p>3872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25">
            <text:p>3872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26">
            <text:p>3872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227">
            <text:p>38722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87301">
            <text:p>387301</text:p>
          </table:table-cell>
          <table:table-cell table:number-columns-repeated="9"/>
        </table:table-row>
        <table:table-row table:style-name="ro1">
          <table:table-cell office:value-type="float" office:value="387302">
            <text:p>387302</text:p>
          </table:table-cell>
          <table:table-cell table:number-columns-repeated="9"/>
        </table:table-row>
        <table:table-row table:style-name="ro1">
          <table:table-cell office:value-type="float" office:value="387303">
            <text:p>387303</text:p>
          </table:table-cell>
          <table:table-cell table:number-columns-repeated="9"/>
        </table:table-row>
        <table:table-row table:style-name="ro1">
          <table:table-cell office:value-type="float" office:value="387304">
            <text:p>3873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305">
            <text:p>3873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87306">
            <text:p>3873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90001">
            <text:p>390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002">
            <text:p>390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05">
            <text:p>390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06">
            <text:p>390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008">
            <text:p>390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09">
            <text:p>3900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10">
            <text:p>390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11">
            <text:p>390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13">
            <text:p>390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16">
            <text:p>390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20">
            <text:p>390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039">
            <text:p>3900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40">
            <text:p>3900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42">
            <text:p>3900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043">
            <text:p>3900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044">
            <text:p>3900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45">
            <text:p>3900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046">
            <text:p>39004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047">
            <text:p>3900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049">
            <text:p>3900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050">
            <text:p>3900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90103">
            <text:p>3901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04">
            <text:p>3901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07">
            <text:p>390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12">
            <text:p>3901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14">
            <text:p>3901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15">
            <text:p>3901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17">
            <text:p>3901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18">
            <text:p>3901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19">
            <text:p>3901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21">
            <text:p>390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22">
            <text:p>3901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23">
            <text:p>3901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24">
            <text:p>3901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25">
            <text:p>3901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26">
            <text:p>3901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27">
            <text:p>3901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28">
            <text:p>3901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29">
            <text:p>3901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30">
            <text:p>3901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31">
            <text:p>3901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32">
            <text:p>3901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34">
            <text:p>3901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35">
            <text:p>3901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36">
            <text:p>3901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37">
            <text:p>39013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0138">
            <text:p>3901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0141">
            <text:p>3901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95001">
            <text:p>395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02">
            <text:p>395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03">
            <text:p>395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04">
            <text:p>395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05">
            <text:p>395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06">
            <text:p>395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07">
            <text:p>395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08">
            <text:p>395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09">
            <text:p>395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10">
            <text:p>395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11">
            <text:p>395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12">
            <text:p>395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13">
            <text:p>395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14">
            <text:p>395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15">
            <text:p>395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16">
            <text:p>395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17">
            <text:p>3950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18">
            <text:p>395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19">
            <text:p>395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20">
            <text:p>395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21">
            <text:p>3950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22">
            <text:p>3950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23">
            <text:p>3950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24">
            <text:p>395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25">
            <text:p>3950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26">
            <text:p>395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27">
            <text:p>395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5028">
            <text:p>3950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395029">
            <text:p>3950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97001">
            <text:p>397001</text:p>
          </table:table-cell>
          <table:table-cell table:number-columns-repeated="9"/>
        </table:table-row>
        <table:table-row table:style-name="ro1">
          <table:table-cell office:value-type="float" office:value="397002">
            <text:p>397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7003">
            <text:p>397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7004">
            <text:p>397004</text:p>
          </table:table-cell>
          <table:table-cell table:number-columns-repeated="9"/>
        </table:table-row>
        <table:table-row table:style-name="ro1">
          <table:table-cell office:value-type="float" office:value="397005">
            <text:p>397005</text:p>
          </table:table-cell>
          <table:table-cell table:number-columns-repeated="9"/>
        </table:table-row>
        <table:table-row table:style-name="ro1">
          <table:table-cell office:value-type="float" office:value="397006">
            <text:p>397006</text:p>
          </table:table-cell>
          <table:table-cell table:number-columns-repeated="9"/>
        </table:table-row>
        <table:table-row table:style-name="ro1">
          <table:table-cell office:value-type="float" office:value="397007">
            <text:p>397007</text:p>
          </table:table-cell>
          <table:table-cell table:number-columns-repeated="9"/>
        </table:table-row>
        <table:table-row table:style-name="ro1">
          <table:table-cell office:value-type="float" office:value="397008">
            <text:p>397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7009">
            <text:p>397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7010">
            <text:p>397010</text:p>
          </table:table-cell>
          <table:table-cell table:number-columns-repeated="9"/>
        </table:table-row>
        <table:table-row table:style-name="ro1">
          <table:table-cell office:value-type="float" office:value="397011">
            <text:p>397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397012">
            <text:p>397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4001">
            <text:p>444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02">
            <text:p>444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03">
            <text:p>444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04">
            <text:p>444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05">
            <text:p>444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06">
            <text:p>444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07">
            <text:p>444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08">
            <text:p>444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09">
            <text:p>444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10">
            <text:p>444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11">
            <text:p>444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12">
            <text:p>444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13">
            <text:p>444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14">
            <text:p>444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15">
            <text:p>444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16">
            <text:p>444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17">
            <text:p>444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18">
            <text:p>444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19">
            <text:p>444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20">
            <text:p>4440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21">
            <text:p>444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22">
            <text:p>444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23">
            <text:p>4440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24">
            <text:p>444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25">
            <text:p>4440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26">
            <text:p>444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27">
            <text:p>444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28">
            <text:p>444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29">
            <text:p>4440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30">
            <text:p>4440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31">
            <text:p>444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32">
            <text:p>444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33">
            <text:p>4440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34">
            <text:p>4440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35">
            <text:p>4440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36">
            <text:p>4440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37">
            <text:p>444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38">
            <text:p>4440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39">
            <text:p>4440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40">
            <text:p>4440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41">
            <text:p>4440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42">
            <text:p>4440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43">
            <text:p>4440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44044">
            <text:p>44404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44045">
            <text:p>44404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0001">
            <text:p>450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02">
            <text:p>450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03">
            <text:p>450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04">
            <text:p>450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05">
            <text:p>450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06">
            <text:p>450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07">
            <text:p>450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08">
            <text:p>450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09">
            <text:p>450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10">
            <text:p>450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11">
            <text:p>450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12">
            <text:p>450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13">
            <text:p>450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14">
            <text:p>4500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15">
            <text:p>450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16">
            <text:p>450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17">
            <text:p>4500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18">
            <text:p>450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19">
            <text:p>4500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20">
            <text:p>450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21">
            <text:p>450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22">
            <text:p>450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23">
            <text:p>4500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24">
            <text:p>450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25">
            <text:p>4500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26">
            <text:p>450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27">
            <text:p>4500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28">
            <text:p>4500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29">
            <text:p>4500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30">
            <text:p>4500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31">
            <text:p>4500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32">
            <text:p>450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33">
            <text:p>4500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34">
            <text:p>4500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35">
            <text:p>4500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36">
            <text:p>4500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37">
            <text:p>450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38">
            <text:p>4500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39">
            <text:p>4500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40">
            <text:p>4500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41">
            <text:p>4500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42">
            <text:p>4500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43">
            <text:p>4500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44">
            <text:p>4500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45">
            <text:p>4500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46">
            <text:p>45004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47">
            <text:p>4500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48">
            <text:p>45004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49">
            <text:p>4500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50">
            <text:p>4500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51">
            <text:p>45005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52">
            <text:p>45005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53">
            <text:p>45005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54">
            <text:p>4500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55">
            <text:p>4500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56">
            <text:p>4500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57">
            <text:p>4500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58">
            <text:p>4500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59">
            <text:p>45005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60">
            <text:p>45006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61">
            <text:p>4500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62">
            <text:p>45006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63">
            <text:p>45006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64">
            <text:p>45006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65">
            <text:p>45006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66">
            <text:p>45006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67">
            <text:p>45006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68">
            <text:p>4500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69">
            <text:p>45006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70">
            <text:p>45007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71">
            <text:p>45007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72">
            <text:p>45007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73">
            <text:p>45007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74">
            <text:p>45007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75">
            <text:p>45007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76">
            <text:p>45007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77">
            <text:p>45007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78">
            <text:p>45007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79">
            <text:p>45007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0">
            <text:p>45008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1">
            <text:p>45008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2">
            <text:p>45008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3">
            <text:p>45008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4">
            <text:p>45008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5">
            <text:p>45008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6">
            <text:p>45008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7">
            <text:p>45008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8">
            <text:p>45008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89">
            <text:p>45008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90">
            <text:p>45009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91">
            <text:p>45009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92">
            <text:p>45009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93">
            <text:p>45009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94">
            <text:p>45009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95">
            <text:p>45009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96">
            <text:p>45009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97">
            <text:p>45009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098">
            <text:p>45009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099">
            <text:p>45009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0100">
            <text:p>45010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01">
            <text:p>4501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02">
            <text:p>450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03">
            <text:p>450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04">
            <text:p>450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05">
            <text:p>450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06">
            <text:p>450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07">
            <text:p>450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08">
            <text:p>450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09">
            <text:p>4501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10">
            <text:p>450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11">
            <text:p>4501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12">
            <text:p>4501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13">
            <text:p>4501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14">
            <text:p>4501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15">
            <text:p>4501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16">
            <text:p>4501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17">
            <text:p>4501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18">
            <text:p>4501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19">
            <text:p>4501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20">
            <text:p>4501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21">
            <text:p>450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22">
            <text:p>4501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23">
            <text:p>4501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24">
            <text:p>4501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25">
            <text:p>4501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0126">
            <text:p>4501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0127">
            <text:p>4501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01">
            <text:p>57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02">
            <text:p>57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03">
            <text:p>57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05">
            <text:p>57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06">
            <text:p>57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07">
            <text:p>57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1">
            <text:p>57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2">
            <text:p>57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13">
            <text:p>57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4">
            <text:p>57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5">
            <text:p>57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6">
            <text:p>57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19">
            <text:p>57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20">
            <text:p>57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23">
            <text:p>57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24">
            <text:p>57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27">
            <text:p>57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30">
            <text:p>57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31">
            <text:p>57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32">
            <text:p>57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33">
            <text:p>57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34">
            <text:p>57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35">
            <text:p>57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37">
            <text:p>57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38">
            <text:p>57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39">
            <text:p>57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5750">
            <text:p>57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49">
            <text:p>58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851">
            <text:p>585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852">
            <text:p>585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5860">
            <text:p>5860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741">
            <text:p>574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850">
            <text:p>5850</text:p>
          </table:table-cell>
          <table:table-cell table:number-columns-repeated="4"/>
        </table:table-row>
        <table:table-row table:style-name="ro1">
          <table:table-cell office:value-type="float" office:value="5863">
            <text:p>58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5857">
            <text:p>58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5864">
            <text:p>5864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858">
            <text:p>58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5865">
            <text:p>5865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859">
            <text:p>5859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861">
            <text:p>586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5869">
            <text:p>5869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867">
            <text:p>586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5866">
            <text:p>5866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871">
            <text:p>5871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874">
            <text:p>587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5872">
            <text:p>58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5854">
            <text:p>5854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873">
            <text:p>5873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848">
            <text:p>5848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853">
            <text:p>5853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910">
            <text:p>5910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901">
            <text:p>5901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911">
            <text:p>59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5905">
            <text:p>5905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913">
            <text:p>5913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909">
            <text:p>5909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914">
            <text:p>59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5904">
            <text:p>5904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918">
            <text:p>5918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919">
            <text:p>5919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5920">
            <text:p>5920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915">
            <text:p>5915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903">
            <text:p>59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458401">
            <text:p>458401</text:p>
          </table:table-cell>
          <table:table-cell table:number-columns-repeated="4"/>
          <table:table-cell office:value-type="float" office:value="5908">
            <text:p>5908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458402">
            <text:p>458402</text:p>
          </table:table-cell>
          <table:table-cell office:value-type="string">
            <text:p>SEEN</text:p>
          </table:table-cell>
          <table:table-cell table:number-columns-repeated="3"/>
          <table:table-cell office:value-type="float" office:value="5912">
            <text:p>59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458403">
            <text:p>458403</text:p>
          </table:table-cell>
          <table:table-cell table:number-columns-repeated="4"/>
          <table:table-cell office:value-type="float" office:value="5916">
            <text:p>5916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458404">
            <text:p>4584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5902">
            <text:p>59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1">
          <table:table-cell office:value-type="float" office:value="458405">
            <text:p>458405</text:p>
          </table:table-cell>
          <table:table-cell table:number-columns-repeated="4"/>
          <table:table-cell office:value-type="float" office:value="5906">
            <text:p>5906</text:p>
          </table:table-cell>
          <table:table-cell office:value-type="string">
            <text:p>SEEN</text:p>
          </table:table-cell>
          <table:table-cell table:number-columns-repeated="3"/>
        </table:table-row>
        <table:table-row table:style-name="ro1">
          <table:table-cell office:value-type="float" office:value="458406">
            <text:p>4584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407">
            <text:p>4584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08">
            <text:p>4584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09">
            <text:p>458409</text:p>
          </table:table-cell>
          <table:table-cell table:number-columns-repeated="9"/>
        </table:table-row>
        <table:table-row table:style-name="ro1">
          <table:table-cell office:value-type="float" office:value="458410">
            <text:p>4584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11">
            <text:p>4584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412">
            <text:p>4584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13">
            <text:p>458413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14">
            <text:p>458414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15">
            <text:p>4584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416">
            <text:p>4584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17">
            <text:p>4584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18">
            <text:p>4584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419">
            <text:p>4584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20">
            <text:p>4584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421">
            <text:p>458421</text:p>
          </table:table-cell>
          <table:table-cell table:number-columns-repeated="9"/>
        </table:table-row>
        <table:table-row table:style-name="ro1">
          <table:table-cell office:value-type="float" office:value="458422">
            <text:p>4584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423">
            <text:p>4584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24">
            <text:p>4584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25">
            <text:p>4584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26">
            <text:p>4584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427">
            <text:p>458427</text:p>
          </table:table-cell>
          <table:table-cell table:number-columns-repeated="9"/>
        </table:table-row>
        <table:table-row table:style-name="ro1">
          <table:table-cell office:value-type="float" office:value="458428">
            <text:p>4584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8529">
            <text:p>458529</text:p>
          </table:table-cell>
          <table:table-cell table:number-columns-repeated="9"/>
        </table:table-row>
        <table:table-row table:style-name="ro1">
          <table:table-cell office:value-type="float" office:value="458530">
            <text:p>4585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531">
            <text:p>4585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58532">
            <text:p>4585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533">
            <text:p>4585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534">
            <text:p>4585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535">
            <text:p>4585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58536">
            <text:p>4585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5001">
            <text:p>465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02">
            <text:p>465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03">
            <text:p>465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04">
            <text:p>465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05">
            <text:p>465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06">
            <text:p>465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07">
            <text:p>465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08">
            <text:p>465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09">
            <text:p>465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10">
            <text:p>465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11">
            <text:p>465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12">
            <text:p>465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13">
            <text:p>465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14">
            <text:p>465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15">
            <text:p>465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16">
            <text:p>465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17">
            <text:p>4650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18">
            <text:p>465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19">
            <text:p>465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20">
            <text:p>465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21">
            <text:p>465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22">
            <text:p>465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23">
            <text:p>4650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24">
            <text:p>465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25">
            <text:p>4650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26">
            <text:p>465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27">
            <text:p>4650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28">
            <text:p>4650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29">
            <text:p>4650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30">
            <text:p>4650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31">
            <text:p>465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32">
            <text:p>465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33">
            <text:p>4650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34">
            <text:p>4650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35">
            <text:p>4650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36">
            <text:p>4650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37">
            <text:p>465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38">
            <text:p>4650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39">
            <text:p>4650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40">
            <text:p>4650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41">
            <text:p>4650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42">
            <text:p>4650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43">
            <text:p>4650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44">
            <text:p>4650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45">
            <text:p>46504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46">
            <text:p>4650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047">
            <text:p>4650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48">
            <text:p>46504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49">
            <text:p>4650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050">
            <text:p>4650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5151">
            <text:p>46515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52">
            <text:p>4651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53">
            <text:p>46515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54">
            <text:p>4651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55">
            <text:p>4651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56">
            <text:p>46515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57">
            <text:p>4651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58">
            <text:p>4651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59">
            <text:p>4651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60">
            <text:p>46516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61">
            <text:p>4651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62">
            <text:p>46516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63">
            <text:p>4651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64">
            <text:p>46516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65">
            <text:p>46516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66">
            <text:p>46516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67">
            <text:p>46516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68">
            <text:p>4651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69">
            <text:p>46516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70">
            <text:p>46517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71">
            <text:p>46517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72">
            <text:p>4651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73">
            <text:p>46517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74">
            <text:p>46517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75">
            <text:p>46517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76">
            <text:p>46517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77">
            <text:p>46517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78">
            <text:p>46517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79">
            <text:p>46517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80">
            <text:p>46518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81">
            <text:p>46518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82">
            <text:p>46518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83">
            <text:p>46518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84">
            <text:p>46518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85">
            <text:p>46518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86">
            <text:p>46518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87">
            <text:p>46518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88">
            <text:p>46518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89">
            <text:p>46518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90">
            <text:p>46519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91">
            <text:p>46519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92">
            <text:p>46519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93">
            <text:p>46519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94">
            <text:p>46519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195">
            <text:p>46519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96">
            <text:p>46519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197">
            <text:p>46519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5235">
            <text:p>4652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237">
            <text:p>46523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241">
            <text:p>4652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242">
            <text:p>4652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247">
            <text:p>4652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5901">
            <text:p>4659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02">
            <text:p>4659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03">
            <text:p>4659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04">
            <text:p>4659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05">
            <text:p>4659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06">
            <text:p>4659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07">
            <text:p>4659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08">
            <text:p>4659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09">
            <text:p>4659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10">
            <text:p>4659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11">
            <text:p>4659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12">
            <text:p>4659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13">
            <text:p>4659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14">
            <text:p>4659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16">
            <text:p>4659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18">
            <text:p>4659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19">
            <text:p>4659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20">
            <text:p>4659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21">
            <text:p>4659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22">
            <text:p>4659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23">
            <text:p>4659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24">
            <text:p>4659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25">
            <text:p>4659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26">
            <text:p>4659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27">
            <text:p>4659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28">
            <text:p>4659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29">
            <text:p>4659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30">
            <text:p>4659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31">
            <text:p>4659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5932">
            <text:p>4659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33">
            <text:p>4659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5934">
            <text:p>4659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6001">
            <text:p>466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02">
            <text:p>466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6003">
            <text:p>466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06">
            <text:p>466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08">
            <text:p>466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10">
            <text:p>466010</text:p>
          </table:table-cell>
          <table:table-cell table:number-columns-repeated="9"/>
        </table:table-row>
        <table:table-row table:style-name="ro1">
          <table:table-cell office:value-type="float" office:value="466011">
            <text:p>466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12">
            <text:p>466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15">
            <text:p>466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16">
            <text:p>466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18">
            <text:p>4660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6019">
            <text:p>4660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6020">
            <text:p>466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21">
            <text:p>466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22">
            <text:p>466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23">
            <text:p>466023</text:p>
          </table:table-cell>
          <table:table-cell table:number-columns-repeated="9"/>
        </table:table-row>
        <table:table-row table:style-name="ro1">
          <table:table-cell office:value-type="float" office:value="466024">
            <text:p>4660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6026">
            <text:p>466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6028">
            <text:p>466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34">
            <text:p>4660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6035">
            <text:p>4660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466036">
            <text:p>4660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38">
            <text:p>4660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39">
            <text:p>4660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40">
            <text:p>4660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41">
            <text:p>4660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42">
            <text:p>4660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466043">
            <text:p>4660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0001">
            <text:p>700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02">
            <text:p>700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03">
            <text:p>700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04">
            <text:p>700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05">
            <text:p>700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06">
            <text:p>700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07">
            <text:p>700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08">
            <text:p>700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09">
            <text:p>700009</text:p>
          </table:table-cell>
          <table:table-cell table:number-columns-repeated="9"/>
        </table:table-row>
        <table:table-row table:style-name="ro1">
          <table:table-cell office:value-type="float" office:value="700010">
            <text:p>700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11">
            <text:p>700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12">
            <text:p>700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13">
            <text:p>700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14">
            <text:p>700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15">
            <text:p>700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16">
            <text:p>700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17">
            <text:p>700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18">
            <text:p>700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19">
            <text:p>7000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20">
            <text:p>700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21">
            <text:p>7000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22">
            <text:p>700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23">
            <text:p>7000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24">
            <text:p>700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25">
            <text:p>7000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26">
            <text:p>70002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27">
            <text:p>700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28">
            <text:p>700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29">
            <text:p>7000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30">
            <text:p>7000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31">
            <text:p>700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32">
            <text:p>7000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33">
            <text:p>7000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34">
            <text:p>7000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35">
            <text:p>7000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36">
            <text:p>7000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37">
            <text:p>700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38">
            <text:p>700038</text:p>
          </table:table-cell>
          <table:table-cell table:number-columns-repeated="9"/>
        </table:table-row>
        <table:table-row table:style-name="ro1">
          <table:table-cell office:value-type="float" office:value="700039">
            <text:p>7000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40">
            <text:p>7000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41">
            <text:p>7000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42">
            <text:p>7000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43">
            <text:p>7000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44">
            <text:p>70004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45">
            <text:p>70004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46">
            <text:p>7000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47">
            <text:p>7000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48">
            <text:p>700048</text:p>
          </table:table-cell>
          <table:table-cell table:number-columns-repeated="9"/>
        </table:table-row>
        <table:table-row table:style-name="ro1">
          <table:table-cell office:value-type="float" office:value="700049">
            <text:p>7000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50">
            <text:p>7000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51">
            <text:p>70005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52">
            <text:p>70005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53">
            <text:p>7000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54">
            <text:p>70005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55">
            <text:p>7000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056">
            <text:p>70005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57">
            <text:p>70005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58">
            <text:p>70005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59">
            <text:p>70005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060">
            <text:p>70006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0101">
            <text:p>700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02">
            <text:p>7001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03">
            <text:p>700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04">
            <text:p>700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05">
            <text:p>7001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06">
            <text:p>700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07">
            <text:p>700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08">
            <text:p>700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09">
            <text:p>700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10">
            <text:p>7001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11">
            <text:p>7001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12">
            <text:p>700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13">
            <text:p>7001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14">
            <text:p>7001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15">
            <text:p>7001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16">
            <text:p>7001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17">
            <text:p>7001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18">
            <text:p>7001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19">
            <text:p>7001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20">
            <text:p>7001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21">
            <text:p>7001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22">
            <text:p>7001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23">
            <text:p>7001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24">
            <text:p>7001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25">
            <text:p>7001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26">
            <text:p>7001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27">
            <text:p>7001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28">
            <text:p>7001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29">
            <text:p>7001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30">
            <text:p>7001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31">
            <text:p>7001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32">
            <text:p>7001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33">
            <text:p>7001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34">
            <text:p>7001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35">
            <text:p>7001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36">
            <text:p>7001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37">
            <text:p>7001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38">
            <text:p>70013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39">
            <text:p>7001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40">
            <text:p>7001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41">
            <text:p>70014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42">
            <text:p>7001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43">
            <text:p>7001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44">
            <text:p>70014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45">
            <text:p>70014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46">
            <text:p>7001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47">
            <text:p>7001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48">
            <text:p>70014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49">
            <text:p>7001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50">
            <text:p>70015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51">
            <text:p>70015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0152">
            <text:p>7001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53">
            <text:p>7001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54">
            <text:p>7001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0155">
            <text:p>70015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1001">
            <text:p>701001</text:p>
          </table:table-cell>
          <table:table-cell table:number-columns-repeated="9"/>
        </table:table-row>
        <table:table-row table:style-name="ro1">
          <table:table-cell office:value-type="float" office:value="701002">
            <text:p>701002</text:p>
          </table:table-cell>
          <table:table-cell table:number-columns-repeated="9"/>
        </table:table-row>
        <table:table-row table:style-name="ro1">
          <table:table-cell office:value-type="float" office:value="701003">
            <text:p>701003</text:p>
          </table:table-cell>
          <table:table-cell table:number-columns-repeated="9"/>
        </table:table-row>
        <table:table-row table:style-name="ro1">
          <table:table-cell office:value-type="float" office:value="701004">
            <text:p>701004</text:p>
          </table:table-cell>
          <table:table-cell table:number-columns-repeated="9"/>
        </table:table-row>
        <table:table-row table:style-name="ro1">
          <table:table-cell office:value-type="float" office:value="701005">
            <text:p>701005</text:p>
          </table:table-cell>
          <table:table-cell table:number-columns-repeated="9"/>
        </table:table-row>
        <table:table-row table:style-name="ro1">
          <table:table-cell office:value-type="float" office:value="701006">
            <text:p>701006</text:p>
          </table:table-cell>
          <table:table-cell table:number-columns-repeated="9"/>
        </table:table-row>
        <table:table-row table:style-name="ro1">
          <table:table-cell office:value-type="float" office:value="701007">
            <text:p>701007</text:p>
          </table:table-cell>
          <table:table-cell table:number-columns-repeated="9"/>
        </table:table-row>
        <table:table-row table:style-name="ro1">
          <table:table-cell office:value-type="float" office:value="701008">
            <text:p>701008</text:p>
          </table:table-cell>
          <table:table-cell table:number-columns-repeated="9"/>
        </table:table-row>
        <table:table-row table:style-name="ro1">
          <table:table-cell office:value-type="float" office:value="701009">
            <text:p>701009</text:p>
          </table:table-cell>
          <table:table-cell table:number-columns-repeated="9"/>
        </table:table-row>
        <table:table-row table:style-name="ro1">
          <table:table-cell office:value-type="float" office:value="701010">
            <text:p>701010</text:p>
          </table:table-cell>
          <table:table-cell table:number-columns-repeated="9"/>
        </table:table-row>
        <table:table-row table:style-name="ro1">
          <table:table-cell office:value-type="float" office:value="701011">
            <text:p>701011</text:p>
          </table:table-cell>
          <table:table-cell table:number-columns-repeated="9"/>
        </table:table-row>
        <table:table-row table:style-name="ro1">
          <table:table-cell office:value-type="float" office:value="701012">
            <text:p>701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13">
            <text:p>701013</text:p>
          </table:table-cell>
          <table:table-cell table:number-columns-repeated="9"/>
        </table:table-row>
        <table:table-row table:style-name="ro1">
          <table:table-cell office:value-type="float" office:value="701014">
            <text:p>701014</text:p>
          </table:table-cell>
          <table:table-cell table:number-columns-repeated="9"/>
        </table:table-row>
        <table:table-row table:style-name="ro1">
          <table:table-cell office:value-type="float" office:value="701016">
            <text:p>701016</text:p>
          </table:table-cell>
          <table:table-cell table:number-columns-repeated="9"/>
        </table:table-row>
        <table:table-row table:style-name="ro1">
          <table:table-cell office:value-type="float" office:value="701017">
            <text:p>7010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18">
            <text:p>701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19">
            <text:p>701019</text:p>
          </table:table-cell>
          <table:table-cell table:number-columns-repeated="9"/>
        </table:table-row>
        <table:table-row table:style-name="ro1">
          <table:table-cell office:value-type="float" office:value="701020">
            <text:p>701020</text:p>
          </table:table-cell>
          <table:table-cell table:number-columns-repeated="9"/>
        </table:table-row>
        <table:table-row table:style-name="ro1">
          <table:table-cell office:value-type="float" office:value="701021">
            <text:p>701021</text:p>
          </table:table-cell>
          <table:table-cell table:number-columns-repeated="9"/>
        </table:table-row>
        <table:table-row table:style-name="ro1">
          <table:table-cell office:value-type="float" office:value="701022">
            <text:p>701022</text:p>
          </table:table-cell>
          <table:table-cell table:number-columns-repeated="9"/>
        </table:table-row>
        <table:table-row table:style-name="ro1">
          <table:table-cell office:value-type="float" office:value="701023">
            <text:p>7010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24">
            <text:p>701024</text:p>
          </table:table-cell>
          <table:table-cell table:number-columns-repeated="9"/>
        </table:table-row>
        <table:table-row table:style-name="ro1">
          <table:table-cell office:value-type="float" office:value="701025">
            <text:p>701025</text:p>
          </table:table-cell>
          <table:table-cell table:number-columns-repeated="9"/>
        </table:table-row>
        <table:table-row table:style-name="ro1">
          <table:table-cell office:value-type="float" office:value="701026">
            <text:p>701026</text:p>
          </table:table-cell>
          <table:table-cell table:number-columns-repeated="9"/>
        </table:table-row>
        <table:table-row table:style-name="ro1">
          <table:table-cell office:value-type="float" office:value="701027">
            <text:p>701027</text:p>
          </table:table-cell>
          <table:table-cell table:number-columns-repeated="9"/>
        </table:table-row>
        <table:table-row table:style-name="ro1">
          <table:table-cell office:value-type="float" office:value="701028">
            <text:p>701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29">
            <text:p>701029</text:p>
          </table:table-cell>
          <table:table-cell table:number-columns-repeated="9"/>
        </table:table-row>
        <table:table-row table:style-name="ro1">
          <table:table-cell office:value-type="float" office:value="701030">
            <text:p>701030</text:p>
          </table:table-cell>
          <table:table-cell table:number-columns-repeated="9"/>
        </table:table-row>
        <table:table-row table:style-name="ro1">
          <table:table-cell office:value-type="float" office:value="701031">
            <text:p>70103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32">
            <text:p>701032</text:p>
          </table:table-cell>
          <table:table-cell table:number-columns-repeated="9"/>
        </table:table-row>
        <table:table-row table:style-name="ro1">
          <table:table-cell office:value-type="float" office:value="701033">
            <text:p>701033</text:p>
          </table:table-cell>
          <table:table-cell table:number-columns-repeated="9"/>
        </table:table-row>
        <table:table-row table:style-name="ro1">
          <table:table-cell office:value-type="float" office:value="701034">
            <text:p>701034</text:p>
          </table:table-cell>
          <table:table-cell table:number-columns-repeated="9"/>
        </table:table-row>
        <table:table-row table:style-name="ro1">
          <table:table-cell office:value-type="float" office:value="701035">
            <text:p>7010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36">
            <text:p>701036</text:p>
          </table:table-cell>
          <table:table-cell table:number-columns-repeated="9"/>
        </table:table-row>
        <table:table-row table:style-name="ro1">
          <table:table-cell office:value-type="float" office:value="701037">
            <text:p>7010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38">
            <text:p>701038</text:p>
          </table:table-cell>
          <table:table-cell table:number-columns-repeated="9"/>
        </table:table-row>
        <table:table-row table:style-name="ro1">
          <table:table-cell office:value-type="float" office:value="701039">
            <text:p>701039</text:p>
          </table:table-cell>
          <table:table-cell table:number-columns-repeated="9"/>
        </table:table-row>
        <table:table-row table:style-name="ro1">
          <table:table-cell office:value-type="float" office:value="701040">
            <text:p>701040</text:p>
          </table:table-cell>
          <table:table-cell table:number-columns-repeated="9"/>
        </table:table-row>
        <table:table-row table:style-name="ro1">
          <table:table-cell office:value-type="float" office:value="701041">
            <text:p>701041</text:p>
          </table:table-cell>
          <table:table-cell table:number-columns-repeated="9"/>
        </table:table-row>
        <table:table-row table:style-name="ro1">
          <table:table-cell office:value-type="float" office:value="701042">
            <text:p>701042</text:p>
          </table:table-cell>
          <table:table-cell table:number-columns-repeated="9"/>
        </table:table-row>
        <table:table-row table:style-name="ro1">
          <table:table-cell office:value-type="float" office:value="701043">
            <text:p>701043</text:p>
          </table:table-cell>
          <table:table-cell table:number-columns-repeated="9"/>
        </table:table-row>
        <table:table-row table:style-name="ro1">
          <table:table-cell office:value-type="float" office:value="701044">
            <text:p>70104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45">
            <text:p>701045</text:p>
          </table:table-cell>
          <table:table-cell table:number-columns-repeated="9"/>
        </table:table-row>
        <table:table-row table:style-name="ro1">
          <table:table-cell office:value-type="float" office:value="701046">
            <text:p>701046</text:p>
          </table:table-cell>
          <table:table-cell table:number-columns-repeated="9"/>
        </table:table-row>
        <table:table-row table:style-name="ro1">
          <table:table-cell office:value-type="float" office:value="701047">
            <text:p>7010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048">
            <text:p>701048</text:p>
          </table:table-cell>
          <table:table-cell table:number-columns-repeated="9"/>
        </table:table-row>
        <table:table-row table:style-name="ro1">
          <table:table-cell office:value-type="float" office:value="701049">
            <text:p>701049</text:p>
          </table:table-cell>
          <table:table-cell table:number-columns-repeated="9"/>
        </table:table-row>
        <table:table-row table:style-name="ro1">
          <table:table-cell office:value-type="float" office:value="701050">
            <text:p>701050</text:p>
          </table:table-cell>
          <table:table-cell table:number-columns-repeated="9"/>
        </table:table-row>
        <table:table-row table:style-name="ro1">
          <table:table-cell office:value-type="float" office:value="701051">
            <text:p>701051</text:p>
          </table:table-cell>
          <table:table-cell table:number-columns-repeated="9"/>
        </table:table-row>
        <table:table-row table:style-name="ro1">
          <table:table-cell office:value-type="float" office:value="701052">
            <text:p>701052</text:p>
          </table:table-cell>
          <table:table-cell table:number-columns-repeated="9"/>
        </table:table-row>
        <table:table-row table:style-name="ro1">
          <table:table-cell office:value-type="float" office:value="701053">
            <text:p>701053</text:p>
          </table:table-cell>
          <table:table-cell table:number-columns-repeated="9"/>
        </table:table-row>
        <table:table-row table:style-name="ro1">
          <table:table-cell office:value-type="float" office:value="701054">
            <text:p>701054</text:p>
          </table:table-cell>
          <table:table-cell table:number-columns-repeated="9"/>
        </table:table-row>
        <table:table-row table:style-name="ro1">
          <table:table-cell office:value-type="float" office:value="701055">
            <text:p>701055</text:p>
          </table:table-cell>
          <table:table-cell table:number-columns-repeated="9"/>
        </table:table-row>
        <table:table-row table:style-name="ro1">
          <table:table-cell office:value-type="float" office:value="701056">
            <text:p>701056</text:p>
          </table:table-cell>
          <table:table-cell table:number-columns-repeated="9"/>
        </table:table-row>
        <table:table-row table:style-name="ro1">
          <table:table-cell office:value-type="float" office:value="701057">
            <text:p>701057</text:p>
          </table:table-cell>
          <table:table-cell table:number-columns-repeated="9"/>
        </table:table-row>
        <table:table-row table:style-name="ro1">
          <table:table-cell office:value-type="float" office:value="701058">
            <text:p>701058</text:p>
          </table:table-cell>
          <table:table-cell table:number-columns-repeated="9"/>
        </table:table-row>
        <table:table-row table:style-name="ro1">
          <table:table-cell office:value-type="float" office:value="701059">
            <text:p>701059</text:p>
          </table:table-cell>
          <table:table-cell table:number-columns-repeated="9"/>
        </table:table-row>
        <table:table-row table:style-name="ro1">
          <table:table-cell office:value-type="float" office:value="701060">
            <text:p>70106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1501">
            <text:p>701501</text:p>
          </table:table-cell>
          <table:table-cell table:number-columns-repeated="9"/>
        </table:table-row>
        <table:table-row table:style-name="ro1">
          <table:table-cell office:value-type="float" office:value="701502">
            <text:p>701502</text:p>
          </table:table-cell>
          <table:table-cell table:number-columns-repeated="9"/>
        </table:table-row>
        <table:table-row table:style-name="ro1">
          <table:table-cell office:value-type="float" office:value="701503">
            <text:p>701503</text:p>
          </table:table-cell>
          <table:table-cell table:number-columns-repeated="9"/>
        </table:table-row>
        <table:table-row table:style-name="ro1">
          <table:table-cell office:value-type="float" office:value="701504">
            <text:p>701504</text:p>
          </table:table-cell>
          <table:table-cell table:number-columns-repeated="9"/>
        </table:table-row>
        <table:table-row table:style-name="ro1">
          <table:table-cell office:value-type="float" office:value="701505">
            <text:p>701505</text:p>
          </table:table-cell>
          <table:table-cell table:number-columns-repeated="9"/>
        </table:table-row>
        <table:table-row table:style-name="ro1">
          <table:table-cell office:value-type="float" office:value="701506">
            <text:p>701506</text:p>
          </table:table-cell>
          <table:table-cell table:number-columns-repeated="9"/>
        </table:table-row>
        <table:table-row table:style-name="ro1">
          <table:table-cell office:value-type="float" office:value="701507">
            <text:p>701507</text:p>
          </table:table-cell>
          <table:table-cell table:number-columns-repeated="9"/>
        </table:table-row>
        <table:table-row table:style-name="ro1">
          <table:table-cell office:value-type="float" office:value="701508">
            <text:p>701508</text:p>
          </table:table-cell>
          <table:table-cell table:number-columns-repeated="9"/>
        </table:table-row>
        <table:table-row table:style-name="ro1">
          <table:table-cell office:value-type="float" office:value="701509">
            <text:p>701509</text:p>
          </table:table-cell>
          <table:table-cell table:number-columns-repeated="9"/>
        </table:table-row>
        <table:table-row table:style-name="ro1">
          <table:table-cell office:value-type="float" office:value="701510">
            <text:p>701510</text:p>
          </table:table-cell>
          <table:table-cell table:number-columns-repeated="9"/>
        </table:table-row>
        <table:table-row table:style-name="ro1">
          <table:table-cell office:value-type="float" office:value="701511">
            <text:p>701511</text:p>
          </table:table-cell>
          <table:table-cell table:number-columns-repeated="9"/>
        </table:table-row>
        <table:table-row table:style-name="ro1">
          <table:table-cell office:value-type="float" office:value="701512">
            <text:p>7015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1513">
            <text:p>701513</text:p>
          </table:table-cell>
          <table:table-cell table:number-columns-repeated="9"/>
        </table:table-row>
        <table:table-row table:style-name="ro1">
          <table:table-cell office:value-type="float" office:value="701514">
            <text:p>701514</text:p>
          </table:table-cell>
          <table:table-cell table:number-columns-repeated="9"/>
        </table:table-row>
        <table:table-row table:style-name="ro1">
          <table:table-cell office:value-type="float" office:value="701515">
            <text:p>701515</text:p>
          </table:table-cell>
          <table:table-cell table:number-columns-repeated="9"/>
        </table:table-row>
        <table:table-row table:style-name="ro1">
          <table:table-cell office:value-type="float" office:value="701516">
            <text:p>701516</text:p>
          </table:table-cell>
          <table:table-cell table:number-columns-repeated="9"/>
        </table:table-row>
        <table:table-row table:style-name="ro1">
          <table:table-cell office:value-type="float" office:value="701517">
            <text:p>701517</text:p>
          </table:table-cell>
          <table:table-cell table:number-columns-repeated="9"/>
        </table:table-row>
        <table:table-row table:style-name="ro1">
          <table:table-cell office:value-type="float" office:value="701518">
            <text:p>701518</text:p>
          </table:table-cell>
          <table:table-cell table:number-columns-repeated="9"/>
        </table:table-row>
        <table:table-row table:style-name="ro1">
          <table:table-cell office:value-type="float" office:value="701519">
            <text:p>701519</text:p>
          </table:table-cell>
          <table:table-cell table:number-columns-repeated="9"/>
        </table:table-row>
        <table:table-row table:style-name="ro1">
          <table:table-cell office:value-type="float" office:value="701520">
            <text:p>701520</text:p>
          </table:table-cell>
          <table:table-cell table:number-columns-repeated="9"/>
        </table:table-row>
        <table:table-row table:style-name="ro1">
          <table:table-cell office:value-type="float" office:value="701521">
            <text:p>701521</text:p>
          </table:table-cell>
          <table:table-cell table:number-columns-repeated="9"/>
        </table:table-row>
        <table:table-row table:style-name="ro1">
          <table:table-cell office:value-type="float" office:value="701522">
            <text:p>701522</text:p>
          </table:table-cell>
          <table:table-cell table:number-columns-repeated="9"/>
        </table:table-row>
        <table:table-row table:style-name="ro1">
          <table:table-cell office:value-type="float" office:value="701523">
            <text:p>701523</text:p>
          </table:table-cell>
          <table:table-cell table:number-columns-repeated="9"/>
        </table:table-row>
        <table:table-row table:style-name="ro1">
          <table:table-cell office:value-type="float" office:value="701524">
            <text:p>701524</text:p>
          </table:table-cell>
          <table:table-cell table:number-columns-repeated="9"/>
        </table:table-row>
        <table:table-row table:style-name="ro1">
          <table:table-cell office:value-type="float" office:value="701525">
            <text:p>701525</text:p>
          </table:table-cell>
          <table:table-cell table:number-columns-repeated="9"/>
        </table:table-row>
        <table:table-row table:style-name="ro1">
          <table:table-cell office:value-type="float" office:value="701526">
            <text:p>701526</text:p>
          </table:table-cell>
          <table:table-cell table:number-columns-repeated="9"/>
        </table:table-row>
        <table:table-row table:style-name="ro1">
          <table:table-cell office:value-type="float" office:value="701527">
            <text:p>701527</text:p>
          </table:table-cell>
          <table:table-cell table:number-columns-repeated="9"/>
        </table:table-row>
        <table:table-row table:style-name="ro1">
          <table:table-cell office:value-type="float" office:value="701528">
            <text:p>701528</text:p>
          </table:table-cell>
          <table:table-cell table:number-columns-repeated="9"/>
        </table:table-row>
        <table:table-row table:style-name="ro1">
          <table:table-cell office:value-type="float" office:value="701529">
            <text:p>701529</text:p>
          </table:table-cell>
          <table:table-cell table:number-columns-repeated="9"/>
        </table:table-row>
        <table:table-row table:style-name="ro1">
          <table:table-cell office:value-type="float" office:value="701530">
            <text:p>70153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7001">
            <text:p>707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02">
            <text:p>707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03">
            <text:p>707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04">
            <text:p>707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05">
            <text:p>707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06">
            <text:p>707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07">
            <text:p>707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7008">
            <text:p>7070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7009">
            <text:p>707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10">
            <text:p>707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11">
            <text:p>707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7012">
            <text:p>707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13">
            <text:p>707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14">
            <text:p>707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15">
            <text:p>707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16">
            <text:p>707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17">
            <text:p>707017</text:p>
          </table:table-cell>
          <table:table-cell table:number-columns-repeated="9"/>
        </table:table-row>
        <table:table-row table:style-name="ro1">
          <table:table-cell office:value-type="float" office:value="707018">
            <text:p>707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19">
            <text:p>707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20">
            <text:p>707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21">
            <text:p>707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22">
            <text:p>707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23">
            <text:p>7070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24">
            <text:p>707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25">
            <text:p>707025</text:p>
          </table:table-cell>
          <table:table-cell table:number-columns-repeated="9"/>
        </table:table-row>
        <table:table-row table:style-name="ro1">
          <table:table-cell office:value-type="float" office:value="707026">
            <text:p>707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07027">
            <text:p>70702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28">
            <text:p>7070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style-name="ce1" office:value-type="float" office:value="707029">
            <text:p>7070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07030">
            <text:p>7070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10101">
            <text:p>710101</text:p>
          </table:table-cell>
          <table:table-cell table:number-columns-repeated="9"/>
        </table:table-row>
        <table:table-row table:style-name="ro1">
          <table:table-cell office:value-type="float" office:value="710102">
            <text:p>710102</text:p>
          </table:table-cell>
          <table:table-cell table:number-columns-repeated="9"/>
        </table:table-row>
        <table:table-row table:style-name="ro1">
          <table:table-cell office:value-type="float" office:value="710103">
            <text:p>710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04">
            <text:p>7101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05">
            <text:p>7101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06">
            <text:p>710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07">
            <text:p>710107</text:p>
          </table:table-cell>
          <table:table-cell table:number-columns-repeated="9"/>
        </table:table-row>
        <table:table-row table:style-name="ro1">
          <table:table-cell office:value-type="float" office:value="710108">
            <text:p>7101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09">
            <text:p>710109</text:p>
          </table:table-cell>
          <table:table-cell table:number-columns-repeated="9"/>
        </table:table-row>
        <table:table-row table:style-name="ro1">
          <table:table-cell office:value-type="float" office:value="710110">
            <text:p>7101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11">
            <text:p>710111</text:p>
          </table:table-cell>
          <table:table-cell table:number-columns-repeated="9"/>
        </table:table-row>
        <table:table-row table:style-name="ro1">
          <table:table-cell office:value-type="float" office:value="710112">
            <text:p>7101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13">
            <text:p>710113</text:p>
          </table:table-cell>
          <table:table-cell table:number-columns-repeated="9"/>
        </table:table-row>
        <table:table-row table:style-name="ro1">
          <table:table-cell office:value-type="float" office:value="710114">
            <text:p>710114</text:p>
          </table:table-cell>
          <table:table-cell table:number-columns-repeated="9"/>
        </table:table-row>
        <table:table-row table:style-name="ro1">
          <table:table-cell office:value-type="float" office:value="710115">
            <text:p>710115</text:p>
          </table:table-cell>
          <table:table-cell table:number-columns-repeated="9"/>
        </table:table-row>
        <table:table-row table:style-name="ro1">
          <table:table-cell office:value-type="float" office:value="710116">
            <text:p>7101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17">
            <text:p>710117</text:p>
          </table:table-cell>
          <table:table-cell table:number-columns-repeated="9"/>
        </table:table-row>
        <table:table-row table:style-name="ro1">
          <table:table-cell office:value-type="float" office:value="710118">
            <text:p>7101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0119">
            <text:p>7101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120">
            <text:p>710120</text:p>
          </table:table-cell>
          <table:table-cell table:number-columns-repeated="9"/>
        </table:table-row>
        <table:table-row table:style-name="ro1">
          <table:table-cell office:value-type="float" office:value="710121">
            <text:p>710121</text:p>
          </table:table-cell>
          <table:table-cell table:number-columns-repeated="9"/>
        </table:table-row>
        <table:table-row table:style-name="ro1">
          <table:table-cell office:value-type="float" office:value="710122">
            <text:p>7101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0123">
            <text:p>710123</text:p>
          </table:table-cell>
          <table:table-cell table:number-columns-repeated="9"/>
        </table:table-row>
        <table:table-row table:style-name="ro1">
          <table:table-cell office:value-type="float" office:value="710124">
            <text:p>710124</text:p>
          </table:table-cell>
          <table:table-cell table:number-columns-repeated="9"/>
        </table:table-row>
        <table:table-row table:style-name="ro1">
          <table:table-cell office:value-type="float" office:value="710125">
            <text:p>7101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0126">
            <text:p>710126</text:p>
          </table:table-cell>
          <table:table-cell table:number-columns-repeated="9"/>
        </table:table-row>
        <table:table-row table:style-name="ro1">
          <table:table-cell office:value-type="float" office:value="710127">
            <text:p>710127</text:p>
          </table:table-cell>
          <table:table-cell table:number-columns-repeated="9"/>
        </table:table-row>
        <table:table-row table:style-name="ro1">
          <table:table-cell office:value-type="float" office:value="710128">
            <text:p>710128</text:p>
          </table:table-cell>
          <table:table-cell table:number-columns-repeated="9"/>
        </table:table-row>
        <table:table-row table:style-name="ro1">
          <table:table-cell office:value-type="float" office:value="710129">
            <text:p>710129</text:p>
          </table:table-cell>
          <table:table-cell table:number-columns-repeated="9"/>
        </table:table-row>
        <table:table-row table:style-name="ro1">
          <table:table-cell office:value-type="float" office:value="710130">
            <text:p>7101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10256">
            <text:p>710256</text:p>
          </table:table-cell>
          <table:table-cell table:number-columns-repeated="9"/>
        </table:table-row>
        <table:table-row table:style-name="ro1">
          <table:table-cell office:value-type="float" office:value="710257">
            <text:p>710257</text:p>
          </table:table-cell>
          <table:table-cell table:number-columns-repeated="9"/>
        </table:table-row>
        <table:table-row table:style-name="ro1">
          <table:table-cell office:value-type="float" office:value="710258">
            <text:p>710258</text:p>
          </table:table-cell>
          <table:table-cell table:number-columns-repeated="9"/>
        </table:table-row>
        <table:table-row table:style-name="ro1">
          <table:table-cell office:value-type="float" office:value="710259">
            <text:p>710259</text:p>
          </table:table-cell>
          <table:table-cell table:number-columns-repeated="9"/>
        </table:table-row>
        <table:table-row table:style-name="ro1">
          <table:table-cell office:value-type="float" office:value="710260">
            <text:p>710260</text:p>
          </table:table-cell>
          <table:table-cell table:number-columns-repeated="9"/>
        </table:table-row>
        <table:table-row table:style-name="ro1">
          <table:table-cell office:value-type="float" office:value="710261">
            <text:p>7102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262">
            <text:p>71026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263">
            <text:p>71026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264">
            <text:p>71026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265">
            <text:p>710265</text:p>
          </table:table-cell>
          <table:table-cell table:number-columns-repeated="9"/>
        </table:table-row>
        <table:table-row table:style-name="ro1">
          <table:table-cell office:value-type="float" office:value="710266">
            <text:p>71026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267">
            <text:p>71026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0268">
            <text:p>7102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0269">
            <text:p>710269</text:p>
          </table:table-cell>
          <table:table-cell table:number-columns-repeated="9"/>
        </table:table-row>
        <table:table-row table:style-name="ro1">
          <table:table-cell office:value-type="float" office:value="710270">
            <text:p>710270</text:p>
          </table:table-cell>
          <table:table-cell table:number-columns-repeated="9"/>
        </table:table-row>
        <table:table-row table:style-name="ro1">
          <table:table-cell office:value-type="float" office:value="710271">
            <text:p>710271</text:p>
          </table:table-cell>
          <table:table-cell table:number-columns-repeated="9"/>
        </table:table-row>
        <table:table-row table:style-name="ro1">
          <table:table-cell office:value-type="float" office:value="710272">
            <text:p>710272</text:p>
          </table:table-cell>
          <table:table-cell table:number-columns-repeated="9"/>
        </table:table-row>
        <table:table-row table:style-name="ro1">
          <table:table-cell office:value-type="float" office:value="710273">
            <text:p>71027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10374">
            <text:p>710374</text:p>
          </table:table-cell>
          <table:table-cell table:number-columns-repeated="9"/>
        </table:table-row>
        <table:table-row table:style-name="ro1">
          <table:table-cell office:value-type="float" office:value="710375">
            <text:p>710375</text:p>
          </table:table-cell>
          <table:table-cell table:number-columns-repeated="9"/>
        </table:table-row>
        <table:table-row table:style-name="ro1">
          <table:table-cell office:value-type="float" office:value="710376">
            <text:p>710376</text:p>
          </table:table-cell>
          <table:table-cell table:number-columns-repeated="9"/>
        </table:table-row>
        <table:table-row table:style-name="ro1">
          <table:table-cell office:value-type="float" office:value="710377">
            <text:p>71037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0378">
            <text:p>71037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0379">
            <text:p>71037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17001">
            <text:p>717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02">
            <text:p>717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03">
            <text:p>717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04">
            <text:p>717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05">
            <text:p>717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7006">
            <text:p>7170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7007">
            <text:p>7170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08">
            <text:p>717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09">
            <text:p>717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0">
            <text:p>717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1">
            <text:p>717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2">
            <text:p>717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3">
            <text:p>717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4">
            <text:p>7170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17015">
            <text:p>7170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6">
            <text:p>717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7">
            <text:p>7170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8">
            <text:p>717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19">
            <text:p>717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20">
            <text:p>7170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21">
            <text:p>717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22">
            <text:p>7170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23">
            <text:p>7170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24">
            <text:p>717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17025">
            <text:p>7170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20101">
            <text:p>720101</text:p>
          </table:table-cell>
          <table:table-cell table:number-columns-repeated="9"/>
        </table:table-row>
        <table:table-row table:style-name="ro1">
          <table:table-cell office:value-type="float" office:value="720102">
            <text:p>720102</text:p>
          </table:table-cell>
          <table:table-cell table:number-columns-repeated="9"/>
        </table:table-row>
        <table:table-row table:style-name="ro1">
          <table:table-cell office:value-type="float" office:value="720103">
            <text:p>720103</text:p>
          </table:table-cell>
          <table:table-cell table:number-columns-repeated="9"/>
        </table:table-row>
        <table:table-row table:style-name="ro1">
          <table:table-cell office:value-type="float" office:value="720104">
            <text:p>720104</text:p>
          </table:table-cell>
          <table:table-cell table:number-columns-repeated="9"/>
        </table:table-row>
        <table:table-row table:style-name="ro1">
          <table:table-cell office:value-type="float" office:value="720105">
            <text:p>720105</text:p>
          </table:table-cell>
          <table:table-cell table:number-columns-repeated="9"/>
        </table:table-row>
        <table:table-row table:style-name="ro1">
          <table:table-cell office:value-type="float" office:value="720106">
            <text:p>720106</text:p>
          </table:table-cell>
          <table:table-cell table:number-columns-repeated="9"/>
        </table:table-row>
        <table:table-row table:style-name="ro1">
          <table:table-cell office:value-type="float" office:value="720107">
            <text:p>720107</text:p>
          </table:table-cell>
          <table:table-cell table:number-columns-repeated="9"/>
        </table:table-row>
        <table:table-row table:style-name="ro1">
          <table:table-cell office:value-type="float" office:value="720108">
            <text:p>720108</text:p>
          </table:table-cell>
          <table:table-cell table:number-columns-repeated="9"/>
        </table:table-row>
        <table:table-row table:style-name="ro1">
          <table:table-cell office:value-type="float" office:value="720109">
            <text:p>720109</text:p>
          </table:table-cell>
          <table:table-cell table:number-columns-repeated="9"/>
        </table:table-row>
        <table:table-row table:style-name="ro1">
          <table:table-cell office:value-type="float" office:value="720110">
            <text:p>720110</text:p>
          </table:table-cell>
          <table:table-cell table:number-columns-repeated="9"/>
        </table:table-row>
        <table:table-row table:style-name="ro1">
          <table:table-cell office:value-type="float" office:value="720111">
            <text:p>720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20112">
            <text:p>720112</text:p>
          </table:table-cell>
          <table:table-cell table:number-columns-repeated="9"/>
        </table:table-row>
        <table:table-row table:style-name="ro1">
          <table:table-cell office:value-type="float" office:value="720113">
            <text:p>720113</text:p>
          </table:table-cell>
          <table:table-cell table:number-columns-repeated="9"/>
        </table:table-row>
        <table:table-row table:style-name="ro1">
          <table:table-cell office:value-type="float" office:value="720114">
            <text:p>7201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115">
            <text:p>720115</text:p>
          </table:table-cell>
          <table:table-cell table:number-columns-repeated="9"/>
        </table:table-row>
        <table:table-row table:style-name="ro1">
          <table:table-cell office:value-type="float" office:value="720116">
            <text:p>720116</text:p>
          </table:table-cell>
          <table:table-cell table:number-columns-repeated="9"/>
        </table:table-row>
        <table:table-row table:style-name="ro1">
          <table:table-cell office:value-type="float" office:value="720117">
            <text:p>720117</text:p>
          </table:table-cell>
          <table:table-cell table:number-columns-repeated="9"/>
        </table:table-row>
        <table:table-row table:style-name="ro1">
          <table:table-cell office:value-type="float" office:value="720118">
            <text:p>7201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119">
            <text:p>720119</text:p>
          </table:table-cell>
          <table:table-cell table:number-columns-repeated="9"/>
        </table:table-row>
        <table:table-row table:style-name="ro1">
          <table:table-cell office:value-type="float" office:value="720120">
            <text:p>720120</text:p>
          </table:table-cell>
          <table:table-cell table:number-columns-repeated="9"/>
        </table:table-row>
        <table:table-row table:style-name="ro1">
          <table:table-cell office:value-type="float" office:value="720121">
            <text:p>720121</text:p>
          </table:table-cell>
          <table:table-cell table:number-columns-repeated="9"/>
        </table:table-row>
        <table:table-row table:style-name="ro1">
          <table:table-cell office:value-type="float" office:value="720122">
            <text:p>72012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20501">
            <text:p>720501</text:p>
          </table:table-cell>
          <table:table-cell table:number-columns-repeated="9"/>
        </table:table-row>
        <table:table-row table:style-name="ro1">
          <table:table-cell office:value-type="float" office:value="720502">
            <text:p>720502</text:p>
          </table:table-cell>
          <table:table-cell table:number-columns-repeated="9"/>
        </table:table-row>
        <table:table-row table:style-name="ro1">
          <table:table-cell office:value-type="float" office:value="720503">
            <text:p>720503</text:p>
          </table:table-cell>
          <table:table-cell table:number-columns-repeated="9"/>
        </table:table-row>
        <table:table-row table:style-name="ro1">
          <table:table-cell office:value-type="float" office:value="720504">
            <text:p>720504</text:p>
          </table:table-cell>
          <table:table-cell table:number-columns-repeated="9"/>
        </table:table-row>
        <table:table-row table:style-name="ro1">
          <table:table-cell office:value-type="float" office:value="720505">
            <text:p>720505</text:p>
          </table:table-cell>
          <table:table-cell table:number-columns-repeated="9"/>
        </table:table-row>
        <table:table-row table:style-name="ro1">
          <table:table-cell office:value-type="float" office:value="720506">
            <text:p>720506</text:p>
          </table:table-cell>
          <table:table-cell table:number-columns-repeated="9"/>
        </table:table-row>
        <table:table-row table:style-name="ro1">
          <table:table-cell office:value-type="float" office:value="720507">
            <text:p>720507</text:p>
          </table:table-cell>
          <table:table-cell table:number-columns-repeated="9"/>
        </table:table-row>
        <table:table-row table:style-name="ro1">
          <table:table-cell office:value-type="float" office:value="720508">
            <text:p>720508</text:p>
          </table:table-cell>
          <table:table-cell table:number-columns-repeated="9"/>
        </table:table-row>
        <table:table-row table:style-name="ro1">
          <table:table-cell office:value-type="float" office:value="720509">
            <text:p>720509</text:p>
          </table:table-cell>
          <table:table-cell table:number-columns-repeated="9"/>
        </table:table-row>
        <table:table-row table:style-name="ro1">
          <table:table-cell office:value-type="float" office:value="720510">
            <text:p>720510</text:p>
          </table:table-cell>
          <table:table-cell table:number-columns-repeated="9"/>
        </table:table-row>
        <table:table-row table:style-name="ro1">
          <table:table-cell office:value-type="float" office:value="720511">
            <text:p>720511</text:p>
          </table:table-cell>
          <table:table-cell table:number-columns-repeated="9"/>
        </table:table-row>
        <table:table-row table:style-name="ro1">
          <table:table-cell office:value-type="float" office:value="720512">
            <text:p>720512</text:p>
          </table:table-cell>
          <table:table-cell table:number-columns-repeated="9"/>
        </table:table-row>
        <table:table-row table:style-name="ro1">
          <table:table-cell office:value-type="float" office:value="720513">
            <text:p>720513</text:p>
          </table:table-cell>
          <table:table-cell table:number-columns-repeated="9"/>
        </table:table-row>
        <table:table-row table:style-name="ro1">
          <table:table-cell office:value-type="float" office:value="720514">
            <text:p>720514</text:p>
          </table:table-cell>
          <table:table-cell table:number-columns-repeated="9"/>
        </table:table-row>
        <table:table-row table:style-name="ro1">
          <table:table-cell office:value-type="float" office:value="720515">
            <text:p>7205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16">
            <text:p>720516</text:p>
          </table:table-cell>
          <table:table-cell table:number-columns-repeated="9"/>
        </table:table-row>
        <table:table-row table:style-name="ro1">
          <table:table-cell office:value-type="float" office:value="720517">
            <text:p>7205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18">
            <text:p>720518</text:p>
          </table:table-cell>
          <table:table-cell table:number-columns-repeated="9"/>
        </table:table-row>
        <table:table-row table:style-name="ro1">
          <table:table-cell office:value-type="float" office:value="720519">
            <text:p>720519</text:p>
          </table:table-cell>
          <table:table-cell table:number-columns-repeated="9"/>
        </table:table-row>
        <table:table-row table:style-name="ro1">
          <table:table-cell office:value-type="float" office:value="720520">
            <text:p>720520</text:p>
          </table:table-cell>
          <table:table-cell table:number-columns-repeated="9"/>
        </table:table-row>
        <table:table-row table:style-name="ro1">
          <table:table-cell office:value-type="float" office:value="720521">
            <text:p>720521</text:p>
          </table:table-cell>
          <table:table-cell table:number-columns-repeated="9"/>
        </table:table-row>
        <table:table-row table:style-name="ro1">
          <table:table-cell office:value-type="float" office:value="720522">
            <text:p>72052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23">
            <text:p>720523</text:p>
          </table:table-cell>
          <table:table-cell table:number-columns-repeated="9"/>
        </table:table-row>
        <table:table-row table:style-name="ro1">
          <table:table-cell office:value-type="float" office:value="720524">
            <text:p>720524</text:p>
          </table:table-cell>
          <table:table-cell table:number-columns-repeated="9"/>
        </table:table-row>
        <table:table-row table:style-name="ro1">
          <table:table-cell office:value-type="float" office:value="720525">
            <text:p>7205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26">
            <text:p>720526</text:p>
          </table:table-cell>
          <table:table-cell table:number-columns-repeated="9"/>
        </table:table-row>
        <table:table-row table:style-name="ro1">
          <table:table-cell office:value-type="float" office:value="720527">
            <text:p>720527</text:p>
          </table:table-cell>
          <table:table-cell table:number-columns-repeated="9"/>
        </table:table-row>
        <table:table-row table:style-name="ro1">
          <table:table-cell office:value-type="float" office:value="720528">
            <text:p>720528</text:p>
          </table:table-cell>
          <table:table-cell table:number-columns-repeated="9"/>
        </table:table-row>
        <table:table-row table:style-name="ro1">
          <table:table-cell office:value-type="float" office:value="720529">
            <text:p>720529</text:p>
          </table:table-cell>
          <table:table-cell table:number-columns-repeated="9"/>
        </table:table-row>
        <table:table-row table:style-name="ro1">
          <table:table-cell office:value-type="float" office:value="720530">
            <text:p>7205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31">
            <text:p>720531</text:p>
          </table:table-cell>
          <table:table-cell table:number-columns-repeated="9"/>
        </table:table-row>
        <table:table-row table:style-name="ro1">
          <table:table-cell office:value-type="float" office:value="720532">
            <text:p>7205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33">
            <text:p>720533</text:p>
          </table:table-cell>
          <table:table-cell table:number-columns-repeated="9"/>
        </table:table-row>
        <table:table-row table:style-name="ro1">
          <table:table-cell office:value-type="float" office:value="720534">
            <text:p>720534</text:p>
          </table:table-cell>
          <table:table-cell table:number-columns-repeated="9"/>
        </table:table-row>
        <table:table-row table:style-name="ro1">
          <table:table-cell office:value-type="float" office:value="720535">
            <text:p>72053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35">
            <text:p>720535</text:p>
          </table:table-cell>
          <table:table-cell table:number-columns-repeated="9"/>
        </table:table-row>
        <table:table-row table:style-name="ro1">
          <table:table-cell office:value-type="float" office:value="720536">
            <text:p>720536</text:p>
          </table:table-cell>
          <table:table-cell table:number-columns-repeated="9"/>
        </table:table-row>
        <table:table-row table:style-name="ro1">
          <table:table-cell office:value-type="float" office:value="720537">
            <text:p>720537</text:p>
          </table:table-cell>
          <table:table-cell table:number-columns-repeated="9"/>
        </table:table-row>
        <table:table-row table:style-name="ro1">
          <table:table-cell office:value-type="float" office:value="720538">
            <text:p>720538</text:p>
          </table:table-cell>
          <table:table-cell table:number-columns-repeated="9"/>
        </table:table-row>
        <table:table-row table:style-name="ro1">
          <table:table-cell office:value-type="float" office:value="720539">
            <text:p>72053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40">
            <text:p>72054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41">
            <text:p>720541</text:p>
          </table:table-cell>
          <table:table-cell table:number-columns-repeated="9"/>
        </table:table-row>
        <table:table-row table:style-name="ro1">
          <table:table-cell office:value-type="float" office:value="720542">
            <text:p>720542</text:p>
          </table:table-cell>
          <table:table-cell table:number-columns-repeated="9"/>
        </table:table-row>
        <table:table-row table:style-name="ro1">
          <table:table-cell office:value-type="float" office:value="720543">
            <text:p>720543</text:p>
          </table:table-cell>
          <table:table-cell table:number-columns-repeated="9"/>
        </table:table-row>
        <table:table-row table:style-name="ro1">
          <table:table-cell office:value-type="float" office:value="720544">
            <text:p>720544</text:p>
          </table:table-cell>
          <table:table-cell table:number-columns-repeated="9"/>
        </table:table-row>
        <table:table-row table:style-name="ro1">
          <table:table-cell office:value-type="float" office:value="720545">
            <text:p>720545</text:p>
          </table:table-cell>
          <table:table-cell table:number-columns-repeated="9"/>
        </table:table-row>
        <table:table-row table:style-name="ro1">
          <table:table-cell office:value-type="float" office:value="720546">
            <text:p>72054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47">
            <text:p>72054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48">
            <text:p>72054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49">
            <text:p>72054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50">
            <text:p>720550</text:p>
          </table:table-cell>
          <table:table-cell table:number-columns-repeated="9"/>
        </table:table-row>
        <table:table-row table:style-name="ro1">
          <table:table-cell office:value-type="float" office:value="720551">
            <text:p>720551</text:p>
          </table:table-cell>
          <table:table-cell table:number-columns-repeated="9"/>
        </table:table-row>
        <table:table-row table:style-name="ro1">
          <table:table-cell office:value-type="float" office:value="720552">
            <text:p>72055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53">
            <text:p>720553</text:p>
          </table:table-cell>
          <table:table-cell table:number-columns-repeated="9"/>
        </table:table-row>
        <table:table-row table:style-name="ro1">
          <table:table-cell office:value-type="float" office:value="720554">
            <text:p>72055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55">
            <text:p>720555</text:p>
          </table:table-cell>
          <table:table-cell table:number-columns-repeated="9"/>
        </table:table-row>
        <table:table-row table:style-name="ro1">
          <table:table-cell office:value-type="float" office:value="720556">
            <text:p>720556</text:p>
          </table:table-cell>
          <table:table-cell table:number-columns-repeated="9"/>
        </table:table-row>
        <table:table-row table:style-name="ro1">
          <table:table-cell office:value-type="float" office:value="720557">
            <text:p>720557</text:p>
          </table:table-cell>
          <table:table-cell table:number-columns-repeated="9"/>
        </table:table-row>
        <table:table-row table:style-name="ro1">
          <table:table-cell office:value-type="float" office:value="720558">
            <text:p>720558</text:p>
          </table:table-cell>
          <table:table-cell table:number-columns-repeated="9"/>
        </table:table-row>
        <table:table-row table:style-name="ro1">
          <table:table-cell office:value-type="float" office:value="720559">
            <text:p>720559</text:p>
          </table:table-cell>
          <table:table-cell table:number-columns-repeated="9"/>
        </table:table-row>
        <table:table-row table:style-name="ro1">
          <table:table-cell office:value-type="float" office:value="720560">
            <text:p>72056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61">
            <text:p>72056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62">
            <text:p>720562</text:p>
          </table:table-cell>
          <table:table-cell table:number-columns-repeated="9"/>
        </table:table-row>
        <table:table-row table:style-name="ro1">
          <table:table-cell office:value-type="float" office:value="720563">
            <text:p>720563</text:p>
          </table:table-cell>
          <table:table-cell table:number-columns-repeated="9"/>
        </table:table-row>
        <table:table-row table:style-name="ro1">
          <table:table-cell office:value-type="float" office:value="720564">
            <text:p>72056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65">
            <text:p>72056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66">
            <text:p>720566</text:p>
          </table:table-cell>
          <table:table-cell table:number-columns-repeated="9"/>
        </table:table-row>
        <table:table-row table:style-name="ro1">
          <table:table-cell office:value-type="float" office:value="720567">
            <text:p>72056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68">
            <text:p>720568</text:p>
          </table:table-cell>
          <table:table-cell table:number-columns-repeated="9"/>
        </table:table-row>
        <table:table-row table:style-name="ro1">
          <table:table-cell office:value-type="float" office:value="720569">
            <text:p>720569</text:p>
          </table:table-cell>
          <table:table-cell table:number-columns-repeated="9"/>
        </table:table-row>
        <table:table-row table:style-name="ro1">
          <table:table-cell office:value-type="float" office:value="720570">
            <text:p>72057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20571">
            <text:p>720571</text:p>
          </table:table-cell>
          <table:table-cell table:number-columns-repeated="9"/>
        </table:table-row>
        <table:table-row table:style-name="ro1">
          <table:table-cell office:value-type="float" office:value="720572">
            <text:p>72057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73">
            <text:p>72057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74">
            <text:p>72057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75">
            <text:p>720575</text:p>
          </table:table-cell>
          <table:table-cell table:number-columns-repeated="9"/>
        </table:table-row>
        <table:table-row table:style-name="ro1">
          <table:table-cell office:value-type="float" office:value="720576">
            <text:p>720576</text:p>
          </table:table-cell>
          <table:table-cell table:number-columns-repeated="9"/>
        </table:table-row>
        <table:table-row table:style-name="ro1">
          <table:table-cell office:value-type="float" office:value="720577">
            <text:p>72057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78">
            <text:p>72057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79">
            <text:p>72057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80">
            <text:p>72058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81">
            <text:p>72058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582">
            <text:p>720582</text:p>
          </table:table-cell>
          <table:table-cell table:number-columns-repeated="9"/>
        </table:table-row>
        <table:table-row table:style-name="ro1">
          <table:table-cell office:value-type="float" office:value="720583">
            <text:p>720583</text:p>
          </table:table-cell>
          <table:table-cell table:number-columns-repeated="9"/>
        </table:table-row>
        <table:table-row table:style-name="ro1">
          <table:table-cell office:value-type="float" office:value="720584">
            <text:p>720584</text:p>
          </table:table-cell>
          <table:table-cell table:number-columns-repeated="9"/>
        </table:table-row>
        <table:table-row table:style-name="ro1">
          <table:table-cell office:value-type="float" office:value="720585">
            <text:p>720585</text:p>
          </table:table-cell>
          <table:table-cell table:number-columns-repeated="9"/>
        </table:table-row>
        <table:table-row table:style-name="ro1">
          <table:table-cell office:value-type="float" office:value="720586">
            <text:p>720586</text:p>
          </table:table-cell>
          <table:table-cell table:number-columns-repeated="9"/>
        </table:table-row>
        <table:table-row table:style-name="ro1">
          <table:table-cell office:value-type="float" office:value="720587">
            <text:p>720587</text:p>
          </table:table-cell>
          <table:table-cell table:number-columns-repeated="9"/>
        </table:table-row>
        <table:table-row table:style-name="ro1">
          <table:table-cell office:value-type="float" office:value="720588">
            <text:p>720588</text:p>
          </table:table-cell>
          <table:table-cell table:number-columns-repeated="9"/>
        </table:table-row>
        <table:table-row table:style-name="ro1">
          <table:table-cell office:value-type="float" office:value="720589">
            <text:p>72058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20601">
            <text:p>720601</text:p>
          </table:table-cell>
          <table:table-cell table:number-columns-repeated="9"/>
        </table:table-row>
        <table:table-row table:style-name="ro1">
          <table:table-cell office:value-type="float" office:value="720602">
            <text:p>7206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603">
            <text:p>7206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604">
            <text:p>720604</text:p>
          </table:table-cell>
          <table:table-cell table:number-columns-repeated="9"/>
        </table:table-row>
        <table:table-row table:style-name="ro1">
          <table:table-cell office:value-type="float" office:value="720605">
            <text:p>720605</text:p>
          </table:table-cell>
          <table:table-cell table:number-columns-repeated="9"/>
        </table:table-row>
        <table:table-row table:style-name="ro1">
          <table:table-cell office:value-type="float" office:value="720606">
            <text:p>720606</text:p>
          </table:table-cell>
          <table:table-cell table:number-columns-repeated="9"/>
        </table:table-row>
        <table:table-row table:style-name="ro1">
          <table:table-cell office:value-type="float" office:value="720607">
            <text:p>720607</text:p>
          </table:table-cell>
          <table:table-cell table:number-columns-repeated="9"/>
        </table:table-row>
        <table:table-row table:style-name="ro1">
          <table:table-cell office:value-type="float" office:value="720608">
            <text:p>720608</text:p>
          </table:table-cell>
          <table:table-cell table:number-columns-repeated="9"/>
        </table:table-row>
        <table:table-row table:style-name="ro1">
          <table:table-cell office:value-type="float" office:value="720609">
            <text:p>7206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610">
            <text:p>7206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20611">
            <text:p>7206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20612">
            <text:p>72061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30001">
            <text:p>730001</text:p>
          </table:table-cell>
          <table:table-cell table:number-columns-repeated="9"/>
        </table:table-row>
        <table:table-row table:style-name="ro1">
          <table:table-cell office:value-type="float" office:value="730002">
            <text:p>730002</text:p>
          </table:table-cell>
          <table:table-cell table:number-columns-repeated="9"/>
        </table:table-row>
        <table:table-row table:style-name="ro1">
          <table:table-cell office:value-type="float" office:value="730003">
            <text:p>730003</text:p>
          </table:table-cell>
          <table:table-cell table:number-columns-repeated="9"/>
        </table:table-row>
        <table:table-row table:style-name="ro1">
          <table:table-cell office:value-type="float" office:value="730004">
            <text:p>730004</text:p>
          </table:table-cell>
          <table:table-cell table:number-columns-repeated="9"/>
        </table:table-row>
        <table:table-row table:style-name="ro1">
          <table:table-cell office:value-type="float" office:value="730005">
            <text:p>730005</text:p>
          </table:table-cell>
          <table:table-cell table:number-columns-repeated="9"/>
        </table:table-row>
        <table:table-row table:style-name="ro1">
          <table:table-cell office:value-type="float" office:value="730006">
            <text:p>730006</text:p>
          </table:table-cell>
          <table:table-cell table:number-columns-repeated="9"/>
        </table:table-row>
        <table:table-row table:style-name="ro1">
          <table:table-cell office:value-type="float" office:value="730007">
            <text:p>730007</text:p>
          </table:table-cell>
          <table:table-cell table:number-columns-repeated="9"/>
        </table:table-row>
        <table:table-row table:style-name="ro1">
          <table:table-cell office:value-type="float" office:value="730008">
            <text:p>730008</text:p>
          </table:table-cell>
          <table:table-cell table:number-columns-repeated="9"/>
        </table:table-row>
        <table:table-row table:style-name="ro1">
          <table:table-cell office:value-type="float" office:value="730009">
            <text:p>730009</text:p>
          </table:table-cell>
          <table:table-cell table:number-columns-repeated="9"/>
        </table:table-row>
        <table:table-row table:style-name="ro1">
          <table:table-cell office:value-type="float" office:value="730010">
            <text:p>730010</text:p>
          </table:table-cell>
          <table:table-cell table:number-columns-repeated="9"/>
        </table:table-row>
        <table:table-row table:style-name="ro1">
          <table:table-cell office:value-type="float" office:value="730011">
            <text:p>730011</text:p>
          </table:table-cell>
          <table:table-cell table:number-columns-repeated="9"/>
        </table:table-row>
        <table:table-row table:style-name="ro1">
          <table:table-cell office:value-type="float" office:value="730012">
            <text:p>730012</text:p>
          </table:table-cell>
          <table:table-cell table:number-columns-repeated="9"/>
        </table:table-row>
        <table:table-row table:style-name="ro1">
          <table:table-cell office:value-type="float" office:value="730013">
            <text:p>730013</text:p>
          </table:table-cell>
          <table:table-cell table:number-columns-repeated="9"/>
        </table:table-row>
        <table:table-row table:style-name="ro1">
          <table:table-cell office:value-type="float" office:value="730014">
            <text:p>730014</text:p>
          </table:table-cell>
          <table:table-cell table:number-columns-repeated="9"/>
        </table:table-row>
        <table:table-row table:style-name="ro1">
          <table:table-cell office:value-type="float" office:value="730015">
            <text:p>730015</text:p>
          </table:table-cell>
          <table:table-cell table:number-columns-repeated="9"/>
        </table:table-row>
        <table:table-row table:style-name="ro1">
          <table:table-cell office:value-type="float" office:value="730016">
            <text:p>7300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30017">
            <text:p>730017</text:p>
          </table:table-cell>
          <table:table-cell table:number-columns-repeated="9"/>
        </table:table-row>
        <table:table-row table:style-name="ro1">
          <table:table-cell office:value-type="float" office:value="730018">
            <text:p>730018</text:p>
          </table:table-cell>
          <table:table-cell table:number-columns-repeated="9"/>
        </table:table-row>
        <table:table-row table:style-name="ro1">
          <table:table-cell office:value-type="float" office:value="730019">
            <text:p>730019</text:p>
          </table:table-cell>
          <table:table-cell table:number-columns-repeated="9"/>
        </table:table-row>
        <table:table-row table:style-name="ro1">
          <table:table-cell office:value-type="float" office:value="730020">
            <text:p>730020</text:p>
          </table:table-cell>
          <table:table-cell table:number-columns-repeated="9"/>
        </table:table-row>
        <table:table-row table:style-name="ro1">
          <table:table-cell office:value-type="float" office:value="730021">
            <text:p>730021</text:p>
          </table:table-cell>
          <table:table-cell table:number-columns-repeated="9"/>
        </table:table-row>
        <table:table-row table:style-name="ro1">
          <table:table-cell office:value-type="float" office:value="730022">
            <text:p>730022</text:p>
          </table:table-cell>
          <table:table-cell table:number-columns-repeated="9"/>
        </table:table-row>
        <table:table-row table:style-name="ro1">
          <table:table-cell office:value-type="float" office:value="730023">
            <text:p>730023</text:p>
          </table:table-cell>
          <table:table-cell table:number-columns-repeated="9"/>
        </table:table-row>
        <table:table-row table:style-name="ro1">
          <table:table-cell office:value-type="float" office:value="730024">
            <text:p>730024</text:p>
          </table:table-cell>
          <table:table-cell table:number-columns-repeated="9"/>
        </table:table-row>
        <table:table-row table:style-name="ro1">
          <table:table-cell office:value-type="float" office:value="730025">
            <text:p>730025</text:p>
          </table:table-cell>
          <table:table-cell table:number-columns-repeated="9"/>
        </table:table-row>
        <table:table-row table:style-name="ro1">
          <table:table-cell office:value-type="float" office:value="730026">
            <text:p>730026</text:p>
          </table:table-cell>
          <table:table-cell table:number-columns-repeated="9"/>
        </table:table-row>
        <table:table-row table:style-name="ro1">
          <table:table-cell office:value-type="float" office:value="730027">
            <text:p>730027</text:p>
          </table:table-cell>
          <table:table-cell table:number-columns-repeated="9"/>
        </table:table-row>
        <table:table-row table:style-name="ro1">
          <table:table-cell office:value-type="float" office:value="730028">
            <text:p>730028</text:p>
          </table:table-cell>
          <table:table-cell table:number-columns-repeated="9"/>
        </table:table-row>
        <table:table-row table:style-name="ro1">
          <table:table-cell office:value-type="float" office:value="730029">
            <text:p>730029</text:p>
          </table:table-cell>
          <table:table-cell table:number-columns-repeated="9"/>
        </table:table-row>
        <table:table-row table:style-name="ro1">
          <table:table-cell office:value-type="float" office:value="730030">
            <text:p>730030</text:p>
          </table:table-cell>
          <table:table-cell table:number-columns-repeated="9"/>
        </table:table-row>
        <table:table-row table:style-name="ro1">
          <table:table-cell office:value-type="float" office:value="730031">
            <text:p>730031</text:p>
          </table:table-cell>
          <table:table-cell table:number-columns-repeated="9"/>
        </table:table-row>
        <table:table-row table:style-name="ro1">
          <table:table-cell office:value-type="float" office:value="730032">
            <text:p>730032</text:p>
          </table:table-cell>
          <table:table-cell table:number-columns-repeated="9"/>
        </table:table-row>
        <table:table-row table:style-name="ro1">
          <table:table-cell office:value-type="float" office:value="730033">
            <text:p>730033</text:p>
          </table:table-cell>
          <table:table-cell table:number-columns-repeated="9"/>
        </table:table-row>
        <table:table-row table:style-name="ro1">
          <table:table-cell office:value-type="float" office:value="730034">
            <text:p>730034</text:p>
          </table:table-cell>
          <table:table-cell table:number-columns-repeated="9"/>
        </table:table-row>
        <table:table-row table:style-name="ro1">
          <table:table-cell office:value-type="float" office:value="730035">
            <text:p>730035</text:p>
          </table:table-cell>
          <table:table-cell table:number-columns-repeated="9"/>
        </table:table-row>
        <table:table-row table:style-name="ro1">
          <table:table-cell office:value-type="float" office:value="730036">
            <text:p>730036</text:p>
          </table:table-cell>
          <table:table-cell table:number-columns-repeated="9"/>
        </table:table-row>
        <table:table-row table:style-name="ro1">
          <table:table-cell office:value-type="float" office:value="730037">
            <text:p>730037</text:p>
          </table:table-cell>
          <table:table-cell table:number-columns-repeated="9"/>
        </table:table-row>
        <table:table-row table:style-name="ro1">
          <table:table-cell office:value-type="float" office:value="730038">
            <text:p>730038</text:p>
          </table:table-cell>
          <table:table-cell table:number-columns-repeated="9"/>
        </table:table-row>
        <table:table-row table:style-name="ro1">
          <table:table-cell office:value-type="float" office:value="730039">
            <text:p>730039</text:p>
          </table:table-cell>
          <table:table-cell table:number-columns-repeated="9"/>
        </table:table-row>
        <table:table-row table:style-name="ro1">
          <table:table-cell office:value-type="float" office:value="730040">
            <text:p>730040</text:p>
          </table:table-cell>
          <table:table-cell table:number-columns-repeated="9"/>
        </table:table-row>
        <table:table-row table:style-name="ro1">
          <table:table-cell office:value-type="float" office:value="730041">
            <text:p>730041</text:p>
          </table:table-cell>
          <table:table-cell table:number-columns-repeated="9"/>
        </table:table-row>
        <table:table-row table:style-name="ro1">
          <table:table-cell office:value-type="float" office:value="730042">
            <text:p>73004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30043">
            <text:p>73004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30044">
            <text:p>730044</text:p>
          </table:table-cell>
          <table:table-cell table:number-columns-repeated="9"/>
        </table:table-row>
        <table:table-row table:style-name="ro1">
          <table:table-cell office:value-type="float" office:value="730045">
            <text:p>730045</text:p>
          </table:table-cell>
          <table:table-cell table:number-columns-repeated="9"/>
        </table:table-row>
        <table:table-row table:style-name="ro1">
          <table:table-cell office:value-type="float" office:value="730046">
            <text:p>730046</text:p>
          </table:table-cell>
          <table:table-cell table:number-columns-repeated="9"/>
        </table:table-row>
        <table:table-row table:style-name="ro1">
          <table:table-cell office:value-type="float" office:value="730047">
            <text:p>730047</text:p>
          </table:table-cell>
          <table:table-cell table:number-columns-repeated="9"/>
        </table:table-row>
        <table:table-row table:style-name="ro1">
          <table:table-cell office:value-type="float" office:value="730048">
            <text:p>73004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30201">
            <text:p>730201</text:p>
          </table:table-cell>
          <table:table-cell table:number-columns-repeated="9"/>
        </table:table-row>
        <table:table-row table:style-name="ro1">
          <table:table-cell office:value-type="float" office:value="730202">
            <text:p>730202</text:p>
          </table:table-cell>
          <table:table-cell table:number-columns-repeated="9"/>
        </table:table-row>
        <table:table-row table:style-name="ro1">
          <table:table-cell office:value-type="float" office:value="730203">
            <text:p>730203</text:p>
          </table:table-cell>
          <table:table-cell table:number-columns-repeated="9"/>
        </table:table-row>
        <table:table-row table:style-name="ro1">
          <table:table-cell office:value-type="float" office:value="730204">
            <text:p>730204</text:p>
          </table:table-cell>
          <table:table-cell table:number-columns-repeated="9"/>
        </table:table-row>
        <table:table-row table:style-name="ro1">
          <table:table-cell office:value-type="float" office:value="730205">
            <text:p>730205</text:p>
          </table:table-cell>
          <table:table-cell table:number-columns-repeated="9"/>
        </table:table-row>
        <table:table-row table:style-name="ro1">
          <table:table-cell office:value-type="float" office:value="730206">
            <text:p>730206</text:p>
          </table:table-cell>
          <table:table-cell table:number-columns-repeated="9"/>
        </table:table-row>
        <table:table-row table:style-name="ro1">
          <table:table-cell office:value-type="float" office:value="730207">
            <text:p>730207</text:p>
          </table:table-cell>
          <table:table-cell table:number-columns-repeated="9"/>
        </table:table-row>
        <table:table-row table:style-name="ro1">
          <table:table-cell office:value-type="float" office:value="730208">
            <text:p>730208</text:p>
          </table:table-cell>
          <table:table-cell table:number-columns-repeated="9"/>
        </table:table-row>
        <table:table-row table:style-name="ro1">
          <table:table-cell office:value-type="float" office:value="730209">
            <text:p>730209</text:p>
          </table:table-cell>
          <table:table-cell table:number-columns-repeated="9"/>
        </table:table-row>
        <table:table-row table:style-name="ro1">
          <table:table-cell office:value-type="float" office:value="730210">
            <text:p>730210</text:p>
          </table:table-cell>
          <table:table-cell table:number-columns-repeated="9"/>
        </table:table-row>
        <table:table-row table:style-name="ro1">
          <table:table-cell office:value-type="float" office:value="730211">
            <text:p>730211</text:p>
          </table:table-cell>
          <table:table-cell table:number-columns-repeated="9"/>
        </table:table-row>
        <table:table-row table:style-name="ro1">
          <table:table-cell office:value-type="float" office:value="730212">
            <text:p>730212</text:p>
          </table:table-cell>
          <table:table-cell table:number-columns-repeated="9"/>
        </table:table-row>
        <table:table-row table:style-name="ro1">
          <table:table-cell office:value-type="float" office:value="730213">
            <text:p>730213</text:p>
          </table:table-cell>
          <table:table-cell table:number-columns-repeated="9"/>
        </table:table-row>
        <table:table-row table:style-name="ro1">
          <table:table-cell office:value-type="float" office:value="730214">
            <text:p>7302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30215">
            <text:p>730215</text:p>
          </table:table-cell>
          <table:table-cell table:number-columns-repeated="9"/>
        </table:table-row>
        <table:table-row table:style-name="ro1">
          <table:table-cell office:value-type="float" office:value="730216">
            <text:p>730216</text:p>
          </table:table-cell>
          <table:table-cell table:number-columns-repeated="9"/>
        </table:table-row>
        <table:table-row table:style-name="ro1">
          <table:table-cell office:value-type="float" office:value="730217">
            <text:p>730217</text:p>
          </table:table-cell>
          <table:table-cell table:number-columns-repeated="9"/>
        </table:table-row>
        <table:table-row table:style-name="ro1">
          <table:table-cell office:value-type="float" office:value="730218">
            <text:p>730218</text:p>
          </table:table-cell>
          <table:table-cell table:number-columns-repeated="9"/>
        </table:table-row>
        <table:table-row table:style-name="ro1">
          <table:table-cell office:value-type="float" office:value="730219">
            <text:p>730219</text:p>
          </table:table-cell>
          <table:table-cell table:number-columns-repeated="9"/>
        </table:table-row>
        <table:table-row table:style-name="ro1">
          <table:table-cell office:value-type="float" office:value="730220">
            <text:p>730220</text:p>
          </table:table-cell>
          <table:table-cell table:number-columns-repeated="9"/>
        </table:table-row>
        <table:table-row table:style-name="ro1">
          <table:table-cell office:value-type="float" office:value="730221">
            <text:p>730221</text:p>
          </table:table-cell>
          <table:table-cell table:number-columns-repeated="9"/>
        </table:table-row>
        <table:table-row table:style-name="ro1">
          <table:table-cell office:value-type="float" office:value="730222">
            <text:p>730222</text:p>
          </table:table-cell>
          <table:table-cell table:number-columns-repeated="9"/>
        </table:table-row>
        <table:table-row table:style-name="ro1">
          <table:table-cell office:value-type="float" office:value="730223">
            <text:p>730223</text:p>
          </table:table-cell>
          <table:table-cell table:number-columns-repeated="9"/>
        </table:table-row>
        <table:table-row table:style-name="ro1">
          <table:table-cell office:value-type="float" office:value="730224">
            <text:p>730224</text:p>
          </table:table-cell>
          <table:table-cell table:number-columns-repeated="9"/>
        </table:table-row>
        <table:table-row table:style-name="ro1">
          <table:table-cell office:value-type="float" office:value="730225">
            <text:p>730225</text:p>
          </table:table-cell>
          <table:table-cell table:number-columns-repeated="9"/>
        </table:table-row>
        <table:table-row table:style-name="ro1">
          <table:table-cell office:value-type="float" office:value="730226">
            <text:p>730226</text:p>
          </table:table-cell>
          <table:table-cell table:number-columns-repeated="9"/>
        </table:table-row>
        <table:table-row table:style-name="ro1">
          <table:table-cell office:value-type="float" office:value="730227">
            <text:p>730227</text:p>
          </table:table-cell>
          <table:table-cell table:number-columns-repeated="9"/>
        </table:table-row>
        <table:table-row table:style-name="ro1">
          <table:table-cell office:value-type="float" office:value="730228">
            <text:p>730228</text:p>
          </table:table-cell>
          <table:table-cell table:number-columns-repeated="9"/>
        </table:table-row>
        <table:table-row table:style-name="ro1">
          <table:table-cell office:value-type="float" office:value="730229">
            <text:p>730229</text:p>
          </table:table-cell>
          <table:table-cell table:number-columns-repeated="9"/>
        </table:table-row>
        <table:table-row table:style-name="ro1">
          <table:table-cell office:value-type="float" office:value="730230">
            <text:p>730230</text:p>
          </table:table-cell>
          <table:table-cell table:number-columns-repeated="9"/>
        </table:table-row>
        <table:table-row table:style-name="ro1">
          <table:table-cell office:value-type="float" office:value="730231">
            <text:p>730231</text:p>
          </table:table-cell>
          <table:table-cell table:number-columns-repeated="9"/>
        </table:table-row>
        <table:table-row table:style-name="ro1">
          <table:table-cell office:value-type="float" office:value="730232">
            <text:p>730232</text:p>
          </table:table-cell>
          <table:table-cell table:number-columns-repeated="9"/>
        </table:table-row>
        <table:table-row table:style-name="ro1">
          <table:table-cell office:value-type="float" office:value="730233">
            <text:p>730233</text:p>
          </table:table-cell>
          <table:table-cell table:number-columns-repeated="9"/>
        </table:table-row>
        <table:table-row table:style-name="ro1">
          <table:table-cell office:value-type="float" office:value="730234">
            <text:p>730234</text:p>
          </table:table-cell>
          <table:table-cell table:number-columns-repeated="9"/>
        </table:table-row>
        <table:table-row table:style-name="ro1">
          <table:table-cell office:value-type="float" office:value="730235">
            <text:p>730235</text:p>
          </table:table-cell>
          <table:table-cell table:number-columns-repeated="9"/>
        </table:table-row>
        <table:table-row table:style-name="ro1">
          <table:table-cell office:value-type="float" office:value="730236">
            <text:p>73023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45001">
            <text:p>745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002">
            <text:p>745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45003">
            <text:p>745003</text:p>
          </table:table-cell>
          <table:table-cell table:number-columns-repeated="9"/>
        </table:table-row>
        <table:table-row table:style-name="ro1">
          <table:table-cell office:value-type="float" office:value="745004">
            <text:p>745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005">
            <text:p>745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006">
            <text:p>745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007">
            <text:p>745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45008">
            <text:p>745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009">
            <text:p>7450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010">
            <text:p>7450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45101">
            <text:p>7451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102">
            <text:p>7451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103">
            <text:p>745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104">
            <text:p>745104</text:p>
          </table:table-cell>
          <table:table-cell table:number-columns-repeated="9"/>
        </table:table-row>
        <table:table-row table:style-name="ro1">
          <table:table-cell office:value-type="float" office:value="745105">
            <text:p>7451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106">
            <text:p>745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107">
            <text:p>745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108">
            <text:p>745108</text:p>
          </table:table-cell>
          <table:table-cell table:number-columns-repeated="9"/>
        </table:table-row>
        <table:table-row table:style-name="ro1">
          <table:table-cell office:value-type="float" office:value="745109">
            <text:p>7451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45110">
            <text:p>7451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55325">
            <text:p>7553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326">
            <text:p>755326</text:p>
          </table:table-cell>
          <table:table-cell table:number-columns-repeated="9"/>
        </table:table-row>
        <table:table-row table:style-name="ro1">
          <table:table-cell office:value-type="float" office:value="755327">
            <text:p>755327</text:p>
          </table:table-cell>
          <table:table-cell table:number-columns-repeated="9"/>
        </table:table-row>
        <table:table-row table:style-name="ro1">
          <table:table-cell office:value-type="float" office:value="755328">
            <text:p>75532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329">
            <text:p>75532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330">
            <text:p>7553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331">
            <text:p>7553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332">
            <text:p>75533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333">
            <text:p>75533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334">
            <text:p>75533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335">
            <text:p>7553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336">
            <text:p>755336</text:p>
          </table:table-cell>
          <table:table-cell table:number-columns-repeated="9"/>
        </table:table-row>
        <table:table-row table:style-name="ro1">
          <table:table-cell office:value-type="float" office:value="755337">
            <text:p>75533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338">
            <text:p>7553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339">
            <text:p>75533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55401">
            <text:p>7554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02">
            <text:p>7554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03">
            <text:p>7554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04">
            <text:p>7554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05">
            <text:p>7554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406">
            <text:p>7554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07">
            <text:p>7554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08">
            <text:p>7554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09">
            <text:p>7554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10">
            <text:p>7554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11">
            <text:p>7554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412">
            <text:p>7554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413">
            <text:p>7554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14">
            <text:p>7554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15">
            <text:p>7554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16">
            <text:p>7554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17">
            <text:p>7554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18">
            <text:p>7554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19">
            <text:p>7554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20">
            <text:p>7554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421">
            <text:p>7554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422">
            <text:p>7554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55423">
            <text:p>7554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755424">
            <text:p>7554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56001">
            <text:p>756001</text:p>
          </table:table-cell>
          <table:table-cell table:number-columns-repeated="9"/>
        </table:table-row>
        <table:table-row table:style-name="ro1">
          <table:table-cell office:value-type="float" office:value="756002">
            <text:p>756002</text:p>
          </table:table-cell>
          <table:table-cell table:number-columns-repeated="9"/>
        </table:table-row>
        <table:table-row table:style-name="ro1">
          <table:table-cell office:value-type="float" office:value="756003">
            <text:p>756003</text:p>
          </table:table-cell>
          <table:table-cell table:number-columns-repeated="9"/>
        </table:table-row>
        <table:table-row table:style-name="ro1">
          <table:table-cell office:value-type="float" office:value="756004">
            <text:p>756004</text:p>
          </table:table-cell>
          <table:table-cell table:number-columns-repeated="9"/>
        </table:table-row>
        <table:table-row table:style-name="ro1">
          <table:table-cell office:value-type="float" office:value="756005">
            <text:p>756005</text:p>
          </table:table-cell>
          <table:table-cell table:number-columns-repeated="9"/>
        </table:table-row>
        <table:table-row table:style-name="ro1">
          <table:table-cell office:value-type="float" office:value="756006">
            <text:p>756006</text:p>
          </table:table-cell>
          <table:table-cell table:number-columns-repeated="9"/>
        </table:table-row>
        <table:table-row table:style-name="ro1">
          <table:table-cell office:value-type="float" office:value="756007">
            <text:p>75600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56101">
            <text:p>756101</text:p>
          </table:table-cell>
          <table:table-cell table:number-columns-repeated="9"/>
        </table:table-row>
        <table:table-row table:style-name="ro1">
          <table:table-cell office:value-type="float" office:value="756102">
            <text:p>756102</text:p>
          </table:table-cell>
          <table:table-cell table:number-columns-repeated="9"/>
        </table:table-row>
        <table:table-row table:style-name="ro1">
          <table:table-cell office:value-type="float" office:value="756103">
            <text:p>756103</text:p>
          </table:table-cell>
          <table:table-cell table:number-columns-repeated="9"/>
        </table:table-row>
        <table:table-row table:style-name="ro1">
          <table:table-cell office:value-type="float" office:value="756104">
            <text:p>756104</text:p>
          </table:table-cell>
          <table:table-cell table:number-columns-repeated="9"/>
        </table:table-row>
        <table:table-row table:style-name="ro1">
          <table:table-cell office:value-type="float" office:value="756105">
            <text:p>756105</text:p>
          </table:table-cell>
          <table:table-cell table:number-columns-repeated="9"/>
        </table:table-row>
        <table:table-row table:style-name="ro1">
          <table:table-cell office:value-type="float" office:value="756106">
            <text:p>756106</text:p>
          </table:table-cell>
          <table:table-cell table:number-columns-repeated="9"/>
        </table:table-row>
        <table:table-row table:style-name="ro1">
          <table:table-cell office:value-type="float" office:value="756107">
            <text:p>756107</text:p>
          </table:table-cell>
          <table:table-cell table:number-columns-repeated="9"/>
        </table:table-row>
        <table:table-row table:style-name="ro1">
          <table:table-cell office:value-type="float" office:value="756108">
            <text:p>756108</text:p>
          </table:table-cell>
          <table:table-cell table:number-columns-repeated="9"/>
        </table:table-row>
        <table:table-row table:style-name="ro1">
          <table:table-cell office:value-type="float" office:value="756109">
            <text:p>756109</text:p>
          </table:table-cell>
          <table:table-cell table:number-columns-repeated="9"/>
        </table:table-row>
        <table:table-row table:style-name="ro1">
          <table:table-cell office:value-type="float" office:value="756110">
            <text:p>756110</text:p>
          </table:table-cell>
          <table:table-cell table:number-columns-repeated="9"/>
        </table:table-row>
        <table:table-row table:style-name="ro1">
          <table:table-cell office:value-type="float" office:value="756111">
            <text:p>756111</text:p>
          </table:table-cell>
          <table:table-cell table:number-columns-repeated="9"/>
        </table:table-row>
        <table:table-row table:style-name="ro1">
          <table:table-cell office:value-type="float" office:value="756112">
            <text:p>756112</text:p>
          </table:table-cell>
          <table:table-cell table:number-columns-repeated="9"/>
        </table:table-row>
        <table:table-row table:style-name="ro1">
          <table:table-cell office:value-type="float" office:value="756113">
            <text:p>756113</text:p>
          </table:table-cell>
          <table:table-cell table:number-columns-repeated="9"/>
        </table:table-row>
        <table:table-row table:style-name="ro1">
          <table:table-cell office:value-type="float" office:value="756114">
            <text:p>756114</text:p>
          </table:table-cell>
          <table:table-cell table:number-columns-repeated="9"/>
        </table:table-row>
        <table:table-row table:style-name="ro1">
          <table:table-cell office:value-type="float" office:value="756115">
            <text:p>756115</text:p>
          </table:table-cell>
          <table:table-cell table:number-columns-repeated="9"/>
        </table:table-row>
        <table:table-row table:style-name="ro1">
          <table:table-cell office:value-type="float" office:value="756116">
            <text:p>756116</text:p>
          </table:table-cell>
          <table:table-cell table:number-columns-repeated="9"/>
        </table:table-row>
        <table:table-row table:style-name="ro1">
          <table:table-cell office:value-type="float" office:value="756117">
            <text:p>75611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68001">
            <text:p>768001</text:p>
          </table:table-cell>
          <table:table-cell table:number-columns-repeated="9"/>
        </table:table-row>
        <table:table-row table:style-name="ro1">
          <table:table-cell office:value-type="float" office:value="768002">
            <text:p>76800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69002">
            <text:p>769002</text:p>
          </table:table-cell>
          <table:table-cell table:number-columns-repeated="9"/>
        </table:table-row>
        <table:table-row table:style-name="ro1">
          <table:table-cell office:value-type="float" office:value="769003">
            <text:p>769003</text:p>
          </table:table-cell>
          <table:table-cell table:number-columns-repeated="9"/>
        </table:table-row>
        <table:table-row table:style-name="ro1">
          <table:table-cell office:value-type="float" office:value="769006">
            <text:p>769006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007">
            <text:p>769007</text:p>
          </table:table-cell>
          <table:table-cell table:number-columns-repeated="9"/>
        </table:table-row>
        <table:table-row table:style-name="ro1">
          <table:table-cell office:value-type="float" office:value="769008">
            <text:p>769008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69421">
            <text:p>769421</text:p>
          </table:table-cell>
          <table:table-cell table:number-columns-repeated="9"/>
        </table:table-row>
        <table:table-row table:style-name="ro1">
          <table:table-cell office:value-type="float" office:value="769424">
            <text:p>7694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426">
            <text:p>769426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431">
            <text:p>769431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434">
            <text:p>769434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442">
            <text:p>769442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448">
            <text:p>769448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450">
            <text:p>769450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456">
            <text:p>769456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458">
            <text:p>769458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69922">
            <text:p>769922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23">
            <text:p>769923</text:p>
          </table:table-cell>
          <table:table-cell table:number-columns-repeated="9"/>
        </table:table-row>
        <table:table-row table:style-name="ro1">
          <table:table-cell office:value-type="float" office:value="769925">
            <text:p>769925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27">
            <text:p>769927</text:p>
          </table:table-cell>
          <table:table-cell table:number-columns-repeated="9"/>
        </table:table-row>
        <table:table-row table:style-name="ro1">
          <table:table-cell office:value-type="float" office:value="769928">
            <text:p>769928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30">
            <text:p>769930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32">
            <text:p>769932</text:p>
          </table:table-cell>
          <table:table-cell table:number-columns-repeated="9"/>
        </table:table-row>
        <table:table-row table:style-name="ro1">
          <table:table-cell office:value-type="float" office:value="769935">
            <text:p>7699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36">
            <text:p>769936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37">
            <text:p>769937</text:p>
          </table:table-cell>
          <table:table-cell table:number-columns-repeated="9"/>
        </table:table-row>
        <table:table-row table:style-name="ro1">
          <table:table-cell office:value-type="float" office:value="769938">
            <text:p>769938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39">
            <text:p>769939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40">
            <text:p>769940</text:p>
          </table:table-cell>
          <table:table-cell table:number-columns-repeated="9"/>
        </table:table-row>
        <table:table-row table:style-name="ro1">
          <table:table-cell office:value-type="float" office:value="769943">
            <text:p>769943</text:p>
          </table:table-cell>
          <table:table-cell table:number-columns-repeated="9"/>
        </table:table-row>
        <table:table-row table:style-name="ro1">
          <table:table-cell office:value-type="float" office:value="769944">
            <text:p>769944</text:p>
          </table:table-cell>
          <table:table-cell table:number-columns-repeated="9"/>
        </table:table-row>
        <table:table-row table:style-name="ro1">
          <table:table-cell office:value-type="float" office:value="769945">
            <text:p>769945</text:p>
          </table:table-cell>
          <table:table-cell table:number-columns-repeated="9"/>
        </table:table-row>
        <table:table-row table:style-name="ro1">
          <table:table-cell office:value-type="float" office:value="769947">
            <text:p>769947</text:p>
          </table:table-cell>
          <table:table-cell table:number-columns-repeated="9"/>
        </table:table-row>
        <table:table-row table:style-name="ro1">
          <table:table-cell office:value-type="float" office:value="769949">
            <text:p>7699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769959">
            <text:p>769959</text:p>
          </table:table-cell>
          <table:table-cell/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77001">
            <text:p>777001</text:p>
          </table:table-cell>
          <table:table-cell table:number-columns-repeated="9"/>
        </table:table-row>
        <table:table-row table:style-name="ro1">
          <table:table-cell office:value-type="float" office:value="777002">
            <text:p>777002</text:p>
          </table:table-cell>
          <table:table-cell table:number-columns-repeated="9"/>
        </table:table-row>
        <table:table-row table:style-name="ro1">
          <table:table-cell office:value-type="float" office:value="777003">
            <text:p>777003</text:p>
          </table:table-cell>
          <table:table-cell table:number-columns-repeated="9"/>
        </table:table-row>
        <table:table-row table:style-name="ro1">
          <table:table-cell office:value-type="float" office:value="777004">
            <text:p>777004</text:p>
          </table:table-cell>
          <table:table-cell table:number-columns-repeated="9"/>
        </table:table-row>
        <table:table-row table:style-name="ro1">
          <table:table-cell office:value-type="float" office:value="777005">
            <text:p>777005</text:p>
          </table:table-cell>
          <table:table-cell table:number-columns-repeated="9"/>
        </table:table-row>
        <table:table-row table:style-name="ro1">
          <table:table-cell office:value-type="float" office:value="777006">
            <text:p>777006</text:p>
          </table:table-cell>
          <table:table-cell table:number-columns-repeated="9"/>
        </table:table-row>
        <table:table-row table:style-name="ro1">
          <table:table-cell office:value-type="float" office:value="777007">
            <text:p>777007</text:p>
          </table:table-cell>
          <table:table-cell table:number-columns-repeated="9"/>
        </table:table-row>
        <table:table-row table:style-name="ro1">
          <table:table-cell office:value-type="float" office:value="777008">
            <text:p>777008</text:p>
          </table:table-cell>
          <table:table-cell table:number-columns-repeated="9"/>
        </table:table-row>
        <table:table-row table:style-name="ro1">
          <table:table-cell office:value-type="float" office:value="777009">
            <text:p>777009</text:p>
          </table:table-cell>
          <table:table-cell table:number-columns-repeated="9"/>
        </table:table-row>
        <table:table-row table:style-name="ro1">
          <table:table-cell office:value-type="float" office:value="777010">
            <text:p>777010</text:p>
          </table:table-cell>
          <table:table-cell table:number-columns-repeated="9"/>
        </table:table-row>
        <table:table-row table:style-name="ro1">
          <table:table-cell office:value-type="float" office:value="777011">
            <text:p>777011</text:p>
          </table:table-cell>
          <table:table-cell table:number-columns-repeated="9"/>
        </table:table-row>
        <table:table-row table:style-name="ro1">
          <table:table-cell office:value-type="float" office:value="777012">
            <text:p>777012</text:p>
          </table:table-cell>
          <table:table-cell table:number-columns-repeated="9"/>
        </table:table-row>
        <table:table-row table:style-name="ro1">
          <table:table-cell office:value-type="float" office:value="777013">
            <text:p>777013</text:p>
          </table:table-cell>
          <table:table-cell table:number-columns-repeated="9"/>
        </table:table-row>
        <table:table-row table:style-name="ro1">
          <table:table-cell office:value-type="float" office:value="777014">
            <text:p>777014</text:p>
          </table:table-cell>
          <table:table-cell table:number-columns-repeated="9"/>
        </table:table-row>
        <table:table-row table:style-name="ro1">
          <table:table-cell office:value-type="float" office:value="777015">
            <text:p>777015</text:p>
          </table:table-cell>
          <table:table-cell table:number-columns-repeated="9"/>
        </table:table-row>
        <table:table-row table:style-name="ro1">
          <table:table-cell office:value-type="float" office:value="777016">
            <text:p>777016</text:p>
          </table:table-cell>
          <table:table-cell table:number-columns-repeated="9"/>
        </table:table-row>
        <table:table-row table:style-name="ro1">
          <table:table-cell office:value-type="float" office:value="777017">
            <text:p>777017</text:p>
          </table:table-cell>
          <table:table-cell table:number-columns-repeated="9"/>
        </table:table-row>
        <table:table-row table:style-name="ro1">
          <table:table-cell office:value-type="float" office:value="777018">
            <text:p>777018</text:p>
          </table:table-cell>
          <table:table-cell table:number-columns-repeated="9"/>
        </table:table-row>
        <table:table-row table:style-name="ro1">
          <table:table-cell office:value-type="float" office:value="777019">
            <text:p>777019</text:p>
          </table:table-cell>
          <table:table-cell table:number-columns-repeated="9"/>
        </table:table-row>
        <table:table-row table:style-name="ro1">
          <table:table-cell office:value-type="float" office:value="777020">
            <text:p>777020</text:p>
          </table:table-cell>
          <table:table-cell table:number-columns-repeated="9"/>
        </table:table-row>
        <table:table-row table:style-name="ro1">
          <table:table-cell office:value-type="float" office:value="777021">
            <text:p>777021</text:p>
          </table:table-cell>
          <table:table-cell table:number-columns-repeated="9"/>
        </table:table-row>
        <table:table-row table:style-name="ro1">
          <table:table-cell office:value-type="float" office:value="777022">
            <text:p>777022</text:p>
          </table:table-cell>
          <table:table-cell table:number-columns-repeated="9"/>
        </table:table-row>
        <table:table-row table:style-name="ro1">
          <table:table-cell office:value-type="float" office:value="777023">
            <text:p>777023</text:p>
          </table:table-cell>
          <table:table-cell table:number-columns-repeated="9"/>
        </table:table-row>
        <table:table-row table:style-name="ro1">
          <table:table-cell office:value-type="float" office:value="777024">
            <text:p>777024</text:p>
          </table:table-cell>
          <table:table-cell table:number-columns-repeated="9"/>
        </table:table-row>
        <table:table-row table:style-name="ro1">
          <table:table-cell office:value-type="float" office:value="777025">
            <text:p>777025</text:p>
          </table:table-cell>
          <table:table-cell table:number-columns-repeated="9"/>
        </table:table-row>
        <table:table-row table:style-name="ro1">
          <table:table-cell office:value-type="float" office:value="777026">
            <text:p>777026</text:p>
          </table:table-cell>
          <table:table-cell table:number-columns-repeated="9"/>
        </table:table-row>
        <table:table-row table:style-name="ro1">
          <table:table-cell office:value-type="float" office:value="777027">
            <text:p>777027</text:p>
          </table:table-cell>
          <table:table-cell table:number-columns-repeated="9"/>
        </table:table-row>
        <table:table-row table:style-name="ro1">
          <table:table-cell office:value-type="float" office:value="777028">
            <text:p>777028</text:p>
          </table:table-cell>
          <table:table-cell table:number-columns-repeated="9"/>
        </table:table-row>
        <table:table-row table:style-name="ro1">
          <table:table-cell office:value-type="float" office:value="777029">
            <text:p>777029</text:p>
          </table:table-cell>
          <table:table-cell table:number-columns-repeated="9"/>
        </table:table-row>
        <table:table-row table:style-name="ro1">
          <table:table-cell office:value-type="float" office:value="777030">
            <text:p>777030</text:p>
          </table:table-cell>
          <table:table-cell table:number-columns-repeated="9"/>
        </table:table-row>
        <table:table-row table:style-name="ro1">
          <table:table-cell office:value-type="float" office:value="777031">
            <text:p>777031</text:p>
          </table:table-cell>
          <table:table-cell table:number-columns-repeated="9"/>
        </table:table-row>
        <table:table-row table:style-name="ro1">
          <table:table-cell office:value-type="float" office:value="777032">
            <text:p>777032</text:p>
          </table:table-cell>
          <table:table-cell table:number-columns-repeated="9"/>
        </table:table-row>
        <table:table-row table:style-name="ro1">
          <table:table-cell office:value-type="float" office:value="777033">
            <text:p>777033</text:p>
          </table:table-cell>
          <table:table-cell table:number-columns-repeated="9"/>
        </table:table-row>
        <table:table-row table:style-name="ro1">
          <table:table-cell office:value-type="float" office:value="777034">
            <text:p>777034</text:p>
          </table:table-cell>
          <table:table-cell table:number-columns-repeated="9"/>
        </table:table-row>
        <table:table-row table:style-name="ro1">
          <table:table-cell office:value-type="float" office:value="777035">
            <text:p>777035</text:p>
          </table:table-cell>
          <table:table-cell table:number-columns-repeated="9"/>
        </table:table-row>
        <table:table-row table:style-name="ro1">
          <table:table-cell office:value-type="float" office:value="777036">
            <text:p>777036</text:p>
          </table:table-cell>
          <table:table-cell table:number-columns-repeated="9"/>
        </table:table-row>
        <table:table-row table:style-name="ro1">
          <table:table-cell office:value-type="float" office:value="777037">
            <text:p>777037</text:p>
          </table:table-cell>
          <table:table-cell table:number-columns-repeated="9"/>
        </table:table-row>
        <table:table-row table:style-name="ro1">
          <table:table-cell office:value-type="float" office:value="777038">
            <text:p>777038</text:p>
          </table:table-cell>
          <table:table-cell table:number-columns-repeated="9"/>
        </table:table-row>
        <table:table-row table:style-name="ro1">
          <table:table-cell office:value-type="float" office:value="777039">
            <text:p>777039</text:p>
          </table:table-cell>
          <table:table-cell table:number-columns-repeated="9"/>
        </table:table-row>
        <table:table-row table:style-name="ro1">
          <table:table-cell office:value-type="float" office:value="777041">
            <text:p>777041</text:p>
          </table:table-cell>
          <table:table-cell table:number-columns-repeated="9"/>
        </table:table-row>
        <table:table-row table:style-name="ro1">
          <table:table-cell office:value-type="float" office:value="777043">
            <text:p>777043</text:p>
          </table:table-cell>
          <table:table-cell table:number-columns-repeated="9"/>
        </table:table-row>
        <table:table-row table:style-name="ro1">
          <table:table-cell office:value-type="float" office:value="777045">
            <text:p>777045</text:p>
          </table:table-cell>
          <table:table-cell table:number-columns-repeated="9"/>
        </table:table-row>
        <table:table-row table:style-name="ro1">
          <table:table-cell office:value-type="float" office:value="777047">
            <text:p>777047</text:p>
          </table:table-cell>
          <table:table-cell table:number-columns-repeated="9"/>
        </table:table-row>
        <table:table-row table:style-name="ro1">
          <table:table-cell office:value-type="float" office:value="777049">
            <text:p>777049</text:p>
          </table:table-cell>
          <table:table-cell table:number-columns-repeated="9"/>
        </table:table-row>
        <table:table-row table:style-name="ro1">
          <table:table-cell office:value-type="float" office:value="777051">
            <text:p>777051</text:p>
          </table:table-cell>
          <table:table-cell table:number-columns-repeated="9"/>
        </table:table-row>
        <table:table-row table:style-name="ro1">
          <table:table-cell office:value-type="float" office:value="777053">
            <text:p>77705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77140">
            <text:p>777140</text:p>
          </table:table-cell>
          <table:table-cell table:number-columns-repeated="9"/>
        </table:table-row>
        <table:table-row table:style-name="ro1">
          <table:table-cell office:value-type="float" office:value="777142">
            <text:p>777142</text:p>
          </table:table-cell>
          <table:table-cell table:number-columns-repeated="9"/>
        </table:table-row>
        <table:table-row table:style-name="ro1">
          <table:table-cell office:value-type="float" office:value="777144">
            <text:p>777144</text:p>
          </table:table-cell>
          <table:table-cell table:number-columns-repeated="9"/>
        </table:table-row>
        <table:table-row table:style-name="ro1">
          <table:table-cell office:value-type="float" office:value="777146">
            <text:p>777146</text:p>
          </table:table-cell>
          <table:table-cell table:number-columns-repeated="9"/>
        </table:table-row>
        <table:table-row table:style-name="ro1">
          <table:table-cell office:value-type="float" office:value="777148">
            <text:p>777148</text:p>
          </table:table-cell>
          <table:table-cell table:number-columns-repeated="9"/>
        </table:table-row>
        <table:table-row table:style-name="ro1">
          <table:table-cell office:value-type="float" office:value="777150">
            <text:p>77715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99201">
            <text:p>79920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0001">
            <text:p>800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002">
            <text:p>800002</text:p>
          </table:table-cell>
          <table:table-cell table:number-columns-repeated="9"/>
        </table:table-row>
        <table:table-row table:style-name="ro1">
          <table:table-cell office:value-type="float" office:value="800003">
            <text:p>800003</text:p>
          </table:table-cell>
          <table:table-cell table:number-columns-repeated="9"/>
        </table:table-row>
        <table:table-row table:style-name="ro1">
          <table:table-cell office:value-type="float" office:value="800004">
            <text:p>800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005">
            <text:p>800005</text:p>
          </table:table-cell>
          <table:table-cell table:number-columns-repeated="9"/>
        </table:table-row>
        <table:table-row table:style-name="ro1">
          <table:table-cell office:value-type="float" office:value="800006">
            <text:p>800006</text:p>
          </table:table-cell>
          <table:table-cell table:number-columns-repeated="9"/>
        </table:table-row>
        <table:table-row table:style-name="ro1">
          <table:table-cell office:value-type="float" office:value="800007">
            <text:p>800007</text:p>
          </table:table-cell>
          <table:table-cell table:number-columns-repeated="9"/>
        </table:table-row>
        <table:table-row table:style-name="ro1">
          <table:table-cell office:value-type="float" office:value="800008">
            <text:p>800008</text:p>
          </table:table-cell>
          <table:table-cell table:number-columns-repeated="9"/>
        </table:table-row>
        <table:table-row table:style-name="ro1">
          <table:table-cell office:value-type="float" office:value="800009">
            <text:p>800009</text:p>
          </table:table-cell>
          <table:table-cell table:number-columns-repeated="9"/>
        </table:table-row>
        <table:table-row table:style-name="ro1">
          <table:table-cell office:value-type="float" office:value="800010">
            <text:p>800010</text:p>
          </table:table-cell>
          <table:table-cell table:number-columns-repeated="9"/>
        </table:table-row>
        <table:table-row table:style-name="ro1">
          <table:table-cell office:value-type="float" office:value="800011">
            <text:p>800011</text:p>
          </table:table-cell>
          <table:table-cell table:number-columns-repeated="9"/>
        </table:table-row>
        <table:table-row table:style-name="ro1">
          <table:table-cell office:value-type="float" office:value="800012">
            <text:p>800012</text:p>
          </table:table-cell>
          <table:table-cell table:number-columns-repeated="9"/>
        </table:table-row>
        <table:table-row table:style-name="ro1">
          <table:table-cell office:value-type="float" office:value="800013">
            <text:p>800013</text:p>
          </table:table-cell>
          <table:table-cell table:number-columns-repeated="9"/>
        </table:table-row>
        <table:table-row table:style-name="ro1">
          <table:table-cell office:value-type="float" office:value="800014">
            <text:p>800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015">
            <text:p>800015</text:p>
          </table:table-cell>
          <table:table-cell table:number-columns-repeated="9"/>
        </table:table-row>
        <table:table-row table:style-name="ro1">
          <table:table-cell office:value-type="float" office:value="800016">
            <text:p>800016</text:p>
          </table:table-cell>
          <table:table-cell table:number-columns-repeated="9"/>
        </table:table-row>
        <table:table-row table:style-name="ro1">
          <table:table-cell office:value-type="float" office:value="800017">
            <text:p>800017</text:p>
          </table:table-cell>
          <table:table-cell table:number-columns-repeated="9"/>
        </table:table-row>
        <table:table-row table:style-name="ro1">
          <table:table-cell office:value-type="float" office:value="800018">
            <text:p>8000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019">
            <text:p>8000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020">
            <text:p>800020</text:p>
          </table:table-cell>
          <table:table-cell table:number-columns-repeated="9"/>
        </table:table-row>
        <table:table-row table:style-name="ro1">
          <table:table-cell office:value-type="float" office:value="800021">
            <text:p>800021</text:p>
          </table:table-cell>
          <table:table-cell table:number-columns-repeated="9"/>
        </table:table-row>
        <table:table-row table:style-name="ro1">
          <table:table-cell office:value-type="float" office:value="800022">
            <text:p>800022</text:p>
          </table:table-cell>
          <table:table-cell table:number-columns-repeated="9"/>
        </table:table-row>
        <table:table-row table:style-name="ro1">
          <table:table-cell office:value-type="float" office:value="800023">
            <text:p>800023</text:p>
          </table:table-cell>
          <table:table-cell table:number-columns-repeated="9"/>
        </table:table-row>
        <table:table-row table:style-name="ro1">
          <table:table-cell office:value-type="float" office:value="800024">
            <text:p>80002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025">
            <text:p>80002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026">
            <text:p>800026</text:p>
          </table:table-cell>
          <table:table-cell table:number-columns-repeated="9"/>
        </table:table-row>
        <table:table-row table:style-name="ro1">
          <table:table-cell office:value-type="float" office:value="800027">
            <text:p>800027</text:p>
          </table:table-cell>
          <table:table-cell table:number-columns-repeated="9"/>
        </table:table-row>
        <table:table-row table:style-name="ro1">
          <table:table-cell office:value-type="float" office:value="800028">
            <text:p>800028</text:p>
          </table:table-cell>
          <table:table-cell table:number-columns-repeated="9"/>
        </table:table-row>
        <table:table-row table:style-name="ro1">
          <table:table-cell office:value-type="float" office:value="800029">
            <text:p>800029</text:p>
          </table:table-cell>
          <table:table-cell table:number-columns-repeated="9"/>
        </table:table-row>
        <table:table-row table:style-name="ro1">
          <table:table-cell office:value-type="float" office:value="800030">
            <text:p>800030</text:p>
          </table:table-cell>
          <table:table-cell table:number-columns-repeated="9"/>
        </table:table-row>
        <table:table-row table:style-name="ro1">
          <table:table-cell office:value-type="float" office:value="800031">
            <text:p>800031</text:p>
          </table:table-cell>
          <table:table-cell table:number-columns-repeated="9"/>
        </table:table-row>
        <table:table-row table:style-name="ro1">
          <table:table-cell office:value-type="float" office:value="800032">
            <text:p>800032</text:p>
          </table:table-cell>
          <table:table-cell table:number-columns-repeated="9"/>
        </table:table-row>
        <table:table-row table:style-name="ro1">
          <table:table-cell office:value-type="float" office:value="800033">
            <text:p>800033</text:p>
          </table:table-cell>
          <table:table-cell table:number-columns-repeated="9"/>
        </table:table-row>
        <table:table-row table:style-name="ro1">
          <table:table-cell office:value-type="float" office:value="800034">
            <text:p>800034</text:p>
          </table:table-cell>
          <table:table-cell table:number-columns-repeated="9"/>
        </table:table-row>
        <table:table-row table:style-name="ro1">
          <table:table-cell office:value-type="float" office:value="800035">
            <text:p>800035</text:p>
          </table:table-cell>
          <table:table-cell table:number-columns-repeated="9"/>
        </table:table-row>
        <table:table-row table:style-name="ro1">
          <table:table-cell office:value-type="float" office:value="800036">
            <text:p>80003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0101">
            <text:p>800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102">
            <text:p>8001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103">
            <text:p>800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104">
            <text:p>800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105">
            <text:p>800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106">
            <text:p>800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107">
            <text:p>800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108">
            <text:p>8001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109">
            <text:p>800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110">
            <text:p>8001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111">
            <text:p>8001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112">
            <text:p>8001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113">
            <text:p>8001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0201">
            <text:p>8002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202">
            <text:p>8002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203">
            <text:p>8002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204">
            <text:p>8002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205">
            <text:p>8002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206">
            <text:p>8002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207">
            <text:p>8002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208">
            <text:p>8002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0209">
            <text:p>8002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210">
            <text:p>8002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0301">
            <text:p>800301</text:p>
          </table:table-cell>
          <table:table-cell table:number-columns-repeated="9"/>
        </table:table-row>
        <table:table-row table:style-name="ro1">
          <table:table-cell office:value-type="float" office:value="800302">
            <text:p>800302</text:p>
          </table:table-cell>
          <table:table-cell table:number-columns-repeated="9"/>
        </table:table-row>
        <table:table-row table:style-name="ro1">
          <table:table-cell office:value-type="float" office:value="800303">
            <text:p>800303</text:p>
          </table:table-cell>
          <table:table-cell table:number-columns-repeated="9"/>
        </table:table-row>
        <table:table-row table:style-name="ro1">
          <table:table-cell office:value-type="float" office:value="800304">
            <text:p>800304</text:p>
          </table:table-cell>
          <table:table-cell table:number-columns-repeated="9"/>
        </table:table-row>
        <table:table-row table:style-name="ro1">
          <table:table-cell office:value-type="float" office:value="800305">
            <text:p>800305</text:p>
          </table:table-cell>
          <table:table-cell table:number-columns-repeated="9"/>
        </table:table-row>
        <table:table-row table:style-name="ro1">
          <table:table-cell office:value-type="float" office:value="800306">
            <text:p>800306</text:p>
          </table:table-cell>
          <table:table-cell table:number-columns-repeated="9"/>
        </table:table-row>
        <table:table-row table:style-name="ro1">
          <table:table-cell office:value-type="float" office:value="800307">
            <text:p>800307</text:p>
          </table:table-cell>
          <table:table-cell table:number-columns-repeated="9"/>
        </table:table-row>
        <table:table-row table:style-name="ro1">
          <table:table-cell office:value-type="float" office:value="800308">
            <text:p>800308</text:p>
          </table:table-cell>
          <table:table-cell table:number-columns-repeated="9"/>
        </table:table-row>
        <table:table-row table:style-name="ro1">
          <table:table-cell office:value-type="float" office:value="800309">
            <text:p>8003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310">
            <text:p>800310</text:p>
          </table:table-cell>
          <table:table-cell table:number-columns-repeated="9"/>
        </table:table-row>
        <table:table-row table:style-name="ro1">
          <table:table-cell office:value-type="float" office:value="800311">
            <text:p>800311</text:p>
          </table:table-cell>
          <table:table-cell table:number-columns-repeated="9"/>
        </table:table-row>
        <table:table-row table:style-name="ro1">
          <table:table-cell office:value-type="float" office:value="800312">
            <text:p>8003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313">
            <text:p>800313</text:p>
          </table:table-cell>
          <table:table-cell table:number-columns-repeated="9"/>
        </table:table-row>
        <table:table-row table:style-name="ro1">
          <table:table-cell office:value-type="float" office:value="800314">
            <text:p>800314</text:p>
          </table:table-cell>
          <table:table-cell table:number-columns-repeated="9"/>
        </table:table-row>
        <table:table-row table:style-name="ro1">
          <table:table-cell office:value-type="float" office:value="800315">
            <text:p>800315</text:p>
          </table:table-cell>
          <table:table-cell table:number-columns-repeated="9"/>
        </table:table-row>
        <table:table-row table:style-name="ro1">
          <table:table-cell office:value-type="float" office:value="800316">
            <text:p>800316</text:p>
          </table:table-cell>
          <table:table-cell table:number-columns-repeated="9"/>
        </table:table-row>
        <table:table-row table:style-name="ro1">
          <table:table-cell office:value-type="float" office:value="800317">
            <text:p>8003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318">
            <text:p>8003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0319">
            <text:p>800319</text:p>
          </table:table-cell>
          <table:table-cell table:number-columns-repeated="9"/>
        </table:table-row>
        <table:table-row table:style-name="ro1">
          <table:table-cell office:value-type="float" office:value="800320">
            <text:p>800320</text:p>
          </table:table-cell>
          <table:table-cell table:number-columns-repeated="9"/>
        </table:table-row>
        <table:table-row table:style-name="ro1">
          <table:table-cell office:value-type="float" office:value="800321">
            <text:p>800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1101">
            <text:p>801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102">
            <text:p>8011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103">
            <text:p>8011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104">
            <text:p>8011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105">
            <text:p>801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106">
            <text:p>8011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107">
            <text:p>8011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108">
            <text:p>8011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109">
            <text:p>8011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110">
            <text:p>801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111">
            <text:p>8011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112">
            <text:p>8011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1201">
            <text:p>8012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202">
            <text:p>8012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03">
            <text:p>8012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04">
            <text:p>8012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205">
            <text:p>8012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06">
            <text:p>8012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07">
            <text:p>8012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08">
            <text:p>8012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209">
            <text:p>8012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0">
            <text:p>8012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1">
            <text:p>8012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2">
            <text:p>8012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3">
            <text:p>8012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4">
            <text:p>8012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5">
            <text:p>8012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6">
            <text:p>8012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7">
            <text:p>8012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218">
            <text:p>8012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19">
            <text:p>8012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20">
            <text:p>80122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221">
            <text:p>8012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222">
            <text:p>8012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23">
            <text:p>80122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1224">
            <text:p>8012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25">
            <text:p>8012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26">
            <text:p>8012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27">
            <text:p>8012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28">
            <text:p>8012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29">
            <text:p>8012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1230">
            <text:p>80123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2001">
            <text:p>802001</text:p>
          </table:table-cell>
          <table:table-cell table:number-columns-repeated="9"/>
        </table:table-row>
        <table:table-row table:style-name="ro1">
          <table:table-cell office:value-type="float" office:value="802002">
            <text:p>802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03">
            <text:p>802003</text:p>
          </table:table-cell>
          <table:table-cell table:number-columns-repeated="9"/>
        </table:table-row>
        <table:table-row table:style-name="ro1">
          <table:table-cell office:value-type="float" office:value="802004">
            <text:p>802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05">
            <text:p>802005</text:p>
          </table:table-cell>
          <table:table-cell table:number-columns-repeated="9"/>
        </table:table-row>
        <table:table-row table:style-name="ro1">
          <table:table-cell office:value-type="float" office:value="802006">
            <text:p>8020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07">
            <text:p>802007</text:p>
          </table:table-cell>
          <table:table-cell table:number-columns-repeated="9"/>
        </table:table-row>
        <table:table-row table:style-name="ro1">
          <table:table-cell office:value-type="float" office:value="802008">
            <text:p>80200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09">
            <text:p>802009</text:p>
          </table:table-cell>
          <table:table-cell table:number-columns-repeated="9"/>
        </table:table-row>
        <table:table-row table:style-name="ro1">
          <table:table-cell office:value-type="float" office:value="802010">
            <text:p>802010</text:p>
          </table:table-cell>
          <table:table-cell table:number-columns-repeated="9"/>
        </table:table-row>
        <table:table-row table:style-name="ro1">
          <table:table-cell office:value-type="float" office:value="802011">
            <text:p>8020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12">
            <text:p>8020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13">
            <text:p>8020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14">
            <text:p>8020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15">
            <text:p>802015</text:p>
          </table:table-cell>
          <table:table-cell table:number-columns-repeated="9"/>
        </table:table-row>
        <table:table-row table:style-name="ro1">
          <table:table-cell office:value-type="float" office:value="802016">
            <text:p>802016</text:p>
          </table:table-cell>
          <table:table-cell table:number-columns-repeated="9"/>
        </table:table-row>
        <table:table-row table:style-name="ro1">
          <table:table-cell office:value-type="float" office:value="802017">
            <text:p>8020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18">
            <text:p>802018</text:p>
          </table:table-cell>
          <table:table-cell table:number-columns-repeated="9"/>
        </table:table-row>
        <table:table-row table:style-name="ro1">
          <table:table-cell office:value-type="float" office:value="802019">
            <text:p>802019</text:p>
          </table:table-cell>
          <table:table-cell table:number-columns-repeated="9"/>
        </table:table-row>
        <table:table-row table:style-name="ro1">
          <table:table-cell office:value-type="float" office:value="802020">
            <text:p>802020</text:p>
          </table:table-cell>
          <table:table-cell table:number-columns-repeated="9"/>
        </table:table-row>
        <table:table-row table:style-name="ro1">
          <table:table-cell office:value-type="float" office:value="802021">
            <text:p>80202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022">
            <text:p>80202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2101">
            <text:p>802101</text:p>
          </table:table-cell>
          <table:table-cell table:number-columns-repeated="9"/>
        </table:table-row>
        <table:table-row table:style-name="ro1">
          <table:table-cell office:value-type="float" office:value="802102">
            <text:p>802102</text:p>
          </table:table-cell>
          <table:table-cell table:number-columns-repeated="9"/>
        </table:table-row>
        <table:table-row table:style-name="ro1">
          <table:table-cell office:value-type="float" office:value="802103">
            <text:p>802103</text:p>
          </table:table-cell>
          <table:table-cell table:number-columns-repeated="9"/>
        </table:table-row>
        <table:table-row table:style-name="ro1">
          <table:table-cell office:value-type="float" office:value="802104">
            <text:p>802104</text:p>
          </table:table-cell>
          <table:table-cell table:number-columns-repeated="9"/>
        </table:table-row>
        <table:table-row table:style-name="ro1">
          <table:table-cell office:value-type="float" office:value="802105">
            <text:p>802105</text:p>
          </table:table-cell>
          <table:table-cell table:number-columns-repeated="9"/>
        </table:table-row>
        <table:table-row table:style-name="ro1">
          <table:table-cell office:value-type="float" office:value="802106">
            <text:p>802106</text:p>
          </table:table-cell>
          <table:table-cell table:number-columns-repeated="9"/>
        </table:table-row>
        <table:table-row table:style-name="ro1">
          <table:table-cell office:value-type="float" office:value="802107">
            <text:p>802107</text:p>
          </table:table-cell>
          <table:table-cell table:number-columns-repeated="9"/>
        </table:table-row>
        <table:table-row table:style-name="ro1">
          <table:table-cell office:value-type="float" office:value="802108">
            <text:p>802108</text:p>
          </table:table-cell>
          <table:table-cell table:number-columns-repeated="9"/>
        </table:table-row>
        <table:table-row table:style-name="ro1">
          <table:table-cell office:value-type="float" office:value="802109">
            <text:p>802109</text:p>
          </table:table-cell>
          <table:table-cell table:number-columns-repeated="9"/>
        </table:table-row>
        <table:table-row table:style-name="ro1">
          <table:table-cell office:value-type="float" office:value="802110">
            <text:p>802110</text:p>
          </table:table-cell>
          <table:table-cell table:number-columns-repeated="9"/>
        </table:table-row>
        <table:table-row table:style-name="ro1">
          <table:table-cell office:value-type="float" office:value="802111">
            <text:p>802111</text:p>
          </table:table-cell>
          <table:table-cell table:number-columns-repeated="9"/>
        </table:table-row>
        <table:table-row table:style-name="ro1">
          <table:table-cell office:value-type="float" office:value="802112">
            <text:p>802112</text:p>
          </table:table-cell>
          <table:table-cell table:number-columns-repeated="9"/>
        </table:table-row>
        <table:table-row table:style-name="ro1">
          <table:table-cell office:value-type="float" office:value="802113">
            <text:p>802113</text:p>
          </table:table-cell>
          <table:table-cell table:number-columns-repeated="9"/>
        </table:table-row>
        <table:table-row table:style-name="ro1">
          <table:table-cell office:value-type="float" office:value="802114">
            <text:p>80211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2201">
            <text:p>8022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02">
            <text:p>802202</text:p>
          </table:table-cell>
          <table:table-cell table:number-columns-repeated="9"/>
        </table:table-row>
        <table:table-row table:style-name="ro1">
          <table:table-cell office:value-type="float" office:value="802203">
            <text:p>8022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04">
            <text:p>8022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05">
            <text:p>8022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06">
            <text:p>80220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07">
            <text:p>80220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08">
            <text:p>8022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2209">
            <text:p>80220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0">
            <text:p>802210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1">
            <text:p>80221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2">
            <text:p>80221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3">
            <text:p>80221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4">
            <text:p>80221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5">
            <text:p>80221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6">
            <text:p>802216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7">
            <text:p>802217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8">
            <text:p>802218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2219">
            <text:p>802219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2301">
            <text:p>8023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2302">
            <text:p>8023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2303">
            <text:p>8023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2304">
            <text:p>8023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office:value-type="float" office:value="802305">
            <text:p>8023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3001">
            <text:p>803001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3002">
            <text:p>803002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3003">
            <text:p>803003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3004">
            <text:p>803004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office:value-type="float" office:value="803005">
            <text:p>803005</text:p>
          </table:table-cell>
          <table:table-cell office:value-type="string">
            <text:p>SE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5001">
            <text:p>805001</text:p>
          </table:table-cell>
          <table:table-cell table:number-columns-repeated="9"/>
        </table:table-row>
        <table:table-row table:style-name="ro1">
          <table:table-cell office:value-type="float" office:value="805002">
            <text:p>805002</text:p>
          </table:table-cell>
          <table:table-cell table:number-columns-repeated="9"/>
        </table:table-row>
        <table:table-row table:style-name="ro1">
          <table:table-cell office:value-type="float" office:value="805003">
            <text:p>805003</text:p>
          </table:table-cell>
          <table:table-cell table:number-columns-repeated="9"/>
        </table:table-row>
        <table:table-row table:style-name="ro1">
          <table:table-cell office:value-type="float" office:value="805004">
            <text:p>805004</text:p>
          </table:table-cell>
          <table:table-cell table:number-columns-repeated="9"/>
        </table:table-row>
        <table:table-row table:style-name="ro1">
          <table:table-cell office:value-type="float" office:value="805005">
            <text:p>805005</text:p>
          </table:table-cell>
          <table:table-cell table:number-columns-repeated="9"/>
        </table:table-row>
        <table:table-row table:style-name="ro1">
          <table:table-cell office:value-type="float" office:value="805006">
            <text:p>805006</text:p>
          </table:table-cell>
          <table:table-cell table:number-columns-repeated="9"/>
        </table:table-row>
        <table:table-row table:style-name="ro1">
          <table:table-cell office:value-type="float" office:value="805007">
            <text:p>805007</text:p>
          </table:table-cell>
          <table:table-cell table:number-columns-repeated="9"/>
        </table:table-row>
        <table:table-row table:style-name="ro1">
          <table:table-cell office:value-type="float" office:value="805008">
            <text:p>805008</text:p>
          </table:table-cell>
          <table:table-cell table:number-columns-repeated="9"/>
        </table:table-row>
        <table:table-row table:style-name="ro1">
          <table:table-cell office:value-type="float" office:value="805009">
            <text:p>805009</text:p>
          </table:table-cell>
          <table:table-cell table:number-columns-repeated="9"/>
        </table:table-row>
        <table:table-row table:style-name="ro1">
          <table:table-cell office:value-type="float" office:value="805010">
            <text:p>805010</text:p>
          </table:table-cell>
          <table:table-cell table:number-columns-repeated="9"/>
        </table:table-row>
        <table:table-row table:style-name="ro1">
          <table:table-cell office:value-type="float" office:value="805011">
            <text:p>805011</text:p>
          </table:table-cell>
          <table:table-cell table:number-columns-repeated="9"/>
        </table:table-row>
        <table:table-row table:style-name="ro1">
          <table:table-cell office:value-type="float" office:value="805012">
            <text:p>805012</text:p>
          </table:table-cell>
          <table:table-cell table:number-columns-repeated="9"/>
        </table:table-row>
        <table:table-row table:style-name="ro1">
          <table:table-cell office:value-type="float" office:value="805013">
            <text:p>80501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7001">
            <text:p>807001</text:p>
          </table:table-cell>
          <table:table-cell table:number-columns-repeated="9"/>
        </table:table-row>
        <table:table-row table:style-name="ro1">
          <table:table-cell office:value-type="float" office:value="807002">
            <text:p>807002</text:p>
          </table:table-cell>
          <table:table-cell table:number-columns-repeated="9"/>
        </table:table-row>
        <table:table-row table:style-name="ro1">
          <table:table-cell office:value-type="float" office:value="807003">
            <text:p>807003</text:p>
          </table:table-cell>
          <table:table-cell table:number-columns-repeated="9"/>
        </table:table-row>
        <table:table-row table:style-name="ro1">
          <table:table-cell office:value-type="float" office:value="807004">
            <text:p>807004</text:p>
          </table:table-cell>
          <table:table-cell table:number-columns-repeated="9"/>
        </table:table-row>
        <table:table-row table:style-name="ro1">
          <table:table-cell office:value-type="float" office:value="807005">
            <text:p>807005</text:p>
          </table:table-cell>
          <table:table-cell table:number-columns-repeated="9"/>
        </table:table-row>
        <table:table-row table:style-name="ro1">
          <table:table-cell office:value-type="float" office:value="807006">
            <text:p>807006</text:p>
          </table:table-cell>
          <table:table-cell table:number-columns-repeated="9"/>
        </table:table-row>
        <table:table-row table:style-name="ro1">
          <table:table-cell office:value-type="float" office:value="807007">
            <text:p>807007</text:p>
          </table:table-cell>
          <table:table-cell table:number-columns-repeated="9"/>
        </table:table-row>
        <table:table-row table:style-name="ro1">
          <table:table-cell office:value-type="float" office:value="807008">
            <text:p>807008</text:p>
          </table:table-cell>
          <table:table-cell table:number-columns-repeated="9"/>
        </table:table-row>
        <table:table-row table:style-name="ro1">
          <table:table-cell office:value-type="float" office:value="807009">
            <text:p>807009</text:p>
          </table:table-cell>
          <table:table-cell table:number-columns-repeated="9"/>
        </table:table-row>
        <table:table-row table:style-name="ro1">
          <table:table-cell office:value-type="float" office:value="807010">
            <text:p>8070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10001">
            <text:p>810001</text:p>
          </table:table-cell>
          <table:table-cell table:number-columns-repeated="9"/>
        </table:table-row>
        <table:table-row table:style-name="ro1">
          <table:table-cell office:value-type="float" office:value="810002">
            <text:p>810002</text:p>
          </table:table-cell>
          <table:table-cell table:number-columns-repeated="9"/>
        </table:table-row>
        <table:table-row table:style-name="ro1">
          <table:table-cell office:value-type="float" office:value="810003">
            <text:p>810003</text:p>
          </table:table-cell>
          <table:table-cell table:number-columns-repeated="9"/>
        </table:table-row>
        <table:table-row table:style-name="ro1">
          <table:table-cell office:value-type="float" office:value="810004">
            <text:p>810004</text:p>
          </table:table-cell>
          <table:table-cell table:number-columns-repeated="9"/>
        </table:table-row>
        <table:table-row table:style-name="ro1">
          <table:table-cell office:value-type="float" office:value="810005">
            <text:p>810005</text:p>
          </table:table-cell>
          <table:table-cell table:number-columns-repeated="9"/>
        </table:table-row>
        <table:table-row table:style-name="ro1">
          <table:table-cell office:value-type="float" office:value="810006">
            <text:p>810006</text:p>
          </table:table-cell>
          <table:table-cell table:number-columns-repeated="9"/>
        </table:table-row>
        <table:table-row table:style-name="ro1">
          <table:table-cell office:value-type="float" office:value="810007">
            <text:p>810007</text:p>
          </table:table-cell>
          <table:table-cell table:number-columns-repeated="9"/>
        </table:table-row>
        <table:table-row table:style-name="ro1">
          <table:table-cell office:value-type="float" office:value="810008">
            <text:p>810008</text:p>
          </table:table-cell>
          <table:table-cell table:number-columns-repeated="9"/>
        </table:table-row>
        <table:table-row table:style-name="ro1">
          <table:table-cell office:value-type="float" office:value="810009">
            <text:p>810009</text:p>
          </table:table-cell>
          <table:table-cell table:number-columns-repeated="9"/>
        </table:table-row>
        <table:table-row table:style-name="ro1">
          <table:table-cell office:value-type="float" office:value="810010">
            <text:p>810010</text:p>
          </table:table-cell>
          <table:table-cell table:number-columns-repeated="9"/>
        </table:table-row>
        <table:table-row table:style-name="ro1">
          <table:table-cell office:value-type="float" office:value="810011">
            <text:p>810011</text:p>
          </table:table-cell>
          <table:table-cell table:number-columns-repeated="9"/>
        </table:table-row>
        <table:table-row table:style-name="ro1">
          <table:table-cell office:value-type="float" office:value="810012">
            <text:p>810012</text:p>
          </table:table-cell>
          <table:table-cell table:number-columns-repeated="9"/>
        </table:table-row>
        <table:table-row table:style-name="ro1">
          <table:table-cell office:value-type="float" office:value="810013">
            <text:p>810013</text:p>
          </table:table-cell>
          <table:table-cell table:number-columns-repeated="9"/>
        </table:table-row>
        <table:table-row table:style-name="ro1">
          <table:table-cell office:value-type="float" office:value="810014">
            <text:p>810014</text:p>
          </table:table-cell>
          <table:table-cell table:number-columns-repeated="9"/>
        </table:table-row>
        <table:table-row table:style-name="ro1">
          <table:table-cell office:value-type="float" office:value="810015">
            <text:p>810015</text:p>
          </table:table-cell>
          <table:table-cell table:number-columns-repeated="9"/>
        </table:table-row>
        <table:table-row table:style-name="ro1">
          <table:table-cell office:value-type="float" office:value="810016">
            <text:p>810016</text:p>
          </table:table-cell>
          <table:table-cell table:number-columns-repeated="9"/>
        </table:table-row>
        <table:table-row table:style-name="ro1">
          <table:table-cell office:value-type="float" office:value="810017">
            <text:p>810017</text:p>
          </table:table-cell>
          <table:table-cell table:number-columns-repeated="9"/>
        </table:table-row>
        <table:table-row table:style-name="ro1">
          <table:table-cell office:value-type="float" office:value="810018">
            <text:p>810018</text:p>
          </table:table-cell>
          <table:table-cell table:number-columns-repeated="9"/>
        </table:table-row>
        <table:table-row table:style-name="ro1">
          <table:table-cell office:value-type="float" office:value="810019">
            <text:p>810019</text:p>
          </table:table-cell>
          <table:table-cell table:number-columns-repeated="9"/>
        </table:table-row>
        <table:table-row table:style-name="ro1">
          <table:table-cell office:value-type="float" office:value="810020">
            <text:p>810020</text:p>
          </table:table-cell>
          <table:table-cell table:number-columns-repeated="9"/>
        </table:table-row>
        <table:table-row table:style-name="ro1">
          <table:table-cell office:value-type="float" office:value="810021">
            <text:p>810021</text:p>
          </table:table-cell>
          <table:table-cell table:number-columns-repeated="9"/>
        </table:table-row>
        <table:table-row table:style-name="ro1">
          <table:table-cell office:value-type="float" office:value="810022">
            <text:p>810022</text:p>
          </table:table-cell>
          <table:table-cell table:number-columns-repeated="9"/>
        </table:table-row>
        <table:table-row table:style-name="ro1">
          <table:table-cell office:value-type="float" office:value="810023">
            <text:p>810023</text:p>
          </table:table-cell>
          <table:table-cell table:number-columns-repeated="9"/>
        </table:table-row>
        <table:table-row table:style-name="ro1">
          <table:table-cell office:value-type="float" office:value="810024">
            <text:p>810024</text:p>
          </table:table-cell>
          <table:table-cell table:number-columns-repeated="9"/>
        </table:table-row>
        <table:table-row table:style-name="ro1">
          <table:table-cell office:value-type="float" office:value="810025">
            <text:p>810025</text:p>
          </table:table-cell>
          <table:table-cell table:number-columns-repeated="9"/>
        </table:table-row>
        <table:table-row table:style-name="ro1">
          <table:table-cell office:value-type="float" office:value="810026">
            <text:p>810026</text:p>
          </table:table-cell>
          <table:table-cell table:number-columns-repeated="9"/>
        </table:table-row>
        <table:table-row table:style-name="ro1">
          <table:table-cell office:value-type="float" office:value="810027">
            <text:p>810027</text:p>
          </table:table-cell>
          <table:table-cell table:number-columns-repeated="9"/>
        </table:table-row>
        <table:table-row table:style-name="ro1">
          <table:table-cell office:value-type="float" office:value="810028">
            <text:p>810028</text:p>
          </table:table-cell>
          <table:table-cell table:number-columns-repeated="9"/>
        </table:table-row>
        <table:table-row table:style-name="ro1">
          <table:table-cell office:value-type="float" office:value="810029">
            <text:p>810029</text:p>
          </table:table-cell>
          <table:table-cell table:number-columns-repeated="9"/>
        </table:table-row>
        <table:table-row table:style-name="ro1">
          <table:table-cell office:value-type="float" office:value="810030">
            <text:p>810030</text:p>
          </table:table-cell>
          <table:table-cell table:number-columns-repeated="9"/>
        </table:table-row>
        <table:table-row table:style-name="ro1">
          <table:table-cell office:value-type="float" office:value="810031">
            <text:p>810031</text:p>
          </table:table-cell>
          <table:table-cell table:number-columns-repeated="9"/>
        </table:table-row>
        <table:table-row table:style-name="ro1">
          <table:table-cell office:value-type="float" office:value="810032">
            <text:p>810032</text:p>
          </table:table-cell>
          <table:table-cell table:number-columns-repeated="9"/>
        </table:table-row>
        <table:table-row table:style-name="ro1">
          <table:table-cell office:value-type="float" office:value="810033">
            <text:p>810033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5">05/09/2025</text:date>, <text:time>01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0-11-09T18:04:25.52</meta:creation-date>
    <dc:date>2025-09-05T01:22:05.85</dc:date>
    <dc:creator>David </dc:creator>
    <meta:editing-duration>P43DT20H53M57S</meta:editing-duration>
    <meta:editing-cycles>230</meta:editing-cycles>
    <meta:generator>OpenOffice/4.1.7$Win32 OpenOffice.org_project/417m1$Build-9800</meta:generator>
    <meta:document-statistic meta:table-count="1" meta:cell-count="5183" meta:object-count="0"/>
  </office:meta>
</office:document-meta>
</file>