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>
        <style:tab-stops>
          <style:tab-stop style:position="11.033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background-color="#ff0000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  <style:style style:name="T5" style:family="text">
      <style:text-properties fo:color="#800000" fo:background-color="#ff0000"/>
    </style:style>
    <style:style style:name="T6" style:family="text">
      <style:text-properties fo:background-color="#ffffff"/>
    </style:style>
    <style:style style:name="T7" style:family="text">
      <style:text-properties fo:color="#ff0000"/>
    </style:style>
    <style:style style:name="T8" style:family="text">
      <style:text-properties fo:color="#cc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6"/><text:span text:style-name="T1">LONDON UNDERGROUND SETS</text:span></text:p>
      <text:p text:style-name="P1"/>
      <text:p text:style-name="P1"><text:s text:c="3"/>BAKERLOO LINE</text:p>
      <text:p text:style-name="P1"/>
      <text:p text:style-name="P1"><text:span text:style-name="T2">3231</text:span> 4231 4331 3331</text:p>
      <text:p text:style-name="P1"><text:span text:style-name="T2">3232</text:span> 4232 4332 3332</text:p>
      <text:p text:style-name="P1"><text:span text:style-name="T2">3233</text:span> <text:span text:style-name="T3">4233 4333 3333</text:span></text:p>
      <text:p text:style-name="P1"><text:span text:style-name="T2">3234</text:span> 4234 4334 3334 </text:p>
      <text:p text:style-name="P1"><text:span text:style-name="T2">3235</text:span> <text:span text:style-name="T3">4235 4335 3335</text:span></text:p>
      <text:p text:style-name="P1"><text:span text:style-name="T2">3236</text:span> 4236 4336 3336 </text:p>
      <text:p text:style-name="P1"><text:span text:style-name="T2">3237</text:span> 4237 4337 3337</text:p>
      <text:p text:style-name="P1"><text:span text:style-name="T2">3238</text:span> 4238 4338 3338</text:p>
      <text:p text:style-name="P1"><text:span text:style-name="T2">3239</text:span> 4239 4339 3339</text:p>
      <text:p text:style-name="P1"><text:span text:style-name="T2">3240</text:span> <text:span text:style-name="T3">4240 4340 3340</text:span></text:p>
      <text:p text:style-name="P1"><text:span text:style-name="T2">3241</text:span> <text:span text:style-name="T3">4241 4341 3341</text:span></text:p>
      <text:p text:style-name="P1"><text:span text:style-name="T2">3242</text:span> 4242 4342 3342</text:p>
      <text:p text:style-name="P1"><text:span text:style-name="T2">3243</text:span> <text:span text:style-name="T3">4243 4343 3343</text:span></text:p>
      <text:p text:style-name="P1"><text:span text:style-name="T2">3244</text:span> <text:span text:style-name="T3">4244 4344 3344</text:span></text:p>
      <text:p text:style-name="P1"><text:span text:style-name="T2">3245</text:span> <text:span text:style-name="T3">4245 4345 3345</text:span></text:p>
      <text:p text:style-name="P1"><text:span text:style-name="T2">3246</text:span> 4246 4346 3346</text:p>
      <text:p text:style-name="P1"><text:span text:style-name="T2">3247</text:span> 4247 4347 3347</text:p>
      <text:p text:style-name="P1">3248 4248 4348 3348</text:p>
      <text:p text:style-name="P1"><text:span text:style-name="T2">3250</text:span>4250 4350 3350</text:p>
      <text:p text:style-name="P1"><text:span text:style-name="T2">3251</text:span> <text:span text:style-name="T3">4251 4351 3351</text:span></text:p>
      <text:p text:style-name="P1"><text:span text:style-name="T2">3252</text:span> <text:span text:style-name="T3">4252 4352 3352</text:span></text:p>
      <text:p text:style-name="P1"><text:span text:style-name="T2">3253</text:span> 4253 4353 3353</text:p>
      <text:p text:style-name="P1"><text:span text:style-name="T2">3254</text:span> 4254 4354 3354</text:p>
      <text:p text:style-name="P1"><text:span text:style-name="T2">3255</text:span> <text:span text:style-name="T3">4255 4355 3355</text:span></text:p>
      <text:p text:style-name="P1"><text:span text:style-name="T2">3256</text:span> 4256 4356 3356</text:p>
      <text:p text:style-name="P1"><text:span text:style-name="T2">3258</text:span> <text:span text:style-name="T3">4258 4358 3358</text:span></text:p>
      <text:p text:style-name="P1"><text:span text:style-name="T2">3259</text:span> <text:span text:style-name="T3">4259 4359 3359</text:span></text:p>
      <text:p text:style-name="P1"><text:span text:style-name="T2">3260</text:span> 4260 4360 3360</text:p>
      <text:p text:style-name="P1"><text:span text:style-name="T2">3261</text:span> 4261 4361 3361</text:p>
      <text:p text:style-name="P1"><text:span text:style-name="T2">3262</text:span> 4262 4362 3362</text:p>
      <text:p text:style-name="P1"><text:span text:style-name="T2">3263</text:span> <text:span text:style-name="T3">4263 4363 3363</text:span></text:p>
      <text:p text:style-name="P1"><text:soft-page-break/><text:span text:style-name="T2">3264</text:span> <text:span text:style-name="T3">4264 4364 3364</text:span></text:p>
      <text:p text:style-name="P1"><text:span text:style-name="T2">3265</text:span> 4265 4365 3365</text:p>
      <text:p text:style-name="P1"><text:span text:style-name="T2">3266</text:span> 4266 4366 3366</text:p>
      <text:p text:style-name="P1"><text:span text:style-name="T2">3267</text:span> 4267 4367 3367</text:p>
      <text:p text:style-name="P1"><text:span text:style-name="T2">3299</text:span> <text:span text:style-name="T3">4299 4399 3399</text:span></text:p>
      <text:p text:style-name="P1"/>
      <text:p text:style-name="P1"><text:span text:style-name="T2">3431</text:span> 4531 3531 </text:p>
      <text:p text:style-name="P1"><text:span text:style-name="T2">3432</text:span> 4532 3532</text:p>
      <text:p text:style-name="P1"><text:span text:style-name="T2">3433</text:span> 4533 3533</text:p>
      <text:p text:style-name="P1"><text:span text:style-name="T2">3434</text:span><text:span text:style-name="T4"> </text:span><text:span text:style-name="T3">4534 3534</text:span></text:p>
      <text:p text:style-name="P1"><text:span text:style-name="T2">3435</text:span> 4535 3535</text:p>
      <text:p text:style-name="P1"><text:span text:style-name="T2">3436</text:span> 4536 3536</text:p>
      <text:p text:style-name="P1"><text:span text:style-name="T2">3437</text:span> <text:span text:style-name="T3">4537 3537</text:span></text:p>
      <text:p text:style-name="P1"><text:span text:style-name="T2">3438</text:span> <text:span text:style-name="T3">4538 3538</text:span></text:p>
      <text:p text:style-name="P1">3440 4540 3540</text:p>
      <text:p text:style-name="P1"><text:span text:style-name="T2">3441</text:span> <text:span text:style-name="T3">4541 3541</text:span></text:p>
      <text:p text:style-name="P1"><text:span text:style-name="T2">3442</text:span> 4542 3542</text:p>
      <text:p text:style-name="P1"><text:span text:style-name="T2">3443</text:span> <text:span text:style-name="T3">4543 3543</text:span></text:p>
      <text:p text:style-name="P1"><text:span text:style-name="T2">3444</text:span> <text:span text:style-name="T3">4544 3544</text:span></text:p>
      <text:p text:style-name="P1"><text:span text:style-name="T2">3445</text:span> <text:span text:style-name="T3">4545 3545</text:span></text:p>
      <text:p text:style-name="P1"><text:span text:style-name="T2">3446</text:span><text:span text:style-name="T4"> </text:span><text:span text:style-name="T3">4546 3546</text:span></text:p>
      <text:p text:style-name="P1"><text:span text:style-name="T2">3447</text:span> <text:span text:style-name="T3">4547 3547</text:span></text:p>
      <text:p text:style-name="P1"><text:span text:style-name="T2">3448</text:span> 4548 3548</text:p>
      <text:p text:style-name="P1"><text:span text:style-name="T2">3449</text:span> 4549 3549</text:p>
      <text:p text:style-name="P1">3450 4550 3550</text:p>
      <text:p text:style-name="P1"><text:span text:style-name="T2">3451</text:span> 4551 3551</text:p>
      <text:p text:style-name="P1"><text:span text:style-name="T2">3452</text:span> 4552 3552</text:p>
      <text:p text:style-name="P1"><text:span text:style-name="T2">3453</text:span> 4553 3553</text:p>
      <text:p text:style-name="P1"><text:span text:style-name="T2">3454</text:span> <text:span text:style-name="T3">4554 3554</text:span></text:p>
      <text:p text:style-name="P1"><text:span text:style-name="T2">3455</text:span> <text:span text:style-name="T3">4555 3555</text:span></text:p>
      <text:p text:style-name="P1"><text:span text:style-name="T2">3456</text:span> 4556 3556</text:p>
      <text:p text:style-name="P1"><text:span text:style-name="T2">3457</text:span> 4557 3557</text:p>
      <text:p text:style-name="P1"><text:span text:style-name="T2">3458</text:span> 4558 3558</text:p>
      <text:p text:style-name="P1"><text:span text:style-name="T2">3459</text:span> <text:span text:style-name="T3">4559 3559</text:span></text:p>
      <text:p text:style-name="P1"><text:span text:style-name="T2">3460</text:span> 4560 3560</text:p>
      <text:p text:style-name="P1"><text:soft-page-break/><text:span text:style-name="T2">3461</text:span> 4561 3561</text:p>
      <text:p text:style-name="P1"><text:span text:style-name="T2">3462</text:span> 4562 3562</text:p>
      <text:p text:style-name="P1"><text:span text:style-name="T2">3463</text:span> 4563 3563</text:p>
      <text:p text:style-name="P1"><text:span text:style-name="T2">3464</text:span> 4564 3564</text:p>
      <text:p text:style-name="P1"><text:span text:style-name="T2">3465</text:span> <text:span text:style-name="T3">4565 3565</text:span></text:p>
      <text:p text:style-name="P1"><text:span text:style-name="T2">3466</text:span> 4566 3566</text:p>
      <text:p text:style-name="P1"><text:span text:style-name="T2">3467</text:span> <text:span text:style-name="T3">4567 3567</text:span></text:p>
      <text:p text:style-name="P1"/>
      <text:p text:style-name="P1">CENTRAL LINE</text:p>
      <text:p text:style-name="P1"/>
      <text:p text:style-name="P1"><text:span text:style-name="T2">91001</text:span> 92001</text:p>
      <text:p text:style-name="P1"><text:span text:style-name="T2">91003</text:span> <text:span text:style-name="T3">92003</text:span></text:p>
      <text:p text:style-name="P1"><text:span text:style-name="T2">91005</text:span> 92005</text:p>
      <text:p text:style-name="P1"><text:span text:style-name="T2">91007</text:span> <text:span text:style-name="T3">92007</text:span></text:p>
      <text:p text:style-name="P1"><text:span text:style-name="T2">91009</text:span> <text:span text:style-name="T3">92009</text:span></text:p>
      <text:p text:style-name="P1"><text:span text:style-name="T2">91011</text:span> <text:span text:style-name="T3">92011</text:span></text:p>
      <text:p text:style-name="P1">91013 92013</text:p>
      <text:p text:style-name="P1"><text:span text:style-name="T2">91015</text:span> 92015</text:p>
      <text:p text:style-name="P1"><text:span text:style-name="T2">91017</text:span> 92017</text:p>
      <text:p text:style-name="P1"><text:span text:style-name="T2">91019</text:span> 92019</text:p>
      <text:p text:style-name="P1">91021 92021</text:p>
      <text:p text:style-name="P1"><text:span text:style-name="T2">91023</text:span> 92023</text:p>
      <text:p text:style-name="P1"><text:span text:style-name="T2">91025</text:span> 92025</text:p>
      <text:p text:style-name="P1">91027 92027</text:p>
      <text:p text:style-name="P1">91029 92029</text:p>
      <text:p text:style-name="P1">91031 92031</text:p>
      <text:p text:style-name="P1"><text:span text:style-name="T2">91033</text:span> <text:span text:style-name="T3">92033</text:span></text:p>
      <text:p text:style-name="P1"><text:span text:style-name="T2">91035</text:span> 92035</text:p>
      <text:p text:style-name="P1"><text:span text:style-name="T2">91037</text:span> <text:span text:style-name="T3">92037</text:span></text:p>
      <text:p text:style-name="P1"><text:span text:style-name="T2">91039</text:span> 92039</text:p>
      <text:p text:style-name="P1"><text:span text:style-name="T2">91041</text:span> <text:span text:style-name="T3">92041</text:span></text:p>
      <text:p text:style-name="P1"><text:span text:style-name="T2">91043</text:span> <text:span text:style-name="T3">92043</text:span></text:p>
      <text:p text:style-name="P1">91045 92045</text:p>
      <text:p text:style-name="P1"><text:span text:style-name="T2">91047</text:span> 92047</text:p>
      <text:p text:style-name="P1">91049 92049</text:p>
      <text:p text:style-name="P1"><text:soft-page-break/>91051 92051</text:p>
      <text:p text:style-name="P1">91053 92053</text:p>
      <text:p text:style-name="P1"><text:span text:style-name="T2">91055</text:span> 92055</text:p>
      <text:p text:style-name="P1"><text:span text:style-name="T2">91057</text:span> 92057</text:p>
      <text:p text:style-name="P1"><text:span text:style-name="T2">91059</text:span> 92059</text:p>
      <text:p text:style-name="P1"><text:span text:style-name="T2">91061</text:span> 92061</text:p>
      <text:p text:style-name="P1"><text:span text:style-name="T2">91063</text:span> 92063</text:p>
      <text:p text:style-name="P1"><text:span text:style-name="T2">91065</text:span><text:span text:style-name="T4"> </text:span>92065</text:p>
      <text:p text:style-name="P1"><text:span text:style-name="T2">91067</text:span> 92067</text:p>
      <text:p text:style-name="P1">91069 92069</text:p>
      <text:p text:style-name="P1"><text:span text:style-name="T2">91071</text:span> 92071</text:p>
      <text:p text:style-name="P1">91073 92073</text:p>
      <text:p text:style-name="P1"><text:span text:style-name="T2">91075</text:span> <text:span text:style-name="T3">92075</text:span></text:p>
      <text:p text:style-name="P1"><text:span text:style-name="T2">91077</text:span> 92077</text:p>
      <text:p text:style-name="P1"><text:span text:style-name="T2">91079</text:span> 92079</text:p>
      <text:p text:style-name="P1">91081 92081</text:p>
      <text:p text:style-name="P1"><text:span text:style-name="T2">91083</text:span> <text:span text:style-name="T3">92083</text:span></text:p>
      <text:p text:style-name="P1"><text:span text:style-name="T2">91085</text:span> 92085</text:p>
      <text:p text:style-name="P1"><text:span text:style-name="T2">91087</text:span> <text:span text:style-name="T3">92087</text:span></text:p>
      <text:p text:style-name="P1">91089 92089</text:p>
      <text:p text:style-name="P1"><text:span text:style-name="T2">91091</text:span> 92091 </text:p>
      <text:p text:style-name="P1"><text:span text:style-name="T2">91093</text:span> <text:span text:style-name="T3">92093</text:span></text:p>
      <text:p text:style-name="P1"><text:span text:style-name="T2">91095</text:span> <text:span text:style-name="T3">92095</text:span></text:p>
      <text:p text:style-name="P1"><text:span text:style-name="T2">91097</text:span> 92097</text:p>
      <text:p text:style-name="P1"><text:span text:style-name="T2">91099</text:span> <text:span text:style-name="T3">92099</text:span></text:p>
      <text:p text:style-name="P1"/>
      <text:p text:style-name="P1"><text:span text:style-name="T2">91101</text:span> 92102</text:p>
      <text:p text:style-name="P1"><text:span text:style-name="T2">91103</text:span> <text:span text:style-name="T3">92103</text:span></text:p>
      <text:p text:style-name="P1"><text:span text:style-name="T2">91105</text:span> <text:span text:style-name="T3">92105</text:span></text:p>
      <text:p text:style-name="P1"><text:span text:style-name="T2">91107</text:span> <text:span text:style-name="T3">92107</text:span></text:p>
      <text:p text:style-name="P1"><text:span text:style-name="T2">91109</text:span><text:span text:style-name="T4"> </text:span>92109</text:p>
      <text:p text:style-name="P1"><text:span text:style-name="T2">91111</text:span> 92111</text:p>
      <text:p text:style-name="P1"><text:span text:style-name="T2">91113</text:span> 92113</text:p>
      <text:p text:style-name="P1"><text:span text:style-name="T2">91115</text:span> <text:span text:style-name="T3">92115</text:span></text:p>
      <text:p text:style-name="P1"><text:span text:style-name="T2">91117</text:span> 92117</text:p>
      <text:p text:style-name="P1"><text:soft-page-break/><text:span text:style-name="T2">91119</text:span> 92119</text:p>
      <text:p text:style-name="P1"><text:span text:style-name="T2">91121</text:span> 92121</text:p>
      <text:p text:style-name="P1"><text:span text:style-name="T2">91123</text:span> 92123</text:p>
      <text:p text:style-name="P1">91125 92125</text:p>
      <text:p text:style-name="P1"><text:span text:style-name="T2">91127</text:span> 92127</text:p>
      <text:p text:style-name="P1">91129 92129</text:p>
      <text:p text:style-name="P1">91131 92131</text:p>
      <text:p text:style-name="P1">91133 92133</text:p>
      <text:p text:style-name="P1">91135 92135</text:p>
      <text:p text:style-name="P1">91137 92137</text:p>
      <text:p text:style-name="P1">91139 92139</text:p>
      <text:p text:style-name="P1"><text:span text:style-name="T2">91141</text:span> <text:span text:style-name="T3">92141</text:span></text:p>
      <text:p text:style-name="P1"><text:span text:style-name="T2">91143</text:span> 92143</text:p>
      <text:p text:style-name="P1"><text:span text:style-name="T2">91145</text:span> 92145</text:p>
      <text:p text:style-name="P1"><text:span text:style-name="T2">91147</text:span> <text:span text:style-name="T3">92147</text:span></text:p>
      <text:p text:style-name="P1"><text:span text:style-name="T2">91149</text:span> 92149</text:p>
      <text:p text:style-name="P1"><text:span text:style-name="T2">91151</text:span> 92151</text:p>
      <text:p text:style-name="P1"><text:span text:style-name="T2">91153</text:span> 92153</text:p>
      <text:p text:style-name="P1"><text:span text:style-name="T2">91155</text:span> 92155</text:p>
      <text:p text:style-name="P1"><text:span text:style-name="T2">91157</text:span> <text:span text:style-name="T3">92157</text:span></text:p>
      <text:p text:style-name="P1"><text:span text:style-name="T2">91159</text:span> <text:span text:style-name="T3">92159</text:span></text:p>
      <text:p text:style-name="P1"><text:span text:style-name="T2">91161</text:span> <text:span text:style-name="T3">92161</text:span></text:p>
      <text:p text:style-name="P1">91163 92163</text:p>
      <text:p text:style-name="P1"><text:span text:style-name="T2">91165</text:span> 92165</text:p>
      <text:p text:style-name="P1"><text:span text:style-name="T2">91167</text:span> <text:span text:style-name="T3">92167</text:span></text:p>
      <text:p text:style-name="P1"><text:span text:style-name="T2">91169</text:span> 92169</text:p>
      <text:p text:style-name="P1">91171 92171</text:p>
      <text:p text:style-name="P1"><text:span text:style-name="T2">91173</text:span> 92173</text:p>
      <text:p text:style-name="P1">91175 92175</text:p>
      <text:p text:style-name="P1"><text:span text:style-name="T2">91177</text:span> <text:span text:style-name="T3">92177</text:span></text:p>
      <text:p text:style-name="P1">91179 92179</text:p>
      <text:p text:style-name="P1"><text:span text:style-name="T2">91181</text:span> 92181</text:p>
      <text:p text:style-name="P1">91183 92183</text:p>
      <text:p text:style-name="P1"><text:span text:style-name="T2">91185</text:span> 92185</text:p>
      <text:p text:style-name="P1"><text:span text:style-name="T2">91187</text:span> 92187</text:p>
      <text:p text:style-name="P1"><text:soft-page-break/><text:span text:style-name="T2">91189</text:span> 92189</text:p>
      <text:p text:style-name="P1"><text:span text:style-name="T2">91191</text:span> 92191</text:p>
      <text:p text:style-name="P1"><text:span text:style-name="T2">91193</text:span> 92193</text:p>
      <text:p text:style-name="P1"><text:span text:style-name="T2">91195</text:span> 92195 </text:p>
      <text:p text:style-name="P1"><text:span text:style-name="T2">91197</text:span> 92197</text:p>
      <text:p text:style-name="P1"><text:span text:style-name="T2">91199</text:span> <text:span text:style-name="T3">92199</text:span></text:p>
      <text:p text:style-name="P1"/>
      <text:p text:style-name="P1"><text:span text:style-name="T2">91201</text:span> 92201</text:p>
      <text:p text:style-name="P1"><text:span text:style-name="T2">91203</text:span> 92203</text:p>
      <text:p text:style-name="P1">91205 92205</text:p>
      <text:p text:style-name="P1"><text:span text:style-name="T2">91207</text:span> 92207</text:p>
      <text:p text:style-name="P1"><text:span text:style-name="T2">91209</text:span> 92209</text:p>
      <text:p text:style-name="P1">91211 92211</text:p>
      <text:p text:style-name="P1">91213 92213</text:p>
      <text:p text:style-name="P1">91215 92215</text:p>
      <text:p text:style-name="P1"><text:span text:style-name="T2">91217</text:span> 92217</text:p>
      <text:p text:style-name="P1"><text:span text:style-name="T2">91219</text:span> <text:span text:style-name="T3">92219</text:span></text:p>
      <text:p text:style-name="P1"><text:span text:style-name="T2">91221</text:span> 92221</text:p>
      <text:p text:style-name="P1">91223 92223</text:p>
      <text:p text:style-name="P1"><text:span text:style-name="T2">91225</text:span> <text:span text:style-name="T3">92225</text:span></text:p>
      <text:p text:style-name="P1"><text:span text:style-name="T2">91227</text:span> <text:span text:style-name="T3">92227</text:span></text:p>
      <text:p text:style-name="P1"><text:span text:style-name="T2">91229</text:span> 92229</text:p>
      <text:p text:style-name="P1">91231 92231</text:p>
      <text:p text:style-name="P1">91233 92233</text:p>
      <text:p text:style-name="P1">91235 92235</text:p>
      <text:p text:style-name="P1"><text:span text:style-name="T2">91237</text:span> 92237</text:p>
      <text:p text:style-name="P1"><text:span text:style-name="T2">91239</text:span> 92239</text:p>
      <text:p text:style-name="P1"><text:span text:style-name="T2">91241</text:span> 92241</text:p>
      <text:p text:style-name="P1">91243 92243</text:p>
      <text:p text:style-name="P1"><text:span text:style-name="T2">91245</text:span> 92245</text:p>
      <text:p text:style-name="P1"><text:span text:style-name="T2">91247</text:span> 92247</text:p>
      <text:p text:style-name="P1"><text:span text:style-name="T2">91249</text:span> 92249</text:p>
      <text:p text:style-name="P1"><text:span text:style-name="T2">91251</text:span> 92251</text:p>
      <text:p text:style-name="P1"><text:span text:style-name="T2">91253</text:span> <text:span text:style-name="T3">92253</text:span></text:p>
      <text:p text:style-name="P1"><text:span text:style-name="T2">91255</text:span> <text:span text:style-name="T3">92255</text:span></text:p>
      <text:p text:style-name="P1"><text:soft-page-break/>91257 92257</text:p>
      <text:p text:style-name="P1">91259 92259</text:p>
      <text:p text:style-name="P1">91261 92261</text:p>
      <text:p text:style-name="P1">91263 92263</text:p>
      <text:p text:style-name="P1"><text:span text:style-name="T2">91265</text:span> 92265</text:p>
      <text:p text:style-name="P1"><text:span text:style-name="T2">91267</text:span> 92267</text:p>
      <text:p text:style-name="P1"><text:span text:style-name="T2">91269</text:span> <text:span text:style-name="T3">92269</text:span></text:p>
      <text:p text:style-name="P1"><text:span text:style-name="T2">91271</text:span> 92271</text:p>
      <text:p text:style-name="P1"><text:span text:style-name="T2">91273</text:span> 92273</text:p>
      <text:p text:style-name="P1">91275 92275</text:p>
      <text:p text:style-name="P1"><text:span text:style-name="T2">91277</text:span> 92277</text:p>
      <text:p text:style-name="P1">91279 92279</text:p>
      <text:p text:style-name="P1">91281 92281</text:p>
      <text:p text:style-name="P1"><text:span text:style-name="T2">91283</text:span> 92283</text:p>
      <text:p text:style-name="P1"><text:span text:style-name="T2">91285</text:span> 92285</text:p>
      <text:p text:style-name="P1"><text:span text:style-name="T2">91287</text:span> <text:span text:style-name="T3">92287</text:span></text:p>
      <text:p text:style-name="P1"><text:span text:style-name="T2">91289</text:span> 92289</text:p>
      <text:p text:style-name="P1"><text:span text:style-name="T2">91291</text:span> 92291</text:p>
      <text:p text:style-name="P1"><text:span text:style-name="T2">91293</text:span> 92293</text:p>
      <text:p text:style-name="P1">91295 92295</text:p>
      <text:p text:style-name="P1"><text:span text:style-name="T2">91297</text:span> 92297</text:p>
      <text:p text:style-name="P1">91299 92299</text:p>
      <text:p text:style-name="P1"/>
      <text:p text:style-name="P1">91301 92301</text:p>
      <text:p text:style-name="P1"><text:span text:style-name="T2">91303</text:span> 92303</text:p>
      <text:p text:style-name="P1"><text:span text:style-name="T2">91305</text:span> <text:span text:style-name="T3">92305</text:span></text:p>
      <text:p text:style-name="P1"><text:span text:style-name="T2">91307</text:span> 92307</text:p>
      <text:p text:style-name="P1"><text:span text:style-name="T2">91309</text:span> 92309</text:p>
      <text:p text:style-name="P1">91311 92311</text:p>
      <text:p text:style-name="P1"><text:span text:style-name="T2">91313</text:span> <text:span text:style-name="T3">92313</text:span></text:p>
      <text:p text:style-name="P1"><text:span text:style-name="T2">91315</text:span> 92315</text:p>
      <text:p text:style-name="P1"><text:span text:style-name="T2">91317</text:span> 92317</text:p>
      <text:p text:style-name="P1"><text:span text:style-name="T2">91319</text:span> 92319</text:p>
      <text:p text:style-name="P1">91321 92321</text:p>
      <text:p text:style-name="P1"><text:span text:style-name="T2">91323</text:span> 92323</text:p>
      <text:p text:style-name="P1"><text:soft-page-break/>91325 92325</text:p>
      <text:p text:style-name="P1">91327 92327</text:p>
      <text:p text:style-name="P1">91329 92329</text:p>
      <text:p text:style-name="P1">91331 92331</text:p>
      <text:p text:style-name="P1"><text:span text:style-name="T2">91333</text:span> 92333</text:p>
      <text:p text:style-name="P1"><text:span text:style-name="T2">91335</text:span> 92335</text:p>
      <text:p text:style-name="P1">91337 92337</text:p>
      <text:p text:style-name="P1">91339 92339</text:p>
      <text:p text:style-name="P1">91341 92341</text:p>
      <text:p text:style-name="P1">91343 92343</text:p>
      <text:p text:style-name="P1"><text:span text:style-name="T2">91345</text:span> 92345</text:p>
      <text:p text:style-name="P1">91347 92347</text:p>
      <text:p text:style-name="P1"><text:span text:style-name="T2">91349</text:span> 92349</text:p>
      <text:p text:style-name="P1"/>
      <text:p text:style-name="P1"><text:span text:style-name="T2">92002</text:span> 93002</text:p>
      <text:p text:style-name="P1">92004 93004</text:p>
      <text:p text:style-name="P1">92006 93006</text:p>
      <text:p text:style-name="P1"><text:span text:style-name="T2">92008</text:span> 93008</text:p>
      <text:p text:style-name="P1"><text:span text:style-name="T2">92010</text:span> 93010</text:p>
      <text:p text:style-name="P1"><text:span text:style-name="T2">92012</text:span> 93012</text:p>
      <text:p text:style-name="P1"><text:span text:style-name="T2">92014</text:span> 93014</text:p>
      <text:p text:style-name="P1"><text:span text:style-name="T2">92016</text:span> 93016</text:p>
      <text:p text:style-name="P1">92018 93018</text:p>
      <text:p text:style-name="P1"><text:span text:style-name="T2">92020</text:span> 93020</text:p>
      <text:p text:style-name="P1">92022 93022</text:p>
      <text:p text:style-name="P1">92024 93024</text:p>
      <text:p text:style-name="P1"><text:span text:style-name="T2">92026</text:span> <text:span text:style-name="T3">93026</text:span></text:p>
      <text:p text:style-name="P1">92028 93028</text:p>
      <text:p text:style-name="P1"><text:span text:style-name="T2">92030</text:span> 93030</text:p>
      <text:p text:style-name="P1"><text:span text:style-name="T2">92032</text:span> <text:span text:style-name="T3">93032</text:span></text:p>
      <text:p text:style-name="P1"><text:span text:style-name="T2">92034</text:span> <text:span text:style-name="T3">93034</text:span></text:p>
      <text:p text:style-name="P1"><text:span text:style-name="T2">92036</text:span> <text:span text:style-name="T3">93036</text:span></text:p>
      <text:p text:style-name="P1"><text:span text:style-name="T2">92038</text:span> 93038</text:p>
      <text:p text:style-name="P1"><text:span text:style-name="T2">92040</text:span> 92040</text:p>
      <text:p text:style-name="P1"><text:span text:style-name="T2">92042</text:span> 93042</text:p>
      <text:p text:style-name="P1"><text:soft-page-break/><text:span text:style-name="T2">92044</text:span> <text:span text:style-name="T3">93044</text:span></text:p>
      <text:p text:style-name="P1"><text:span text:style-name="T2">92046</text:span> 93046</text:p>
      <text:p text:style-name="P1"><text:span text:style-name="T2">92048</text:span> 93048</text:p>
      <text:p text:style-name="P1"><text:span text:style-name="T2">92050</text:span> 93050</text:p>
      <text:p text:style-name="P1"><text:span text:style-name="T2">92052</text:span> 93052</text:p>
      <text:p text:style-name="P1"><text:span text:style-name="T2">92054</text:span> 93054</text:p>
      <text:p text:style-name="P1"><text:span text:style-name="T2">92056</text:span> <text:span text:style-name="T3">93056</text:span></text:p>
      <text:p text:style-name="P1"><text:span text:style-name="T2">92058</text:span> <text:span text:style-name="T3">93058</text:span></text:p>
      <text:p text:style-name="P1">92060 93060</text:p>
      <text:p text:style-name="P1">92062 93062</text:p>
      <text:p text:style-name="P1"><text:span text:style-name="T2">92064</text:span> 93064</text:p>
      <text:p text:style-name="P1">92066 93066</text:p>
      <text:p text:style-name="P2"><text:span text:style-name="T2">92068</text:span> 93068</text:p>
      <text:p text:style-name="P1"><text:span text:style-name="T2">92070</text:span> <text:span text:style-name="T3">93070</text:span></text:p>
      <text:p text:style-name="P1">92072 93072</text:p>
      <text:p text:style-name="P1">92074 93074</text:p>
      <text:p text:style-name="P1"><text:span text:style-name="T2">92076</text:span><text:span text:style-name="T6"> </text:span><text:span text:style-name="T3">93076</text:span></text:p>
      <text:p text:style-name="P1"><text:span text:style-name="T2">92078</text:span> 93078</text:p>
      <text:p text:style-name="P1"><text:span text:style-name="T2">92080</text:span> <text:span text:style-name="T3">93080</text:span></text:p>
      <text:p text:style-name="P1"><text:span text:style-name="T2">92082</text:span> 93082</text:p>
      <text:p text:style-name="P1">92084 93084</text:p>
      <text:p text:style-name="P1"><text:span text:style-name="T2">92086</text:span> 93086</text:p>
      <text:p text:style-name="P1">92088 93088</text:p>
      <text:p text:style-name="P1"><text:span text:style-name="T2">92090</text:span> 93090</text:p>
      <text:p text:style-name="P1">92092 93092</text:p>
      <text:p text:style-name="P1"><text:span text:style-name="T2">92094</text:span> 93094</text:p>
      <text:p text:style-name="P1"><text:span text:style-name="T2">92096</text:span> <text:span text:style-name="T3">92096</text:span></text:p>
      <text:p text:style-name="P1"><text:span text:style-name="T2">92098</text:span> 93098</text:p>
      <text:p text:style-name="P1"/>
      <text:p text:style-name="P1"><text:span text:style-name="T2">92100</text:span> 93100</text:p>
      <text:p text:style-name="P1"><text:span text:style-name="T2">92102</text:span> 93102</text:p>
      <text:p text:style-name="P1"><text:span text:style-name="T2">92104</text:span> 93104</text:p>
      <text:p text:style-name="P1">92106 93106</text:p>
      <text:p text:style-name="P1"><text:span text:style-name="T2">92108</text:span> 93108</text:p>
      <text:p text:style-name="P1"><text:span text:style-name="T2">92110</text:span><text:span text:style-name="T4"> </text:span>93110</text:p>
      <text:p text:style-name="P1"><text:soft-page-break/>92112 93112</text:p>
      <text:p text:style-name="P1"><text:span text:style-name="T2">92114</text:span> 93114</text:p>
      <text:p text:style-name="P1"><text:span text:style-name="T2">92116</text:span> 93116</text:p>
      <text:p text:style-name="P1">92118 93118</text:p>
      <text:p text:style-name="P1"><text:span text:style-name="T2">92120</text:span> 93120</text:p>
      <text:p text:style-name="P1"><text:span text:style-name="T2">92122</text:span> 93122 </text:p>
      <text:p text:style-name="P1">92124 93124</text:p>
      <text:p text:style-name="P1"><text:span text:style-name="T2">92126</text:span> 93126</text:p>
      <text:p text:style-name="P1">92128 93128</text:p>
      <text:p text:style-name="P1"><text:span text:style-name="T2">92130</text:span> 93130</text:p>
      <text:p text:style-name="P1"><text:span text:style-name="T2">92132</text:span> <text:span text:style-name="T3">93132</text:span></text:p>
      <text:p text:style-name="P1">92134 93134</text:p>
      <text:p text:style-name="P1">92136 93136</text:p>
      <text:p text:style-name="P1">92138 93138</text:p>
      <text:p text:style-name="P1">92140 93140</text:p>
      <text:p text:style-name="P1"><text:span text:style-name="T2">92142</text:span> <text:span text:style-name="T3">93142</text:span></text:p>
      <text:p text:style-name="P1"><text:span text:style-name="T2">92144</text:span> 93144</text:p>
      <text:p text:style-name="P1"><text:span text:style-name="T2">92146</text:span> 93146</text:p>
      <text:p text:style-name="P1"><text:span text:style-name="T2">92148</text:span> 93148</text:p>
      <text:p text:style-name="P1">92150 93150</text:p>
      <text:p text:style-name="P1"><text:span text:style-name="T2">92152</text:span> 93152</text:p>
      <text:p text:style-name="P1"><text:span text:style-name="T2">92154</text:span> 93154</text:p>
      <text:p text:style-name="P1"><text:span text:style-name="T2">92156</text:span> 93156</text:p>
      <text:p text:style-name="P1"><text:span text:style-name="T2">92158</text:span> 93158</text:p>
      <text:p text:style-name="P1"><text:span text:style-name="T2">92160</text:span> <text:span text:style-name="T3">93160</text:span></text:p>
      <text:p text:style-name="P1"><text:span text:style-name="T2">92162</text:span> 93162</text:p>
      <text:p text:style-name="P1"><text:span text:style-name="T2">92164</text:span> 93164</text:p>
      <text:p text:style-name="P1">92166 93166</text:p>
      <text:p text:style-name="P1">92168 93168</text:p>
      <text:p text:style-name="P1"><text:span text:style-name="T2">92170</text:span> 93170</text:p>
      <text:p text:style-name="P1"><text:span text:style-name="T2">92172</text:span> 93172</text:p>
      <text:p text:style-name="P1"><text:span text:style-name="T2">92174</text:span> 93174</text:p>
      <text:p text:style-name="P1"><text:span text:style-name="T2">92176</text:span> 93176</text:p>
      <text:p text:style-name="P1">92178 93178</text:p>
      <text:p text:style-name="P1"><text:span text:style-name="T2">92180</text:span> <text:span text:style-name="T3">93180</text:span></text:p>
      <text:p text:style-name="P1"><text:soft-page-break/><text:span text:style-name="T2">92182</text:span> 93182</text:p>
      <text:p text:style-name="P1"><text:span text:style-name="T2">92184</text:span> <text:span text:style-name="T3">93184</text:span></text:p>
      <text:p text:style-name="P1">92186 93186</text:p>
      <text:p text:style-name="P1"><text:span text:style-name="T2">92188</text:span> 93188</text:p>
      <text:p text:style-name="P1">92190 93190</text:p>
      <text:p text:style-name="P1">92192 93192</text:p>
      <text:p text:style-name="P1"><text:span text:style-name="T2">92194</text:span> 93194</text:p>
      <text:p text:style-name="P1"><text:span text:style-name="T2">92196</text:span> <text:span text:style-name="T3">93196</text:span></text:p>
      <text:p text:style-name="P1"><text:span text:style-name="T2">92198</text:span> 93198</text:p>
      <text:p text:style-name="P1"/>
      <text:p text:style-name="P1"><text:span text:style-name="T5">92200</text:span> 93200</text:p>
      <text:p text:style-name="P1"><text:span text:style-name="T2">92202</text:span> 93202</text:p>
      <text:p text:style-name="P1"><text:span text:style-name="T2">92204</text:span> <text:span text:style-name="T3">93204</text:span></text:p>
      <text:p text:style-name="P1"><text:span text:style-name="T2">92206</text:span> 93206</text:p>
      <text:p text:style-name="P1">92208 93208 </text:p>
      <text:p text:style-name="P1"><text:span text:style-name="T2">92210</text:span> 93210</text:p>
      <text:p text:style-name="P1">92212 93212</text:p>
      <text:p text:style-name="P1"><text:span text:style-name="T2">92214</text:span> 93214</text:p>
      <text:p text:style-name="P1"><text:span text:style-name="T2">92216</text:span> 93216</text:p>
      <text:p text:style-name="P1"><text:span text:style-name="T2">92218</text:span> 93218</text:p>
      <text:p text:style-name="P1">92220 93220</text:p>
      <text:p text:style-name="P1">92222 93222</text:p>
      <text:p text:style-name="P1"><text:span text:style-name="T2">92224</text:span> <text:span text:style-name="T3">93224</text:span></text:p>
      <text:p text:style-name="P1">92226 93226</text:p>
      <text:p text:style-name="P1"><text:span text:style-name="T2">92228</text:span> 93228</text:p>
      <text:p text:style-name="P1">92230 93230</text:p>
      <text:p text:style-name="P1"><text:span text:style-name="T2">92232</text:span> 93232</text:p>
      <text:p text:style-name="P1"><text:span text:style-name="T2">92234</text:span> <text:span text:style-name="T3">93234</text:span></text:p>
      <text:p text:style-name="P1"><text:span text:style-name="T2">92236</text:span> 93236</text:p>
      <text:p text:style-name="P1"><text:span text:style-name="T2">92238</text:span> 93238</text:p>
      <text:p text:style-name="P1">92240 93240</text:p>
      <text:p text:style-name="P1">92242 93242</text:p>
      <text:p text:style-name="P1"><text:span text:style-name="T2">92244</text:span> 93244</text:p>
      <text:p text:style-name="P1"><text:span text:style-name="T2">92246</text:span> 93246</text:p>
      <text:p text:style-name="P1"><text:span text:style-name="T2">92248</text:span> <text:span text:style-name="T3">93248</text:span></text:p>
      <text:p text:style-name="P1"><text:soft-page-break/><text:span text:style-name="T2">92250</text:span> 93250</text:p>
      <text:p text:style-name="P1"><text:span text:style-name="T2">92252</text:span> 93252</text:p>
      <text:p text:style-name="P1">92254 93254</text:p>
      <text:p text:style-name="P1"><text:span text:style-name="T2">92256</text:span> <text:span text:style-name="T3">93256</text:span></text:p>
      <text:p text:style-name="P1"><text:span text:style-name="T2">92258</text:span> 93258</text:p>
      <text:p text:style-name="P1"><text:span text:style-name="T2">92260</text:span> <text:span text:style-name="T3">93260</text:span></text:p>
      <text:p text:style-name="P1"><text:span text:style-name="T2">92262</text:span> 93262</text:p>
      <text:p text:style-name="P1"><text:span text:style-name="T2">92264</text:span> <text:span text:style-name="T3">93264</text:span></text:p>
      <text:p text:style-name="P1"><text:span text:style-name="T2">92266</text:span> 93266</text:p>
      <text:p text:style-name="P1"/>
      <text:p text:style-name="P1"><text:span text:style-name="T2">92402</text:span> 93402</text:p>
      <text:p text:style-name="P1">92404 93404</text:p>
      <text:p text:style-name="P1"><text:span text:style-name="T2">92406</text:span> <text:span text:style-name="T3">93406</text:span></text:p>
      <text:p text:style-name="P1"><text:span text:style-name="T2">92408</text:span> <text:span text:style-name="T3">93408</text:span></text:p>
      <text:p text:style-name="P1"><text:span text:style-name="T2">92410</text:span> 93410</text:p>
      <text:p text:style-name="P1">92412 93412</text:p>
      <text:p text:style-name="P1"><text:span text:style-name="T2">92414 </text:span>93414 </text:p>
      <text:p text:style-name="P1">92416 93416</text:p>
      <text:p text:style-name="P1">92418 93418</text:p>
      <text:p text:style-name="P1"><text:span text:style-name="T2">92420</text:span> 93420</text:p>
      <text:p text:style-name="P1">92422 93422</text:p>
      <text:p text:style-name="P1"><text:span text:style-name="T2">92424</text:span> <text:span text:style-name="T3">93424</text:span></text:p>
      <text:p text:style-name="P1">92426 93426</text:p>
      <text:p text:style-name="P1">92428 93428</text:p>
      <text:p text:style-name="P1"><text:span text:style-name="T2">92430</text:span> 93430</text:p>
      <text:p text:style-name="P1"><text:span text:style-name="T2">92432</text:span> <text:span text:style-name="T3">93432</text:span></text:p>
      <text:p text:style-name="P1"><text:span text:style-name="T2">92434</text:span> 93434</text:p>
      <text:p text:style-name="P1"><text:span text:style-name="T2">92436</text:span> <text:span text:style-name="T3">92436</text:span></text:p>
      <text:p text:style-name="P1"><text:span text:style-name="T2">92438</text:span> <text:span text:style-name="T3">93438</text:span></text:p>
      <text:p text:style-name="P1">92440 93440</text:p>
      <text:p text:style-name="P1"><text:span text:style-name="T2">92442</text:span> <text:span text:style-name="T3">93442</text:span></text:p>
      <text:p text:style-name="P1"><text:span text:style-name="T2">92444</text:span> 93444</text:p>
      <text:p text:style-name="P1"><text:span text:style-name="T2">92446</text:span> 93446</text:p>
      <text:p text:style-name="P1">92448 93448</text:p>
      <text:p text:style-name="P1"><text:span text:style-name="T2">92450</text:span> 93450</text:p>
      <text:p text:style-name="P1"><text:soft-page-break/>92452 93452</text:p>
      <text:p text:style-name="P1">92454 93454</text:p>
      <text:p text:style-name="P1"><text:span text:style-name="T2">92456</text:span> 93456</text:p>
      <text:p text:style-name="P1">92458 93458</text:p>
      <text:p text:style-name="P1"><text:span text:style-name="T2">92460</text:span> 93460</text:p>
      <text:p text:style-name="P1"><text:span text:style-name="T2">92462</text:span> 93462</text:p>
      <text:p text:style-name="P1"><text:span text:style-name="T2">92464</text:span> 93464</text:p>
      <text:p text:style-name="P1"/>
      <text:p text:style-name="P1">DISTRICT HAMMERSMITH CITY </text:p>
      <text:p text:style-name="P1"><text:span text:style-name="T2">21301</text:span> <text:span text:style-name="T3">22301 24301 24302 25302 22302 21302</text:span></text:p>
      <text:p text:style-name="P1"><text:span text:style-name="T2">21303</text:span> 22303 24303 24304 25304 22304 21304</text:p>
      <text:p text:style-name="P1"><text:span text:style-name="T2">21305</text:span> <text:span text:style-name="T3">22305 24305 24306 25306 22306 21306</text:span></text:p>
      <text:p text:style-name="P1"><text:span text:style-name="T2">21307</text:span> 22307 24307 24308 25308 22308 21308</text:p>
      <text:p text:style-name="P1"><text:span text:style-name="T2">21309</text:span> 22309 24309 24310 25310 22310 21310</text:p>
      <text:p text:style-name="P1"><text:span text:style-name="T2">21311</text:span> 22311 24311 <text:s/>24311 25312 22312 21312</text:p>
      <text:p text:style-name="P1">21313 22313 24313 <text:s/>24314 25314 22314 21314</text:p>
      <text:p text:style-name="P1"><text:span text:style-name="T2">21315</text:span> 22315 24315 <text:s/>24316 25316 22316 21316</text:p>
      <text:p text:style-name="P1"><text:span text:style-name="T2">21317</text:span> 22317 24317 <text:s/>24318 25318 22318 21318</text:p>
      <text:p text:style-name="P1"><text:span text:style-name="T2">21319</text:span> <text:span text:style-name="T3">22319 24319 <text:s/>24320 25320 22320 21320</text:span></text:p>
      <text:p text:style-name="P1"><text:span text:style-name="T2">21321</text:span> 22321 24321 <text:s/>24322 25322 22322 21322</text:p>
      <text:p text:style-name="P1"><text:span text:style-name="T2">21323</text:span> 22323 24323 <text:s/>24324 25324 22324 21324</text:p>
      <text:p text:style-name="P1"><text:span text:style-name="T2">21325</text:span> 22325 24325 <text:s/>24326 25326 22326 <text:s/>21326</text:p>
      <text:p text:style-name="P1">21327 22327 24327 <text:s/>24328 <text:s/>25328 22328 21328</text:p>
      <text:p text:style-name="P1"><text:span text:style-name="T2">21329</text:span> 22329 24329 <text:s/>24330 25330 22330 21330</text:p>
      <text:p text:style-name="P1"><text:span text:style-name="T7">21331</text:span><text:span text:style-name="T8"> </text:span>22331 24331 <text:s/>24332 25332 22332 21332</text:p>
      <text:p text:style-name="P1"><text:span text:style-name="T2">21333</text:span> <text:span text:style-name="T3">22333 24333 <text:s/>24334 25334 22334 21334</text:span></text:p>
      <text:p text:style-name="P1">21335 22335 24335 <text:s/>24336 25336 22336 21336</text:p>
      <text:p text:style-name="P1"><text:span text:style-name="T2">21337</text:span> 22337 24337 <text:s/>24338 25338 22338 21338</text:p>
      <text:p text:style-name="P1">21339 22339 24339 <text:s/>24340 25340 22340 21340</text:p>
      <text:p text:style-name="P1">21341 22341 24341 <text:s/>24342 25342 22342 21342</text:p>
      <text:p text:style-name="P1"><text:span text:style-name="T2">21343</text:span> 22343 24343 <text:s/>24344 25344 22344 21344</text:p>
      <text:p text:style-name="P1"><text:span text:style-name="T2">21345</text:span> 22345 24345 <text:s/>24346 25346 22346 21346</text:p>
      <text:p text:style-name="P1"><text:span text:style-name="T2">21347</text:span> <text:span text:style-name="T3">22347 24347 <text:s/>24348 25348 22348 21348</text:span></text:p>
      <text:p text:style-name="P1"><text:span text:style-name="T2">21349</text:span> 22349 24349 <text:s/>24350 25350 22350 21350</text:p>
      <text:p text:style-name="P1"><text:span text:style-name="T2">21351</text:span> <text:span text:style-name="T3">22351 24351 <text:s/>24352 25352 22352 21352</text:span></text:p>
      <text:p text:style-name="P1"><text:soft-page-break/><text:span text:style-name="T2">21353</text:span> 22353 24353 <text:s/>24354 25354 22354 21354</text:p>
      <text:p text:style-name="P1"><text:span text:style-name="T2">21355</text:span> <text:span text:style-name="T3">22355 24355 <text:s/>24356 25356 22356 21356</text:span></text:p>
      <text:p text:style-name="P1"><text:span text:style-name="T2">21357</text:span> <text:span text:style-name="T3">22357 24357 <text:s/>24358 25358 22358 21358</text:span></text:p>
      <text:p text:style-name="P1"><text:span text:style-name="T2">21359</text:span><text:span text:style-name="T3"> 22359 24359 <text:s/>24360 25360 22360 21360</text:span></text:p>
      <text:p text:style-name="P1">21361 22361 24361 <text:s/>24362 25362 22362 21362</text:p>
      <text:p text:style-name="P1"><text:span text:style-name="T2">21363</text:span> <text:span text:style-name="T3">22363 24363 <text:s/>24364 25364 22364 21364</text:span></text:p>
      <text:p text:style-name="P1"><text:span text:style-name="T2">21365</text:span> <text:span text:style-name="T3">22365 24365 <text:s/>24366 25366 22366 21366</text:span></text:p>
      <text:p text:style-name="P1"><text:span text:style-name="T2">21367</text:span> 22367 24367 <text:s/>24368 25368 22368 21368</text:p>
      <text:p text:style-name="P1"><text:span text:style-name="T2">21369</text:span> 22369 24369 <text:s/>24370 25370 22370 21370</text:p>
      <text:p text:style-name="P1"><text:span text:style-name="T2">21371</text:span> 22371 24371 <text:s/>24372 25372 22372 21372</text:p>
      <text:p text:style-name="P1"><text:span text:style-name="T2">21373</text:span> <text:span text:style-name="T3">22373 24373 <text:s/>24374 25374 22374 21374</text:span></text:p>
      <text:p text:style-name="P1"><text:span text:style-name="T2">21375</text:span> 22375 24375 <text:s/>24376 25376 22376 21376</text:p>
      <text:p text:style-name="P1"><text:span text:style-name="T2">21377</text:span> <text:span text:style-name="T3">22377 24377 <text:s/>24378 25378 22378 21378</text:span></text:p>
      <text:p text:style-name="P1"><text:span text:style-name="T2">21379</text:span> 22379 24379 <text:s/>24380 25380 22380 21380</text:p>
      <text:p text:style-name="P1"><text:span text:style-name="T2">21381</text:span> 22381 24381 <text:s/>24382 25382 22382 21382</text:p>
      <text:p text:style-name="P1"><text:span text:style-name="T2">21383</text:span> 22383 24383 <text:s/>24384 23384 22384 21384</text:p>
      <text:p text:style-name="P1"><text:span text:style-name="T2">21385</text:span> 22385 24385 <text:s/>24386 23386 22386 21386</text:p>
      <text:p text:style-name="P1"><text:span text:style-name="T2">21387</text:span> 22387 24387 <text:s/>24388 23388 22388 21388</text:p>
      <text:p text:style-name="P1"><text:span text:style-name="T2">21389</text:span> 22389 24389 <text:s/>24390 23390 22390 21390</text:p>
      <text:p text:style-name="P1"><text:span text:style-name="T2">21391</text:span> <text:span text:style-name="T3">22391 24391 <text:s/>24392 23392 22392 21392</text:span></text:p>
      <text:p text:style-name="P1"><text:span text:style-name="T2">21393</text:span> <text:span text:style-name="T3">22393 24393 <text:s/>24394 23394 22394 21394</text:span></text:p>
      <text:p text:style-name="P1"><text:span text:style-name="T2">21395</text:span> <text:span text:style-name="T3">22395 24395 <text:s/>24396 23396 22396 21396</text:span></text:p>
      <text:p text:style-name="P1">21397 22397 24397 <text:s/>24398 23398 22398 21398</text:p>
      <text:p text:style-name="P1"><text:span text:style-name="T2">21399</text:span> <text:span text:style-name="T3">22399 24399 <text:s/>24400 23400 22400 21400</text:span></text:p>
      <text:p text:style-name="P1"><text:span text:style-name="T2">21401</text:span> 22401 24401 <text:s/>24402 23402 22402 21402</text:p>
      <text:p text:style-name="P1"><text:span text:style-name="T2">21403</text:span> 22403 24403 <text:s/>24404 23404 22404 21404</text:p>
      <text:p text:style-name="P1"><text:span text:style-name="T2">21405</text:span> <text:span text:style-name="T3">22405 24405 <text:s/>24406 23406 22406 21406</text:span></text:p>
      <text:p text:style-name="P1"><text:span text:style-name="T2">21407</text:span> 22407 24407 <text:s/>24408 23408 22408 21408</text:p>
      <text:p text:style-name="P1"><text:span text:style-name="T2">21409</text:span> 22409 24409 <text:s/>24410 23410 22410 21410</text:p>
      <text:p text:style-name="P1">21411 22411 24411 <text:s/>24412 23412 22412 21412</text:p>
      <text:p text:style-name="P1"><text:span text:style-name="T2">21413</text:span> 22413 24413 <text:s/>24414 23414 22414 21414</text:p>
      <text:p text:style-name="P1"><text:span text:style-name="T2">21415</text:span> 22415 24415 <text:s/>24416 23416 22416 21416</text:p>
      <text:p text:style-name="P1">21417 22417 24417 <text:s/>24418 23418 22418 21418</text:p>
      <text:p text:style-name="P1"><text:span text:style-name="T2">21419</text:span> <text:span text:style-name="T3">22419 24419 <text:s/>24420 23420 22420 21420</text:span></text:p>
      <text:p text:style-name="P1"><text:span text:style-name="T2">21421</text:span> <text:span text:style-name="T3">22421 24421 <text:s/>24422 23422 22422 21422</text:span></text:p>
      <text:p text:style-name="P1"><text:soft-page-break/><text:span text:style-name="T2">21423</text:span> 22423 24423 <text:s/>24424 23424 22424 21424</text:p>
      <text:p text:style-name="P1"><text:span text:style-name="T2">21425</text:span> <text:span text:style-name="T3">22425 24425 <text:s/>24426 23426 22426 21426</text:span></text:p>
      <text:p text:style-name="P1">21427 22427 24427 <text:s/>24428 23428 22428 21428</text:p>
      <text:p text:style-name="P1"><text:span text:style-name="T2">21429</text:span><text:span text:style-name="T4"> </text:span><text:span text:style-name="T3">22429 24429 <text:s/>24430 23430 22430 21430</text:span></text:p>
      <text:p text:style-name="P1"><text:span text:style-name="T2">21431</text:span> <text:span text:style-name="T3">22431 24431 <text:s/>24432 23432 22432 21432</text:span></text:p>
      <text:p text:style-name="P1"><text:span text:style-name="T2">21433</text:span> 22433 24433 <text:s/>24434 23434 22434 21434</text:p>
      <text:p text:style-name="P1"><text:span text:style-name="T2">21435</text:span> 22435 24435 <text:s/>24436 23436 22436 21436</text:p>
      <text:p text:style-name="P1">21437 22437 24437 <text:s/>24438 23438 22438 21438</text:p>
      <text:p text:style-name="P1"><text:span text:style-name="T2">21439</text:span> <text:span text:style-name="T3">22439 24439 <text:s/>24440 23440 22440 21440</text:span></text:p>
      <text:p text:style-name="P1"><text:span text:style-name="T2">21441</text:span> 22441 24441 <text:s/>24442 23442 22442 21442</text:p>
      <text:p text:style-name="P1"><text:span text:style-name="T2">21443</text:span> 22443 24443 <text:s/>24444 23444 22444 21444</text:p>
      <text:p text:style-name="P1"><text:span text:style-name="T2">21445</text:span> <text:span text:style-name="T3">22445 24445 <text:s/>24446 23446 22446 21446</text:span></text:p>
      <text:p text:style-name="P1"><text:span text:style-name="T2">21447</text:span> 22447 24447 <text:s/>24448 23448 22448 21448</text:p>
      <text:p text:style-name="P1"><text:span text:style-name="T2">21449</text:span> 22449 24449 <text:s/>24450 23450 22450 21450</text:p>
      <text:p text:style-name="P1"><text:span text:style-name="T2">21451</text:span> <text:span text:style-name="T3">22451 24451 <text:s/>24452 23452 22452 21452</text:span></text:p>
      <text:p text:style-name="P1"><text:span text:style-name="T2">21453</text:span> 22453 24453 <text:s/>24454 23454 22454 21454</text:p>
      <text:p text:style-name="P1"><text:span text:style-name="T2">21455</text:span> 22455 24455 <text:s/>24456 23456 22456 21456</text:p>
      <text:p text:style-name="P1"><text:span text:style-name="T2">21457</text:span> 22457 24457 <text:s/>24458 23458 22458 21458</text:p>
      <text:p text:style-name="P1"><text:span text:style-name="T2">21459</text:span> <text:span text:style-name="T3">22459 24459 <text:s/>24460 23460 22460 21460</text:span></text:p>
      <text:p text:style-name="P1"><text:span text:style-name="T2">21461</text:span> 22461 24461 <text:s/>24462 23462 22462 21462</text:p>
      <text:p text:style-name="P1">21463 22463 24463 <text:s/>24464 23464 22464 21464</text:p>
      <text:p text:style-name="P1"><text:span text:style-name="T2">21465</text:span> 22465 24465 <text:s/>24466 23466 22466 21466</text:p>
      <text:p text:style-name="P1"><text:span text:style-name="T2">21467</text:span> 22467 24467 <text:s/>24468 23468 22468 21468</text:p>
      <text:p text:style-name="P1"><text:span text:style-name="T2">21469</text:span> 22469 24469 <text:s/>24470 23470 22470 21470</text:p>
      <text:p text:style-name="P1"><text:span text:style-name="T2">21471</text:span> 22471 24471 <text:s/>24472 23472 22472 21472</text:p>
      <text:p text:style-name="P1"><text:span text:style-name="T2">21473</text:span> <text:span text:style-name="T3">22473 24473 <text:s/>24474 23474 22474 21474</text:span></text:p>
      <text:p text:style-name="P1"><text:span text:style-name="T2">21475</text:span> 22475 24475 <text:s/>24476 23476 22476 21476</text:p>
      <text:p text:style-name="P1"><text:span text:style-name="T2">21477</text:span> <text:span text:style-name="T3">22477 24477 <text:s/>24478 23478 22478 21478</text:span></text:p>
      <text:p text:style-name="P1"><text:span text:style-name="T2">21479</text:span> 22479 24479 <text:s/>24480 23480 22480 21480</text:p>
      <text:p text:style-name="P1"><text:span text:style-name="T2">21481</text:span> <text:span text:style-name="T3">22481 24481 <text:s/>24482 23482 22482 21482</text:span></text:p>
      <text:p text:style-name="P1"><text:span text:style-name="T2">21483</text:span><text:span text:style-name="T6"> </text:span><text:span text:style-name="T3">22483 24483 <text:s/>24484 23484 22484 21484</text:span></text:p>
      <text:p text:style-name="P1"><text:span text:style-name="T2">21485</text:span> 22485 24485 <text:s/>24486 23486 22486 21486</text:p>
      <text:p text:style-name="P1">21487 22487 24487 <text:s/>24488 23488 22488 21488</text:p>
      <text:p text:style-name="P1"><text:span text:style-name="T2">21489</text:span> 22489 24489 <text:s/>24490 23490 22490 21490</text:p>
      <text:p text:style-name="P1"><text:span text:style-name="T2">21491</text:span> <text:span text:style-name="T3">22491 24491 <text:s/>24492 23492 22492 21492</text:span></text:p>
      <text:p text:style-name="P1"><text:soft-page-break/><text:span text:style-name="T2">21493</text:span> 22493 24493 <text:s/>24494 23494 22494 21494</text:p>
      <text:p text:style-name="P1"><text:span text:style-name="T2">21495</text:span> <text:span text:style-name="T3">22495 24495 <text:s/>24496 23496 22496 21496</text:span></text:p>
      <text:p text:style-name="P1"><text:span text:style-name="T2">21497</text:span> 22497 24497 <text:s/>24498 23498 22498 21498</text:p>
      <text:p text:style-name="P1"><text:span text:style-name="T2">21499</text:span> <text:span text:style-name="T3">22499 24499 <text:s/>24500 23500 22500 21500</text:span></text:p>
      <text:p text:style-name="P1"><text:span text:style-name="T2">21501</text:span> <text:span text:style-name="T3">22501 24501 <text:s/>24502 23502 22502 21502</text:span></text:p>
      <text:p text:style-name="P1"><text:span text:style-name="T2">21503</text:span> <text:span text:style-name="T3">22503 24503 <text:s/>24504 23504 22504 21504</text:span></text:p>
      <text:p text:style-name="P1"><text:span text:style-name="T2">21505</text:span> 22505 24505 <text:s/>24506 23506 22506 21506</text:p>
      <text:p text:style-name="P1"><text:span text:style-name="T2">21507</text:span> 22507 24507 <text:s/>24508 23508 22508 21508</text:p>
      <text:p text:style-name="P1"><text:span text:style-name="T2">21509</text:span> <text:span text:style-name="T3">22509 24509 <text:s/>24510 23510 22510 21510</text:span></text:p>
      <text:p text:style-name="P1">21511 22511 24511 <text:s/>24512 23512 22512 21512</text:p>
      <text:p text:style-name="P1"><text:span text:style-name="T2">21513</text:span> 22513 24513 <text:s/>24514 23514 22514 21514</text:p>
      <text:p text:style-name="P1"><text:span text:style-name="T2">21515</text:span> 22515 24515 <text:s/>24516 23516 22516 21516</text:p>
      <text:p text:style-name="P1"><text:span text:style-name="T2">21517</text:span> 22517 24517 <text:s/>24518 23518 22518 21518</text:p>
      <text:p text:style-name="P1"><text:span text:style-name="T2">21519</text:span> 22519 24519 <text:s/>24520 23520 22520 21520</text:p>
      <text:p text:style-name="P1"><text:span text:style-name="T2">21521</text:span> 22521 24521 <text:s/>24522 23522 22522 21522</text:p>
      <text:p text:style-name="P1"><text:span text:style-name="T2">21523</text:span> 22523 24523 <text:s/>24524 23524 22524 21524</text:p>
      <text:p text:style-name="P1"><text:span text:style-name="T2">21525</text:span> <text:span text:style-name="T3">22525 24525 <text:s/>24526 23526 22526 21526</text:span></text:p>
      <text:p text:style-name="P1">21527 22527 24527 <text:s/>24528 23528 22528 21528</text:p>
      <text:p text:style-name="P1"><text:span text:style-name="T2">21529</text:span> 22529 24529 <text:s/>24530 23530 22530 21530</text:p>
      <text:p text:style-name="P1"><text:span text:style-name="T2">21531</text:span> 22531 24531 <text:s/>24532 23532 22532 21532</text:p>
      <text:p text:style-name="P1"><text:span text:style-name="T2">21533</text:span> 22533 24533 <text:s/>24534 23534 22534 21534</text:p>
      <text:p text:style-name="P1"><text:span text:style-name="T2">21535</text:span> 22535 24535 <text:s/>24536 23536 22536 21536</text:p>
      <text:p text:style-name="P1"><text:span text:style-name="T2">21537</text:span> 22537 24537 <text:s/>24538 23538 22538 21538</text:p>
      <text:p text:style-name="P1"><text:span text:style-name="T2">21539</text:span> 22539 24539 <text:s/>24540 23540 22540 21540</text:p>
      <text:p text:style-name="P1"><text:span text:style-name="T2">21541</text:span> <text:span text:style-name="T3">22541 24541 <text:s/>24542 23542 22542 21542</text:span></text:p>
      <text:p text:style-name="P1"><text:span text:style-name="T2">21543</text:span> 22543 24543 <text:s/>24544 23544 22544 21544</text:p>
      <text:p text:style-name="P1"><text:span text:style-name="T2">21545</text:span> 22545 24545 <text:s/>24546 23546 22546 21546</text:p>
      <text:p text:style-name="P1"><text:span text:style-name="T2">21547</text:span> 22547 24547 <text:s/>24548 23548 22548 21548</text:p>
      <text:p text:style-name="P1">21549 22549 24549 <text:s/>24550 23550 22550 21550</text:p>
      <text:p text:style-name="P1"><text:span text:style-name="T2">21551</text:span> 22551 24551 <text:s/>24552 23552 22552 21552</text:p>
      <text:p text:style-name="P1"><text:span text:style-name="T2">21553</text:span> 22553 24553 <text:s/>24554 23554 22554 21554</text:p>
      <text:p text:style-name="P1">21555 22555 24555 <text:s/>24556 23556 22556 21556</text:p>
      <text:p text:style-name="P1">21557 22557 24557 <text:s/>24558 23558 22558 21558</text:p>
      <text:p text:style-name="P1">21559 22559 24559 <text:s/>24560 23560 22560 21560</text:p>
      <text:p text:style-name="P1"><text:span text:style-name="T2">21561</text:span> 22561 24561 <text:s/>24562 23562 22562 21562</text:p>
      <text:p text:style-name="P1"><text:soft-page-break/><text:span text:style-name="T2">21563</text:span> 22563 24563 <text:s/>24564 23564 22564 21564</text:p>
      <text:p text:style-name="P1">21565 22565 24565 <text:s/>24566 23566 22566 21566</text:p>
      <text:p text:style-name="P1">21567 22567 24567 <text:s/>24568 23568 22568 21568</text:p>
      <text:p text:style-name="P1"/>
      <text:p text:style-name="P1">JUBILEE LINE</text:p>
      <text:p text:style-name="P1"><text:span text:style-name="T2">96002</text:span> 96202 96402</text:p>
      <text:p text:style-name="P1"><text:span text:style-name="T2">96004</text:span> 96204 96404</text:p>
      <text:p text:style-name="P1">96006 96206 96406</text:p>
      <text:p text:style-name="P1"><text:span text:style-name="T2">96008</text:span> <text:span text:style-name="T3">96208 96408</text:span></text:p>
      <text:p text:style-name="P1"><text:span text:style-name="T2">96010</text:span> <text:span text:style-name="T3">96210 96410</text:span></text:p>
      <text:p text:style-name="P1"><text:span text:style-name="T2">96012</text:span> 96212 96412</text:p>
      <text:p text:style-name="P1"><text:span text:style-name="T2">96014</text:span> 96214 96414</text:p>
      <text:p text:style-name="P1"><text:span text:style-name="T2">96016</text:span> 96216 96416</text:p>
      <text:p text:style-name="P1"><text:span text:style-name="T2">96018</text:span> 96218 96418 </text:p>
      <text:p text:style-name="P1"><text:span text:style-name="T2">96020</text:span> 96220 96420</text:p>
      <text:p text:style-name="P1"><text:span text:style-name="T2">96022</text:span> 96222 96422</text:p>
      <text:p text:style-name="P1"><text:span text:style-name="T2">96024</text:span> <text:span text:style-name="T3">96224 96424</text:span></text:p>
      <text:p text:style-name="P1"><text:span text:style-name="T2">96026</text:span> 96226 96426</text:p>
      <text:p text:style-name="P1"><text:span text:style-name="T2">96028</text:span> <text:span text:style-name="T3">96228 96428</text:span></text:p>
      <text:p text:style-name="P1"><text:span text:style-name="T2">96030</text:span> <text:span text:style-name="T3">96230 96430</text:span></text:p>
      <text:p text:style-name="P1"><text:span text:style-name="T2">96032</text:span> 96232 96432</text:p>
      <text:p text:style-name="P1">96034 96234 96434</text:p>
      <text:p text:style-name="P1"><text:span text:style-name="T2">96036</text:span> 96236 96436</text:p>
      <text:p text:style-name="P1">96038 96238 96438</text:p>
      <text:p text:style-name="P1"><text:span text:style-name="T2">96040</text:span> 96240 96440</text:p>
      <text:p text:style-name="P1"><text:span text:style-name="T2">96042</text:span> 96242 96442</text:p>
      <text:p text:style-name="P1"><text:span text:style-name="T2">96044</text:span> 96244 96444</text:p>
      <text:p text:style-name="P1"><text:span text:style-name="T2">96046</text:span> 96246 96446</text:p>
      <text:p text:style-name="P1"><text:span text:style-name="T2">96048</text:span> 96248 96448</text:p>
      <text:p text:style-name="P1"><text:span text:style-name="T2">96050</text:span> <text:span text:style-name="T3">96250 96450</text:span></text:p>
      <text:p text:style-name="P1"><text:span text:style-name="T2">96052</text:span> 96252 96452</text:p>
      <text:p text:style-name="P1"><text:span text:style-name="T2">96054</text:span> 96254 96454</text:p>
      <text:p text:style-name="P1"><text:span text:style-name="T2">96056</text:span> 96256 96456</text:p>
      <text:p text:style-name="P1">96058 96258 96458</text:p>
      <text:p text:style-name="P1">96060 96260 96460</text:p>
      <text:p text:style-name="P1"><text:soft-page-break/><text:span text:style-name="T2">96062</text:span> <text:span text:style-name="T3">96262 96462</text:span></text:p>
      <text:p text:style-name="P1"><text:span text:style-name="T2">96064</text:span> 96264 96464</text:p>
      <text:p text:style-name="P1"><text:span text:style-name="T2">96066</text:span> 96266 96466</text:p>
      <text:p text:style-name="P1"><text:span text:style-name="T2">96068</text:span> 96268 96468</text:p>
      <text:p text:style-name="P1"><text:span text:style-name="T2">96070</text:span><text:span text:style-name="T4"> </text:span><text:span text:style-name="T3">96270 96470</text:span></text:p>
      <text:p text:style-name="P1"><text:span text:style-name="T2">96072</text:span> 96272 96472</text:p>
      <text:p text:style-name="P1">96074 96274 96474</text:p>
      <text:p text:style-name="P1"><text:span text:style-name="T2">96076</text:span> 96276 96476</text:p>
      <text:p text:style-name="P1"><text:span text:style-name="T2">96078</text:span> 96278 96478</text:p>
      <text:p text:style-name="P1"><text:span text:style-name="T2">96080</text:span> 96880 96480</text:p>
      <text:p text:style-name="P1"><text:span text:style-name="T2">96082</text:span> 96882 96482</text:p>
      <text:p text:style-name="P1"><text:span text:style-name="T2">96084</text:span> <text:span text:style-name="T3">96884 96484</text:span></text:p>
      <text:p text:style-name="P1"><text:span text:style-name="T2">96086</text:span> 96886 96486</text:p>
      <text:p text:style-name="P1"><text:span text:style-name="T2">96088</text:span> 96888 96488</text:p>
      <text:p text:style-name="P1"><text:span text:style-name="T2">96090</text:span> 96890 96490</text:p>
      <text:p text:style-name="P1"><text:span text:style-name="T2">96092</text:span> 96892 96492</text:p>
      <text:p text:style-name="P1"><text:span text:style-name="T2">96094</text:span> 96894 96494</text:p>
      <text:p text:style-name="P1"><text:span text:style-name="T2">96096</text:span> 96896 96496</text:p>
      <text:p text:style-name="P1"><text:span text:style-name="T2">96098</text:span> 96898 96498</text:p>
      <text:p text:style-name="P1"/>
      <text:p text:style-name="P1"><text:span text:style-name="T2">96100</text:span> 96900 96500</text:p>
      <text:p text:style-name="P1">96102 96902 96502</text:p>
      <text:p text:style-name="P1"><text:span text:style-name="T2">96104</text:span> 96904 96504</text:p>
      <text:p text:style-name="P1"><text:span text:style-name="T2">96106</text:span> 96906 96506</text:p>
      <text:p text:style-name="P1"><text:span text:style-name="T2">96108</text:span> 96908 96508</text:p>
      <text:p text:style-name="P1"><text:span text:style-name="T2">96110</text:span> <text:span text:style-name="T3">96910 96510</text:span></text:p>
      <text:p text:style-name="P1"><text:span text:style-name="T2">96112</text:span> 96912 96512</text:p>
      <text:p text:style-name="P1"><text:span text:style-name="T2">96114</text:span> 96914 96514</text:p>
      <text:p text:style-name="P1"><text:span text:style-name="T2">96116</text:span> 96916 96516</text:p>
      <text:p text:style-name="P1"><text:span text:style-name="T2">96118</text:span> 96918 96518</text:p>
      <text:p text:style-name="P1">96120 96320 96520</text:p>
      <text:p text:style-name="P1"><text:span text:style-name="T2">96122</text:span> 96322 96522</text:p>
      <text:p text:style-name="P1">96124 96324 96524</text:p>
      <text:p text:style-name="P1">96126 96326 96526</text:p>
      <text:p text:style-name="P1"/>
      <text:p text:style-name="P1"><text:soft-page-break/><text:span text:style-name="T2">96401</text:span> <text:span text:style-name="T3">96601 96201 96001</text:span></text:p>
      <text:p text:style-name="P1">96403 96603 96203 96003</text:p>
      <text:p text:style-name="P1"><text:span text:style-name="T2">96405</text:span> 96605 96205 96005</text:p>
      <text:p text:style-name="P1"><text:span text:style-name="T2">96407</text:span> <text:span text:style-name="T3">96607 96207 96007</text:span></text:p>
      <text:p text:style-name="P1"><text:span text:style-name="T2">96409</text:span> 96609 96209 96009</text:p>
      <text:p text:style-name="P1"><text:span text:style-name="T2">96411</text:span> 96611 96211 96011</text:p>
      <text:p text:style-name="P1"><text:span text:style-name="T2">96413</text:span> 96613 96213 96013</text:p>
      <text:p text:style-name="P1">96415 96615 96215 96015</text:p>
      <text:p text:style-name="P1"><text:span text:style-name="T2">96417</text:span> 96617 96217 96017</text:p>
      <text:p text:style-name="P1"><text:span text:style-name="T2">96419</text:span> 96619 96219 96019</text:p>
      <text:p text:style-name="P1"><text:span text:style-name="T2">96421</text:span> 96621 96221 96021</text:p>
      <text:p text:style-name="P1"><text:span text:style-name="T2">96423</text:span> 96623 96223 96023</text:p>
      <text:p text:style-name="P1"><text:span text:style-name="T2">96425</text:span> 96625 96225 96025</text:p>
      <text:p text:style-name="P1"><text:span text:style-name="T2">96427</text:span><text:span text:style-name="T6"> </text:span>96627 96227 96027</text:p>
      <text:p text:style-name="P1"><text:span text:style-name="T2">96429</text:span> <text:span text:style-name="T3">96629 96229 96029</text:span></text:p>
      <text:p text:style-name="P1">96431 96631 96231 96031</text:p>
      <text:p text:style-name="P1"><text:span text:style-name="T2">96433</text:span> 96633 96233 96033</text:p>
      <text:p text:style-name="P1"><text:span text:style-name="T2">96435</text:span> 96635 96235 96035</text:p>
      <text:p text:style-name="P1"><text:span text:style-name="T2">96437</text:span> 96637 96237 96037</text:p>
      <text:p text:style-name="P1"><text:span text:style-name="T2">96439</text:span> 96639 96239 96039</text:p>
      <text:p text:style-name="P1"><text:span text:style-name="T2">96441</text:span> 96641 96241 96041</text:p>
      <text:p text:style-name="P1"><text:span text:style-name="T2">96443</text:span> 96643 96243 96043</text:p>
      <text:p text:style-name="P1"><text:span text:style-name="T2">96445</text:span> 96645 96245 96045</text:p>
      <text:p text:style-name="P1"><text:span text:style-name="T8">96447</text:span> 96647 96247 96047</text:p>
      <text:p text:style-name="P1">96449 96649 96249 96049</text:p>
      <text:p text:style-name="P1"><text:span text:style-name="T2">96451</text:span> <text:span text:style-name="T3">96651 96251 96051</text:span></text:p>
      <text:p text:style-name="P1">96453 96653 96253 96053</text:p>
      <text:p text:style-name="P1"><text:span text:style-name="T2">96455</text:span> 96655 96255 96055</text:p>
      <text:p text:style-name="P1">96457 96657 96257 96057</text:p>
      <text:p text:style-name="P1"><text:span text:style-name="T2">96459</text:span> 96659 96259 96059</text:p>
      <text:p text:style-name="P1"><text:span text:style-name="T2">96461</text:span> <text:span text:style-name="T3">96661 96261 96061</text:span></text:p>
      <text:p text:style-name="P1"><text:span text:style-name="T2">96463</text:span> <text:span text:style-name="T3">96663 96263 96063</text:span></text:p>
      <text:p text:style-name="P1">96465 96665 96265 96065</text:p>
      <text:p text:style-name="P1">96467 96667 96267 96067</text:p>
      <text:p text:style-name="P1">96469 96669 96269 96069</text:p>
      <text:p text:style-name="P1"><text:soft-page-break/><text:span text:style-name="T8">96471</text:span> 96671 96271 96071</text:p>
      <text:p text:style-name="P1"><text:span text:style-name="T2">96473</text:span> 96673 96273 96073</text:p>
      <text:p text:style-name="P1"><text:span text:style-name="T2">96475</text:span> 96675 96275 96075</text:p>
      <text:p text:style-name="P1">96477 96677 96277 96077</text:p>
      <text:p text:style-name="P1"><text:span text:style-name="T2">96479</text:span> 96679 96279 96079</text:p>
      <text:p text:style-name="P1"><text:span text:style-name="T2">96481</text:span> 96681 96281 96081</text:p>
      <text:p text:style-name="P1"><text:span text:style-name="T2">96483</text:span> <text:span text:style-name="T3">96683 96283 96083</text:span></text:p>
      <text:p text:style-name="P1">96485 96685 96285 96085</text:p>
      <text:p text:style-name="P1"><text:span text:style-name="T2">96487</text:span> 96687 96287 96087</text:p>
      <text:p text:style-name="P1"><text:span text:style-name="T2">96489</text:span> 96689 96289 96089</text:p>
      <text:p text:style-name="P1"><text:span text:style-name="T2">96491</text:span> 96691 96291 96091</text:p>
      <text:p text:style-name="P1"><text:span text:style-name="T2">96493</text:span> 96693 96293 96093</text:p>
      <text:p text:style-name="P1">96495 96695 96295 96095</text:p>
      <text:p text:style-name="P1"><text:span text:style-name="T2">96497</text:span> 96697 96297 96097</text:p>
      <text:p text:style-name="P1"><text:span text:style-name="T2">96499</text:span> <text:span text:style-name="T3">96699 96299 96099</text:span></text:p>
      <text:p text:style-name="P1"/>
      <text:p text:style-name="P1"><text:span text:style-name="T2">96501</text:span> 96701 96301 96101</text:p>
      <text:p text:style-name="P1"><text:span text:style-name="T2">96503</text:span> 96703 96303 96103</text:p>
      <text:p text:style-name="P1"><text:span text:style-name="T2">96505</text:span> 96705 96305 96105</text:p>
      <text:p text:style-name="P1"><text:span text:style-name="T2">96507</text:span> 96707 96307 96107</text:p>
      <text:p text:style-name="P1"><text:span text:style-name="T2">96509</text:span> 96709 96309 96109</text:p>
      <text:p text:style-name="P1"><text:span text:style-name="T2">96511</text:span> 96711 96311 96111</text:p>
      <text:p text:style-name="P1"><text:span text:style-name="T2">96513</text:span> 96713 96313 96113</text:p>
      <text:p text:style-name="P1"><text:span text:style-name="T2">96515</text:span> 96715 96315 96115</text:p>
      <text:p text:style-name="P1"><text:span text:style-name="T2">96517</text:span> <text:span text:style-name="T3">96717 96317 96117</text:span></text:p>
      <text:p text:style-name="P1"><text:span text:style-name="T2">96519</text:span> 96719 96319 96119</text:p>
      <text:p text:style-name="P1"><text:span text:style-name="T2">96521</text:span> 96721 96321 96121</text:p>
      <text:p text:style-name="P1"><text:span text:style-name="T2">96523</text:span> 96723 96323 96123</text:p>
      <text:p text:style-name="P1"><text:span text:style-name="T2">96525</text:span> 96725 96325 96125</text:p>
      <text:p text:style-name="P1"/>
      <text:p text:style-name="P1">METROPOLITAN LINE</text:p>
      <text:p text:style-name="P1"><text:span text:style-name="T2">21001</text:span> 22001 23001 24001 24002 25002 22002 21002</text:p>
      <text:p text:style-name="P1"><text:span text:style-name="T2">21003</text:span> 22003 23003 24003 24004 25004 22004 21004</text:p>
      <text:p text:style-name="P1"><text:span text:style-name="T2">21005</text:span> 22005 23005 24005 24006 25006 22006 21006</text:p>
      <text:p text:style-name="P1"><text:span text:style-name="T2">21007</text:span> 22007 23007 24007 24008 25008 22008 21008</text:p>
      <text:p text:style-name="P1"><text:soft-page-break/><text:span text:style-name="T2">21009</text:span> <text:span text:style-name="T3">22009 23009 24009 24010 25010 22010 21010</text:span></text:p>
      <text:p text:style-name="P1"><text:span text:style-name="T2">21011</text:span> <text:span text:style-name="T3">22011 23011 24012 24012 25012 22012 21012</text:span></text:p>
      <text:p text:style-name="P1"><text:span text:style-name="T2">21013</text:span> <text:span text:style-name="T3">22013 23013 24013 24014 25014 22014 21014</text:span></text:p>
      <text:p text:style-name="P1"><text:span text:style-name="T2">21015</text:span> <text:span text:style-name="T3">22015 23015 24015 24016 25016 22016 21016</text:span></text:p>
      <text:p text:style-name="P1"><text:span text:style-name="T2">21017</text:span> 22017 23017 24017 24018 25018 22018 21018</text:p>
      <text:p text:style-name="P1"><text:span text:style-name="T2">21019</text:span> <text:span text:style-name="T3">22019 23019 24019 24020 25020 22020 21020</text:span></text:p>
      <text:p text:style-name="P1"><text:span text:style-name="T2">21021</text:span> <text:span text:style-name="T3">22021 23021 24021 24022 25022 22022 21022</text:span></text:p>
      <text:p text:style-name="P1"><text:span text:style-name="T2">21023</text:span> <text:span text:style-name="T3">22023 23023 24023 24024 25024 22024 21024</text:span></text:p>
      <text:p text:style-name="P1"><text:span text:style-name="T2">21025</text:span> <text:span text:style-name="T3">22025 23025 24025 24026 25026 22026 21026</text:span></text:p>
      <text:p text:style-name="P1"><text:span text:style-name="T2">21027</text:span> 22027 23027 24027 24028 25028 22028 21028</text:p>
      <text:p text:style-name="P1"><text:span text:style-name="T2">21029</text:span> <text:span text:style-name="T3">22029 23029 24029 24030 25030 22030 21030</text:span></text:p>
      <text:p text:style-name="P1"><text:span text:style-name="T2">21031</text:span> <text:span text:style-name="T3">22031 23031 24031 24032 25032 22032 21032</text:span></text:p>
      <text:p text:style-name="P1"><text:span text:style-name="T2">21033</text:span> <text:span text:style-name="T3">22033 23033 24033 24034 25034 22034 21034</text:span></text:p>
      <text:p text:style-name="P1"><text:span text:style-name="T2">21035</text:span> 22035 23035 24035 24036 25036 22036 21036</text:p>
      <text:p text:style-name="P1"><text:span text:style-name="T2">21037</text:span> 22037 23037 24037 24038 25038 22038 21038</text:p>
      <text:p text:style-name="P1"><text:span text:style-name="T2">21039</text:span> <text:span text:style-name="T3">22039 23039 24039 24040 25040 22040 21040</text:span></text:p>
      <text:p text:style-name="P1"><text:span text:style-name="T2">21041</text:span> 22041 23041 24041 24042 25042 22042 21042</text:p>
      <text:p text:style-name="P1"><text:span text:style-name="T2">21043</text:span> <text:span text:style-name="T3">22043 23043 24043 24044 25044 22044 21044</text:span></text:p>
      <text:p text:style-name="P1"><text:span text:style-name="T2">21045</text:span> 22045 23045 24045 24046 25046 22046 21046</text:p>
      <text:p text:style-name="P1"><text:span text:style-name="T2">21047</text:span> <text:span text:style-name="T3">22047 23047 24047 24048 25048 22048 21048</text:span></text:p>
      <text:p text:style-name="P1"><text:span text:style-name="T2">21049</text:span> 22049 23049 24049 24050 25050 22050 22050</text:p>
      <text:p text:style-name="P1"><text:span text:style-name="T2">21051</text:span> 22051 23051 24051 24052 25052 22052 21052</text:p>
      <text:p text:style-name="P1"><text:span text:style-name="T2">21053</text:span> <text:span text:style-name="T3">22053 23053 24053 24054 25054 22054 21054</text:span></text:p>
      <text:p text:style-name="P1"><text:span text:style-name="T2">21055</text:span> 22055 23055 24055 24056 25056 22056 21056</text:p>
      <text:p text:style-name="P1"><text:span text:style-name="T2">21057</text:span> 22057 23057 24057 24058 23058 22058 21058</text:p>
      <text:p text:style-name="P1">21059 22059 23059 24059 24060 23060 22060 21060</text:p>
      <text:p text:style-name="P1"><text:span text:style-name="T2">21061</text:span> <text:span text:style-name="T3">22061 23061 24061 24062 23062 22062 21062</text:span></text:p>
      <text:p text:style-name="P1"><text:span text:style-name="T2">21063</text:span> <text:span text:style-name="T3">22063 23063 24063 24064 23064 22064 21064</text:span></text:p>
      <text:p text:style-name="P1"><text:span text:style-name="T2">21065</text:span> <text:span text:style-name="T3">22065 23065 24065 24066 23066 22066 21066</text:span></text:p>
      <text:p text:style-name="P1"><text:span text:style-name="T2">21067</text:span> <text:span text:style-name="T3">22067 23067 24067 24068 23068 22068 21068</text:span></text:p>
      <text:p text:style-name="P1"><text:span text:style-name="T2">21069</text:span> <text:span text:style-name="T3">22069 23069 24069 24070 23070 22070 21070</text:span></text:p>
      <text:p text:style-name="P1"><text:span text:style-name="T2">21071</text:span> 22071 23071 24071 24072 23072 22072 21072</text:p>
      <text:p text:style-name="P1"><text:span text:style-name="T2">21073</text:span> <text:span text:style-name="T3">22073 23073 24073 24074 23074 22074 21074</text:span></text:p>
      <text:p text:style-name="P1"><text:span text:style-name="T2">21075</text:span> <text:span text:style-name="T3">22075 23075 24075 24076 23076 22076 21076</text:span></text:p>
      <text:p text:style-name="P1"><text:span text:style-name="T2">21077</text:span> 22077 23077 24077 24078 23078 22078 21078</text:p>
      <text:p text:style-name="P1"><text:soft-page-break/><text:span text:style-name="T2">21079</text:span> <text:span text:style-name="T3">22079 23079 24079 24080 23080 22080 21080</text:span></text:p>
      <text:p text:style-name="P1"><text:span text:style-name="T2">21081</text:span> 22081 23081 24081 24082 23082 22082 21082</text:p>
      <text:p text:style-name="P1">21083 22083 23083 24083 24084 23084 22084 21084</text:p>
      <text:p text:style-name="P1"><text:span text:style-name="T2">21085</text:span> 22085 23085 24085 24086 23086 22086 21086</text:p>
      <text:p text:style-name="P1"><text:span text:style-name="T2">21087</text:span> <text:span text:style-name="T3">22087 23087 24087 24088 23088 22088 21088</text:span></text:p>
      <text:p text:style-name="P1"><text:span text:style-name="T2">21089</text:span> <text:span text:style-name="T3">22089 23089 24089 24090 23090 22090 21090</text:span></text:p>
      <text:p text:style-name="P1"><text:span text:style-name="T2">21091</text:span> <text:span text:style-name="T3">22091 23091 24091 24092 23092 22092 21092</text:span></text:p>
      <text:p text:style-name="P1"><text:span text:style-name="T2">21093</text:span> <text:span text:style-name="T3">22093 23093 24093 24094 23094 22094 21094</text:span></text:p>
      <text:p text:style-name="P1"><text:span text:style-name="T2">21095</text:span> <text:span text:style-name="T3">22095 23095 24095 24096 23096 22096 21096</text:span></text:p>
      <text:p text:style-name="P1"><text:span text:style-name="T2">21097</text:span> 22097 23097 24097 24098 23098 22098 21098</text:p>
      <text:p text:style-name="P1"><text:span text:style-name="T2">21099</text:span> <text:span text:style-name="T3">22099 23099 24099 24100 23100 22100 21100</text:span></text:p>
      <text:p text:style-name="P1"><text:span text:style-name="T2">21101</text:span> 22101 23101 24101 24102 23102 22102 21102</text:p>
      <text:p text:style-name="P1"><text:span text:style-name="T2">21103</text:span> <text:span text:style-name="T3">22103 23103 24103 24104 23104 22104 21104</text:span></text:p>
      <text:p text:style-name="P1"><text:span text:style-name="T2">21105</text:span> <text:span text:style-name="T3">22105 23105 24105 24106 23106 22106 21106</text:span></text:p>
      <text:p text:style-name="P1"><text:span text:style-name="T2">21107</text:span> <text:span text:style-name="T3">22107 23107 24107 24108 23108 22108 21108</text:span></text:p>
      <text:p text:style-name="P1"><text:span text:style-name="T2">21109</text:span> 22109 23109 24109 24110 23110 22110 21110</text:p>
      <text:p text:style-name="P1"><text:span text:style-name="T2">21111</text:span> 22111 23111 24111 <text:s/>24112 23112 22112 21112</text:p>
      <text:p text:style-name="P1"><text:span text:style-name="T2">21113</text:span> 22113 23113 24113 24114 23114 22114 21114</text:p>
      <text:p text:style-name="P1"><text:span text:style-name="T2">21115</text:span> 22115 23115 24115 24116 23116 22116 21116</text:p>
      <text:p text:style-name="P1"/>
      <text:p text:style-name="P1">WATERLOO CITY LINE</text:p>
      <text:p text:style-name="P1"><text:span text:style-name="T2">65501</text:span> <text:span text:style-name="T3">67501</text:span></text:p>
      <text:p text:style-name="P1"><text:span text:style-name="T2">65502</text:span> <text:span text:style-name="T3">67502</text:span></text:p>
      <text:p text:style-name="P1"><text:span text:style-name="T2">65503</text:span> <text:span text:style-name="T3">67503</text:span></text:p>
      <text:p text:style-name="P1"><text:span text:style-name="T2">65504</text:span> <text:span text:style-name="T3">67504</text:span></text:p>
      <text:p text:style-name="P1"><text:span text:style-name="T2">65505</text:span> <text:span text:style-name="T3">67505</text:span></text:p>
      <text:p text:style-name="P1"><text:span text:style-name="T2">65506</text:span> <text:span text:style-name="T3">67506</text:span></text:p>
      <text:p text:style-name="P1"><text:span text:style-name="T2">65507</text:span> <text:span text:style-name="T3">67507</text:span></text:p>
      <text:p text:style-name="P1"><text:span text:style-name="T2">65508</text:span> <text:span text:style-name="T3">67508</text:span> </text:p>
      <text:p text:style-name="P1"><text:span text:style-name="T2">65509</text:span> <text:span text:style-name="T3">67509</text:span></text:p>
      <text:p text:style-name="P1"><text:span text:style-name="T2">65510</text:span> <text:span text:style-name="T3">67510</text:span></text:p>
      <text:p text:style-name="P1"/>
      <text:p text:style-name="P1">VICTORIA LINE</text:p>
      <text:p text:style-name="P1"><text:span text:style-name="T2">11001</text:span> <text:span text:style-name="T3">12001 13001 14001</text:span></text:p>
      <text:p text:style-name="P1"><text:span text:style-name="T2">11002</text:span> <text:span text:style-name="T3">12002 13002 14002</text:span></text:p>
      <text:p text:style-name="P1"><text:soft-page-break/><text:span text:style-name="T2">11003</text:span> 12003 13003 14003</text:p>
      <text:p text:style-name="P1"><text:span text:style-name="T2">11004</text:span> 12004 13004 14004</text:p>
      <text:p text:style-name="P1"><text:span text:style-name="T2">11005</text:span> 12005 13005 14005</text:p>
      <text:p text:style-name="P1"><text:span text:style-name="T2">11006</text:span> 12006 13006 14006</text:p>
      <text:p text:style-name="P1">11007 12007 13007 14007</text:p>
      <text:p text:style-name="P1">11008 12008 13008 14008</text:p>
      <text:p text:style-name="P1">11009 12009 13009 14009</text:p>
      <text:p text:style-name="P1"><text:span text:style-name="T6">11010</text:span> 12010 13010 14010</text:p>
      <text:p text:style-name="P1"><text:span text:style-name="T2">11011</text:span> 12011 13011 <text:s/>14011</text:p>
      <text:p text:style-name="P1"><text:span text:style-name="T2">11012</text:span> 12012 13012 14012</text:p>
      <text:p text:style-name="P1"><text:span text:style-name="T2">11013</text:span> 12013 13013 14013</text:p>
      <text:p text:style-name="P1"><text:span text:style-name="T2">11014</text:span> 12014 13014 14014</text:p>
      <text:p text:style-name="P1"><text:span text:style-name="T2">11015</text:span> <text:span text:style-name="T3">12015 13015 14015</text:span></text:p>
      <text:p text:style-name="P1"><text:span text:style-name="T2">11016</text:span> <text:span text:style-name="T3">12016 13016 14016</text:span></text:p>
      <text:p text:style-name="P1"><text:span text:style-name="T2">11017</text:span> <text:span text:style-name="T3">12017 13017 14017</text:span></text:p>
      <text:p text:style-name="P1"><text:span text:style-name="T2">11018</text:span> <text:span text:style-name="T3">12018 13018 14018</text:span></text:p>
      <text:p text:style-name="P1"><text:span text:style-name="T2">11019</text:span> 12019 13019 14019</text:p>
      <text:p text:style-name="P1"><text:span text:style-name="T2">11020</text:span> 12020 13020 14020</text:p>
      <text:p text:style-name="P1"><text:span text:style-name="T2">11021</text:span> <text:span text:style-name="T3">12021 13021 14021</text:span></text:p>
      <text:p text:style-name="P1"><text:span text:style-name="T2">11022</text:span> <text:span text:style-name="T3">12022 13022 14022</text:span></text:p>
      <text:p text:style-name="P1"><text:span text:style-name="T2">11023</text:span> <text:span text:style-name="T3">12023 13023 14023</text:span></text:p>
      <text:p text:style-name="P1"><text:span text:style-name="T2">11024</text:span> <text:span text:style-name="T3">12024 13024 14024</text:span></text:p>
      <text:p text:style-name="P1"><text:span text:style-name="T6">11025</text:span> <text:span text:style-name="T6">12025 13025 14025</text:span></text:p>
      <text:p text:style-name="P1">11026 12026 13026 14026</text:p>
      <text:p text:style-name="P1"><text:span text:style-name="T2">11027</text:span> 12027 13027 14027</text:p>
      <text:p text:style-name="P1"><text:span text:style-name="T2">11028</text:span> 12028 13028 14028</text:p>
      <text:p text:style-name="P1"><text:span text:style-name="T6">11029</text:span> 12029 13029 14029</text:p>
      <text:p text:style-name="P1">11030 12030 13030 14030</text:p>
      <text:p text:style-name="P1"><text:span text:style-name="T2">11031</text:span> <text:span text:style-name="T3">12031 13031 14031</text:span></text:p>
      <text:p text:style-name="P1"><text:span text:style-name="T2">11032</text:span> <text:span text:style-name="T3">12032 13032 14032</text:span></text:p>
      <text:p text:style-name="P1"><text:span text:style-name="T2">11033</text:span> 12033 13033 14033</text:p>
      <text:p text:style-name="P1"><text:span text:style-name="T2">11034</text:span> 12034 13034 14034</text:p>
      <text:p text:style-name="P1"><text:span text:style-name="T2">11035</text:span> 12035 13035 14035</text:p>
      <text:p text:style-name="P1"><text:span text:style-name="T2">11036</text:span> 12036 13036 14036</text:p>
      <text:p text:style-name="P1"><text:span text:style-name="T2">11037</text:span> 12037 13037 14037</text:p>
      <text:p text:style-name="P1"><text:soft-page-break/><text:span text:style-name="T2">11038</text:span> 12038 13038 14038</text:p>
      <text:p text:style-name="P1"><text:span text:style-name="T2">11039</text:span> <text:span text:style-name="T3">12039 13039 14039</text:span></text:p>
      <text:p text:style-name="P1"><text:span text:style-name="T2">11040</text:span> <text:span text:style-name="T3">12040 13040 14040</text:span></text:p>
      <text:p text:style-name="P1"><text:span text:style-name="T2">11041</text:span> <text:span text:style-name="T3">12041 13041 14041</text:span></text:p>
      <text:p text:style-name="P1"><text:span text:style-name="T2">11042</text:span> <text:span text:style-name="T3">12042 13042 14042</text:span></text:p>
      <text:p text:style-name="P1"><text:span text:style-name="T2">11043</text:span> <text:span text:style-name="T3">12043 13043 14043</text:span></text:p>
      <text:p text:style-name="P1"><text:span text:style-name="T2">11044</text:span> <text:span text:style-name="T3">12044 13044 14044</text:span></text:p>
      <text:p text:style-name="P1"><text:span text:style-name="T2">11045</text:span> <text:span text:style-name="T3">12045 13045 14044</text:span></text:p>
      <text:p text:style-name="P1"><text:span text:style-name="T2">11046</text:span> <text:span text:style-name="T3">12046 13046 14046</text:span></text:p>
      <text:p text:style-name="P1"><text:span text:style-name="T2">11047</text:span> 12047 13047 14047</text:p>
      <text:p text:style-name="P1"><text:span text:style-name="T2">11048</text:span> 12048 13048 14048</text:p>
      <text:p text:style-name="P1"><text:span text:style-name="T2">11049</text:span> 12049 13049 14049</text:p>
      <text:p text:style-name="P1"><text:span text:style-name="T2">11050</text:span> 12050 13050 14050</text:p>
      <text:p text:style-name="P1">11051 12051 13051 14051</text:p>
      <text:p text:style-name="P1">11052 12052 13052 14052</text:p>
      <text:p text:style-name="P1"><text:span text:style-name="T2">11053</text:span> 12053 13053 14053</text:p>
      <text:p text:style-name="P1"><text:span text:style-name="T2">11054</text:span> 12054 13054 14054</text:p>
      <text:p text:style-name="P1">11055 12055 13055 14055</text:p>
      <text:p text:style-name="P1">11056 12056 13056 14056</text:p>
      <text:p text:style-name="P1"><text:span text:style-name="T2">11057</text:span> <text:span text:style-name="T3">12057 13057 14057</text:span></text:p>
      <text:p text:style-name="P1"><text:span text:style-name="T2">11058</text:span> <text:span text:style-name="T3">12058 13058 14058</text:span></text:p>
      <text:p text:style-name="P1"><text:span text:style-name="T2">11059</text:span> <text:span text:style-name="T3">12059 13059 14059</text:span></text:p>
      <text:p text:style-name="P1"><text:span text:style-name="T2">11060</text:span> <text:span text:style-name="T3">12060 13060 14060</text:span></text:p>
      <text:p text:style-name="P1"><text:span text:style-name="T2">11061</text:span> 12061 13061 14061</text:p>
      <text:p text:style-name="P1"><text:span text:style-name="T2">11062</text:span> 12062 13062 14062</text:p>
      <text:p text:style-name="P1"><text:span text:style-name="T2">11063</text:span> <text:span text:style-name="T3">12063 13063 14063</text:span></text:p>
      <text:p text:style-name="P1"><text:span text:style-name="T2">11064</text:span> <text:span text:style-name="T3">12064 13064 14064</text:span></text:p>
      <text:p text:style-name="P1">11065 12065 13065 14065</text:p>
      <text:p text:style-name="P1"><text:span text:style-name="T6">11066 </text:span>12066 13066 14066</text:p>
      <text:p text:style-name="P1"><text:span text:style-name="T2">11067</text:span> <text:span text:style-name="T3">12067 13067 14067</text:span></text:p>
      <text:p text:style-name="P1"><text:span text:style-name="T2">11068</text:span> <text:span text:style-name="T3">12068 13068 14068</text:span></text:p>
      <text:p text:style-name="P1"><text:span text:style-name="T2">11069</text:span> <text:span text:style-name="T3">12069 13069 14069</text:span></text:p>
      <text:p text:style-name="P1"><text:span text:style-name="T2">11070</text:span> <text:span text:style-name="T3">12070 13070 14070</text:span></text:p>
      <text:p text:style-name="P1"><text:span text:style-name="T2">11071</text:span> <text:span text:style-name="T3">12071 13071 14071</text:span></text:p>
      <text:p text:style-name="P1"><text:span text:style-name="T2">11072</text:span> <text:span text:style-name="T3">12072 13072 14072</text:span></text:p>
      <text:p text:style-name="P1"><text:soft-page-break/><text:span text:style-name="T2">11073</text:span> <text:span text:style-name="T3">12073 13073 14073</text:span></text:p>
      <text:p text:style-name="P1"><text:span text:style-name="T2">11074</text:span> <text:span text:style-name="T3">12074 13074 14074</text:span></text:p>
      <text:p text:style-name="P1"><text:span text:style-name="T2">11075</text:span> 12075 13075 14075</text:p>
      <text:p text:style-name="P1"><text:span text:style-name="T2">11076</text:span> 12076 13076 14076</text:p>
      <text:p text:style-name="P1"><text:span text:style-name="T2">11077</text:span> <text:span text:style-name="T3">12077 13077 14077</text:span></text:p>
      <text:p text:style-name="P1"><text:span text:style-name="T2">11078</text:span> <text:span text:style-name="T3">12078 13078 14078</text:span></text:p>
      <text:p text:style-name="P1">11079 12079 13079 14079</text:p>
      <text:p text:style-name="P1">11080 12080 13080 14080</text:p>
      <text:p text:style-name="P1"><text:span text:style-name="T2">11081</text:span> <text:span text:style-name="T3">12081 13081 14081</text:span></text:p>
      <text:p text:style-name="P1"><text:span text:style-name="T2">11082</text:span> <text:span text:style-name="T3">12082 13082 14082</text:span></text:p>
      <text:p text:style-name="P1"><text:span text:style-name="T2">11083</text:span> 12083 13083 14083</text:p>
      <text:p text:style-name="P1"><text:span text:style-name="T2">11084</text:span> 12084 13084 14084</text:p>
      <text:p text:style-name="P1">11085 12085 13085 14085</text:p>
      <text:p text:style-name="P1">11086 12086 13086 14086</text:p>
      <text:p text:style-name="P1"><text:span text:style-name="T2">11087</text:span> <text:span text:style-name="T3">12087 13087 14087</text:span></text:p>
      <text:p text:style-name="P1"><text:span text:style-name="T2">11088</text:span> <text:span text:style-name="T3">12088 13088 14088</text:span></text:p>
      <text:p text:style-name="P1">11089 12089 13089 14089</text:p>
      <text:p text:style-name="P1">11090 12090 13090 14090</text:p>
      <text:p text:style-name="P1"><text:span text:style-name="T2">11091</text:span> <text:span text:style-name="T3">12091 13091 14091</text:span></text:p>
      <text:p text:style-name="P1"><text:span text:style-name="T2">11092</text:span> <text:span text:style-name="T3">12092 13092 14092</text:span></text:p>
      <text:p text:style-name="P1"><text:span text:style-name="T2">11093</text:span> <text:span text:style-name="T3">12093 13093 14093</text:span></text:p>
      <text:p text:style-name="P1"><text:span text:style-name="T2">11094</text:span> <text:span text:style-name="T3">12094 13094 14094</text:span></text:p>
      <text:p text:style-name="P1"/>
      <text:p text:style-name="P1">PICCADILLY LINE</text:p>
      <text:p text:style-name="P1"><text:span text:style-name="T2">100</text:span> 500 300</text:p>
      <text:p text:style-name="P1"><text:span text:style-name="T2">101</text:span> <text:span text:style-name="T3">501 301</text:span></text:p>
      <text:p text:style-name="P1"><text:span text:style-name="T2">102</text:span> 502 302</text:p>
      <text:p text:style-name="P1"><text:span text:style-name="T2">103</text:span> <text:span text:style-name="T3">503 303</text:span></text:p>
      <text:p text:style-name="P1">104 504 304</text:p>
      <text:p text:style-name="P1"><text:span text:style-name="T2">105</text:span> 505 305</text:p>
      <text:p text:style-name="P1">106 506 306</text:p>
      <text:p text:style-name="P1"><text:span text:style-name="T2">107</text:span> 507 307</text:p>
      <text:p text:style-name="P1"><text:span text:style-name="T5">108</text:span> <text:span text:style-name="T3">508 308</text:span></text:p>
      <text:p text:style-name="P1">109 509 309</text:p>
      <text:p text:style-name="P1">110 510 310</text:p>
      <text:p text:style-name="P1"><text:soft-page-break/>111 511 311</text:p>
      <text:p text:style-name="P1"><text:span text:style-name="T2">112</text:span> <text:span text:style-name="T3">512 312</text:span></text:p>
      <text:p text:style-name="P1"><text:span text:style-name="T2">113</text:span> 513 313</text:p>
      <text:p text:style-name="P1"><text:span text:style-name="T2">115</text:span> 515 315</text:p>
      <text:p text:style-name="P1">116 516 316</text:p>
      <text:p text:style-name="P1"><text:span text:style-name="T2">117 </text:span>517 317</text:p>
      <text:p text:style-name="P1">118 518 318</text:p>
      <text:p text:style-name="P1">119 519 319</text:p>
      <text:p text:style-name="P1"><text:span text:style-name="T2">120</text:span> 520 320</text:p>
      <text:p text:style-name="P1"><text:span text:style-name="T2">121</text:span> <text:span text:style-name="T3">521 321</text:span></text:p>
      <text:p text:style-name="P1"><text:span text:style-name="T2">122</text:span> <text:span text:style-name="T3">522 322</text:span></text:p>
      <text:p text:style-name="P1"><text:span text:style-name="T2">123</text:span> <text:span text:style-name="T3">523 323</text:span></text:p>
      <text:p text:style-name="P1"><text:span text:style-name="T2">124</text:span> 524 324</text:p>
      <text:p text:style-name="P1"><text:span text:style-name="T2">125</text:span> <text:span text:style-name="T3">525 325</text:span></text:p>
      <text:p text:style-name="P1"><text:span text:style-name="T2">126</text:span> <text:span text:style-name="T3">526 326</text:span></text:p>
      <text:p text:style-name="P1"><text:span text:style-name="T2">127</text:span> <text:span text:style-name="T3">527 327</text:span></text:p>
      <text:p text:style-name="P1"><text:span text:style-name="T2">128</text:span> <text:span text:style-name="T3">528 328</text:span></text:p>
      <text:p text:style-name="P1"><text:span text:style-name="T2">129</text:span> 529 329</text:p>
      <text:p text:style-name="P1"><text:span text:style-name="T2">130</text:span> <text:span text:style-name="T3">530 330</text:span></text:p>
      <text:p text:style-name="P1"><text:span text:style-name="T2">131</text:span> 531 331</text:p>
      <text:p text:style-name="P1"><text:span text:style-name="T2">132</text:span> <text:span text:style-name="T3">532 332</text:span></text:p>
      <text:p text:style-name="P1"><text:span text:style-name="T2">133</text:span> <text:span text:style-name="T3">533 333</text:span></text:p>
      <text:p text:style-name="P1"><text:span text:style-name="T2">134</text:span> 534 334</text:p>
      <text:p text:style-name="P1"><text:span text:style-name="T2">135</text:span> 535 335</text:p>
      <text:p text:style-name="P1"><text:span text:style-name="T2">136</text:span> 536 336</text:p>
      <text:p text:style-name="P1">137 537 337</text:p>
      <text:p text:style-name="P1"><text:span text:style-name="T2">138</text:span> 538 338</text:p>
      <text:p text:style-name="P1"><text:span text:style-name="T2">139</text:span> <text:span text:style-name="T3">539 339</text:span></text:p>
      <text:p text:style-name="P1"><text:span text:style-name="T2">140</text:span> <text:span text:style-name="T3">540 340</text:span></text:p>
      <text:p text:style-name="P1"><text:span text:style-name="T2">141</text:span> 541 341</text:p>
      <text:p text:style-name="P1"><text:span text:style-name="T2">142</text:span> 542 342</text:p>
      <text:p text:style-name="P1">143 543 343</text:p>
      <text:p text:style-name="P1"><text:span text:style-name="T2">144</text:span> 544 344</text:p>
      <text:p text:style-name="P1"><text:span text:style-name="T2">145</text:span> 545 345</text:p>
      <text:p text:style-name="P1"><text:span text:style-name="T2">146</text:span> <text:span text:style-name="T3">546 346</text:span></text:p>
      <text:p text:style-name="P1"><text:soft-page-break/><text:span text:style-name="T2">147</text:span> 547 347</text:p>
      <text:p text:style-name="P1"><text:span text:style-name="T2">148</text:span> 548 348</text:p>
      <text:p text:style-name="P1"><text:span text:style-name="T2">149</text:span> 549 349</text:p>
      <text:p text:style-name="P1"><text:span text:style-name="T2">150</text:span> 550 350</text:p>
      <text:p text:style-name="P1">151 551 351</text:p>
      <text:p text:style-name="P1">152 552 352 </text:p>
      <text:p text:style-name="P1">153 553 353</text:p>
      <text:p text:style-name="P1"><text:span text:style-name="T2">154</text:span> 554 354</text:p>
      <text:p text:style-name="P1"><text:span text:style-name="T2">155</text:span> 555 355</text:p>
      <text:p text:style-name="P1">156 556 356</text:p>
      <text:p text:style-name="P1">157 557 357</text:p>
      <text:p text:style-name="P1"><text:span text:style-name="T2">158</text:span> 558 358</text:p>
      <text:p text:style-name="P1"><text:span text:style-name="T2">159</text:span> <text:span text:style-name="T3">559 359</text:span></text:p>
      <text:p text:style-name="P1"><text:span text:style-name="T2">160</text:span> 560 360</text:p>
      <text:p text:style-name="P1">161 561 361</text:p>
      <text:p text:style-name="P1">162 562 362</text:p>
      <text:p text:style-name="P1"><text:span text:style-name="T2">163</text:span> <text:span text:style-name="T3">563 363</text:span></text:p>
      <text:p text:style-name="P1"><text:span text:style-name="T2">164</text:span> <text:span text:style-name="T3">564 364</text:span></text:p>
      <text:p text:style-name="P1"><text:span text:style-name="T2">165</text:span> 565 365</text:p>
      <text:p text:style-name="P1"><text:span text:style-name="T2">167</text:span> 567 367</text:p>
      <text:p text:style-name="P1"><text:span text:style-name="T2">168</text:span> 568 368</text:p>
      <text:p text:style-name="P1"><text:span text:style-name="T2">169</text:span> 569 369</text:p>
      <text:p text:style-name="P1"><text:span text:style-name="T2">170</text:span> 570 370</text:p>
      <text:p text:style-name="P1"><text:span text:style-name="T2">171</text:span> 571 371</text:p>
      <text:p text:style-name="P1">172 572 372</text:p>
      <text:p text:style-name="P1">173 573 373</text:p>
      <text:p text:style-name="P1"><text:span text:style-name="T2">174</text:span> <text:span text:style-name="T3">574 374</text:span></text:p>
      <text:p text:style-name="P1"><text:span text:style-name="T2">175</text:span> <text:span text:style-name="T3">575 375</text:span></text:p>
      <text:p text:style-name="P1">176 576 376</text:p>
      <text:p text:style-name="P1"><text:span text:style-name="T2">177</text:span> 577 377</text:p>
      <text:p text:style-name="P1"><text:span text:style-name="T2">178</text:span> <text:span text:style-name="T3">578 378</text:span></text:p>
      <text:p text:style-name="P1"><text:span text:style-name="T2">179</text:span> 579 379</text:p>
      <text:p text:style-name="P1"><text:span text:style-name="T2">180</text:span> <text:span text:style-name="T3">580 380</text:span></text:p>
      <text:p text:style-name="P1"><text:span text:style-name="T2">181</text:span> 581 381</text:p>
      <text:p text:style-name="P1"><text:span text:style-name="T2">182</text:span> 582 382</text:p>
      <text:p text:style-name="P1"><text:soft-page-break/><text:span text:style-name="T2">183</text:span> 583 383</text:p>
      <text:p text:style-name="P1">184 584 384</text:p>
      <text:p text:style-name="P1">185 585 385</text:p>
      <text:p text:style-name="P1"><text:span text:style-name="T2">186</text:span> <text:span text:style-name="T3">586 386</text:span></text:p>
      <text:p text:style-name="P1"><text:span text:style-name="T2">187</text:span> <text:span text:style-name="T3">587 387</text:span></text:p>
      <text:p text:style-name="P1"><text:span text:style-name="T2">188</text:span> <text:span text:style-name="T3">588 388</text:span></text:p>
      <text:p text:style-name="P1"><text:span text:style-name="T2">189</text:span> <text:span text:style-name="T3">589 389</text:span></text:p>
      <text:p text:style-name="P1"><text:span text:style-name="T2">190</text:span> 590 390</text:p>
      <text:p text:style-name="P1"><text:span text:style-name="T2">191</text:span> 591 391</text:p>
      <text:p text:style-name="P1"><text:span text:style-name="T2">192</text:span> <text:span text:style-name="T3">592 392</text:span></text:p>
      <text:p text:style-name="P1"><text:span text:style-name="T2">193</text:span> 593 393</text:p>
      <text:p text:style-name="P1">194 594 394</text:p>
      <text:p text:style-name="P1">195 595 395</text:p>
      <text:p text:style-name="P1"><text:span text:style-name="T2">196</text:span> <text:span text:style-name="T3">596 396</text:span></text:p>
      <text:p text:style-name="P1"><text:span text:style-name="T2">197</text:span> 597 397</text:p>
      <text:p text:style-name="P1"><text:span text:style-name="T2">198</text:span> 598 398</text:p>
      <text:p text:style-name="P1"><text:span text:style-name="T2">199</text:span> <text:span text:style-name="T3">599 399</text:span></text:p>
      <text:p text:style-name="P1"/>
      <text:p text:style-name="P1"><text:span text:style-name="T2">200</text:span> <text:span text:style-name="T3">600 400</text:span></text:p>
      <text:p text:style-name="P1"><text:span text:style-name="T2">201</text:span> 601 401</text:p>
      <text:p text:style-name="P1">202 602 402</text:p>
      <text:p text:style-name="P1">203 603 403</text:p>
      <text:p text:style-name="P1"><text:span text:style-name="T2">205</text:span> 605 405</text:p>
      <text:p text:style-name="P1"><text:span text:style-name="T2">206</text:span> 606 406</text:p>
      <text:p text:style-name="P1"><text:span text:style-name="T2">207</text:span> <text:span text:style-name="T3">607 407</text:span></text:p>
      <text:p text:style-name="P1"><text:span text:style-name="T2">208</text:span> 608 408</text:p>
      <text:p text:style-name="P1"><text:span text:style-name="T2">209</text:span> 609 409</text:p>
      <text:p text:style-name="P1"><text:span text:style-name="T2">210</text:span> <text:span text:style-name="T3">610 410</text:span></text:p>
      <text:p text:style-name="P1">211 611 411</text:p>
      <text:p text:style-name="P1">212 612 412</text:p>
      <text:p text:style-name="P1"><text:span text:style-name="T2">213</text:span> <text:span text:style-name="T3">613 413</text:span></text:p>
      <text:p text:style-name="P1"><text:span text:style-name="T2">214</text:span> 614 414</text:p>
      <text:p text:style-name="P1"><text:span text:style-name="T2">215</text:span> 615 415</text:p>
      <text:p text:style-name="P1"><text:span text:style-name="T2">216</text:span> 616 416</text:p>
      <text:p text:style-name="P1">217 617 417</text:p>
      <text:p text:style-name="P1"><text:soft-page-break/><text:span text:style-name="T2">218</text:span> 618 418</text:p>
      <text:p text:style-name="P1"><text:span text:style-name="T2">219</text:span> <text:span text:style-name="T3">619 419</text:span></text:p>
      <text:p text:style-name="P1"><text:span text:style-name="T2">220</text:span> 620 420</text:p>
      <text:p text:style-name="P1">221 621 421</text:p>
      <text:p text:style-name="P1">222 622 422</text:p>
      <text:p text:style-name="P1">223 623 423</text:p>
      <text:p text:style-name="P1"><text:span text:style-name="T2">224</text:span> <text:span text:style-name="T3">624 424</text:span></text:p>
      <text:p text:style-name="P1"><text:span text:style-name="T2">225</text:span> <text:span text:style-name="T3">625 425</text:span></text:p>
      <text:p text:style-name="P1"><text:span text:style-name="T2">226</text:span> <text:span text:style-name="T3">626 426</text:span></text:p>
      <text:p text:style-name="P1"><text:span text:style-name="T2">227</text:span> 627 427</text:p>
      <text:p text:style-name="P1">228 628 428</text:p>
      <text:p text:style-name="P1"><text:span text:style-name="T2">229</text:span> <text:span text:style-name="T3">629 429</text:span></text:p>
      <text:p text:style-name="P1"><text:span text:style-name="T2">230</text:span> 630 430</text:p>
      <text:p text:style-name="P1"><text:span text:style-name="T2">231</text:span> <text:span text:style-name="T3">631 431</text:span></text:p>
      <text:p text:style-name="P1"><text:span text:style-name="T2">232</text:span> 632 432</text:p>
      <text:p text:style-name="P1"><text:span text:style-name="T2">233</text:span> <text:span text:style-name="T3">633 433</text:span></text:p>
      <text:p text:style-name="P1">234 634 434</text:p>
      <text:p text:style-name="P1"><text:span text:style-name="T2">235</text:span> 635 435</text:p>
      <text:p text:style-name="P1">236 636 436</text:p>
      <text:p text:style-name="P1"><text:span text:style-name="T2">237</text:span> <text:span text:style-name="T3">637 437</text:span></text:p>
      <text:p text:style-name="P1"><text:span text:style-name="T2">238</text:span> 638 438</text:p>
      <text:p text:style-name="P1"><text:span text:style-name="T2">239</text:span> 639 439</text:p>
      <text:p text:style-name="P1"><text:span text:style-name="T2">240</text:span> <text:span text:style-name="T3">640 440</text:span></text:p>
      <text:p text:style-name="P1"><text:span text:style-name="T2">241</text:span> <text:span text:style-name="T3">641 441</text:span></text:p>
      <text:p text:style-name="P1"><text:span text:style-name="T2">242</text:span> 642 442</text:p>
      <text:p text:style-name="P1">243 643 443</text:p>
      <text:p text:style-name="P1"><text:span text:style-name="T2">244</text:span> <text:span text:style-name="T3">644 444</text:span></text:p>
      <text:p text:style-name="P1"><text:span text:style-name="T2">245</text:span> 645 445</text:p>
      <text:p text:style-name="P1"><text:span text:style-name="T2">246</text:span> 646 446</text:p>
      <text:p text:style-name="P1"><text:span text:style-name="T2">247</text:span> 647 447</text:p>
      <text:p text:style-name="P1">248 648 448</text:p>
      <text:p text:style-name="P1"><text:span text:style-name="T2">249</text:span> 649 449</text:p>
      <text:p text:style-name="P1"><text:span text:style-name="T2">250</text:span> 650 450</text:p>
      <text:p text:style-name="P1"><text:span text:style-name="T2">251</text:span> 651 451</text:p>
      <text:p text:style-name="P1"><text:span text:style-name="T2">252</text:span> 652 452</text:p>
      <text:p text:style-name="P1"><text:soft-page-break/><text:span text:style-name="T2">253</text:span> 653 453</text:p>
      <text:p text:style-name="P1"/>
      <text:p text:style-name="P1"><text:span text:style-name="T2">854</text:span> 654 855</text:p>
      <text:p text:style-name="P1">856 656 857</text:p>
      <text:p text:style-name="P1"><text:span text:style-name="T2">858</text:span> <text:span text:style-name="T3">658 859</text:span></text:p>
      <text:p text:style-name="P1">860 660 861</text:p>
      <text:p text:style-name="P1"><text:span text:style-name="T2">862</text:span> <text:span text:style-name="T3">662 863</text:span></text:p>
      <text:p text:style-name="P1"><text:span text:style-name="T2">864</text:span> <text:span text:style-name="T3">664 865</text:span></text:p>
      <text:p text:style-name="P1">866 666 867</text:p>
      <text:p text:style-name="P1"><text:span text:style-name="T2">870</text:span> 670 871</text:p>
      <text:p text:style-name="P1"><text:span text:style-name="T2">872</text:span> 672 873</text:p>
      <text:p text:style-name="P1"><text:span text:style-name="T2">874</text:span> 674 875</text:p>
      <text:p text:style-name="P1">876 676 877</text:p>
      <text:p text:style-name="P1"><text:span text:style-name="T2">878</text:span> <text:span text:style-name="T3">678 879</text:span></text:p>
      <text:p text:style-name="P1"><text:span text:style-name="T2">880</text:span> 680 881</text:p>
      <text:p text:style-name="P1">882 682 883</text:p>
      <text:p text:style-name="P1">884 684 885</text:p>
      <text:p text:style-name="P1"><text:span text:style-name="T2">886</text:span> 686 887</text:p>
      <text:p text:style-name="P1"><text:span text:style-name="T2">892</text:span> <text:span text:style-name="T3">692 893</text:span></text:p>
      <text:p text:style-name="P1"><text:span text:style-name="T2">894</text:span> 694 895</text:p>
      <text:p text:style-name="P1">896 696 897</text:p>
      <text:p text:style-name="P1"/>
      <text:p text:style-name="P1">NORTHERN LINE</text:p>
      <text:p text:style-name="P1">51501 52501 53501</text:p>
      <text:p text:style-name="P1">51502 52502 53502</text:p>
      <text:p text:style-name="P1">51503 52503 53503</text:p>
      <text:p text:style-name="P1">51504 52504 53504</text:p>
      <text:p text:style-name="P1">51505 52505 53505</text:p>
      <text:p text:style-name="P1">51506 52506 53506</text:p>
      <text:p text:style-name="P1">51507 52507 53507</text:p>
      <text:p text:style-name="P1">51508 52508 53508</text:p>
      <text:p text:style-name="P1">51509 52509 53509</text:p>
      <text:p text:style-name="P1">51510 52510 53510</text:p>
      <text:p text:style-name="P1"><text:span text:style-name="T2">51511</text:span> 52511 53511</text:p>
      <text:p text:style-name="P1"><text:span text:style-name="T2">51512</text:span> 52512 53512</text:p>
      <text:p text:style-name="P1"><text:soft-page-break/>51513 52513 53513</text:p>
      <text:p text:style-name="P1">51514 52514 53514</text:p>
      <text:p text:style-name="P1">51515 52515 53515</text:p>
      <text:p text:style-name="P1">51516 52516 53516</text:p>
      <text:p text:style-name="P1">51517 52517 53517</text:p>
      <text:p text:style-name="P1">51518 52518 53518</text:p>
      <text:p text:style-name="P1">51519 52519 53519</text:p>
      <text:p text:style-name="P1">51520 52520 53520</text:p>
      <text:p text:style-name="P1">51521 52521 53521</text:p>
      <text:p text:style-name="P1">51522 52522 53522</text:p>
      <text:p text:style-name="P1">51523 52523 53523</text:p>
      <text:p text:style-name="P1">51524 52524 53524</text:p>
      <text:p text:style-name="P1">51525 52525 53525</text:p>
      <text:p text:style-name="P1">51526 52526 53526</text:p>
      <text:p text:style-name="P1">51527 52527 53527</text:p>
      <text:p text:style-name="P1">51528 52528 53528</text:p>
      <text:p text:style-name="P1">51529 52529 53529</text:p>
      <text:p text:style-name="P1">51530 52530 53530</text:p>
      <text:p text:style-name="P1">51531 52531 53531</text:p>
      <text:p text:style-name="P1">51532 52532 53532</text:p>
      <text:p text:style-name="P1">51533 52533 53533</text:p>
      <text:p text:style-name="P1">51534 52534 53534</text:p>
      <text:p text:style-name="P1">51535 52535 53535</text:p>
      <text:p text:style-name="P1">51536 52536 53536</text:p>
      <text:p text:style-name="P1">51537 52537 53537</text:p>
      <text:p text:style-name="P1">51538 52538 53538</text:p>
      <text:p text:style-name="P1"><text:span text:style-name="T2">51539</text:span> <text:span text:style-name="T3">52539 53539</text:span></text:p>
      <text:p text:style-name="P1"><text:span text:style-name="T2">51540</text:span> <text:span text:style-name="T3">52540 53540</text:span></text:p>
      <text:p text:style-name="P1">51541 52541 53541</text:p>
      <text:p text:style-name="P1">51542 52542 53542</text:p>
      <text:p text:style-name="P1">51543 52543 53543</text:p>
      <text:p text:style-name="P1">51544 52544 53544</text:p>
      <text:p text:style-name="P1">51545 52545 53545</text:p>
      <text:p text:style-name="P1">51546 52546 53546</text:p>
      <text:p text:style-name="P1">51547 52547 53547</text:p>
      <text:p text:style-name="P1"><text:soft-page-break/>51548 52548 53548</text:p>
      <text:p text:style-name="P1">51549 52549 53549</text:p>
      <text:p text:style-name="P1">51550 52550 53550</text:p>
      <text:p text:style-name="P1">51551 52551 53551</text:p>
      <text:p text:style-name="P1">51552 52552 53552</text:p>
      <text:p text:style-name="P1"><text:span text:style-name="T2">51553</text:span> 52553 53553</text:p>
      <text:p text:style-name="P1"><text:span text:style-name="T2">51554</text:span> 52554 53554</text:p>
      <text:p text:style-name="P1"><text:span text:style-name="T2">51555</text:span> 52555 53555</text:p>
      <text:p text:style-name="P1"><text:span text:style-name="T2">51556</text:span> 52556 53556</text:p>
      <text:p text:style-name="P1">51557 52557 53557</text:p>
      <text:p text:style-name="P1">51558 52558 53558</text:p>
      <text:p text:style-name="P1">51559 52559 53559</text:p>
      <text:p text:style-name="P1">51560 52560 53560</text:p>
      <text:p text:style-name="P1">51561 52561 53561</text:p>
      <text:p text:style-name="P1">51562 52562 53562</text:p>
      <text:p text:style-name="P1">51563 52563 53563</text:p>
      <text:p text:style-name="P1">51564 52564 53564</text:p>
      <text:p text:style-name="P1">51565 52565 53565</text:p>
      <text:p text:style-name="P1">51566 52566 53566</text:p>
      <text:p text:style-name="P1"><text:span text:style-name="T2">51567</text:span> 52567 53567</text:p>
      <text:p text:style-name="P1"><text:span text:style-name="T2">51568</text:span> 52568 53568</text:p>
      <text:p text:style-name="P1">51569 52569 53569</text:p>
      <text:p text:style-name="P1">51570 52570 53570</text:p>
      <text:p text:style-name="P1">51571 52571 53571</text:p>
      <text:p text:style-name="P1">51572 52572 53572</text:p>
      <text:p text:style-name="P1">51573 52573 53573</text:p>
      <text:p text:style-name="P1">51574 52574 53574</text:p>
      <text:p text:style-name="P1">51575 52575 53575</text:p>
      <text:p text:style-name="P1">51576 52576 53576</text:p>
      <text:p text:style-name="P1">51577 52577 53577</text:p>
      <text:p text:style-name="P1">51578 52578 53578</text:p>
      <text:p text:style-name="P1">51579 52579 53579</text:p>
      <text:p text:style-name="P1">51580 52580 53580</text:p>
      <text:p text:style-name="P1">51581 52581 53581</text:p>
      <text:p text:style-name="P1">51582 52582 53582</text:p>
      <text:p text:style-name="P1"><text:soft-page-break/>51583 52583 53583</text:p>
      <text:p text:style-name="P1">51584 52584 53584</text:p>
      <text:p text:style-name="P1">51585 52585 53585</text:p>
      <text:p text:style-name="P1">51586 52586 53586</text:p>
      <text:p text:style-name="P1">51587 52587 53587</text:p>
      <text:p text:style-name="P1">51588 52588 53588</text:p>
      <text:p text:style-name="P1">51589 52589 53589</text:p>
      <text:p text:style-name="P1">51590 52590 53590</text:p>
      <text:p text:style-name="P1">51591 52591 53591</text:p>
      <text:p text:style-name="P1">51592 52592 53592</text:p>
      <text:p text:style-name="P1">51593 52593 53593</text:p>
      <text:p text:style-name="P1">51594 52594 53594</text:p>
      <text:p text:style-name="P1"><text:span text:style-name="T2">51595</text:span> 52595 53595</text:p>
      <text:p text:style-name="P1"><text:span text:style-name="T2">51596</text:span> 52596 53596</text:p>
      <text:p text:style-name="P1"><text:span text:style-name="T2">51597</text:span> 52597 53597</text:p>
      <text:p text:style-name="P1"><text:span text:style-name="T2">51598</text:span> 52598 53598</text:p>
      <text:p text:style-name="P1">51599 52599 53599</text:p>
      <text:p text:style-name="P1"/>
      <text:p text:style-name="P1">51600 52600 53600</text:p>
      <text:p text:style-name="P1">51601 52601 53601</text:p>
      <text:p text:style-name="P1">51602 52602 53602</text:p>
      <text:p text:style-name="P1">51603 52603 53603</text:p>
      <text:p text:style-name="P1">51604 52604 53604</text:p>
      <text:p text:style-name="P1">51605 52605 53605</text:p>
      <text:p text:style-name="P1">51606 52606 53606</text:p>
      <text:p text:style-name="P1">51607 52607 53607</text:p>
      <text:p text:style-name="P1">51608 52608 53608</text:p>
      <text:p text:style-name="P1">51609 52609 53609</text:p>
      <text:p text:style-name="P1">51610 52610 53610</text:p>
      <text:p text:style-name="P1"><text:span text:style-name="T2">51611</text:span> 52611 53611</text:p>
      <text:p text:style-name="P1"><text:span text:style-name="T2">51612</text:span> 52612 53612</text:p>
      <text:p text:style-name="P1"><text:span text:style-name="T6">51613 </text:span>52613 53613</text:p>
      <text:p text:style-name="P1">51614 52614 53614</text:p>
      <text:p text:style-name="P1">51615 52615 53615</text:p>
      <text:p text:style-name="P1">51616 52616 53616</text:p>
      <text:p text:style-name="P1"><text:soft-page-break/><text:span text:style-name="T2">51617</text:span> 52617 53617</text:p>
      <text:p text:style-name="P1"><text:span text:style-name="T2">51618</text:span> 52618 53618</text:p>
      <text:p text:style-name="P1">51619 52619 53619</text:p>
      <text:p text:style-name="P1">51620 52620 53620</text:p>
      <text:p text:style-name="P1">51621 52621 53621</text:p>
      <text:p text:style-name="P1">51622 52622 53622</text:p>
      <text:p text:style-name="P1">51623 52623 53623</text:p>
      <text:p text:style-name="P1">51624 52624 53624</text:p>
      <text:p text:style-name="P1">51625 52625 53625</text:p>
      <text:p text:style-name="P1">51626 52626 53626</text:p>
      <text:p text:style-name="P1">51627 52627 53627</text:p>
      <text:p text:style-name="P1">51628 52628 53628</text:p>
      <text:p text:style-name="P1">51629 52629 53629</text:p>
      <text:p text:style-name="P1">51630 52630 53630</text:p>
      <text:p text:style-name="P1">51631 52631 53631</text:p>
      <text:p text:style-name="P1">51632 52632 53632</text:p>
      <text:p text:style-name="P1">51633 52633 53633</text:p>
      <text:p text:style-name="P1">51634 52634 53634</text:p>
      <text:p text:style-name="P1">51635 52635 53635</text:p>
      <text:p text:style-name="P1">51636 52636 53636</text:p>
      <text:p text:style-name="P1">51637 52637 53637</text:p>
      <text:p text:style-name="P1">51638 52638 53638</text:p>
      <text:p text:style-name="P1">51639 52639 53639</text:p>
      <text:p text:style-name="P1">51640 52640 53640</text:p>
      <text:p text:style-name="P1">51641 52641 53641</text:p>
      <text:p text:style-name="P1">51642 52642 53642</text:p>
      <text:p text:style-name="P1">51643 52643 53643</text:p>
      <text:p text:style-name="P1">51644 52644 53644</text:p>
      <text:p text:style-name="P1">51645 52645 53645</text:p>
      <text:p text:style-name="P1">51646 52646 53646</text:p>
      <text:p text:style-name="P1">51647 52647 53647</text:p>
      <text:p text:style-name="P1">51648 52648 53648</text:p>
      <text:p text:style-name="P1">51649 52649 53649</text:p>
      <text:p text:style-name="P1">51650 52650 53650</text:p>
      <text:p text:style-name="P1"><text:span text:style-name="T2">51651</text:span> 52651 53651</text:p>
      <text:p text:style-name="P1"><text:soft-page-break/><text:span text:style-name="T2">51652</text:span> 52652 53652</text:p>
      <text:p text:style-name="P1"><text:span text:style-name="T2">51653</text:span> 52653 53653</text:p>
      <text:p text:style-name="P1"><text:span text:style-name="T2">51654</text:span> 52654 53654</text:p>
      <text:p text:style-name="P1">51655 52655 53655</text:p>
      <text:p text:style-name="P1">51656 52656 53656</text:p>
      <text:p text:style-name="P1">51657 52657 53657</text:p>
      <text:p text:style-name="P1">51658 52658 53658</text:p>
      <text:p text:style-name="P1">51659 52659 53659</text:p>
      <text:p text:style-name="P1">51660 52660 53660</text:p>
      <text:p text:style-name="P1">51661 52661 53661</text:p>
      <text:p text:style-name="P1">51662 52662 53662</text:p>
      <text:p text:style-name="P1">51663 52663 53663</text:p>
      <text:p text:style-name="P1">51664 52664 53664</text:p>
      <text:p text:style-name="P1">51665 52665 53665</text:p>
      <text:p text:style-name="P1">51666 52666 53666</text:p>
      <text:p text:style-name="P1">51667 52667 53667</text:p>
      <text:p text:style-name="P1">51668 52668 53668</text:p>
      <text:p text:style-name="P1">51669 52669 53669</text:p>
      <text:p text:style-name="P1">51670 52670 53670</text:p>
      <text:p text:style-name="P1">51671 52671 53671</text:p>
      <text:p text:style-name="P1">51672 52672 53672</text:p>
      <text:p text:style-name="P1">51673 52673 53673</text:p>
      <text:p text:style-name="P1">51674 52674 53674</text:p>
      <text:p text:style-name="P1">51675 52675 53675</text:p>
      <text:p text:style-name="P1">51676 52676 53676</text:p>
      <text:p text:style-name="P1">51677 52677 53677</text:p>
      <text:p text:style-name="P1">51678 52678 53678</text:p>
      <text:p text:style-name="P1">51679 52679 53679</text:p>
      <text:p text:style-name="P1">51680 52680 53680</text:p>
      <text:p text:style-name="P1">51681 52681 53681</text:p>
      <text:p text:style-name="P1">51682 52682 53682</text:p>
      <text:p text:style-name="P1">51683 52683 53683</text:p>
      <text:p text:style-name="P1">51684 52684 53684</text:p>
      <text:p text:style-name="P1">51685 52685 53685</text:p>
      <text:p text:style-name="P1">51686 52686 53686</text:p>
      <text:p text:style-name="P1"><text:soft-page-break/>51701 52701 53701</text:p>
      <text:p text:style-name="P1">51702 52702 53702</text:p>
      <text:p text:style-name="P1">51703 52703 53703</text:p>
      <text:p text:style-name="P1">51704 52704 53704</text:p>
      <text:p text:style-name="P1">51705 52705 53705</text:p>
      <text:p text:style-name="P1">51706 52706 53706</text:p>
      <text:p text:style-name="P1"><text:span text:style-name="T2">51707</text:span> <text:span text:style-name="T3">52707 53707</text:span></text:p>
      <text:p text:style-name="P1"><text:span text:style-name="T2">51708</text:span> <text:span text:style-name="T3">52708 53708</text:span></text:p>
      <text:p text:style-name="P1">51709 52709 53709</text:p>
      <text:p text:style-name="P1">51710 52710 53710</text:p>
      <text:p text:style-name="P1">51711 52711 53711</text:p>
      <text:p text:style-name="P1">51712 52712 53712</text:p>
      <text:p text:style-name="P1">51713 52713 53713</text:p>
      <text:p text:style-name="P1">51714 52714 53714</text:p>
      <text:p text:style-name="P1">51715 52715 53715</text:p>
      <text:p text:style-name="P1">51716 52716 53716</text:p>
      <text:p text:style-name="P1">51717 52717 53717</text:p>
      <text:p text:style-name="P1">51718 52718 53718</text:p>
      <text:p text:style-name="P1">51719 52719 53719</text:p>
      <text:p text:style-name="P1">51720 52720 53720</text:p>
      <text:p text:style-name="P1">51721 52721 53721</text:p>
      <text:p text:style-name="P1">51722 52722 53722</text:p>
      <text:p text:style-name="P1">51723 52723 53723</text:p>
      <text:p text:style-name="P1">51724 52724 53724</text:p>
      <text:p text:style-name="P1">51725 52725 53725</text:p>
      <text:p text:style-name="P1">51726 52726 53726</text:p>
      <text:p text:style-name="P1"/>
      <text:p text:style-name="P1">GLASGOW SUBWAY</text:p>
      <text:p text:style-name="P1">001</text:p>
      <text:p text:style-name="P1">002</text:p>
      <text:p text:style-name="P1">003</text:p>
      <text:p text:style-name="P1">004</text:p>
      <text:p text:style-name="P1">005</text:p>
      <text:p text:style-name="P1">006</text:p>
      <text:p text:style-name="P1">007</text:p>
      <text:p text:style-name="P1"><text:soft-page-break/>008</text:p>
      <text:p text:style-name="P1">009</text:p>
      <text:p text:style-name="P1">010</text:p>
      <text:p text:style-name="P1">011</text:p>
      <text:p text:style-name="P1">012</text:p>
      <text:p text:style-name="P1">013</text:p>
      <text:p text:style-name="P1">014</text:p>
      <text:p text:style-name="P1">015</text:p>
      <text:p text:style-name="P1">016</text:p>
      <text:p text:style-name="P1">017</text:p>
      <text:p text:style-name="P1"/>
      <text:p text:style-name="P1">101</text:p>
      <text:p text:style-name="P1">102</text:p>
      <text:p text:style-name="P1">103</text:p>
      <text:p text:style-name="P1">104</text:p>
      <text:p text:style-name="P1">105</text:p>
      <text:p text:style-name="P1">106</text:p>
      <text:p text:style-name="P1">107</text:p>
      <text:p text:style-name="P1">108</text:p>
      <text:p text:style-name="P1">109</text:p>
      <text:p text:style-name="P1">110</text:p>
      <text:p text:style-name="P1">111</text:p>
      <text:p text:style-name="P1">112</text:p>
      <text:p text:style-name="P1">113</text:p>
      <text:p text:style-name="P1">114</text:p>
      <text:p text:style-name="P1">115</text:p>
      <text:p text:style-name="P1">116</text:p>
      <text:p text:style-name="P1">117</text:p>
      <text:p text:style-name="P1">118</text:p>
      <text:p text:style-name="P1">119</text:p>
      <text:p text:style-name="P1">120</text:p>
      <text:p text:style-name="P1">121</text:p>
      <text:p text:style-name="P1">122</text:p>
      <text:p text:style-name="P1">123</text:p>
      <text:p text:style-name="P1">124</text:p>
      <text:p text:style-name="P1"><text:soft-page-break/>125</text:p>
      <text:p text:style-name="P1">126</text:p>
      <text:p text:style-name="P1">127</text:p>
      <text:p text:style-name="P1">128</text:p>
      <text:p text:style-name="P1">129</text:p>
      <text:p text:style-name="P1">130</text:p>
      <text:p text:style-name="P1">131</text:p>
      <text:p text:style-name="P1">132</text:p>
      <text:p text:style-name="P1">133</text:p>
      <text:p text:style-name="P1"/>
      <text:p text:style-name="P1">201</text:p>
      <text:p text:style-name="P1">202</text:p>
      <text:p text:style-name="P1">203</text:p>
      <text:p text:style-name="P1">204</text:p>
      <text:p text:style-name="P1">205</text:p>
      <text:p text:style-name="P1">206</text:p>
      <text:p text:style-name="P1">207</text:p>
      <text:p text:style-name="P1">208</text:p>
      <text:p text:style-name="P1"/>
      <text:p text:style-name="P1">L2</text:p>
      <text:p text:style-name="P1">L3</text:p>
      <text:p text:style-name="P1">L6</text:p>
      <text:p text:style-name="P1">L7</text:p>
      <text:p text:style-name="P1">1</text:p>
      <text:p text:style-name="P1">4</text:p>
      <text:p text:style-name="P1">39</text:p>
      <text:p text:style-name="P1">41</text:p>
      <text:p text:style-name="P1">55</text:p>
      <text:p text:style-name="P1"/>
      <text:p text:style-name="P1">LONDON UNDERGROUND LOCOS</text:p>
      <text:p text:style-name="P1"/>
      <text:p text:style-name="P1">L15</text:p>
      <text:p text:style-name="P1">L16</text:p>
      <text:p text:style-name="P1">L17</text:p>
      <text:p text:style-name="P1">L18</text:p>
      <text:p text:style-name="P1"><text:soft-page-break/>L19</text:p>
      <text:p text:style-name="P1">L20</text:p>
      <text:p text:style-name="P1">L21</text:p>
      <text:p text:style-name="P1">L22</text:p>
      <text:p text:style-name="P1">L23</text:p>
      <text:p text:style-name="P1">L24</text:p>
      <text:p text:style-name="P1">L25</text:p>
      <text:p text:style-name="P1">L26</text:p>
      <text:p text:style-name="P1">L27</text:p>
      <text:p text:style-name="P1">L28</text:p>
      <text:p text:style-name="P1">L29</text:p>
      <text:p text:style-name="P1">L30</text:p>
      <text:p text:style-name="P1">L31</text:p>
      <text:p text:style-name="P1">L32</text:p>
      <text:p text:style-name="P1">L44</text:p>
      <text:p text:style-name="P1">L45</text:p>
      <text:p text:style-name="P1">L46</text:p>
      <text:p text:style-name="P1">L47</text:p>
      <text:p text:style-name="P1">L48</text:p>
      <text:p text:style-name="P1">L49</text:p>
      <text:p text:style-name="P1">L50</text:p>
      <text:p text:style-name="P1">L51</text:p>
      <text:p text:style-name="P1">L52</text:p>
      <text:p text:style-name="P1">L53</text:p>
      <text:p text:style-name="P1">L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essop</meta:initial-creator>
    <meta:creation-date>2020-11-09T17:47:46.20</meta:creation-date>
    <dc:date>2025-02-13T00:38:46.65</dc:date>
    <dc:creator>David </dc:creator>
    <meta:editing-duration>P9DT15H18M1S</meta:editing-duration>
    <meta:editing-cycles>46</meta:editing-cycles>
    <meta:generator>OpenOffice/4.1.7$Win32 OpenOffice.org_project/417m1$Build-9800</meta:generator>
    <meta:document-statistic meta:table-count="0" meta:image-count="0" meta:object-count="0" meta:page-count="39" meta:paragraph-count="1324" meta:word-count="4440" meta:character-count="24063"/>
  </office:meta>
</office:document-meta>
</file>