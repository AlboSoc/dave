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HA 25</text:p>
      <text:p text:style-name="P1">AHA HUNTING HIGH AND LOW</text:p>
      <text:p text:style-name="P1"/>
      <text:p text:style-name="P1">THIS IS MY TRUTH TELL ME YOURS </text:p>
      <text:p text:style-name="P1">MANIC STREET PERACHERS</text:p>
      <text:p text:style-name="P1"/>
      <text:p text:style-name="P1">REM 1982 2011</text:p>
      <text:p text:style-name="P1"/>
      <text:p text:style-name="P1">ELLIE GOULDING HALCYON DAYS</text:p>
      <text:p text:style-name="P1"/>
      <text:p text:style-name="P1">KYLIE GREATEST HITS</text:p>
      <text:p text:style-name="P1">KYLIE KYLIE MINOGUE</text:p>
      <text:p text:style-name="P1"/>
      <text:p text:style-name="P1">WESTLIFE WORLD OF OUR OWN</text:p>
      <text:p text:style-name="P1"/>
      <text:p text:style-name="P1">SUGABABES OVERLOADED </text:p>
      <text:p text:style-name="P1"/>
      <text:p text:style-name="P1">T PAU THE GREATEST HITS</text:p>
      <text:p text:style-name="P1"/>
      <text:p text:style-name="P1">GLRLS ALOUD OUT OF CONTROL</text:p>
      <text:p text:style-name="P1"/>
      <text:p text:style-name="P1">MADANNA GREATEST HITS2</text:p>
      <text:p text:style-name="P1"/>
      <text:p text:style-name="P1">LASGO SOME THINGS</text:p>
      <text:p text:style-name="P1"/>
      <text:p text:style-name="P1">KATY PERRY ONE OF THE BOYS</text:p>
      <text:p text:style-name="P1"/>
      <text:p text:style-name="P1">ADELE 25</text:p>
      <text:p text:style-name="P1">ADELE 21</text:p>
      <text:p text:style-name="P1"/>
      <text:p text:style-name="P1">GERL HALLIWELL SCHIZO PHONIC</text:p>
      <text:p text:style-name="P1"><text:soft-page-break/></text:p>
      <text:p text:style-name="P1">S CLUB JUNIORS TOGETHER</text:p>
      <text:p text:style-name="P1"/>
      <text:p text:style-name="P1">DATA GEODREM MISKAKEN IDENTITY</text:p>
      <text:p text:style-name="P1"/>
      <text:p text:style-name="P1">BRITNEY SPEARS THE SINGLES COLLECTION</text:p>
      <text:p text:style-name="P1">BHITNEY SPEARS GREATEST HITS</text:p>
      <text:p text:style-name="P1"><text:s/></text:p>
      <text:p text:style-name="P1">S CLUB 7 7</text:p>
      <text:p text:style-name="P1"/>
      <text:p text:style-name="P1">THE BLACK EYED PEAS THE END</text:p>
      <text:p text:style-name="P1"/>
      <text:p text:style-name="P1">BELINDA CARLISLE THE BEST OFVOLUME1</text:p>
      <text:p text:style-name="P1"/>
      <text:p text:style-name="P1">CHERY COLE MESSY LIT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Jessop</meta:initial-creator>
    <meta:creation-date>2020-12-23T16:26:40.67</meta:creation-date>
    <meta:document-statistic meta:table-count="0" meta:image-count="0" meta:object-count="0" meta:page-count="2" meta:paragraph-count="27" meta:word-count="103" meta:character-count="579"/>
    <dc:date>2020-12-23T17:02:30.55</dc:date>
    <dc:creator>David Jessop</dc:creator>
    <meta:editing-duration>PT5M20S</meta:editing-duration>
    <meta:editing-cycles>1</meta:editing-cycles>
    <meta:generator>OpenOffice/4.1.7$Win32 OpenOffice.org_project/417m1$Build-9800</meta:generator>
  </office:meta>
</office:document-meta>
</file>