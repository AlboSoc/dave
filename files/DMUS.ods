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55034">
            <text:p>550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39001">
            <text:p>139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39002">
            <text:p>139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0001">
            <text:p>150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002">
            <text:p>150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003">
            <text:p>1500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004">
            <text:p>1500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005">
            <text:p>1500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006">
            <text:p>15000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0101">
            <text:p>150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02">
            <text:p>150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03">
            <text:p>150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04">
            <text:p>150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05">
            <text:p>150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06">
            <text:p>150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07">
            <text:p>1501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08">
            <text:p>150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09">
            <text:p>1501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10">
            <text:p>150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11">
            <text:p>150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13">
            <text:p>1501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14">
            <text:p>150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15">
            <text:p>1501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18">
            <text:p>1501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19">
            <text:p>1501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20">
            <text:p>1501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21">
            <text:p>150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22">
            <text:p>150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23">
            <text:p>1501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24">
            <text:p>1501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25">
            <text:p>1501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26">
            <text:p>1501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27">
            <text:p>150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28">
            <text:p>1501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29">
            <text:p>1501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30">
            <text:p>1501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31">
            <text:p>1501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32">
            <text:p>1501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33">
            <text:p>1501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34">
            <text:p>1501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35">
            <text:p>1501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36">
            <text:p>1501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37">
            <text:p>1501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38">
            <text:p>1501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39">
            <text:p>1501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40">
            <text:p>1501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41">
            <text:p>1501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42">
            <text:p>1501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43">
            <text:p>15014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44">
            <text:p>1501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45">
            <text:p>1501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46">
            <text:p>1501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148">
            <text:p>1501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49">
            <text:p>1501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150">
            <text:p>1501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0201">
            <text:p>1502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02">
            <text:p>1502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03">
            <text:p>1502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04">
            <text:p>1502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05">
            <text:p>1502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06">
            <text:p>1502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07">
            <text:p>1502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08">
            <text:p>1502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10">
            <text:p>1502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11">
            <text:p>1502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13">
            <text:p>1502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14">
            <text:p>1502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15">
            <text:p>1502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16">
            <text:p>1502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17">
            <text:p>1502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18">
            <text:p>1502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19">
            <text:p>1502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20">
            <text:p>1502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21">
            <text:p>1502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22">
            <text:p>1502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23">
            <text:p>1502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24">
            <text:p>1502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25">
            <text:p>1502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26">
            <text:p>1502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28">
            <text:p>1502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29">
            <text:p>1502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30">
            <text:p>1502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31">
            <text:p>150231</text:p>
          </table:table-cell>
          <table:table-cell table:number-columns-repeated="2"/>
          <table:table-cell office:value-type="string">
            <text:p>CF</text:p>
          </table:table-cell>
          <table:table-cell table:number-columns-repeated="2"/>
        </table:table-row>
        <table:table-row table:style-name="ro1">
          <table:table-cell office:value-type="float" office:value="150232">
            <text:p>1502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33">
            <text:p>1502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34">
            <text:p>1502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35">
            <text:p>1502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36">
            <text:p>1502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37">
            <text:p>150237</text:p>
          </table:table-cell>
          <table:table-cell table:number-columns-repeated="2"/>
          <table:table-cell office:value-type="string">
            <text:p>CF</text:p>
          </table:table-cell>
          <table:table-cell table:number-columns-repeated="2"/>
        </table:table-row>
        <table:table-row table:style-name="ro1">
          <table:table-cell office:value-type="float" office:value="150238">
            <text:p>150238</text:p>
          </table:table-cell>
          <table:table-cell table:number-columns-repeated="2"/>
          <table:table-cell office:value-type="string">
            <text:p>EX</text:p>
          </table:table-cell>
          <table:table-cell table:number-columns-repeated="2"/>
        </table:table-row>
        <table:table-row table:style-name="ro1">
          <table:table-cell office:value-type="float" office:value="150239">
            <text:p>1502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40">
            <text:p>15024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41">
            <text:p>1502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42">
            <text:p>1502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43">
            <text:p>1502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44">
            <text:p>1502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45">
            <text:p>1502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46">
            <text:p>1502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47">
            <text:p>15024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48">
            <text:p>15024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49">
            <text:p>1502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50">
            <text:p>15025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51">
            <text:p>1502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52">
            <text:p>1502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53">
            <text:p>1502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54">
            <text:p>15025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55">
            <text:p>15025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56">
            <text:p>15025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57">
            <text:p>150257</text:p>
          </table:table-cell>
          <table:table-cell table:number-columns-repeated="2"/>
          <table:table-cell office:value-type="string">
            <text:p>CF</text:p>
          </table:table-cell>
          <table:table-cell table:number-columns-repeated="2"/>
        </table:table-row>
        <table:table-row table:style-name="ro1">
          <table:table-cell office:value-type="float" office:value="150258">
            <text:p>1502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59">
            <text:p>15025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0">
            <text:p>15026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1">
            <text:p>15026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2">
            <text:p>15026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3">
            <text:p>15026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4">
            <text:p>15026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5">
            <text:p>15026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6">
            <text:p>15026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7">
            <text:p>15026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68">
            <text:p>1502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69">
            <text:p>15026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70">
            <text:p>1502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71">
            <text:p>15027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72">
            <text:p>1502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73">
            <text:p>15027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74">
            <text:p>15027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75">
            <text:p>15027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76">
            <text:p>15027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77">
            <text:p>15027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78">
            <text:p>15027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79">
            <text:p>15027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0280">
            <text:p>15028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82">
            <text:p>15028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83">
            <text:p>15028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0284">
            <text:p>150284</text:p>
          </table:table-cell>
          <table:table-cell table:number-columns-repeated="2"/>
          <table:table-cell office:value-type="string">
            <text:p>CF</text:p>
          </table:table-cell>
          <table:table-cell table:number-columns-repeated="2"/>
        </table:table-row>
        <table:table-row table:style-name="ro1">
          <table:table-cell office:value-type="float" office:value="150285">
            <text:p>15028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3301">
            <text:p>1533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string">
            <text:p>STOERD</text:p>
          </table:table-cell>
        </table:table-row>
        <table:table-row table:style-name="ro1">
          <table:table-cell office:value-type="float" office:value="153303">
            <text:p>1533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04">
            <text:p>1533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string">
            <text:p>STOERD</text:p>
          </table:table-cell>
        </table:table-row>
        <table:table-row table:style-name="ro1">
          <table:table-cell office:value-type="float" office:value="153305">
            <text:p>1533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06">
            <text:p>1533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  <table:table-cell office:value-type="float" office:value="153906">
            <text:p>153906</text:p>
          </table:table-cell>
          <table:table-cell/>
        </table:table-row>
        <table:table-row table:style-name="ro1">
          <table:table-cell office:value-type="float" office:value="153307">
            <text:p>1533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08">
            <text:p>153308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09">
            <text:p>153309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09">
            <text:p>153909</text:p>
          </table:table-cell>
          <table:table-cell/>
        </table:table-row>
        <table:table-row table:style-name="ro1">
          <table:table-cell office:value-type="float" office:value="153310">
            <text:p>1533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  <table:table-cell office:value-type="float" office:value="153910">
            <text:p>153910</text:p>
          </table:table-cell>
          <table:table-cell/>
        </table:table-row>
        <table:table-row table:style-name="ro1">
          <table:table-cell office:value-type="float" office:value="153311">
            <text:p>153311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NR</text:p>
          </table:table-cell>
        </table:table-row>
        <table:table-row table:style-name="ro1">
          <table:table-cell office:value-type="float" office:value="153312">
            <text:p>1533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13">
            <text:p>153313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13">
            <text:p>153913</text:p>
          </table:table-cell>
          <table:table-cell/>
        </table:table-row>
        <table:table-row table:style-name="ro1">
          <table:table-cell office:value-type="float" office:value="143314">
            <text:p>143314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14">
            <text:p>153914</text:p>
          </table:table-cell>
          <table:table-cell/>
        </table:table-row>
        <table:table-row table:style-name="ro1">
          <table:table-cell office:value-type="float" office:value="153315">
            <text:p>1533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string">
            <text:p>STOERD</text:p>
          </table:table-cell>
        </table:table-row>
        <table:table-row table:style-name="ro1">
          <table:table-cell office:value-type="float" office:value="153317">
            <text:p>1533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18">
            <text:p>1533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19">
            <text:p>153319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20">
            <text:p>153320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21">
            <text:p>1533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  <table:table-cell office:value-type="float" office:value="153921">
            <text:p>153921</text:p>
          </table:table-cell>
          <table:table-cell/>
        </table:table-row>
        <table:table-row table:style-name="ro1">
          <table:table-cell office:value-type="float" office:value="153322">
            <text:p>153322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22">
            <text:p>153922</text:p>
          </table:table-cell>
          <table:table-cell/>
        </table:table-row>
        <table:table-row table:style-name="ro1">
          <table:table-cell office:value-type="float" office:value="153323">
            <text:p>1533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25">
            <text:p>1533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26">
            <text:p>153326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26">
            <text:p>153926</text:p>
          </table:table-cell>
          <table:table-cell/>
        </table:table-row>
        <table:table-row table:style-name="ro1">
          <table:table-cell office:value-type="float" office:value="153327">
            <text:p>1533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28">
            <text:p>1533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29">
            <text:p>1533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30">
            <text:p>1533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string">
            <text:p>STOERD</text:p>
          </table:table-cell>
        </table:table-row>
        <table:table-row table:style-name="ro1">
          <table:table-cell office:value-type="float" office:value="153331">
            <text:p>1533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32">
            <text:p>153332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33">
            <text:p>1533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34">
            <text:p>153334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35">
            <text:p>153335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35">
            <text:p>153935</text:p>
          </table:table-cell>
          <table:table-cell/>
        </table:table-row>
        <table:table-row table:style-name="ro1">
          <table:table-cell office:value-type="float" office:value="153351">
            <text:p>1533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53">
            <text:p>1533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54">
            <text:p>153354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55">
            <text:p>153355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56">
            <text:p>153356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57">
            <text:p>153357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58">
            <text:p>153358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60">
            <text:p>15336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string">
            <text:p>STOERD</text:p>
          </table:table-cell>
        </table:table-row>
        <table:table-row table:style-name="ro1">
          <table:table-cell office:value-type="float" office:value="153361">
            <text:p>15336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62">
            <text:p>15336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63">
            <text:p>153363</text:p>
          </table:table-cell>
          <table:table-cell table:number-columns-repeated="2"/>
          <table:table-cell office:value-type="string">
            <text:p>NL</text:p>
          </table:table-cell>
          <table:table-cell/>
          <table:table-cell office:value-type="string">
            <text:p>STOERD</text:p>
          </table:table-cell>
        </table:table-row>
        <table:table-row table:style-name="ro1">
          <table:table-cell office:value-type="float" office:value="153365">
            <text:p>153365</text:p>
          </table:table-cell>
          <table:table-cell table:number-columns-repeated="2"/>
          <table:table-cell office:value-type="string">
            <text:p>TS</text:p>
          </table:table-cell>
          <table:table-cell/>
          <table:table-cell office:value-type="string">
            <text:p>STOERD</text:p>
          </table:table-cell>
        </table:table-row>
        <table:table-row table:style-name="ro1">
          <table:table-cell office:value-type="float" office:value="153367">
            <text:p>15336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68">
            <text:p>153368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68">
            <text:p>153968</text:p>
          </table:table-cell>
          <table:table-cell/>
        </table:table-row>
        <table:table-row table:style-name="ro1">
          <table:table-cell office:value-type="float" office:value="153369">
            <text:p>15336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70">
            <text:p>15337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71">
            <text:p>153371</text:p>
          </table:table-cell>
          <table:table-cell table:number-columns-repeated="2"/>
          <table:table-cell office:value-type="string">
            <text:p>TS</text:p>
          </table:table-cell>
          <table:table-cell/>
          <table:table-cell office:value-type="string">
            <text:p>STOERD</text:p>
          </table:table-cell>
        </table:table-row>
        <table:table-row table:style-name="ro1">
          <table:table-cell office:value-type="float" office:value="153372">
            <text:p>153372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72">
            <text:p>153972</text:p>
          </table:table-cell>
          <table:table-cell/>
        </table:table-row>
        <table:table-row table:style-name="ro1">
          <table:table-cell office:value-type="float" office:value="153373">
            <text:p>15337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75">
            <text:p>153375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76">
            <text:p>153376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NR</text:p>
          </table:table-cell>
        </table:table-row>
        <table:table-row table:style-name="ro1">
          <table:table-cell office:value-type="float" office:value="153377">
            <text:p>15337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78">
            <text:p>15337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string">
            <text:p>STOERD</text:p>
          </table:table-cell>
        </table:table-row>
        <table:table-row table:style-name="ro1">
          <table:table-cell office:value-type="float" office:value="153379">
            <text:p>15337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80">
            <text:p>15338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3381">
            <text:p>153381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82">
            <text:p>153382</text:p>
          </table:table-cell>
          <table:table-cell office:value-type="string">
            <text:p>SEEN</text:p>
          </table:table-cell>
          <table:table-cell table:number-columns-repeated="2"/>
          <table:table-cell office:value-type="float" office:value="153982">
            <text:p>153982</text:p>
          </table:table-cell>
          <table:table-cell/>
        </table:table-row>
        <table:table-row table:style-name="ro1">
          <table:table-cell office:value-type="float" office:value="153383">
            <text:p>153383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STOERD</text:p>
          </table:table-cell>
        </table:table-row>
        <table:table-row table:style-name="ro1">
          <table:table-cell office:value-type="float" office:value="153384">
            <text:p>15338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3385">
            <text:p>153385</text:p>
          </table:table-cell>
          <table:table-cell office:value-type="string">
            <text:p>SEEN</text:p>
          </table:table-cell>
          <table:table-cell table:number-columns-repeated="3"/>
          <table:table-cell office:value-type="string">
            <text:p>N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5341">
            <text:p>1553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5342">
            <text:p>1553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5343">
            <text:p>1553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5344">
            <text:p>1553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5345">
            <text:p>1553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5346">
            <text:p>1553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5347">
            <text:p>1553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6401">
            <text:p>1564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02">
            <text:p>1564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03">
            <text:p>1564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04">
            <text:p>1564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05">
            <text:p>156405</text:p>
          </table:table-cell>
          <table:table-cell table:number-columns-repeated="2"/>
          <table:table-cell office:value-type="string">
            <text:p>DY</text:p>
          </table:table-cell>
          <table:table-cell table:number-columns-repeated="2"/>
        </table:table-row>
        <table:table-row table:style-name="ro1">
          <table:table-cell office:value-type="float" office:value="156406">
            <text:p>156406</text:p>
          </table:table-cell>
          <table:table-cell table:number-columns-repeated="2"/>
          <table:table-cell office:value-type="string">
            <text:p>DY</text:p>
          </table:table-cell>
          <table:table-cell table:number-columns-repeated="2"/>
        </table:table-row>
        <table:table-row table:style-name="ro1">
          <table:table-cell office:value-type="float" office:value="156408">
            <text:p>1564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10">
            <text:p>1564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11">
            <text:p>1564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12">
            <text:p>156412</text:p>
          </table:table-cell>
          <table:table-cell table:number-columns-repeated="5"/>
        </table:table-row>
        <table:table-row table:style-name="ro1">
          <table:table-cell office:value-type="float" office:value="156413">
            <text:p>1564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14">
            <text:p>1564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15">
            <text:p>1564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18">
            <text:p>1564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19">
            <text:p>1564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20">
            <text:p>1564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21">
            <text:p>1564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2">
            <text:p>1564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3">
            <text:p>1564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4">
            <text:p>1564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5">
            <text:p>1564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6">
            <text:p>1564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7">
            <text:p>1564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8">
            <text:p>1564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29">
            <text:p>1564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0">
            <text:p>1564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1">
            <text:p>1564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2">
            <text:p>1564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3">
            <text:p>1564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4">
            <text:p>1564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5">
            <text:p>1564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6">
            <text:p>1564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7">
            <text:p>1564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8">
            <text:p>1564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39">
            <text:p>15643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0">
            <text:p>15644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1">
            <text:p>1564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2">
            <text:p>1564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3">
            <text:p>1564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44">
            <text:p>1564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45">
            <text:p>1564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6">
            <text:p>1564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7">
            <text:p>15644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8">
            <text:p>15644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49">
            <text:p>15644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0">
            <text:p>15645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1">
            <text:p>1564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2">
            <text:p>1564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3">
            <text:p>15645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4">
            <text:p>1564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55">
            <text:p>1564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56">
            <text:p>15645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7">
            <text:p>15645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8">
            <text:p>15645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59">
            <text:p>15645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0">
            <text:p>15646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1">
            <text:p>15646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2">
            <text:p>15646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3">
            <text:p>15646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4">
            <text:p>15646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5">
            <text:p>15646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6">
            <text:p>15646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7">
            <text:p>15646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8">
            <text:p>15646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69">
            <text:p>15646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0">
            <text:p>156470</text:p>
          </table:table-cell>
          <table:table-cell office:value-type="string">
            <text:p>SEEN</text:p>
          </table:table-cell>
          <table:table-cell/>
          <table:table-cell office:value-type="string">
            <text:p>ST</text:p>
          </table:table-cell>
          <table:table-cell table:number-columns-repeated="2"/>
        </table:table-row>
        <table:table-row table:style-name="ro1">
          <table:table-cell office:value-type="float" office:value="156471">
            <text:p>15647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2">
            <text:p>15647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3">
            <text:p>156473</text:p>
          </table:table-cell>
          <table:table-cell office:value-type="string">
            <text:p>SEEN</text:p>
          </table:table-cell>
          <table:table-cell/>
          <table:table-cell office:value-type="string">
            <text:p>ST</text:p>
          </table:table-cell>
          <table:table-cell table:number-columns-repeated="2"/>
        </table:table-row>
        <table:table-row table:style-name="ro1">
          <table:table-cell office:value-type="float" office:value="156474">
            <text:p>15647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5">
            <text:p>15647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6">
            <text:p>15647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7">
            <text:p>15647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8">
            <text:p>15647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79">
            <text:p>15647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80">
            <text:p>15648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81">
            <text:p>15648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82">
            <text:p>15648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83">
            <text:p>15648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84">
            <text:p>15648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85">
            <text:p>15648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86">
            <text:p>15648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87">
            <text:p>15648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488">
            <text:p>15648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89">
            <text:p>15648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0">
            <text:p>15649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1">
            <text:p>15649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2">
            <text:p>15649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3">
            <text:p>15649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4">
            <text:p>15649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5">
            <text:p>15649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6">
            <text:p>15649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497">
            <text:p>156497</text:p>
          </table:table-cell>
          <table:table-cell office:value-type="string">
            <text:p>SEEN</text:p>
          </table:table-cell>
          <table:table-cell/>
          <table:table-cell office:value-type="string">
            <text:p>ST</text:p>
          </table:table-cell>
          <table:table-cell table:number-columns-repeated="2"/>
        </table:table-row>
        <table:table-row table:style-name="ro1">
          <table:table-cell office:value-type="float" office:value="156498">
            <text:p>15649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office:value-type="string">
            <text:p>ST</text:p>
          </table:table-cell>
          <table:table-cell table:number-columns-repeated="2"/>
        </table:table-row>
        <table:table-row table:style-name="ro1">
          <table:table-cell office:value-type="float" office:value="156499">
            <text:p>15649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6500">
            <text:p>15650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1">
            <text:p>1565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2">
            <text:p>1565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3">
            <text:p>1565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4">
            <text:p>1565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5">
            <text:p>1565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6">
            <text:p>1565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7">
            <text:p>1565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8">
            <text:p>1565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09">
            <text:p>1565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10">
            <text:p>1565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11">
            <text:p>1565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6512">
            <text:p>1565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13">
            <text:p>1565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6514">
            <text:p>1565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6907">
            <text:p>156907</text:p>
          </table:table-cell>
          <table:table-cell table:number-columns-repeated="2"/>
          <table:table-cell office:value-type="string">
            <text:p>N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8701">
            <text:p>158701</text:p>
          </table:table-cell>
          <table:table-cell table:number-columns-repeated="2"/>
          <table:table-cell office:value-type="string">
            <text:p>IS</text:p>
          </table:table-cell>
          <table:table-cell table:number-columns-repeated="2"/>
        </table:table-row>
        <table:table-row table:style-name="ro1">
          <table:table-cell office:value-type="float" office:value="158702">
            <text:p>1587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03">
            <text:p>1587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04">
            <text:p>1587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05">
            <text:p>1587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06">
            <text:p>158706</text:p>
          </table:table-cell>
          <table:table-cell table:number-columns-repeated="2"/>
          <table:table-cell office:value-type="string">
            <text:p>IS</text:p>
          </table:table-cell>
          <table:table-cell table:number-columns-repeated="2"/>
        </table:table-row>
        <table:table-row table:style-name="ro1">
          <table:table-cell office:value-type="float" office:value="158707">
            <text:p>1587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08">
            <text:p>1587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09">
            <text:p>1587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0">
            <text:p>1587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11">
            <text:p>1587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2">
            <text:p>1587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3">
            <text:p>1587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4">
            <text:p>1587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5">
            <text:p>1587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6">
            <text:p>1587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17">
            <text:p>1587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8">
            <text:p>1587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19">
            <text:p>1587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20">
            <text:p>158720</text:p>
          </table:table-cell>
          <table:table-cell table:number-columns-repeated="2"/>
          <table:table-cell office:value-type="string">
            <text:p>IS</text:p>
          </table:table-cell>
          <table:table-cell table:number-columns-repeated="2"/>
        </table:table-row>
        <table:table-row table:style-name="ro1">
          <table:table-cell office:value-type="float" office:value="158721">
            <text:p>1587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22">
            <text:p>158722</text:p>
          </table:table-cell>
          <table:table-cell table:number-columns-repeated="2"/>
          <table:table-cell office:value-type="string">
            <text:p>IS</text:p>
          </table:table-cell>
          <table:table-cell table:number-columns-repeated="2"/>
        </table:table-row>
        <table:table-row table:style-name="ro1">
          <table:table-cell office:value-type="float" office:value="158723">
            <text:p>1587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24">
            <text:p>158724</text:p>
          </table:table-cell>
          <table:table-cell table:number-columns-repeated="2"/>
          <table:table-cell office:value-type="string">
            <text:p>IS</text:p>
          </table:table-cell>
          <table:table-cell table:number-columns-repeated="2"/>
        </table:table-row>
        <table:table-row table:style-name="ro1">
          <table:table-cell office:value-type="float" office:value="158725">
            <text:p>1587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26">
            <text:p>1587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27">
            <text:p>1587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28">
            <text:p>1587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29">
            <text:p>1587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30">
            <text:p>1587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31">
            <text:p>158731</text:p>
          </table:table-cell>
          <table:table-cell table:number-columns-repeated="2"/>
          <table:table-cell office:value-type="string">
            <text:p>CK</text:p>
          </table:table-cell>
          <table:table-cell table:number-columns-repeated="2"/>
        </table:table-row>
        <table:table-row table:style-name="ro1">
          <table:table-cell office:value-type="float" office:value="158732">
            <text:p>1587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33">
            <text:p>1587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34">
            <text:p>1587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35">
            <text:p>1587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36">
            <text:p>1587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38">
            <text:p>1587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39">
            <text:p>158739</text:p>
          </table:table-cell>
          <table:table-cell table:number-columns-repeated="2"/>
          <table:table-cell office:value-type="string">
            <text:p>CK</text:p>
          </table:table-cell>
          <table:table-cell table:number-columns-repeated="2"/>
        </table:table-row>
        <table:table-row table:style-name="ro1">
          <table:table-cell office:value-type="float" office:value="158740">
            <text:p>15874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41">
            <text:p>1587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45">
            <text:p>1587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47">
            <text:p>1587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49">
            <text:p>15874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50">
            <text:p>15875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52">
            <text:p>1587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53">
            <text:p>1587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54">
            <text:p>15875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55">
            <text:p>15875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56">
            <text:p>1587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57">
            <text:p>1587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58">
            <text:p>1587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59">
            <text:p>1587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60">
            <text:p>15876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62">
            <text:p>15876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65">
            <text:p>15876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66">
            <text:p>15876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67">
            <text:p>15876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69">
            <text:p>15876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70">
            <text:p>1587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71">
            <text:p>15877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73">
            <text:p>15877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74">
            <text:p>15877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77">
            <text:p>15877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80">
            <text:p>15878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82">
            <text:p>15878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83">
            <text:p>15878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84">
            <text:p>15878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85">
            <text:p>15878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86">
            <text:p>15878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87">
            <text:p>15878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88">
            <text:p>15878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89">
            <text:p>15878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790">
            <text:p>15879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1">
            <text:p>15879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2">
            <text:p>15879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3">
            <text:p>15879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4">
            <text:p>15879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5">
            <text:p>15879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6">
            <text:p>15879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7">
            <text:p>15879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8">
            <text:p>15879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799">
            <text:p>15879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8806">
            <text:p>1588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0">
            <text:p>1588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2">
            <text:p>1588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3">
            <text:p>1588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5">
            <text:p>1588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6">
            <text:p>1588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7">
            <text:p>1588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8">
            <text:p>1588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19">
            <text:p>1588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0">
            <text:p>1588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21">
            <text:p>1588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2">
            <text:p>1588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3">
            <text:p>1588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4">
            <text:p>1588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25">
            <text:p>1588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6">
            <text:p>1588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7">
            <text:p>1588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8">
            <text:p>1588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29">
            <text:p>1588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0">
            <text:p>1588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1">
            <text:p>1588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32">
            <text:p>1588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3">
            <text:p>1588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4">
            <text:p>1588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5">
            <text:p>1588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36">
            <text:p>1588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7">
            <text:p>1588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8">
            <text:p>1588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39">
            <text:p>158839</text:p>
          </table:table-cell>
          <table:table-cell table:number-columns-repeated="2"/>
          <table:table-cell office:value-type="string">
            <text:p>CF</text:p>
          </table:table-cell>
          <table:table-cell table:number-columns-repeated="2"/>
        </table:table-row>
        <table:table-row table:style-name="ro1">
          <table:table-cell office:value-type="float" office:value="158840">
            <text:p>1588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1">
            <text:p>1588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42">
            <text:p>1588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3">
            <text:p>1588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4">
            <text:p>1588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5">
            <text:p>1588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6">
            <text:p>1588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7">
            <text:p>1588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8">
            <text:p>1588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49">
            <text:p>1588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0">
            <text:p>1588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1">
            <text:p>1588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2">
            <text:p>1588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3">
            <text:p>1588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4">
            <text:p>1588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5">
            <text:p>1588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6">
            <text:p>1588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7">
            <text:p>1588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8">
            <text:p>1588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59">
            <text:p>1588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0">
            <text:p>15886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1">
            <text:p>15886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2">
            <text:p>1588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3">
            <text:p>1588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4">
            <text:p>15886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5">
            <text:p>15886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6">
            <text:p>1588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7">
            <text:p>15886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8">
            <text:p>1588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69">
            <text:p>15886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70">
            <text:p>1588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71">
            <text:p>15887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72">
            <text:p>1588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80">
            <text:p>15888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81">
            <text:p>15888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82">
            <text:p>15888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83">
            <text:p>15888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84">
            <text:p>15888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85">
            <text:p>15888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86">
            <text:p>15888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887">
            <text:p>15888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88">
            <text:p>15888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89">
            <text:p>15888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890">
            <text:p>15889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8901">
            <text:p>1589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2">
            <text:p>1589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3">
            <text:p>1589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4">
            <text:p>1589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5">
            <text:p>1589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6">
            <text:p>1589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7">
            <text:p>1589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8">
            <text:p>1589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09">
            <text:p>1589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10">
            <text:p>1589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50">
            <text:p>1589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51">
            <text:p>1589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8958">
            <text:p>15895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8959">
            <text:p>15895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9001">
            <text:p>159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02">
            <text:p>159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03">
            <text:p>159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9004">
            <text:p>159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9005">
            <text:p>1590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06">
            <text:p>1590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07">
            <text:p>1590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08">
            <text:p>159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9009">
            <text:p>1590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0">
            <text:p>159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9011">
            <text:p>1590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2">
            <text:p>1590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3">
            <text:p>1590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4">
            <text:p>1590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5">
            <text:p>1590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6">
            <text:p>1590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7">
            <text:p>1590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8">
            <text:p>1590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19">
            <text:p>1590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20">
            <text:p>1590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021">
            <text:p>1590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9022">
            <text:p>1590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9101">
            <text:p>1591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102">
            <text:p>159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9103">
            <text:p>159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104">
            <text:p>1591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105">
            <text:p>1591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106">
            <text:p>159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59107">
            <text:p>159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59108">
            <text:p>159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5001">
            <text:p>165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02">
            <text:p>165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03">
            <text:p>165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04">
            <text:p>1650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05">
            <text:p>1650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06">
            <text:p>1650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07">
            <text:p>1650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08">
            <text:p>1650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09">
            <text:p>165009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5010">
            <text:p>1650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11">
            <text:p>1650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12">
            <text:p>1650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13">
            <text:p>165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14">
            <text:p>165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15">
            <text:p>1650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16">
            <text:p>1650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17">
            <text:p>1650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18">
            <text:p>1650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19">
            <text:p>165019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5020">
            <text:p>165020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5021">
            <text:p>1650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22">
            <text:p>165022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023">
            <text:p>1650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24">
            <text:p>1650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25">
            <text:p>165025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ST</text:p>
          </table:table-cell>
          <table:table-cell/>
        </table:table-row>
        <table:table-row table:style-name="ro1">
          <table:table-cell office:value-type="float" office:value="165026">
            <text:p>165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27">
            <text:p>1650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28">
            <text:p>1650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29">
            <text:p>1650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30">
            <text:p>1650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31">
            <text:p>1650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32">
            <text:p>1650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33">
            <text:p>1650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34">
            <text:p>1650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35">
            <text:p>1650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36">
            <text:p>1650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37">
            <text:p>1650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038">
            <text:p>1650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039">
            <text:p>16503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5101">
            <text:p>1651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2">
            <text:p>1651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3">
            <text:p>165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4">
            <text:p>1651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5">
            <text:p>1651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6">
            <text:p>165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7">
            <text:p>1651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8">
            <text:p>165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09">
            <text:p>1651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10">
            <text:p>1651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11">
            <text:p>165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112">
            <text:p>1651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13">
            <text:p>165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14">
            <text:p>1651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16">
            <text:p>1651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17">
            <text:p>1651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18">
            <text:p>1651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5119">
            <text:p>165119</text:p>
          </table:table-cell>
          <table:table-cell table:number-columns-repeated="2"/>
          <table:table-cell office:value-type="string">
            <text:p>PM</text:p>
          </table:table-cell>
          <table:table-cell table:number-columns-repeated="2"/>
        </table:table-row>
        <table:table-row table:style-name="ro1">
          <table:table-cell office:value-type="float" office:value="165120">
            <text:p>1651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21">
            <text:p>1651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22">
            <text:p>1651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23">
            <text:p>1651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24">
            <text:p>1651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25">
            <text:p>165125</text:p>
          </table:table-cell>
          <table:table-cell table:number-columns-repeated="2"/>
          <table:table-cell office:value-type="string">
            <text:p>PM</text:p>
          </table:table-cell>
          <table:table-cell table:number-columns-repeated="2"/>
        </table:table-row>
        <table:table-row table:style-name="ro1">
          <table:table-cell office:value-type="float" office:value="165126">
            <text:p>165126</text:p>
          </table:table-cell>
          <table:table-cell table:number-columns-repeated="2"/>
          <table:table-cell office:value-type="string">
            <text:p>RG</text:p>
          </table:table-cell>
          <table:table-cell table:number-columns-repeated="2"/>
        </table:table-row>
        <table:table-row table:style-name="ro1">
          <table:table-cell office:value-type="float" office:value="165127">
            <text:p>165127</text:p>
          </table:table-cell>
          <table:table-cell table:number-columns-repeated="2"/>
          <table:table-cell office:value-type="string">
            <text:p>RG</text:p>
          </table:table-cell>
          <table:table-cell table:number-columns-repeated="2"/>
        </table:table-row>
        <table:table-row table:style-name="ro1">
          <table:table-cell office:value-type="float" office:value="165128">
            <text:p>1651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29">
            <text:p>1651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30">
            <text:p>1651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31">
            <text:p>1651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32">
            <text:p>165132</text:p>
          </table:table-cell>
          <table:table-cell table:number-columns-repeated="2"/>
          <table:table-cell office:value-type="string">
            <text:p>PM</text:p>
          </table:table-cell>
          <table:table-cell table:number-columns-repeated="2"/>
        </table:table-row>
        <table:table-row table:style-name="ro1">
          <table:table-cell office:value-type="float" office:value="165133">
            <text:p>1651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34">
            <text:p>1651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35">
            <text:p>1651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36">
            <text:p>1651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5137">
            <text:p>165137</text:p>
          </table:table-cell>
          <table:table-cell table:number-columns-repeated="2"/>
          <table:table-cell office:value-type="string">
            <text:p>P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6201">
            <text:p>1662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02">
            <text:p>1662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03">
            <text:p>1662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04">
            <text:p>1662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05">
            <text:p>1662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06">
            <text:p>1662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6207">
            <text:p>1662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08">
            <text:p>1662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09">
            <text:p>1662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0">
            <text:p>1662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1">
            <text:p>166211</text:p>
          </table:table-cell>
          <table:table-cell table:number-columns-repeated="2"/>
          <table:table-cell office:value-type="string">
            <text:p>PM</text:p>
          </table:table-cell>
          <table:table-cell table:number-columns-repeated="2"/>
        </table:table-row>
        <table:table-row table:style-name="ro1">
          <table:table-cell office:value-type="float" office:value="166212">
            <text:p>1662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3">
            <text:p>1662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4">
            <text:p>1662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5">
            <text:p>1662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6">
            <text:p>1662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7">
            <text:p>166217</text:p>
          </table:table-cell>
          <table:table-cell table:number-columns-repeated="2"/>
          <table:table-cell office:value-type="string">
            <text:p>PM</text:p>
          </table:table-cell>
          <table:table-cell table:number-columns-repeated="2"/>
        </table:table-row>
        <table:table-row table:style-name="ro1">
          <table:table-cell office:value-type="float" office:value="166218">
            <text:p>1662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6219">
            <text:p>1662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6220">
            <text:p>1662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6221">
            <text:p>1662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8001">
            <text:p>168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002">
            <text:p>168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8003">
            <text:p>1680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004">
            <text:p>1680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005">
            <text:p>1680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8106">
            <text:p>168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107">
            <text:p>168107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108">
            <text:p>168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109">
            <text:p>1681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110">
            <text:p>1681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111">
            <text:p>1681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112">
            <text:p>168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8113">
            <text:p>168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8214">
            <text:p>1682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8215">
            <text:p>168215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216">
            <text:p>1682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217">
            <text:p>1682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68218">
            <text:p>1682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68219">
            <text:p>1682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8321">
            <text:p>168321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2">
            <text:p>168322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3">
            <text:p>168323</text:p>
          </table:table-cell>
          <table:table-cell/>
          <table:table-cell office:value-type="string">
            <text:p>XXXXXX</text:p>
          </table:table-cell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4">
            <text:p>168324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5">
            <text:p>168325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6">
            <text:p>168326</text:p>
          </table:table-cell>
          <table:table-cell/>
          <table:table-cell office:value-type="string">
            <text:p>XXXXXX</text:p>
          </table:table-cell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7">
            <text:p>168327</text:p>
          </table:table-cell>
          <table:table-cell/>
          <table:table-cell office:value-type="string">
            <text:p>XXXXXX</text:p>
          </table:table-cell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8">
            <text:p>168328</text:p>
          </table:table-cell>
          <table:table-cell/>
          <table:table-cell office:value-type="string">
            <text:p>XXXXXX</text:p>
          </table:table-cell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168329">
            <text:p>168329</text:p>
          </table:table-cell>
          <table:table-cell office:value-type="string">
            <text:p>SEEN</text:p>
          </table:table-cell>
          <table:table-cell/>
          <table:table-cell office:value-type="string">
            <text:p>A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0101">
            <text:p>170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102">
            <text:p>170102</text:p>
          </table:table-cell>
          <table:table-cell table:number-columns-repeated="2"/>
          <table:table-cell office:value-type="string">
            <text:p>TS</text:p>
          </table:table-cell>
          <table:table-cell table:number-columns-repeated="2"/>
        </table:table-row>
        <table:table-row table:style-name="ro1">
          <table:table-cell office:value-type="float" office:value="170103">
            <text:p>170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04">
            <text:p>1701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05">
            <text:p>170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106">
            <text:p>170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107">
            <text:p>1701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08">
            <text:p>170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09">
            <text:p>170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110">
            <text:p>170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111">
            <text:p>1701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12">
            <text:p>1701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13">
            <text:p>170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14">
            <text:p>1701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15">
            <text:p>1701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116">
            <text:p>1701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117">
            <text:p>1701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0201">
            <text:p>1702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202">
            <text:p>1702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203">
            <text:p>1702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204">
            <text:p>1702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205">
            <text:p>1702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206">
            <text:p>1702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207">
            <text:p>1702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208">
            <text:p>1702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270">
            <text:p>17027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271">
            <text:p>17027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272">
            <text:p>1702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273">
            <text:p>17027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0393">
            <text:p>17039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394">
            <text:p>17039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395">
            <text:p>17039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396">
            <text:p>17039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397">
            <text:p>17039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398">
            <text:p>17039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0401">
            <text:p>1704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02">
            <text:p>1704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03">
            <text:p>1704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04">
            <text:p>1704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05">
            <text:p>1704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06">
            <text:p>1704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07">
            <text:p>1704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08">
            <text:p>1704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09">
            <text:p>1704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10">
            <text:p>1704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11">
            <text:p>1704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12">
            <text:p>1704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13">
            <text:p>1704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14">
            <text:p>170414</text:p>
          </table:table-cell>
          <table:table-cell table:number-columns-repeated="2"/>
          <table:table-cell office:value-type="string">
            <text:p>HA</text:p>
          </table:table-cell>
          <table:table-cell table:number-columns-repeated="2"/>
        </table:table-row>
        <table:table-row table:style-name="ro1">
          <table:table-cell office:value-type="float" office:value="170415">
            <text:p>1704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16">
            <text:p>1704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17">
            <text:p>1704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18">
            <text:p>1704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19">
            <text:p>1704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20">
            <text:p>1704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22">
            <text:p>170422</text:p>
          </table:table-cell>
          <table:table-cell table:number-columns-repeated="5"/>
        </table:table-row>
        <table:table-row table:style-name="ro1">
          <table:table-cell office:value-type="float" office:value="170423">
            <text:p>170423</text:p>
          </table:table-cell>
          <table:table-cell table:number-columns-repeated="5"/>
        </table:table-row>
        <table:table-row table:style-name="ro1">
          <table:table-cell office:value-type="float" office:value="170424">
            <text:p>1704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25">
            <text:p>1704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26">
            <text:p>1704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27">
            <text:p>1704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28">
            <text:p>1704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29">
            <text:p>1704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30">
            <text:p>1704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31">
            <text:p>1704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32">
            <text:p>1704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33">
            <text:p>1704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34">
            <text:p>1704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50">
            <text:p>17045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51">
            <text:p>1704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52">
            <text:p>1704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53">
            <text:p>1704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54">
            <text:p>1704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55">
            <text:p>1704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56">
            <text:p>1704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57">
            <text:p>1704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58">
            <text:p>1704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59">
            <text:p>1704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60">
            <text:p>17046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61">
            <text:p>17046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70">
            <text:p>17047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71">
            <text:p>17047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472">
            <text:p>1704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73">
            <text:p>17047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74">
            <text:p>17047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75">
            <text:p>17047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76">
            <text:p>17047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77">
            <text:p>17047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478">
            <text:p>17047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0501">
            <text:p>1705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02">
            <text:p>1705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03">
            <text:p>1705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04">
            <text:p>1705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05">
            <text:p>1705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06">
            <text:p>1705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07">
            <text:p>1705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08">
            <text:p>1705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09">
            <text:p>1705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10">
            <text:p>1705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11">
            <text:p>1705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12">
            <text:p>1705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13">
            <text:p>170513</text:p>
          </table:table-cell>
          <table:table-cell table:number-columns-repeated="2"/>
          <table:table-cell office:value-type="string">
            <text:p>DY</text:p>
          </table:table-cell>
          <table:table-cell table:number-columns-repeated="2"/>
        </table:table-row>
        <table:table-row table:style-name="ro1">
          <table:table-cell office:value-type="float" office:value="170514">
            <text:p>1705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15">
            <text:p>1705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516">
            <text:p>1705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17">
            <text:p>1705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30">
            <text:p>170530</text:p>
          </table:table-cell>
          <table:table-cell table:number-columns-repeated="5"/>
        </table:table-row>
        <table:table-row table:style-name="ro1">
          <table:table-cell office:value-type="float" office:value="170531">
            <text:p>170531</text:p>
          </table:table-cell>
          <table:table-cell table:number-columns-repeated="5"/>
        </table:table-row>
        <table:table-row table:style-name="ro1">
          <table:table-cell office:value-type="float" office:value="170532">
            <text:p>170532</text:p>
          </table:table-cell>
          <table:table-cell table:number-columns-repeated="5"/>
        </table:table-row>
        <table:table-row table:style-name="ro1">
          <table:table-cell office:value-type="float" office:value="170533">
            <text:p>1705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534">
            <text:p>170534</text:p>
          </table:table-cell>
          <table:table-cell table:number-columns-repeated="5"/>
        </table:table-row>
        <table:table-row table:style-name="ro1">
          <table:table-cell office:value-type="float" office:value="170535">
            <text:p>1705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0618">
            <text:p>170618</text:p>
          </table:table-cell>
          <table:table-cell table:number-columns-repeated="2"/>
          <table:table-cell office:value-type="string">
            <text:p>DY</text:p>
          </table:table-cell>
          <table:table-cell table:number-columns-repeated="2"/>
        </table:table-row>
        <table:table-row table:style-name="ro1">
          <table:table-cell office:value-type="float" office:value="170619">
            <text:p>170619</text:p>
          </table:table-cell>
          <table:table-cell/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620">
            <text:p>1706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621">
            <text:p>170621</text:p>
          </table:table-cell>
          <table:table-cell table:number-columns-repeated="5"/>
        </table:table-row>
        <table:table-row table:style-name="ro1">
          <table:table-cell office:value-type="float" office:value="170622">
            <text:p>170622</text:p>
          </table:table-cell>
          <table:table-cell/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623">
            <text:p>170623</text:p>
          </table:table-cell>
          <table:table-cell table:number-columns-repeated="5"/>
        </table:table-row>
        <table:table-row table:style-name="ro1">
          <table:table-cell office:value-type="float" office:value="170636">
            <text:p>1706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637">
            <text:p>1706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0638">
            <text:p>1706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0639">
            <text:p>17063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1201">
            <text:p>17120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1721">
            <text:p>1717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727">
            <text:p>1717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728">
            <text:p>1717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729">
            <text:p>1717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1730">
            <text:p>1717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1801">
            <text:p>1718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2">
            <text:p>1718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3">
            <text:p>1718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4">
            <text:p>1718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5">
            <text:p>1718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6">
            <text:p>1718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7">
            <text:p>1718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8">
            <text:p>1718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09">
            <text:p>171809</text:p>
          </table:table-cell>
          <table:table-cell table:number-columns-repeated="5"/>
        </table:table-row>
        <table:table-row table:style-name="ro1">
          <table:table-cell office:value-type="float" office:value="171810">
            <text:p>171810</text:p>
          </table:table-cell>
          <table:table-cell table:number-columns-repeated="5"/>
        </table:table-row>
        <table:table-row table:style-name="ro1">
          <table:table-cell office:value-type="float" office:value="171811">
            <text:p>1718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1812">
            <text:p>17181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2001">
            <text:p>172001</text:p>
          </table:table-cell>
          <table:table-cell table:number-columns-repeated="2"/>
          <table:table-cell office:value-type="string">
            <text:p>TS</text:p>
          </table:table-cell>
          <table:table-cell table:number-columns-repeated="2"/>
        </table:table-row>
        <table:table-row table:style-name="ro1">
          <table:table-cell office:value-type="float" office:value="172002">
            <text:p>172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003">
            <text:p>1720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004">
            <text:p>1720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005">
            <text:p>1720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006">
            <text:p>1720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007">
            <text:p>172007</text:p>
          </table:table-cell>
          <table:table-cell table:number-columns-repeated="2"/>
          <table:table-cell office:value-type="string">
            <text:p>TS</text:p>
          </table:table-cell>
          <table:table-cell table:number-columns-repeated="2"/>
        </table:table-row>
        <table:table-row table:style-name="ro1">
          <table:table-cell office:value-type="float" office:value="172008">
            <text:p>1720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2101">
            <text:p>1721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102">
            <text:p>172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2103">
            <text:p>172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104">
            <text:p>172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2211">
            <text:p>1722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12">
            <text:p>1722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13">
            <text:p>1722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14">
            <text:p>1722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15">
            <text:p>1722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16">
            <text:p>1722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17">
            <text:p>1722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2218">
            <text:p>1722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19">
            <text:p>1722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20">
            <text:p>1722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21">
            <text:p>1722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222">
            <text:p>1722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2331">
            <text:p>1723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2">
            <text:p>1723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3">
            <text:p>1723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4">
            <text:p>1723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5">
            <text:p>1723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6">
            <text:p>1723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7">
            <text:p>1723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8">
            <text:p>1723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39">
            <text:p>17233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40">
            <text:p>172340</text:p>
          </table:table-cell>
          <table:table-cell table:number-columns-repeated="2"/>
          <table:table-cell office:value-type="string">
            <text:p>TS</text:p>
          </table:table-cell>
          <table:table-cell table:number-columns-repeated="2"/>
        </table:table-row>
        <table:table-row table:style-name="ro1">
          <table:table-cell office:value-type="float" office:value="172341">
            <text:p>1723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42">
            <text:p>1723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43">
            <text:p>17234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2344">
            <text:p>1723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2345">
            <text:p>1723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001">
            <text:p>175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5002">
            <text:p>175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003">
            <text:p>175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004">
            <text:p>175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005">
            <text:p>175005</text:p>
          </table:table-cell>
          <table:table-cell table:number-columns-repeated="2"/>
          <table:table-cell office:value-type="string">
            <text:p>CH</text:p>
          </table:table-cell>
          <table:table-cell table:number-columns-repeated="2"/>
        </table:table-row>
        <table:table-row table:style-name="ro1">
          <table:table-cell office:value-type="float" office:value="175006">
            <text:p>175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007">
            <text:p>175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008">
            <text:p>175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009">
            <text:p>1750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5010">
            <text:p>175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011">
            <text:p>175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101">
            <text:p>175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02">
            <text:p>175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03">
            <text:p>175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5104">
            <text:p>175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05">
            <text:p>175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06">
            <text:p>175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07">
            <text:p>175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08">
            <text:p>175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09">
            <text:p>175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10">
            <text:p>175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11">
            <text:p>175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12">
            <text:p>1751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75113">
            <text:p>1751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14">
            <text:p>175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15">
            <text:p>1751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75116">
            <text:p>1751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0101">
            <text:p>1801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80102">
            <text:p>180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03">
            <text:p>180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04">
            <text:p>1801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80105">
            <text:p>180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06">
            <text:p>180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07">
            <text:p>180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08">
            <text:p>180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09">
            <text:p>180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10">
            <text:p>180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11">
            <text:p>180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12">
            <text:p>180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13">
            <text:p>1801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0114">
            <text:p>180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5101">
            <text:p>185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2">
            <text:p>185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3">
            <text:p>185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4">
            <text:p>185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5">
            <text:p>185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6">
            <text:p>185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7">
            <text:p>185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8">
            <text:p>185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09">
            <text:p>185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0">
            <text:p>185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1">
            <text:p>185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2">
            <text:p>185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3">
            <text:p>1851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4">
            <text:p>185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5">
            <text:p>1851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6">
            <text:p>1851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7">
            <text:p>1851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8">
            <text:p>1851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19">
            <text:p>1851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0">
            <text:p>1851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1">
            <text:p>185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2">
            <text:p>185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3">
            <text:p>1851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4">
            <text:p>1851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5">
            <text:p>185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6">
            <text:p>1851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7">
            <text:p>185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8">
            <text:p>1851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29">
            <text:p>1851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0">
            <text:p>1851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1">
            <text:p>1851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2">
            <text:p>1851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3">
            <text:p>1851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4">
            <text:p>1851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5">
            <text:p>1851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6">
            <text:p>1851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7">
            <text:p>1851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8">
            <text:p>1851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39">
            <text:p>1851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0">
            <text:p>1851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1">
            <text:p>18514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2">
            <text:p>1851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3">
            <text:p>1851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4">
            <text:p>1851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5">
            <text:p>1851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6">
            <text:p>1851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7">
            <text:p>1851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8">
            <text:p>1851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49">
            <text:p>1851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50">
            <text:p>1851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85151">
            <text:p>1851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5001">
            <text:p>195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02">
            <text:p>195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03">
            <text:p>1950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04">
            <text:p>1950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05">
            <text:p>195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06">
            <text:p>1950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07">
            <text:p>195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08">
            <text:p>1950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09">
            <text:p>1950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10">
            <text:p>1950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11">
            <text:p>1950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12">
            <text:p>1950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13">
            <text:p>195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14">
            <text:p>195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15">
            <text:p>1950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16">
            <text:p>1950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17">
            <text:p>1950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18">
            <text:p>1950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19">
            <text:p>1950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20">
            <text:p>195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021">
            <text:p>1950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22">
            <text:p>1950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23">
            <text:p>1950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24">
            <text:p>1950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025">
            <text:p>1950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5101">
            <text:p>1951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02">
            <text:p>1951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03">
            <text:p>195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04">
            <text:p>195104</text:p>
          </table:table-cell>
          <table:table-cell table:number-columns-repeated="2"/>
          <table:table-cell office:value-type="string">
            <text:p>NH</text:p>
          </table:table-cell>
          <table:table-cell table:number-columns-repeated="2"/>
        </table:table-row>
        <table:table-row table:style-name="ro1">
          <table:table-cell office:value-type="float" office:value="195105">
            <text:p>1951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06">
            <text:p>195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07">
            <text:p>1951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08">
            <text:p>195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09">
            <text:p>1951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0">
            <text:p>1951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1">
            <text:p>1951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2">
            <text:p>1951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3">
            <text:p>195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4">
            <text:p>1951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5">
            <text:p>1951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6">
            <text:p>1951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7">
            <text:p>195117</text:p>
          </table:table-cell>
          <table:table-cell table:number-columns-repeated="2"/>
          <table:table-cell office:value-type="string">
            <text:p>NH</text:p>
          </table:table-cell>
          <table:table-cell table:number-columns-repeated="2"/>
        </table:table-row>
        <table:table-row table:style-name="ro1">
          <table:table-cell office:value-type="float" office:value="195118">
            <text:p>1951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19">
            <text:p>1951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0">
            <text:p>1951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1">
            <text:p>1951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2">
            <text:p>1951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3">
            <text:p>1951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4">
            <text:p>1951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5">
            <text:p>1951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6">
            <text:p>1951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7">
            <text:p>1951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28">
            <text:p>195128</text:p>
          </table:table-cell>
          <table:table-cell table:number-columns-repeated="2"/>
          <table:table-cell office:value-type="string">
            <text:p>NH</text:p>
          </table:table-cell>
          <table:table-cell table:number-columns-repeated="2"/>
        </table:table-row>
        <table:table-row table:style-name="ro1">
          <table:table-cell office:value-type="float" office:value="195129">
            <text:p>195129</text:p>
          </table:table-cell>
          <table:table-cell table:number-columns-repeated="2"/>
          <table:table-cell office:value-type="string">
            <text:p>NH</text:p>
          </table:table-cell>
          <table:table-cell table:number-columns-repeated="2"/>
        </table:table-row>
        <table:table-row table:style-name="ro1">
          <table:table-cell office:value-type="float" office:value="195130">
            <text:p>1951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31">
            <text:p>1951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5132">
            <text:p>1951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195133">
            <text:p>1951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6001">
            <text:p>196001</text:p>
          </table:table-cell>
          <table:table-cell table:number-columns-repeated="5"/>
        </table:table-row>
        <table:table-row table:style-name="ro1">
          <table:table-cell office:value-type="float" office:value="196002">
            <text:p>196002</text:p>
          </table:table-cell>
          <table:table-cell table:number-columns-repeated="5"/>
        </table:table-row>
        <table:table-row table:style-name="ro1">
          <table:table-cell office:value-type="float" office:value="196003">
            <text:p>196003</text:p>
          </table:table-cell>
          <table:table-cell table:number-columns-repeated="5"/>
        </table:table-row>
        <table:table-row table:style-name="ro1">
          <table:table-cell office:value-type="float" office:value="196004">
            <text:p>196004</text:p>
          </table:table-cell>
          <table:table-cell table:number-columns-repeated="5"/>
        </table:table-row>
        <table:table-row table:style-name="ro1">
          <table:table-cell office:value-type="float" office:value="196005">
            <text:p>196005</text:p>
          </table:table-cell>
          <table:table-cell table:number-columns-repeated="5"/>
        </table:table-row>
        <table:table-row table:style-name="ro1">
          <table:table-cell office:value-type="float" office:value="196007">
            <text:p>196007</text:p>
          </table:table-cell>
          <table:table-cell table:number-columns-repeated="5"/>
        </table:table-row>
        <table:table-row table:style-name="ro1">
          <table:table-cell office:value-type="float" office:value="196008">
            <text:p>196008</text:p>
          </table:table-cell>
          <table:table-cell table:number-columns-repeated="5"/>
        </table:table-row>
        <table:table-row table:style-name="ro1">
          <table:table-cell office:value-type="float" office:value="196009">
            <text:p>196009</text:p>
          </table:table-cell>
          <table:table-cell table:number-columns-repeated="5"/>
        </table:table-row>
        <table:table-row table:style-name="ro1">
          <table:table-cell office:value-type="float" office:value="196010">
            <text:p>196010</text:p>
          </table:table-cell>
          <table:table-cell table:number-columns-repeated="5"/>
        </table:table-row>
        <table:table-row table:style-name="ro1">
          <table:table-cell office:value-type="float" office:value="196011">
            <text:p>196011</text:p>
          </table:table-cell>
          <table:table-cell table:number-columns-repeated="5"/>
        </table:table-row>
        <table:table-row table:style-name="ro1">
          <table:table-cell office:value-type="float" office:value="196012">
            <text:p>19601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6101">
            <text:p>196101</text:p>
          </table:table-cell>
          <table:table-cell table:number-columns-repeated="5"/>
        </table:table-row>
        <table:table-row table:style-name="ro1">
          <table:table-cell office:value-type="float" office:value="196102">
            <text:p>196102</text:p>
          </table:table-cell>
          <table:table-cell table:number-columns-repeated="5"/>
        </table:table-row>
        <table:table-row table:style-name="ro1">
          <table:table-cell office:value-type="float" office:value="196103">
            <text:p>196103</text:p>
          </table:table-cell>
          <table:table-cell table:number-columns-repeated="5"/>
        </table:table-row>
        <table:table-row table:style-name="ro1">
          <table:table-cell office:value-type="float" office:value="196104">
            <text:p>1961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6105">
            <text:p>196105</text:p>
          </table:table-cell>
          <table:table-cell table:number-columns-repeated="5"/>
        </table:table-row>
        <table:table-row table:style-name="ro1">
          <table:table-cell office:value-type="float" office:value="196106">
            <text:p>196106</text:p>
          </table:table-cell>
          <table:table-cell table:number-columns-repeated="5"/>
        </table:table-row>
        <table:table-row table:style-name="ro1">
          <table:table-cell office:value-type="float" office:value="196107">
            <text:p>196107</text:p>
          </table:table-cell>
          <table:table-cell table:number-columns-repeated="5"/>
        </table:table-row>
        <table:table-row table:style-name="ro1">
          <table:table-cell office:value-type="float" office:value="196108">
            <text:p>196108</text:p>
          </table:table-cell>
          <table:table-cell table:number-columns-repeated="5"/>
        </table:table-row>
        <table:table-row table:style-name="ro1">
          <table:table-cell office:value-type="float" office:value="196109">
            <text:p>196109</text:p>
          </table:table-cell>
          <table:table-cell table:number-columns-repeated="5"/>
        </table:table-row>
        <table:table-row table:style-name="ro1">
          <table:table-cell office:value-type="float" office:value="196110">
            <text:p>196110</text:p>
          </table:table-cell>
          <table:table-cell table:number-columns-repeated="5"/>
        </table:table-row>
        <table:table-row table:style-name="ro1">
          <table:table-cell office:value-type="float" office:value="196111">
            <text:p>196111</text:p>
          </table:table-cell>
          <table:table-cell table:number-columns-repeated="5"/>
        </table:table-row>
        <table:table-row table:style-name="ro1">
          <table:table-cell office:value-type="float" office:value="196112">
            <text:p>196112</text:p>
          </table:table-cell>
          <table:table-cell table:number-columns-repeated="5"/>
        </table:table-row>
        <table:table-row table:style-name="ro1">
          <table:table-cell office:value-type="float" office:value="196113">
            <text:p>196113</text:p>
          </table:table-cell>
          <table:table-cell table:number-columns-repeated="5"/>
        </table:table-row>
        <table:table-row table:style-name="ro1">
          <table:table-cell office:value-type="float" office:value="196114">
            <text:p>19611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7001">
            <text:p>197001</text:p>
          </table:table-cell>
          <table:table-cell table:number-columns-repeated="5"/>
        </table:table-row>
        <table:table-row table:style-name="ro1">
          <table:table-cell office:value-type="float" office:value="197002">
            <text:p>197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197003">
            <text:p>197003</text:p>
          </table:table-cell>
          <table:table-cell table:number-columns-repeated="5"/>
        </table:table-row>
        <table:table-row table:style-name="ro1">
          <table:table-cell office:value-type="float" office:value="197004">
            <text:p>197004</text:p>
          </table:table-cell>
          <table:table-cell table:number-columns-repeated="5"/>
        </table:table-row>
        <table:table-row table:style-name="ro1">
          <table:table-cell office:value-type="float" office:value="197005">
            <text:p>197005</text:p>
          </table:table-cell>
          <table:table-cell table:number-columns-repeated="5"/>
        </table:table-row>
        <table:table-row table:style-name="ro1">
          <table:table-cell office:value-type="float" office:value="197006">
            <text:p>197006</text:p>
          </table:table-cell>
          <table:table-cell table:number-columns-repeated="5"/>
        </table:table-row>
        <table:table-row table:style-name="ro1">
          <table:table-cell office:value-type="float" office:value="197007">
            <text:p>197007</text:p>
          </table:table-cell>
          <table:table-cell table:number-columns-repeated="5"/>
        </table:table-row>
        <table:table-row table:style-name="ro1">
          <table:table-cell office:value-type="float" office:value="197008">
            <text:p>197008</text:p>
          </table:table-cell>
          <table:table-cell table:number-columns-repeated="5"/>
        </table:table-row>
        <table:table-row table:style-name="ro1">
          <table:table-cell office:value-type="float" office:value="197009">
            <text:p>197009</text:p>
          </table:table-cell>
          <table:table-cell table:number-columns-repeated="5"/>
        </table:table-row>
        <table:table-row table:style-name="ro1">
          <table:table-cell office:value-type="float" office:value="197010">
            <text:p>197010</text:p>
          </table:table-cell>
          <table:table-cell table:number-columns-repeated="5"/>
        </table:table-row>
        <table:table-row table:style-name="ro1">
          <table:table-cell office:value-type="float" office:value="197011">
            <text:p>197011</text:p>
          </table:table-cell>
          <table:table-cell table:number-columns-repeated="5"/>
        </table:table-row>
        <table:table-row table:style-name="ro1">
          <table:table-cell office:value-type="float" office:value="197012">
            <text:p>197012</text:p>
          </table:table-cell>
          <table:table-cell table:number-columns-repeated="5"/>
        </table:table-row>
        <table:table-row table:style-name="ro1">
          <table:table-cell office:value-type="float" office:value="197013">
            <text:p>197013</text:p>
          </table:table-cell>
          <table:table-cell table:number-columns-repeated="5"/>
        </table:table-row>
        <table:table-row table:style-name="ro1">
          <table:table-cell office:value-type="float" office:value="197014">
            <text:p>197014</text:p>
          </table:table-cell>
          <table:table-cell table:number-columns-repeated="5"/>
        </table:table-row>
        <table:table-row table:style-name="ro1">
          <table:table-cell office:value-type="float" office:value="197015">
            <text:p>197015</text:p>
          </table:table-cell>
          <table:table-cell table:number-columns-repeated="5"/>
        </table:table-row>
        <table:table-row table:style-name="ro1">
          <table:table-cell office:value-type="float" office:value="197016">
            <text:p>197016</text:p>
          </table:table-cell>
          <table:table-cell table:number-columns-repeated="5"/>
        </table:table-row>
        <table:table-row table:style-name="ro1">
          <table:table-cell office:value-type="float" office:value="197017">
            <text:p>197017</text:p>
          </table:table-cell>
          <table:table-cell table:number-columns-repeated="5"/>
        </table:table-row>
        <table:table-row table:style-name="ro1">
          <table:table-cell office:value-type="float" office:value="197018">
            <text:p>197018</text:p>
          </table:table-cell>
          <table:table-cell table:number-columns-repeated="5"/>
        </table:table-row>
        <table:table-row table:style-name="ro1">
          <table:table-cell office:value-type="float" office:value="197019">
            <text:p>197019</text:p>
          </table:table-cell>
          <table:table-cell table:number-columns-repeated="5"/>
        </table:table-row>
        <table:table-row table:style-name="ro1">
          <table:table-cell office:value-type="float" office:value="197020">
            <text:p>197020</text:p>
          </table:table-cell>
          <table:table-cell table:number-columns-repeated="5"/>
        </table:table-row>
        <table:table-row table:style-name="ro1">
          <table:table-cell office:value-type="float" office:value="197021">
            <text:p>197021</text:p>
          </table:table-cell>
          <table:table-cell table:number-columns-repeated="5"/>
        </table:table-row>
        <table:table-row table:style-name="ro1">
          <table:table-cell office:value-type="float" office:value="197022">
            <text:p>197022</text:p>
          </table:table-cell>
          <table:table-cell table:number-columns-repeated="5"/>
        </table:table-row>
        <table:table-row table:style-name="ro1">
          <table:table-cell office:value-type="float" office:value="197023">
            <text:p>197023</text:p>
          </table:table-cell>
          <table:table-cell table:number-columns-repeated="5"/>
        </table:table-row>
        <table:table-row table:style-name="ro1">
          <table:table-cell office:value-type="float" office:value="197024">
            <text:p>197024</text:p>
          </table:table-cell>
          <table:table-cell table:number-columns-repeated="5"/>
        </table:table-row>
        <table:table-row table:style-name="ro1">
          <table:table-cell office:value-type="float" office:value="197025">
            <text:p>197025</text:p>
          </table:table-cell>
          <table:table-cell table:number-columns-repeated="5"/>
        </table:table-row>
        <table:table-row table:style-name="ro1">
          <table:table-cell office:value-type="float" office:value="197026">
            <text:p>197026</text:p>
          </table:table-cell>
          <table:table-cell table:number-columns-repeated="5"/>
        </table:table-row>
        <table:table-row table:style-name="ro1">
          <table:table-cell office:value-type="float" office:value="197027">
            <text:p>197027</text:p>
          </table:table-cell>
          <table:table-cell table:number-columns-repeated="5"/>
        </table:table-row>
        <table:table-row table:style-name="ro1">
          <table:table-cell office:value-type="float" office:value="197028">
            <text:p>197028</text:p>
          </table:table-cell>
          <table:table-cell table:number-columns-repeated="5"/>
        </table:table-row>
        <table:table-row table:style-name="ro1">
          <table:table-cell office:value-type="float" office:value="197029">
            <text:p>197029</text:p>
          </table:table-cell>
          <table:table-cell table:number-columns-repeated="5"/>
        </table:table-row>
        <table:table-row table:style-name="ro1">
          <table:table-cell office:value-type="float" office:value="197030">
            <text:p>197030</text:p>
          </table:table-cell>
          <table:table-cell table:number-columns-repeated="5"/>
        </table:table-row>
        <table:table-row table:style-name="ro1">
          <table:table-cell office:value-type="float" office:value="197031">
            <text:p>197031</text:p>
          </table:table-cell>
          <table:table-cell table:number-columns-repeated="5"/>
        </table:table-row>
        <table:table-row table:style-name="ro1">
          <table:table-cell office:value-type="float" office:value="197032">
            <text:p>197032</text:p>
          </table:table-cell>
          <table:table-cell table:number-columns-repeated="5"/>
        </table:table-row>
        <table:table-row table:style-name="ro1">
          <table:table-cell office:value-type="float" office:value="197033">
            <text:p>197033</text:p>
          </table:table-cell>
          <table:table-cell table:number-columns-repeated="5"/>
        </table:table-row>
        <table:table-row table:style-name="ro1">
          <table:table-cell office:value-type="float" office:value="197034">
            <text:p>197034</text:p>
          </table:table-cell>
          <table:table-cell table:number-columns-repeated="5"/>
        </table:table-row>
        <table:table-row table:style-name="ro1">
          <table:table-cell office:value-type="float" office:value="197035">
            <text:p>197035</text:p>
          </table:table-cell>
          <table:table-cell table:number-columns-repeated="5"/>
        </table:table-row>
        <table:table-row table:style-name="ro1">
          <table:table-cell office:value-type="float" office:value="197036">
            <text:p>197036</text:p>
          </table:table-cell>
          <table:table-cell table:number-columns-repeated="5"/>
        </table:table-row>
        <table:table-row table:style-name="ro1">
          <table:table-cell office:value-type="float" office:value="197037">
            <text:p>197037</text:p>
          </table:table-cell>
          <table:table-cell table:number-columns-repeated="5"/>
        </table:table-row>
        <table:table-row table:style-name="ro1">
          <table:table-cell office:value-type="float" office:value="197038">
            <text:p>197038</text:p>
          </table:table-cell>
          <table:table-cell table:number-columns-repeated="5"/>
        </table:table-row>
        <table:table-row table:style-name="ro1">
          <table:table-cell office:value-type="float" office:value="197039">
            <text:p>197039</text:p>
          </table:table-cell>
          <table:table-cell table:number-columns-repeated="5"/>
        </table:table-row>
        <table:table-row table:style-name="ro1">
          <table:table-cell office:value-type="float" office:value="197040">
            <text:p>197040</text:p>
          </table:table-cell>
          <table:table-cell table:number-columns-repeated="5"/>
        </table:table-row>
        <table:table-row table:style-name="ro1">
          <table:table-cell office:value-type="float" office:value="197041">
            <text:p>197041</text:p>
          </table:table-cell>
          <table:table-cell table:number-columns-repeated="5"/>
        </table:table-row>
        <table:table-row table:style-name="ro1">
          <table:table-cell office:value-type="float" office:value="197042">
            <text:p>197042</text:p>
          </table:table-cell>
          <table:table-cell table:number-columns-repeated="5"/>
        </table:table-row>
        <table:table-row table:style-name="ro1">
          <table:table-cell office:value-type="float" office:value="197043">
            <text:p>197043</text:p>
          </table:table-cell>
          <table:table-cell table:number-columns-repeated="5"/>
        </table:table-row>
        <table:table-row table:style-name="ro1">
          <table:table-cell office:value-type="float" office:value="197044">
            <text:p>197044</text:p>
          </table:table-cell>
          <table:table-cell table:number-columns-repeated="5"/>
        </table:table-row>
        <table:table-row table:style-name="ro1">
          <table:table-cell office:value-type="float" office:value="197045">
            <text:p>197045</text:p>
          </table:table-cell>
          <table:table-cell table:number-columns-repeated="5"/>
        </table:table-row>
        <table:table-row table:style-name="ro1">
          <table:table-cell office:value-type="float" office:value="197046">
            <text:p>197046</text:p>
          </table:table-cell>
          <table:table-cell table:number-columns-repeated="5"/>
        </table:table-row>
        <table:table-row table:style-name="ro1">
          <table:table-cell office:value-type="float" office:value="197047">
            <text:p>197047</text:p>
          </table:table-cell>
          <table:table-cell table:number-columns-repeated="5"/>
        </table:table-row>
        <table:table-row table:style-name="ro1">
          <table:table-cell office:value-type="float" office:value="197048">
            <text:p>197048</text:p>
          </table:table-cell>
          <table:table-cell table:number-columns-repeated="5"/>
        </table:table-row>
        <table:table-row table:style-name="ro1">
          <table:table-cell office:value-type="float" office:value="197049">
            <text:p>197049</text:p>
          </table:table-cell>
          <table:table-cell table:number-columns-repeated="5"/>
        </table:table-row>
        <table:table-row table:style-name="ro1">
          <table:table-cell office:value-type="float" office:value="197050">
            <text:p>197050</text:p>
          </table:table-cell>
          <table:table-cell table:number-columns-repeated="5"/>
        </table:table-row>
        <table:table-row table:style-name="ro1">
          <table:table-cell office:value-type="float" office:value="197051">
            <text:p>19705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7101">
            <text:p>197101</text:p>
          </table:table-cell>
          <table:table-cell table:number-columns-repeated="5"/>
        </table:table-row>
        <table:table-row table:style-name="ro1">
          <table:table-cell office:value-type="float" office:value="197102">
            <text:p>197102</text:p>
          </table:table-cell>
          <table:table-cell table:number-columns-repeated="5"/>
        </table:table-row>
        <table:table-row table:style-name="ro1">
          <table:table-cell office:value-type="float" office:value="197103">
            <text:p>197103</text:p>
          </table:table-cell>
          <table:table-cell table:number-columns-repeated="5"/>
        </table:table-row>
        <table:table-row table:style-name="ro1">
          <table:table-cell office:value-type="float" office:value="197104">
            <text:p>197104</text:p>
          </table:table-cell>
          <table:table-cell table:number-columns-repeated="5"/>
        </table:table-row>
        <table:table-row table:style-name="ro1">
          <table:table-cell office:value-type="float" office:value="197105">
            <text:p>197105</text:p>
          </table:table-cell>
          <table:table-cell table:number-columns-repeated="5"/>
        </table:table-row>
        <table:table-row table:style-name="ro1">
          <table:table-cell office:value-type="float" office:value="197106">
            <text:p>197106</text:p>
          </table:table-cell>
          <table:table-cell table:number-columns-repeated="5"/>
        </table:table-row>
        <table:table-row table:style-name="ro1">
          <table:table-cell office:value-type="float" office:value="197107">
            <text:p>197107</text:p>
          </table:table-cell>
          <table:table-cell table:number-columns-repeated="5"/>
        </table:table-row>
        <table:table-row table:style-name="ro1">
          <table:table-cell office:value-type="float" office:value="197108">
            <text:p>197108</text:p>
          </table:table-cell>
          <table:table-cell table:number-columns-repeated="5"/>
        </table:table-row>
        <table:table-row table:style-name="ro1">
          <table:table-cell office:value-type="float" office:value="197109">
            <text:p>197109</text:p>
          </table:table-cell>
          <table:table-cell table:number-columns-repeated="5"/>
        </table:table-row>
        <table:table-row table:style-name="ro1">
          <table:table-cell office:value-type="float" office:value="197110">
            <text:p>197110</text:p>
          </table:table-cell>
          <table:table-cell table:number-columns-repeated="5"/>
        </table:table-row>
        <table:table-row table:style-name="ro1">
          <table:table-cell office:value-type="float" office:value="197111">
            <text:p>197111</text:p>
          </table:table-cell>
          <table:table-cell table:number-columns-repeated="5"/>
        </table:table-row>
        <table:table-row table:style-name="ro1">
          <table:table-cell office:value-type="float" office:value="197112">
            <text:p>197112</text:p>
          </table:table-cell>
          <table:table-cell table:number-columns-repeated="5"/>
        </table:table-row>
        <table:table-row table:style-name="ro1">
          <table:table-cell office:value-type="float" office:value="197113">
            <text:p>197113</text:p>
          </table:table-cell>
          <table:table-cell table:number-columns-repeated="5"/>
        </table:table-row>
        <table:table-row table:style-name="ro1">
          <table:table-cell office:value-type="float" office:value="197114">
            <text:p>197114</text:p>
          </table:table-cell>
          <table:table-cell table:number-columns-repeated="5"/>
        </table:table-row>
        <table:table-row table:style-name="ro1">
          <table:table-cell office:value-type="float" office:value="197115">
            <text:p>197115</text:p>
          </table:table-cell>
          <table:table-cell table:number-columns-repeated="5"/>
        </table:table-row>
        <table:table-row table:style-name="ro1">
          <table:table-cell office:value-type="float" office:value="197116">
            <text:p>197116</text:p>
          </table:table-cell>
          <table:table-cell table:number-columns-repeated="5"/>
        </table:table-row>
        <table:table-row table:style-name="ro1">
          <table:table-cell office:value-type="float" office:value="197117">
            <text:p>197117</text:p>
          </table:table-cell>
          <table:table-cell table:number-columns-repeated="5"/>
        </table:table-row>
        <table:table-row table:style-name="ro1">
          <table:table-cell office:value-type="float" office:value="197118">
            <text:p>197118</text:p>
          </table:table-cell>
          <table:table-cell table:number-columns-repeated="5"/>
        </table:table-row>
        <table:table-row table:style-name="ro1">
          <table:table-cell office:value-type="float" office:value="197119">
            <text:p>197119</text:p>
          </table:table-cell>
          <table:table-cell table:number-columns-repeated="5"/>
        </table:table-row>
        <table:table-row table:style-name="ro1">
          <table:table-cell office:value-type="float" office:value="197120">
            <text:p>197120</text:p>
          </table:table-cell>
          <table:table-cell table:number-columns-repeated="5"/>
        </table:table-row>
        <table:table-row table:style-name="ro1">
          <table:table-cell office:value-type="float" office:value="197121">
            <text:p>197121</text:p>
          </table:table-cell>
          <table:table-cell table:number-columns-repeated="5"/>
        </table:table-row>
        <table:table-row table:style-name="ro1">
          <table:table-cell office:value-type="float" office:value="197122">
            <text:p>197122</text:p>
          </table:table-cell>
          <table:table-cell table:number-columns-repeated="5"/>
        </table:table-row>
        <table:table-row table:style-name="ro1">
          <table:table-cell office:value-type="float" office:value="197123">
            <text:p>197123</text:p>
          </table:table-cell>
          <table:table-cell table:number-columns-repeated="5"/>
        </table:table-row>
        <table:table-row table:style-name="ro1">
          <table:table-cell office:value-type="float" office:value="197124">
            <text:p>197124</text:p>
          </table:table-cell>
          <table:table-cell table:number-columns-repeated="5"/>
        </table:table-row>
        <table:table-row table:style-name="ro1">
          <table:table-cell office:value-type="float" office:value="197125">
            <text:p>197125</text:p>
          </table:table-cell>
          <table:table-cell table:number-columns-repeated="5"/>
        </table:table-row>
        <table:table-row table:style-name="ro1">
          <table:table-cell office:value-type="float" office:value="197126">
            <text:p>19712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20001">
            <text:p>220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2">
            <text:p>220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3">
            <text:p>220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4">
            <text:p>220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5">
            <text:p>220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6">
            <text:p>220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7">
            <text:p>220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8">
            <text:p>220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09">
            <text:p>2200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0">
            <text:p>220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1">
            <text:p>220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2">
            <text:p>2200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3">
            <text:p>220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4">
            <text:p>220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5">
            <text:p>220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6">
            <text:p>220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7">
            <text:p>220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18">
            <text:p>2200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0019">
            <text:p>2200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0020">
            <text:p>220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1">
            <text:p>2200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2">
            <text:p>2200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3">
            <text:p>2200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4">
            <text:p>2200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5">
            <text:p>2200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6">
            <text:p>220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7">
            <text:p>2200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8">
            <text:p>2200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29">
            <text:p>2200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30">
            <text:p>2200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31">
            <text:p>2200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32">
            <text:p>220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33">
            <text:p>2200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0034">
            <text:p>220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21101">
            <text:p>221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02">
            <text:p>221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03">
            <text:p>221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04">
            <text:p>221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05">
            <text:p>221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06">
            <text:p>221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07">
            <text:p>2211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08">
            <text:p>221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09">
            <text:p>221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10">
            <text:p>2211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11">
            <text:p>221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12">
            <text:p>221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13">
            <text:p>221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14">
            <text:p>2211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15">
            <text:p>2211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16">
            <text:p>2211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17">
            <text:p>2211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18">
            <text:p>2211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19">
            <text:p>2211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20">
            <text:p>2211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21">
            <text:p>221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22">
            <text:p>221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23">
            <text:p>2211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24">
            <text:p>2211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25">
            <text:p>221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26">
            <text:p>2211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27">
            <text:p>221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28">
            <text:p>2211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29">
            <text:p>2211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30">
            <text:p>2211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31">
            <text:p>2211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32">
            <text:p>2211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33">
            <text:p>2211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34">
            <text:p>2211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35">
            <text:p>2211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36">
            <text:p>2211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37">
            <text:p>2211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38">
            <text:p>2211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39">
            <text:p>2211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40">
            <text:p>2211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41">
            <text:p>22114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42">
            <text:p>2211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1143">
            <text:p>2211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1144">
            <text:p>22114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22001">
            <text:p>222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02">
            <text:p>222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2003">
            <text:p>222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04">
            <text:p>222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05">
            <text:p>2220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2006">
            <text:p>222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07">
            <text:p>2220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2008">
            <text:p>222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09">
            <text:p>2220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2010">
            <text:p>2220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2011">
            <text:p>222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12">
            <text:p>2220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13">
            <text:p>222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14">
            <text:p>2220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2015">
            <text:p>222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16">
            <text:p>222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17">
            <text:p>222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18">
            <text:p>2220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19">
            <text:p>2220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20">
            <text:p>2220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1">
          <table:table-cell office:value-type="float" office:value="222021">
            <text:p>2220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22">
            <text:p>2220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023">
            <text:p>2220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22101">
            <text:p>222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102">
            <text:p>222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103">
            <text:p>222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office:value-type="float" office:value="222104">
            <text:p>222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0001">
            <text:p>230001</text:p>
          </table:table-cell>
          <table:table-cell table:number-columns-repeated="5"/>
        </table:table-row>
        <table:table-row table:style-name="ro1">
          <table:table-cell office:value-type="float" office:value="230002">
            <text:p>230002</text:p>
          </table:table-cell>
          <table:table-cell table:number-columns-repeated="5"/>
        </table:table-row>
        <table:table-row table:style-name="ro1">
          <table:table-cell office:value-type="float" office:value="230003">
            <text:p>230003</text:p>
          </table:table-cell>
          <table:table-cell table:number-columns-repeated="5"/>
        </table:table-row>
        <table:table-row table:style-name="ro1">
          <table:table-cell office:value-type="float" office:value="230004">
            <text:p>230004</text:p>
          </table:table-cell>
          <table:table-cell table:number-columns-repeated="5"/>
        </table:table-row>
        <table:table-row table:style-name="ro1">
          <table:table-cell office:value-type="float" office:value="230005">
            <text:p>230005</text:p>
          </table:table-cell>
          <table:table-cell table:number-columns-repeated="5"/>
        </table:table-row>
        <table:table-row table:style-name="ro1">
          <table:table-cell office:value-type="float" office:value="230006">
            <text:p>230006</text:p>
          </table:table-cell>
          <table:table-cell table:number-columns-repeated="5"/>
        </table:table-row>
        <table:table-row table:style-name="ro1">
          <table:table-cell office:value-type="float" office:value="230007">
            <text:p>230007</text:p>
          </table:table-cell>
          <table:table-cell table:number-columns-repeated="5"/>
        </table:table-row>
        <table:table-row table:style-name="ro1">
          <table:table-cell office:value-type="float" office:value="230008">
            <text:p>230008</text:p>
          </table:table-cell>
          <table:table-cell table:number-columns-repeated="5"/>
        </table:table-row>
        <table:table-row table:style-name="ro1">
          <table:table-cell office:value-type="float" office:value="230009">
            <text:p>230009</text:p>
          </table:table-cell>
          <table:table-cell table:number-columns-repeated="5"/>
        </table:table-row>
        <table:table-row table:style-name="ro1">
          <table:table-cell office:value-type="float" office:value="230010">
            <text:p>230010</text:p>
          </table:table-cell>
          <table:table-cell table:number-columns-repeated="5"/>
        </table:table-row>
        <table:table-row table:style-name="ro1">
          <table:table-cell office:value-type="float" office:value="230011">
            <text:p>230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1001">
            <text:p>231001</text:p>
          </table:table-cell>
          <table:table-cell table:number-columns-repeated="5"/>
        </table:table-row>
        <table:table-row table:style-name="ro1">
          <table:table-cell office:value-type="float" office:value="231002">
            <text:p>231002</text:p>
          </table:table-cell>
          <table:table-cell table:number-columns-repeated="5"/>
        </table:table-row>
        <table:table-row table:style-name="ro1">
          <table:table-cell office:value-type="float" office:value="231003">
            <text:p>231003</text:p>
          </table:table-cell>
          <table:table-cell table:number-columns-repeated="5"/>
        </table:table-row>
        <table:table-row table:style-name="ro1">
          <table:table-cell office:value-type="float" office:value="231004">
            <text:p>231004</text:p>
          </table:table-cell>
          <table:table-cell table:number-columns-repeated="5"/>
        </table:table-row>
        <table:table-row table:style-name="ro1">
          <table:table-cell office:value-type="float" office:value="231005">
            <text:p>231005</text:p>
          </table:table-cell>
          <table:table-cell table:number-columns-repeated="5"/>
        </table:table-row>
        <table:table-row table:style-name="ro1">
          <table:table-cell office:value-type="float" office:value="231006">
            <text:p>231006</text:p>
          </table:table-cell>
          <table:table-cell table:number-columns-repeated="5"/>
        </table:table-row>
        <table:table-row table:style-name="ro1">
          <table:table-cell office:value-type="float" office:value="231007">
            <text:p>231007</text:p>
          </table:table-cell>
          <table:table-cell table:number-columns-repeated="5"/>
        </table:table-row>
        <table:table-row table:style-name="ro1">
          <table:table-cell office:value-type="float" office:value="231008">
            <text:p>231008</text:p>
          </table:table-cell>
          <table:table-cell table:number-columns-repeated="5"/>
        </table:table-row>
        <table:table-row table:style-name="ro1">
          <table:table-cell office:value-type="float" office:value="231009">
            <text:p>231009</text:p>
          </table:table-cell>
          <table:table-cell table:number-columns-repeated="5"/>
        </table:table-row>
        <table:table-row table:style-name="ro1">
          <table:table-cell office:value-type="float" office:value="231010">
            <text:p>231010</text:p>
          </table:table-cell>
          <table:table-cell table:number-columns-repeated="5"/>
        </table:table-row>
        <table:table-row table:style-name="ro1">
          <table:table-cell office:value-type="float" office:value="231011">
            <text:p>231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99001">
            <text:p>399001</text:p>
          </table:table-cell>
          <table:table-cell table:number-columns-repeated="5"/>
        </table:table-row>
        <table:table-row table:style-name="ro1">
          <table:table-cell office:value-type="float" office:value="399002">
            <text:p>399002</text:p>
          </table:table-cell>
          <table:table-cell table:number-columns-repeated="5"/>
        </table:table-row>
        <table:table-row table:style-name="ro1">
          <table:table-cell office:value-type="float" office:value="399003">
            <text:p>399003</text:p>
          </table:table-cell>
          <table:table-cell table:number-columns-repeated="5"/>
        </table:table-row>
        <table:table-row table:style-name="ro1">
          <table:table-cell office:value-type="float" office:value="399004">
            <text:p>399004</text:p>
          </table:table-cell>
          <table:table-cell table:number-columns-repeated="5"/>
        </table:table-row>
        <table:table-row table:style-name="ro1">
          <table:table-cell office:value-type="float" office:value="399005">
            <text:p>399005</text:p>
          </table:table-cell>
          <table:table-cell office:value-type="string">
            <text:p>SEEN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0">20/08/2025</text:date>, <text:time>13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0-11-06T18:30:23.69</meta:creation-date>
    <dc:date>2025-08-20T13:41:27.08</dc:date>
    <dc:creator>David </dc:creator>
    <meta:editing-duration>P6DT7H38M28S</meta:editing-duration>
    <meta:editing-cycles>94</meta:editing-cycles>
    <meta:generator>OpenOffice/4.1.7$Win32 OpenOffice.org_project/417m1$Build-9800</meta:generator>
    <meta:document-statistic meta:table-count="1" meta:cell-count="2756" meta:object-count="0"/>
  </office:meta>
</office:document-meta>
</file>