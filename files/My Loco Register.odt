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24pt" style:text-underline-style="solid" style:text-underline-type="double" style:text-underline-width="auto" style:text-underline-color="#314004" style:font-size-asian="24pt" style:font-size-complex="24pt"/>
    </style:style>
    <style:style style:name="P2" style:family="paragraph" style:parent-style-name="Standard">
      <style:paragraph-properties fo:text-align="center" style:justify-single-word="false"/>
      <style:text-properties style:font-name="Cambria" fo:font-size="14pt" style:text-underline-style="solid" style:text-underline-type="double" style:text-underline-width="auto" style:text-underline-color="#314004" style:font-size-asian="14pt" style:font-size-complex="14pt"/>
    </style:style>
    <style:style style:name="P3"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style:font-size-asian="18pt" style:font-size-complex="18pt"/>
    </style:style>
    <style:style style:name="P4"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fo:background-color="#ffffff" style:font-size-asian="18pt" style:font-size-complex="18pt"/>
    </style:style>
    <style:style style:name="P5" style:family="paragraph" style:parent-style-name="Standard">
      <style:paragraph-properties fo:margin-left="0.503cm" fo:margin-right="0cm" fo:text-align="start" style:justify-single-word="false" fo:text-indent="0cm" style:auto-text-indent="false">
        <style:tab-stops>
          <style:tab-stop style:position="10.795cm"/>
        </style:tab-stops>
      </style:paragraph-properties>
      <style:text-properties style:font-name="Cambria" fo:font-size="18pt" style:text-underline-style="none" fo:background-color="#ffffff" style:font-size-asian="18pt" style:font-size-complex="18pt"/>
    </style:style>
    <style:style style:name="P6" style:family="paragraph" style:parent-style-name="Standard">
      <style:paragraph-properties fo:margin-left="0.503cm" fo:margin-right="0cm" fo:text-align="start" style:justify-single-word="false" fo:text-indent="0cm" style:auto-text-indent="false">
        <style:tab-stops>
          <style:tab-stop style:position="12.019cm"/>
        </style:tab-stops>
      </style:paragraph-properties>
      <style:text-properties style:font-name="Cambria" fo:font-size="18pt" style:text-underline-style="none" fo:background-color="#ffffff" style:font-size-asian="18pt" style:font-size-complex="18pt"/>
    </style:style>
    <style:style style:name="P7"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fo:background-color="#ffff00" style:font-size-asian="18pt" style:font-size-complex="18pt"/>
    </style:style>
    <style:style style:name="P8"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fo:background-color="#83caff" style:font-size-asian="18pt" style:font-size-complex="18pt"/>
    </style:style>
    <style:style style:name="P9"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fo:font-weight="normal" fo:background-color="#ffff00" style:font-size-asian="18pt" style:font-weight-asian="normal" style:font-size-complex="18pt" style:font-weight-complex="normal"/>
    </style:style>
    <style:style style:name="P10"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fo:font-weight="normal" fo:background-color="#ffffff" style:font-size-asian="18pt" style:font-weight-asian="normal" style:font-size-complex="18pt" style:font-weight-complex="normal"/>
    </style:style>
    <style:style style:name="P11" style:family="paragraph" style:parent-style-name="Standard">
      <style:paragraph-properties fo:margin-left="0.503cm" fo:margin-right="0cm" fo:text-align="start" style:justify-single-word="false" fo:text-indent="0cm" style:auto-text-indent="false"/>
      <style:text-properties style:font-name="Cambria" fo:font-size="18pt" style:text-underline-style="none" fo:background-color="transparent" style:font-size-asian="18pt" style:font-size-complex="18pt"/>
    </style:style>
    <style:style style:name="P12" style:family="paragraph" style:parent-style-name="Standard">
      <style:paragraph-properties fo:margin-left="0.503cm" fo:margin-right="0cm" fo:text-align="start" style:justify-single-word="false" fo:text-indent="0cm" style:auto-text-indent="false"/>
      <style:text-properties style:font-name="Cambria" fo:font-size="14pt" style:text-underline-style="none" fo:background-color="#ffffff" style:font-size-asian="14pt" style:font-size-complex="14pt"/>
    </style:style>
    <style:style style:name="P13"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style:font-size-asian="18pt" style:font-size-complex="18pt"/>
    </style:style>
    <style:style style:name="P14"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background-color="#ffffff" style:font-size-asian="18pt" style:font-size-complex="18pt"/>
    </style:style>
    <style:style style:name="P15" style:family="paragraph" style:parent-style-name="Standard">
      <style:paragraph-properties fo:margin-left="0.503cm" fo:margin-right="0cm" fo:text-align="start" style:justify-single-word="false" fo:text-indent="0cm" style:auto-text-indent="false">
        <style:tab-stops>
          <style:tab-stop style:position="10.795cm"/>
        </style:tab-stops>
      </style:paragraph-properties>
      <style:text-properties fo:color="#000000" style:font-name="Cambria" fo:font-size="18pt" style:text-underline-style="none" fo:background-color="#ffffff" style:font-size-asian="18pt" style:font-size-complex="18pt"/>
    </style:style>
    <style:style style:name="P16" style:family="paragraph" style:parent-style-name="Standard">
      <style:paragraph-properties fo:margin-left="0.503cm" fo:margin-right="0cm" fo:text-align="start" style:justify-single-word="false" fo:text-indent="0cm" style:auto-text-indent="false">
        <style:tab-stops>
          <style:tab-stop style:position="12.019cm"/>
        </style:tab-stops>
      </style:paragraph-properties>
      <style:text-properties fo:color="#000000" style:font-name="Cambria" fo:font-size="18pt" style:text-underline-style="none" fo:background-color="#ffffff" style:font-size-asian="18pt" style:font-size-complex="18pt"/>
    </style:style>
    <style:style style:name="P17"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background-color="#ffff00" style:font-size-asian="18pt" style:font-size-complex="18pt"/>
    </style:style>
    <style:style style:name="P18"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background-color="#83caff" style:font-size-asian="18pt" style:font-size-complex="18pt"/>
    </style:style>
    <style:style style:name="P19"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font-weight="normal" fo:background-color="#ffff00" style:font-size-asian="18pt" style:font-weight-asian="normal" style:font-size-complex="18pt" style:font-weight-complex="normal"/>
    </style:style>
    <style:style style:name="P20"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21"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font-weight="normal" fo:background-color="transparent" style:font-size-asian="18pt" style:font-weight-asian="normal" style:font-size-complex="18pt" style:font-weight-complex="normal"/>
    </style:style>
    <style:style style:name="P22" style:family="paragraph" style:parent-style-name="Standard">
      <style:paragraph-properties fo:margin-left="0.503cm" fo:margin-right="0cm" fo:text-align="start" style:justify-single-word="false" fo:text-indent="0cm" style:auto-text-indent="false"/>
      <style:text-properties fo:color="#000000" style:font-name="Cambria" fo:font-size="18pt" style:text-underline-style="none" fo:background-color="transparent" style:font-size-asian="18pt" style:font-size-complex="18pt"/>
    </style:style>
    <style:style style:name="P23" style:family="paragraph" style:parent-style-name="Standard">
      <style:paragraph-properties fo:margin-left="0.503cm" fo:margin-right="0cm" fo:text-align="start" style:justify-single-word="false" fo:text-indent="0cm" style:auto-text-indent="false"/>
      <style:text-properties fo:color="#000000" style:font-name="Cambria" fo:font-size="14pt" style:text-underline-style="none" fo:background-color="#ffffff" style:font-size-asian="14pt" style:font-size-complex="14pt"/>
    </style:style>
    <style:style style:name="P24" style:family="paragraph" style:parent-style-name="Standard">
      <style:paragraph-properties fo:margin-left="0.503cm" fo:margin-right="0cm" fo:text-align="start" style:justify-single-word="false" fo:text-indent="0cm" style:auto-text-indent="false"/>
      <style:text-properties fo:color="#000000" style:font-name="Cambria" fo:font-size="16pt" style:text-underline-style="none" fo:font-weight="normal" fo:background-color="#ffffff" style:font-size-asian="16pt" style:font-weight-asian="normal" style:font-size-complex="16pt" style:font-weight-complex="normal"/>
    </style:style>
    <style:style style:name="P25" style:family="paragraph" style:parent-style-name="Standard" style:master-page-name="">
      <style:paragraph-properties fo:margin-left="0.503cm" fo:margin-right="0cm" fo:text-align="start" style:justify-single-word="false" fo:text-indent="0cm" style:auto-text-indent="false" style:page-number="auto"/>
      <style:text-properties style:font-name="Cambria" fo:font-size="18pt" style:text-underline-style="none" style:font-size-asian="18pt" style:font-size-complex="18pt"/>
    </style:style>
    <style:style style:name="P26" style:family="paragraph" style:parent-style-name="Standard">
      <style:paragraph-properties fo:margin-left="0.503cm" fo:margin-right="0cm" fo:text-align="start" style:justify-single-word="false" fo:text-indent="0cm" style:auto-text-indent="false" fo:background-color="transparent">
        <style:background-image/>
      </style:paragraph-properties>
      <style:text-properties style:font-name="Cambria" fo:font-size="18pt" style:text-underline-style="none" style:font-size-asian="18pt" style:font-size-complex="18pt"/>
    </style:style>
    <style:style style:name="P27" style:family="paragraph" style:parent-style-name="Standard">
      <style:paragraph-properties fo:margin-left="0.503cm" fo:margin-right="0cm" fo:text-align="start" style:justify-single-word="false" fo:text-indent="0cm" style:auto-text-indent="false" fo:background-color="transparent">
        <style:background-image/>
      </style:paragraph-properties>
      <style:text-properties style:font-name="Cambria" fo:font-size="18pt" style:text-underline-style="none" fo:background-color="#ffff00" style:font-size-asian="18pt" style:font-size-complex="18pt"/>
    </style:style>
    <style:style style:name="P28" style:family="paragraph" style:parent-style-name="Standard">
      <style:paragraph-properties fo:margin-left="0.503cm" fo:margin-right="0cm" fo:text-align="start" style:justify-single-word="false" fo:text-indent="0cm" style:auto-text-indent="false" fo:background-color="#ffffff">
        <style:background-image/>
      </style:paragraph-properties>
      <style:text-properties style:font-name="Cambria" fo:font-size="18pt" style:text-underline-style="none" fo:font-weight="normal" fo:background-color="#ffffff" style:font-size-asian="18pt" style:font-weight-asian="normal" style:font-size-complex="18pt" style:font-weight-complex="normal"/>
    </style:style>
    <style:style style:name="P29" style:family="paragraph" style:parent-style-name="Standard">
      <style:paragraph-properties fo:margin-left="0.503cm" fo:margin-right="0cm" fo:text-align="start" style:justify-single-word="false" fo:text-indent="0cm" style:auto-text-indent="false" fo:background-color="#ffffff">
        <style:background-image/>
      </style:paragraph-properties>
      <style:text-properties style:font-name="Cambria" fo:font-size="18pt" style:text-underline-style="none" fo:font-weight="normal" fo:background-color="#ffff00" style:font-size-asian="18pt" style:font-weight-asian="normal" style:font-size-complex="18pt" style:font-weight-complex="normal"/>
    </style:style>
    <style:style style:name="P30" style:family="paragraph" style:parent-style-name="Standard">
      <style:paragraph-properties fo:margin-left="0.503cm" fo:margin-right="0cm" fo:text-align="start" style:justify-single-word="false" fo:text-indent="0cm" style:auto-text-indent="false" fo:background-color="#ffffff">
        <style:background-image/>
      </style:paragraph-properties>
      <style:text-properties style:font-name="Cambria" fo:font-size="18pt" style:text-underline-style="none" fo:background-color="#ffffff" style:font-size-asian="18pt" style:font-size-complex="18pt"/>
    </style:style>
    <style:style style:name="P31" style:family="paragraph" style:parent-style-name="Standard">
      <style:paragraph-properties fo:margin-left="0.503cm" fo:margin-right="0cm" fo:text-align="start" style:justify-single-word="false" fo:text-indent="0cm" style:auto-text-indent="false" fo:background-color="#ffffff">
        <style:tab-stops>
          <style:tab-stop style:position="13.266cm"/>
        </style:tab-stops>
        <style:background-image/>
      </style:paragraph-properties>
      <style:text-properties style:font-name="Cambria" fo:font-size="18pt" style:text-underline-style="none" fo:background-color="#ffffff" style:font-size-asian="18pt" style:font-size-complex="18pt"/>
    </style:style>
    <style:style style:name="P32" style:family="paragraph" style:parent-style-name="Standard">
      <style:paragraph-properties fo:margin-left="0.503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ff" style:font-size-asian="18pt" style:font-size-complex="18pt"/>
    </style:style>
    <style:style style:name="P33" style:family="paragraph" style:parent-style-name="Text_20_body">
      <style:paragraph-properties fo:margin-left="0.503cm" fo:margin-right="0cm" fo:text-align="start" style:justify-single-word="false" fo:text-indent="0cm" style:auto-text-indent="false"/>
      <style:text-properties fo:color="#000000" style:font-name="Cambria" fo:font-size="18pt" style:text-underline-style="none" fo:background-color="#ffffff" style:font-size-asian="18pt" style:font-size-complex="18pt"/>
    </style:style>
    <style:style style:name="P34" style:family="paragraph" style:parent-style-name="Text_20_body">
      <style:paragraph-properties fo:margin-left="0.503cm" fo:margin-right="0cm" fo:text-align="start" style:justify-single-word="false" fo:text-indent="0cm" style:auto-text-indent="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35" style:family="paragraph" style:parent-style-name="Standard">
      <style:paragraph-properties fo:margin-left="-1.251cm" fo:margin-right="0cm" fo:text-align="start" style:justify-single-word="false" fo:text-indent="0cm" style:auto-text-indent="false"/>
      <style:text-properties style:font-name="Cambria" fo:font-size="14pt" style:text-underline-style="none" style:font-size-asian="14pt" style:font-size-complex="14pt"/>
    </style:style>
    <style:style style:name="P36" style:family="paragraph" style:parent-style-name="Standard">
      <style:paragraph-properties fo:margin-left="-1.251cm" fo:margin-right="0cm" fo:text-align="start" style:justify-single-word="false" fo:text-indent="0cm" style:auto-text-indent="false"/>
      <style:text-properties style:font-name="Cambria" fo:font-size="14pt" style:text-underline-style="none" fo:background-color="#ffffff" style:font-size-asian="14pt" style:font-size-complex="14pt"/>
    </style:style>
    <style:style style:name="P37" style:family="paragraph" style:parent-style-name="Standard">
      <style:paragraph-properties fo:margin-left="-1.251cm" fo:margin-right="0cm" fo:text-align="start" style:justify-single-word="false" fo:text-indent="0cm" style:auto-text-indent="false"/>
      <style:text-properties style:font-name="Cambria" fo:font-size="14pt" style:text-underline-style="none" fo:background-color="#ffff00" style:font-size-asian="14pt" style:font-size-complex="14pt"/>
    </style:style>
    <style:style style:name="P38" style:family="paragraph" style:parent-style-name="Standard">
      <style:paragraph-properties fo:margin-left="-1.251cm" fo:margin-right="0cm" fo:text-align="start" style:justify-single-word="false" fo:text-indent="0cm" style:auto-text-indent="false"/>
      <style:text-properties style:font-name="Cambria" fo:font-size="15pt" style:text-underline-style="none" style:font-size-asian="15pt" style:font-size-complex="15pt"/>
    </style:style>
    <style:style style:name="P39" style:family="paragraph" style:parent-style-name="Standard">
      <style:paragraph-properties fo:margin-left="-1.251cm" fo:margin-right="0cm" fo:text-align="start" style:justify-single-word="false" fo:text-indent="0cm" style:auto-text-indent="false"/>
      <style:text-properties style:font-name="Cambria" fo:font-size="15pt" style:text-underline-style="none" fo:background-color="#ffffff" style:font-size-asian="15pt" style:font-size-complex="15pt"/>
    </style:style>
    <style:style style:name="P40" style:family="paragraph" style:parent-style-name="Standard">
      <style:paragraph-properties fo:margin-left="-1.251cm" fo:margin-right="0cm" fo:text-align="start" style:justify-single-word="false" fo:text-indent="0cm" style:auto-text-indent="false"/>
      <style:text-properties style:font-name="Cambria" fo:font-size="15pt" style:text-underline-style="none" fo:background-color="#ffff00" style:font-size-asian="15pt" style:font-size-complex="15pt"/>
    </style:style>
    <style:style style:name="P41" style:family="paragraph" style:parent-style-name="Standard">
      <style:paragraph-properties fo:margin-left="-1.251cm" fo:margin-right="0cm" fo:text-align="start" style:justify-single-word="false" fo:text-indent="0cm" style:auto-text-indent="false"/>
      <style:text-properties style:font-name="Cambria" fo:font-size="16pt" style:text-underline-style="none" style:font-size-asian="16pt" style:font-size-complex="16pt"/>
    </style:style>
    <style:style style:name="P42" style:family="paragraph" style:parent-style-name="Standard">
      <style:paragraph-properties fo:margin-left="-1.251cm" fo:margin-right="0cm" fo:text-align="start" style:justify-single-word="false" fo:text-indent="0cm" style:auto-text-indent="false"/>
      <style:text-properties style:font-name="Cambria" fo:font-size="16pt" style:text-underline-style="none" fo:background-color="#ffffff" style:font-size-asian="16pt" style:font-size-complex="16pt"/>
    </style:style>
    <style:style style:name="P43" style:family="paragraph" style:parent-style-name="Standard">
      <style:paragraph-properties fo:margin-left="-1.251cm" fo:margin-right="0cm" fo:text-align="start" style:justify-single-word="false" fo:text-indent="0cm" style:auto-text-indent="false"/>
      <style:text-properties style:font-name="Cambria" fo:font-size="16pt" style:text-underline-style="none" fo:background-color="#0084d1" style:font-size-asian="16pt" style:font-size-complex="16pt"/>
    </style:style>
    <style:style style:name="P44" style:family="paragraph" style:parent-style-name="Standard">
      <style:paragraph-properties fo:margin-left="-1.251cm" fo:margin-right="0cm" fo:text-align="start" style:justify-single-word="false" fo:text-indent="0cm" style:auto-text-indent="false"/>
      <style:text-properties style:font-name="Cambria" fo:font-size="20pt" style:text-underline-style="none" style:font-size-asian="20pt" style:font-size-complex="20pt"/>
    </style:style>
    <style:style style:name="P45" style:family="paragraph" style:parent-style-name="Standard">
      <style:paragraph-properties fo:margin-left="-1.251cm" fo:margin-right="0cm" fo:text-align="start" style:justify-single-word="false" fo:text-indent="0cm" style:auto-text-indent="false"/>
      <style:text-properties style:font-name="Cambria" fo:font-size="20pt" style:text-underline-style="none" fo:background-color="#ffffff" style:font-size-asian="20pt" style:font-size-complex="20pt"/>
    </style:style>
    <style:style style:name="P46" style:family="paragraph" style:parent-style-name="Standard">
      <style:paragraph-properties fo:margin-left="-1.251cm" fo:margin-right="0cm" fo:text-align="start" style:justify-single-word="false" fo:text-indent="0cm" style:auto-text-indent="false"/>
      <style:text-properties style:font-name="Cambria" fo:font-size="18pt" style:text-underline-style="none" style:font-size-asian="18pt" style:font-size-complex="18pt"/>
    </style:style>
    <style:style style:name="P47" style:family="paragraph" style:parent-style-name="Standard">
      <style:paragraph-properties fo:margin-left="-1.251cm" fo:margin-right="0cm" fo:text-align="start" style:justify-single-word="false" fo:text-indent="0cm" style:auto-text-indent="false">
        <style:tab-stops>
          <style:tab-stop style:position="10.495cm"/>
        </style:tab-stops>
      </style:paragraph-properties>
      <style:text-properties style:font-name="Cambria" fo:font-size="18pt" style:text-underline-style="none" style:font-size-asian="18pt" style:font-size-complex="18pt"/>
    </style:style>
    <style:style style:name="P48" style:family="paragraph" style:parent-style-name="Standard">
      <style:paragraph-properties fo:margin-left="-1.251cm" fo:margin-right="0cm" fo:text-align="start" style:justify-single-word="false" fo:text-indent="0cm" style:auto-text-indent="false">
        <style:tab-stops>
          <style:tab-stop style:position="1.646cm"/>
        </style:tab-stops>
      </style:paragraph-properties>
      <style:text-properties style:font-name="Cambria" fo:font-size="18pt" style:text-underline-style="none" style:font-size-asian="18pt" style:font-size-complex="18pt"/>
    </style:style>
    <style:style style:name="P49" style:family="paragraph" style:parent-style-name="Standard">
      <style:paragraph-properties fo:margin-left="-1.251cm" fo:margin-right="0cm" fo:text-align="start" style:justify-single-word="false" fo:text-indent="0cm" style:auto-text-indent="false"/>
      <style:text-properties style:font-name="Cambria" fo:font-size="18pt" style:text-underline-style="none" fo:background-color="#ffffff" style:font-size-asian="18pt" style:font-size-complex="18pt"/>
    </style:style>
    <style:style style:name="P50" style:family="paragraph" style:parent-style-name="Standard">
      <style:paragraph-properties fo:margin-left="-1.251cm" fo:margin-right="0cm" fo:text-align="start" style:justify-single-word="false" fo:text-indent="0cm" style:auto-text-indent="false"/>
      <style:text-properties style:font-name="Cambria" fo:font-size="18pt" style:text-underline-style="none" fo:background-color="#ffff00" style:font-size-asian="18pt" style:font-size-complex="18pt"/>
    </style:style>
    <style:style style:name="P51" style:family="paragraph" style:parent-style-name="Standard">
      <style:paragraph-properties fo:margin-left="-1.251cm" fo:margin-right="0cm" fo:text-align="start" style:justify-single-word="false" fo:text-indent="0cm" style:auto-text-indent="false"/>
      <style:text-properties style:font-name="Cambria" fo:font-size="18pt" style:text-underline-style="none" fo:background-color="transparent" style:font-size-asian="18pt" style:font-size-complex="18pt"/>
    </style:style>
    <style:style style:name="P52" style:family="paragraph" style:parent-style-name="Standard">
      <style:paragraph-properties fo:margin-left="-1.251cm" fo:margin-right="0cm" fo:text-align="start" style:justify-single-word="false" fo:text-indent="0cm" style:auto-text-indent="false"/>
      <style:text-properties style:font-name="Cambria" fo:font-size="18pt" style:text-underline-style="none" fo:font-weight="normal" fo:background-color="#ffffff" style:font-size-asian="18pt" style:font-weight-asian="normal" style:font-size-complex="18pt"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fo:color="#000000" style:font-name="Cambria" fo:font-size="14pt" style:text-underline-style="none" fo:background-color="#ffff00" style:font-size-asian="14pt" style:font-size-complex="14pt"/>
    </style:style>
    <style:style style:name="P54" style:family="paragraph" style:parent-style-name="Standard">
      <style:paragraph-properties fo:margin-left="-1.251cm" fo:margin-right="0cm" fo:text-align="start" style:justify-single-word="false" fo:text-indent="0cm" style:auto-text-indent="false"/>
      <style:text-properties fo:color="#000000" style:font-name="Cambria" fo:font-size="14pt" style:text-underline-style="none" fo:background-color="#ffffff" style:font-size-asian="14pt" style:font-size-complex="14pt"/>
    </style:style>
    <style:style style:name="P55" style:family="paragraph" style:parent-style-name="Standard">
      <style:paragraph-properties fo:margin-left="-1.251cm" fo:margin-right="0cm" fo:text-align="start" style:justify-single-word="false" fo:text-indent="0cm" style:auto-text-indent="false"/>
      <style:text-properties fo:color="#000000" style:font-name="Cambria" fo:font-size="15pt" style:text-underline-style="none" fo:background-color="#ffff00" style:font-size-asian="15pt" style:font-size-complex="15pt"/>
    </style:style>
    <style:style style:name="P56" style:family="paragraph" style:parent-style-name="Standard">
      <style:paragraph-properties fo:margin-left="-1.251cm" fo:margin-right="0cm" fo:text-align="start" style:justify-single-word="false" fo:text-indent="0cm" style:auto-text-indent="false"/>
      <style:text-properties fo:color="#000000" style:font-name="Cambria" fo:font-size="15pt" style:text-underline-style="none" fo:background-color="#ffffff" style:font-size-asian="15pt" style:font-size-complex="15pt"/>
    </style:style>
    <style:style style:name="P57" style:family="paragraph" style:parent-style-name="Standard">
      <style:paragraph-properties fo:margin-left="-1.251cm" fo:margin-right="0cm" fo:text-align="start" style:justify-single-word="false" fo:text-indent="0cm" style:auto-text-indent="false"/>
      <style:text-properties fo:color="#000000" style:font-name="Cambria" fo:font-size="16pt" style:text-underline-style="none" fo:background-color="#ffffff" style:font-size-asian="16pt" style:font-size-complex="16pt"/>
    </style:style>
    <style:style style:name="P58" style:family="paragraph" style:parent-style-name="Standard">
      <style:paragraph-properties fo:margin-left="-1.251cm" fo:margin-right="0cm" fo:text-align="start" style:justify-single-word="false" fo:text-indent="0cm" style:auto-text-indent="false"/>
      <style:text-properties fo:color="#000000" style:font-name="Cambria" fo:font-size="16pt" style:text-underline-style="none" fo:background-color="#ffff00" style:font-size-asian="16pt" style:font-size-complex="16pt"/>
    </style:style>
    <style:style style:name="P59" style:family="paragraph" style:parent-style-name="Standard">
      <style:paragraph-properties fo:margin-left="-1.251cm" fo:margin-right="0cm" fo:text-align="start" style:justify-single-word="false" fo:text-indent="0cm" style:auto-text-indent="false"/>
      <style:text-properties fo:color="#000000" style:font-name="Cambria" fo:font-size="16pt" style:text-underline-style="none" fo:font-weight="normal" fo:background-color="#ffffff" style:font-size-asian="16pt" style:font-weight-asian="normal" style:font-size-complex="16pt"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fo:color="#000000" style:font-name="Cambria" fo:font-size="16pt" style:text-underline-style="none" fo:background-color="transparent" style:font-size-asian="16pt" style:font-size-complex="16pt"/>
    </style:style>
    <style:style style:name="P61"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background-color="#ffffff" style:font-size-asian="18pt" style:font-size-complex="18pt"/>
    </style:style>
    <style:style style:name="P62" style:family="paragraph" style:parent-style-name="Standard">
      <style:paragraph-properties fo:margin-left="-1.251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background-color="#ffffff" style:font-size-asian="18pt" style:font-size-complex="18pt"/>
    </style:style>
    <style:style style:name="P63" style:family="paragraph" style:parent-style-name="Standard">
      <style:paragraph-properties fo:margin-left="-1.251cm" fo:margin-right="0cm" fo:text-align="start" style:justify-single-word="false" fo:text-indent="0cm" style:auto-text-indent="false">
        <style:tab-stops>
          <style:tab-stop style:position="12.612cm"/>
        </style:tab-stops>
      </style:paragraph-properties>
      <style:text-properties fo:color="#000000" style:font-name="Cambria" fo:font-size="18pt" style:text-underline-style="none" fo:background-color="#ffffff" style:font-size-asian="18pt" style:font-size-complex="18pt"/>
    </style:style>
    <style:style style:name="P64" style:family="paragraph" style:parent-style-name="Standard">
      <style:paragraph-properties fo:margin-left="-1.251cm" fo:margin-right="0cm" fo:text-align="start" style:justify-single-word="false" fo:text-indent="0cm" style:auto-text-indent="false">
        <style:tab-stops>
          <style:tab-stop style:position="14.817cm"/>
        </style:tab-stops>
      </style:paragraph-properties>
      <style:text-properties fo:color="#000000" style:font-name="Cambria" fo:font-size="18pt" style:text-underline-style="none" fo:background-color="#ffffff" style:font-size-asian="18pt" style:font-size-complex="18pt"/>
    </style:style>
    <style:style style:name="P65" style:family="paragraph" style:parent-style-name="Standard">
      <style:paragraph-properties fo:margin-left="-1.251cm" fo:margin-right="0cm" fo:text-align="start" style:justify-single-word="false" fo:text-indent="0cm" style:auto-text-indent="false">
        <style:tab-stops>
          <style:tab-stop style:position="11.06cm"/>
        </style:tab-stops>
      </style:paragraph-properties>
      <style:text-properties fo:color="#000000" style:font-name="Cambria" fo:font-size="18pt" style:text-underline-style="none" fo:background-color="#ffffff" style:font-size-asian="18pt" style:font-size-complex="18pt"/>
    </style:style>
    <style:style style:name="P66" style:family="paragraph" style:parent-style-name="Standard">
      <style:paragraph-properties fo:margin-left="-1.251cm" fo:margin-right="0cm" fo:text-align="start" style:justify-single-word="false" fo:text-indent="0cm" style:auto-text-indent="false">
        <style:tab-stops>
          <style:tab-stop style:position="13.418cm"/>
        </style:tab-stops>
      </style:paragraph-properties>
      <style:text-properties fo:color="#000000" style:font-name="Cambria" fo:font-size="18pt" style:text-underline-style="none" fo:background-color="#ffffff" style:font-size-asian="18pt" style:font-size-complex="18pt"/>
    </style:style>
    <style:style style:name="P67"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background-color="#ffff00" style:font-size-asian="18pt" style:font-size-complex="18pt"/>
    </style:style>
    <style:style style:name="P68"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style:font-size-asian="18pt" style:font-size-complex="18pt"/>
    </style:style>
    <style:style style:name="P69"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background-color="transparent" style:font-size-asian="18pt" style:font-size-complex="18pt"/>
    </style:style>
    <style:style style:name="P70"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71" style:family="paragraph" style:parent-style-name="Standard">
      <style:paragraph-properties fo:margin-left="-1.251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72" style:family="paragraph" style:parent-style-name="Standard">
      <style:paragraph-properties fo:margin-left="-1.251cm" fo:margin-right="0cm" fo:text-align="start" style:justify-single-word="false" fo:text-indent="0cm" style:auto-text-indent="false">
        <style:tab-stops>
          <style:tab-stop style:position="11.06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ffff00" style:font-size-asian="18pt" style:font-weight-asian="normal" style:font-size-complex="18pt"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transparent" style:font-size-asian="18pt" style:font-weight-asian="normal" style:font-size-complex="18pt" style:font-weight-complex="normal"/>
    </style:style>
    <style:style style:name="P75" style:family="paragraph" style:parent-style-name="Standard">
      <style:paragraph-properties fo:margin-left="-1.251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font-weight="normal" fo:background-color="transparent" style:font-size-asian="18pt" style:font-weight-asian="normal" style:font-size-complex="18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83caff" style:font-size-asian="18pt" style:font-weight-asian="normal" style:font-size-complex="18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0084d1" style:font-size-asian="18pt" style:font-weight-asian="normal" style:font-size-complex="18pt" style:font-weight-complex="normal"/>
    </style:style>
    <style:style style:name="P78" style:family="paragraph" style:parent-style-name="Standard">
      <style:paragraph-properties fo:margin-left="-1.251cm" fo:margin-right="0cm" fo:text-align="start" style:justify-single-word="false" fo:text-indent="0cm" style:auto-text-indent="false"/>
      <style:text-properties fo:color="#000000" style:font-name="Cambria" fo:font-size="18pt" style:text-underline-style="none" fo:background-color="#83caff" style:font-size-asian="18pt" style:font-size-complex="18pt"/>
    </style:style>
    <style:style style:name="P79" style:family="paragraph" style:parent-style-name="Standard">
      <style:paragraph-properties fo:margin-left="-1.251cm" fo:margin-right="0cm" fo:text-align="start" style:justify-single-word="false" fo:text-indent="0cm" style:auto-text-indent="false"/>
      <style:text-properties fo:color="#000000" style:font-name="Cambria" fo:font-size="20pt" style:text-underline-style="none" fo:background-color="#ffffff" style:font-size-asian="20pt" style:font-size-complex="20pt"/>
    </style:style>
    <style:style style:name="P80" style:family="paragraph" style:parent-style-name="Standard">
      <style:paragraph-properties fo:margin-left="-1.251cm" fo:margin-right="0cm" fo:text-align="start" style:justify-single-word="false" fo:text-indent="0cm" style:auto-text-indent="false"/>
      <style:text-properties fo:color="#000000" fo:font-size="18pt" fo:background-color="#ffffff" style:font-size-asian="18pt" style:font-size-complex="18pt"/>
    </style:style>
    <style:style style:name="P81" style:family="paragraph" style:parent-style-name="Standard">
      <style:paragraph-properties fo:margin-left="-1.251cm" fo:margin-right="0cm" fo:text-align="start" style:justify-single-word="false" fo:text-indent="0cm" style:auto-text-indent="false"/>
      <style:text-properties fo:color="#800000" style:font-name="Cambria" fo:font-size="14pt" style:text-underline-style="none" fo:background-color="#ffffff" style:font-size-asian="14pt" style:font-size-complex="14pt"/>
    </style:style>
    <style:style style:name="P82" style:family="paragraph" style:parent-style-name="Standard">
      <style:paragraph-properties fo:margin-left="-1.251cm" fo:margin-right="0cm" fo:text-align="start" style:justify-single-word="false" fo:text-indent="0cm" style:auto-text-indent="false"/>
      <style:text-properties fo:color="#800000" style:font-name="Cambria" fo:font-size="18pt" style:text-underline-style="none" style:font-size-asian="18pt" style:font-size-complex="18pt"/>
    </style:style>
    <style:style style:name="P83" style:family="paragraph" style:parent-style-name="Standard">
      <style:paragraph-properties fo:margin-left="-1.251cm" fo:margin-right="0cm" fo:text-align="start" style:justify-single-word="false" fo:text-indent="0cm" style:auto-text-indent="false"/>
      <style:text-properties fo:color="#0000cc" style:font-name="Cambria" fo:font-size="15pt" style:text-underline-style="none" fo:background-color="#ffffff" style:font-size-asian="15pt" style:font-size-complex="15pt"/>
    </style:style>
    <style:style style:name="P84" style:family="paragraph" style:parent-style-name="Standard">
      <style:paragraph-properties fo:margin-left="-1.251cm" fo:margin-right="0cm" fo:text-align="start" style:justify-single-word="false" fo:text-indent="0cm" style:auto-text-indent="false"/>
      <style:text-properties fo:color="#0000cc" style:font-name="Cambria" fo:font-size="14pt" style:text-underline-style="none" fo:background-color="#ffffff" style:font-size-asian="14pt" style:font-size-complex="14pt"/>
    </style:style>
    <style:style style:name="P85" style:family="paragraph" style:parent-style-name="Standard">
      <style:paragraph-properties fo:margin-left="-1.251cm" fo:margin-right="0cm" fo:text-align="start" style:justify-single-word="false" fo:text-indent="0cm" style:auto-text-indent="false"/>
      <style:text-properties fo:color="#0000cc" style:font-name="Cambria" fo:font-size="18pt" style:text-underline-style="none" fo:background-color="#ffffff" style:font-size-asian="18pt" style:font-size-complex="18pt"/>
    </style:style>
    <style:style style:name="P86" style:family="paragraph" style:parent-style-name="Standard">
      <style:paragraph-properties fo:margin-left="-1.251cm" fo:margin-right="0cm" fo:text-align="start" style:justify-single-word="false" fo:text-indent="0cm" style:auto-text-indent="false"/>
      <style:text-properties fo:font-size="15pt" style:font-size-asian="15pt" style:font-size-complex="15pt"/>
    </style:style>
    <style:style style:name="P87" style:family="paragraph" style:parent-style-name="Standard">
      <style:paragraph-properties fo:margin-left="-1.251cm" fo:margin-right="0cm" fo:text-align="start" style:justify-single-word="false" fo:text-indent="0cm" style:auto-text-indent="false"/>
      <style:text-properties fo:color="#0000ff" style:font-name="Cambria" fo:font-size="15pt" style:text-underline-style="none" fo:background-color="#ffffff" style:font-size-asian="15pt" style:font-size-complex="15pt"/>
    </style:style>
    <style:style style:name="P88" style:family="paragraph" style:parent-style-name="Standard">
      <style:paragraph-properties fo:margin-left="-1.251cm" fo:margin-right="0cm" fo:text-align="start" style:justify-single-word="false" fo:text-indent="0cm" style:auto-text-indent="false"/>
      <style:text-properties fo:color="#0000ff" style:font-name="Cambria" fo:font-size="18pt" style:text-underline-style="none" fo:background-color="#ffffff" style:font-size-asian="18pt" style:font-size-complex="18pt"/>
    </style:style>
    <style:style style:name="P89" style:family="paragraph" style:parent-style-name="Standard">
      <style:paragraph-properties fo:margin-left="-1.251cm" fo:margin-right="0cm" fo:text-align="start" style:justify-single-word="false" fo:text-indent="0cm" style:auto-text-indent="false"/>
      <style:text-properties fo:color="#0000ff" style:font-name="Cambria" fo:font-size="18pt" style:text-underline-style="none" fo:font-weight="normal" fo:background-color="#ffffff" style:font-size-asian="18pt" style:font-weight-asian="normal" style:font-size-complex="18pt" style:font-weight-complex="normal"/>
    </style:style>
    <style:style style:name="P90" style:family="paragraph" style:parent-style-name="Standard">
      <style:paragraph-properties fo:margin-left="-1.251cm" fo:margin-right="0cm" fo:text-align="start" style:justify-single-word="false" fo:text-indent="0cm" style:auto-text-indent="false"/>
      <style:text-properties fo:font-size="18pt" style:font-size-asian="18pt" style:font-size-complex="18pt"/>
    </style:style>
    <style:style style:name="P91" style:family="paragraph" style:parent-style-name="Standard">
      <style:paragraph-properties fo:margin-left="-1.251cm" fo:margin-right="0cm" fo:text-align="start" style:justify-single-word="false" fo:text-indent="0cm" style:auto-text-indent="false"/>
      <style:text-properties fo:font-size="18pt" fo:background-color="#ffffff" style:font-size-asian="18pt" style:font-size-complex="18pt"/>
    </style:style>
    <style:style style:name="P92" style:family="paragraph" style:parent-style-name="Standard">
      <style:paragraph-properties fo:margin-left="-1.251cm" fo:margin-right="0cm" fo:text-align="start" style:justify-single-word="false" fo:text-indent="0cm" style:auto-text-indent="false"/>
      <style:text-properties fo:color="#ffffff" style:font-name="Cambria" fo:font-size="18pt" style:text-underline-style="none" fo:background-color="#ffffff" style:font-size-asian="18pt" style:font-size-complex="18pt"/>
    </style:style>
    <style:style style:name="P93" style:family="paragraph" style:parent-style-name="Standard">
      <style:paragraph-properties fo:margin-left="-1.251cm" fo:margin-right="0cm" fo:text-align="start" style:justify-single-word="false" fo:text-indent="0cm" style:auto-text-indent="false"/>
      <style:text-properties fo:color="#ffffff" style:font-name="Cambria" fo:font-size="18pt" style:text-underline-style="none" fo:font-weight="normal" fo:background-color="#ffffff" style:font-size-asian="18pt" style:font-weight-asian="normal" style:font-size-complex="18pt" style:font-weight-complex="normal"/>
    </style:style>
    <style:style style:name="P94" style:family="paragraph" style:parent-style-name="Standard">
      <style:paragraph-properties fo:margin-left="-1.251cm" fo:margin-right="0cm" fo:text-align="start" style:justify-single-word="false" fo:text-indent="0cm" style:auto-text-indent="false"/>
      <style:text-properties fo:color="#ff0000" style:font-name="Cambria" fo:font-size="18pt" style:text-underline-style="none" fo:background-color="#ffffff" style:font-size-asian="18pt" style:font-size-complex="18pt"/>
    </style:style>
    <style:style style:name="P95" style:family="paragraph" style:parent-style-name="Standard">
      <style:paragraph-properties fo:margin-left="-1.251cm" fo:margin-right="0cm" fo:text-align="start" style:justify-single-word="false" fo:text-indent="0cm" style:auto-text-indent="false"/>
      <style:text-properties fo:color="#ff0000" style:font-name="Cambria" fo:font-size="18pt" style:text-underline-style="none" style:font-size-asian="18pt" style:font-size-complex="18pt"/>
    </style:style>
    <style:style style:name="P96" style:family="paragraph" style:parent-style-name="Standard">
      <style:paragraph-properties fo:margin-left="-1.251cm" fo:margin-right="0cm" fo:text-align="start" style:justify-single-word="false" fo:text-indent="0cm" style:auto-text-indent="false"/>
      <style:text-properties fo:color="#ff0000" style:font-name="Cambria" fo:font-size="18pt" style:text-underline-style="none" fo:font-weight="normal" fo:background-color="#ffffff" style:font-size-asian="18pt" style:font-weight-asian="normal" style:font-size-complex="18pt" style:font-weight-complex="normal"/>
    </style:style>
    <style:style style:name="P97" style:family="paragraph" style:parent-style-name="Standard">
      <style:paragraph-properties fo:margin-left="-1.251cm" fo:margin-right="0cm" fo:text-align="start" style:justify-single-word="false" fo:text-indent="0cm" style:auto-text-indent="false"/>
    </style:style>
    <style:style style:name="P98" style:family="paragraph" style:parent-style-name="Text_20_body">
      <style:paragraph-properties fo:margin-left="-1.251cm" fo:margin-right="0cm" fo:text-align="start" style:justify-single-word="false" fo:text-indent="0cm" style:auto-text-indent="false"/>
      <style:text-properties style:font-name="Cambria" fo:font-size="15pt" style:text-underline-style="none" style:font-size-asian="15pt" style:font-size-complex="15pt"/>
    </style:style>
    <style:style style:name="P99" style:family="paragraph" style:parent-style-name="Text_20_body">
      <style:paragraph-properties fo:margin-left="-1.251cm" fo:margin-right="0cm" fo:text-align="start" style:justify-single-word="false" fo:text-indent="0cm" style:auto-text-indent="false"/>
      <style:text-properties style:font-name="Cambria" fo:font-size="15pt" style:text-underline-style="none" fo:background-color="#ffffff" style:font-size-asian="15pt" style:font-size-complex="15pt"/>
    </style:style>
    <style:style style:name="P100" style:family="paragraph" style:parent-style-name="Text_20_body">
      <style:paragraph-properties fo:margin-left="-1.251cm" fo:margin-right="0cm" fo:text-align="start" style:justify-single-word="false" fo:text-indent="0cm" style:auto-text-indent="false"/>
      <style:text-properties style:font-name="Cambria" fo:font-size="16pt" style:text-underline-style="none" fo:background-color="#ffffff" style:font-size-asian="16pt" style:font-size-complex="16pt"/>
    </style:style>
    <style:style style:name="P101" style:family="paragraph" style:parent-style-name="Text_20_body">
      <style:paragraph-properties fo:margin-left="-1.251cm" fo:margin-right="0cm" fo:text-align="start" style:justify-single-word="false" fo:text-indent="0cm" style:auto-text-indent="false"/>
      <style:text-properties style:font-name="Cambria" fo:font-size="16pt" style:text-underline-style="none" style:font-size-asian="16pt" style:font-size-complex="16pt"/>
    </style:style>
    <style:style style:name="P102" style:family="paragraph" style:parent-style-name="Text_20_body">
      <style:paragraph-properties fo:margin-left="-1.251cm" fo:margin-right="0cm" fo:text-align="start" style:justify-single-word="false" fo:text-indent="0cm" style:auto-text-indent="false"/>
      <style:text-properties style:font-name="Cambria" fo:font-size="14pt" style:text-underline-style="none" fo:background-color="#ffffff" style:font-size-asian="14pt" style:font-size-complex="14pt"/>
    </style:style>
    <style:style style:name="P103" style:family="paragraph" style:parent-style-name="Text_20_body">
      <style:paragraph-properties fo:margin-left="-1.251cm" fo:margin-right="0cm" fo:text-align="start" style:justify-single-word="false" fo:text-indent="0cm" style:auto-text-indent="false"/>
      <style:text-properties style:font-name="Cambria" fo:font-size="14pt" style:text-underline-style="none" style:font-size-asian="14pt" style:font-size-complex="14pt"/>
    </style:style>
    <style:style style:name="P104" style:family="paragraph" style:parent-style-name="Text_20_body">
      <style:paragraph-properties fo:margin-left="-1.251cm" fo:margin-right="0cm" fo:text-align="start" style:justify-single-word="false" fo:text-indent="0cm" style:auto-text-indent="false"/>
      <style:text-properties style:font-name="Cambria" fo:font-size="18pt" style:text-underline-style="none" style:font-size-asian="18pt" style:font-size-complex="18pt"/>
    </style:style>
    <style:style style:name="P105" style:family="paragraph" style:parent-style-name="Text_20_body">
      <style:paragraph-properties fo:margin-left="-1.251cm" fo:margin-right="0cm" fo:text-align="start" style:justify-single-word="false" fo:text-indent="0cm" style:auto-text-indent="false"/>
      <style:text-properties style:font-name="Cambria" fo:font-size="18pt" style:text-underline-style="none" fo:background-color="#ffff00" style:font-size-asian="18pt" style:font-size-complex="18pt"/>
    </style:style>
    <style:style style:name="P106" style:family="paragraph" style:parent-style-name="Text_20_body">
      <style:paragraph-properties fo:margin-left="-1.251cm" fo:margin-right="0cm" fo:text-align="start" style:justify-single-word="false" fo:text-indent="0cm" style:auto-text-indent="false"/>
      <style:text-properties style:font-name="Cambria" fo:font-size="18pt" style:text-underline-style="none" fo:background-color="#ffffff" style:font-size-asian="18pt" style:font-size-complex="18pt"/>
    </style:style>
    <style:style style:name="P107" style:family="paragraph" style:parent-style-name="Text_20_body">
      <style:paragraph-properties fo:margin-left="-1.251cm" fo:margin-right="0cm" fo:text-align="start" style:justify-single-word="false" fo:text-indent="0cm" style:auto-text-indent="false"/>
      <style:text-properties fo:color="#000000" style:font-name="Cambria" fo:font-size="15pt" style:text-underline-style="none" fo:background-color="#ffffff" style:font-size-asian="15pt" style:font-size-complex="15pt"/>
    </style:style>
    <style:style style:name="P108" style:family="paragraph" style:parent-style-name="Text_20_body">
      <style:paragraph-properties fo:margin-left="-1.251cm" fo:margin-right="0cm" fo:text-align="start" style:justify-single-word="false" fo:text-indent="0cm" style:auto-text-indent="false"/>
      <style:text-properties fo:color="#000000" style:font-name="Cambria" fo:font-size="16pt" style:text-underline-style="none" fo:background-color="#ffffff" style:font-size-asian="16pt" style:font-size-complex="16pt"/>
    </style:style>
    <style:style style:name="P109" style:family="paragraph" style:parent-style-name="Text_20_body">
      <style:paragraph-properties fo:margin-left="-1.251cm" fo:margin-right="0cm" fo:text-align="start" style:justify-single-word="false" fo:text-indent="0cm" style:auto-text-indent="false"/>
      <style:text-properties fo:color="#000000" style:font-name="Cambria" fo:font-size="16pt" style:text-underline-style="none" fo:font-weight="normal" fo:background-color="#ffffff" style:font-size-asian="16pt" style:font-weight-asian="normal" style:font-size-complex="16pt" style:font-weight-complex="normal"/>
    </style:style>
    <style:style style:name="P110"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background-color="#ffff00" style:font-size-asian="18pt" style:font-size-complex="18pt"/>
    </style:style>
    <style:style style:name="P111"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background-color="#ffffff" style:font-size-asian="18pt" style:font-size-complex="18pt"/>
    </style:style>
    <style:style style:name="P112" style:family="paragraph" style:parent-style-name="Text_20_body">
      <style:paragraph-properties fo:margin-left="-1.251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background-color="#ffffff" style:font-size-asian="18pt" style:font-size-complex="18pt"/>
    </style:style>
    <style:style style:name="P113" style:family="paragraph" style:parent-style-name="Text_20_body">
      <style:paragraph-properties fo:margin-left="-1.251cm" fo:margin-right="0cm" fo:text-align="start" style:justify-single-word="false" fo:text-indent="0cm" style:auto-text-indent="false">
        <style:tab-stops>
          <style:tab-stop style:position="11.06cm"/>
        </style:tab-stops>
      </style:paragraph-properties>
      <style:text-properties fo:color="#000000" style:font-name="Cambria" fo:font-size="18pt" style:text-underline-style="none" fo:background-color="#ffffff" style:font-size-asian="18pt" style:font-size-complex="18pt"/>
    </style:style>
    <style:style style:name="P114"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background-color="#83caff" style:font-size-asian="18pt" style:font-size-complex="18pt"/>
    </style:style>
    <style:style style:name="P115"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116" style:family="paragraph" style:parent-style-name="Text_20_body">
      <style:paragraph-properties fo:margin-left="-1.251cm" fo:margin-right="0cm" fo:text-align="start" style:justify-single-word="false" fo:text-indent="0cm" style:auto-text-indent="false">
        <style:tab-stops>
          <style:tab-stop style:position="11.06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17" style:family="paragraph" style:parent-style-name="Text_20_body">
      <style:paragraph-properties fo:margin-left="-1.251cm" fo:margin-right="0cm" fo:text-align="start" style:justify-single-word="false" fo:text-indent="0cm" style:auto-text-indent="false">
        <style:tab-stops>
          <style:tab-stop style:position="15.716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18" style:family="paragraph" style:parent-style-name="Text_20_body">
      <style:paragraph-properties fo:margin-left="-1.251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19"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ffff00" style:font-size-asian="18pt" style:font-weight-asian="normal" style:font-size-complex="18pt" style:font-weight-complex="normal"/>
    </style:style>
    <style:style style:name="P120"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font-weight="normal" fo:background-color="#000000" style:font-size-asian="18pt" style:font-weight-asian="normal" style:font-size-complex="18pt" style:font-weight-complex="normal"/>
    </style:style>
    <style:style style:name="P121" style:family="paragraph" style:parent-style-name="Text_20_body">
      <style:paragraph-properties fo:margin-left="-1.251cm" fo:margin-right="0cm" fo:text-align="start" style:justify-single-word="false" fo:text-indent="0cm" style:auto-text-indent="false"/>
      <style:text-properties fo:color="#000000" style:font-name="Cambria" fo:font-size="18pt" style:text-underline-style="none" fo:background-color="transparent" style:font-size-asian="18pt" style:font-size-complex="18pt"/>
    </style:style>
    <style:style style:name="P122" style:family="paragraph" style:parent-style-name="Text_20_body">
      <style:paragraph-properties fo:margin-left="-1.251cm" fo:margin-right="0cm" fo:text-align="start" style:justify-single-word="false" fo:text-indent="0cm" style:auto-text-indent="false"/>
      <style:text-properties fo:color="#000000" style:font-name="Cambria" fo:font-size="20pt" style:text-underline-style="none" fo:background-color="#ffffff" style:font-size-asian="20pt" style:font-size-complex="20pt"/>
    </style:style>
    <style:style style:name="P123" style:family="paragraph" style:parent-style-name="Text_20_body">
      <style:paragraph-properties fo:margin-left="-1.251cm" fo:margin-right="0cm" fo:text-align="start" style:justify-single-word="false" fo:text-indent="0cm" style:auto-text-indent="false"/>
      <style:text-properties fo:color="#000000" style:font-name="Cambria" fo:font-size="14pt" style:text-underline-style="none" fo:background-color="#ffffff" style:font-size-asian="14pt" style:font-size-complex="14pt"/>
    </style:style>
    <style:style style:name="P124" style:family="paragraph" style:parent-style-name="Text_20_body">
      <style:paragraph-properties fo:margin-left="-1.251cm" fo:margin-right="0cm" fo:text-align="start" style:justify-single-word="false" fo:text-indent="0cm" style:auto-text-indent="false"/>
      <style:text-properties fo:font-size="15pt" style:font-size-asian="15pt" style:font-size-complex="15pt"/>
    </style:style>
    <style:style style:name="P125" style:family="paragraph" style:parent-style-name="Text_20_body">
      <style:paragraph-properties fo:margin-left="-1.251cm" fo:margin-right="0cm" fo:text-align="start" style:justify-single-word="false" fo:text-indent="0cm" style:auto-text-indent="false"/>
      <style:text-properties fo:color="#0000ff" style:font-name="Cambria" fo:font-size="18pt" style:text-underline-style="none" fo:background-color="#ffffff" style:font-size-asian="18pt" style:font-size-complex="18pt"/>
    </style:style>
    <style:style style:name="P126" style:family="paragraph" style:parent-style-name="Text_20_body">
      <style:paragraph-properties fo:margin-left="-1.251cm" fo:margin-right="0cm" fo:text-align="start" style:justify-single-word="false" fo:text-indent="0cm" style:auto-text-indent="false"/>
      <style:text-properties fo:color="#ffffff" style:font-name="Cambria" fo:font-size="18pt" style:text-underline-style="none" fo:background-color="#ffffff" style:font-size-asian="18pt" style:font-size-complex="18pt"/>
    </style:style>
    <style:style style:name="P127" style:family="paragraph" style:parent-style-name="Text_20_body">
      <style:paragraph-properties fo:margin-left="-1.251cm" fo:margin-right="0cm" fo:text-align="start" style:justify-single-word="false" fo:text-indent="0cm" style:auto-text-indent="false"/>
      <style:text-properties fo:color="#ffffff" style:font-name="Cambria" fo:font-size="18pt" style:text-underline-style="none" fo:font-weight="normal" fo:background-color="#ffffff" style:font-size-asian="18pt" style:font-weight-asian="normal" style:font-size-complex="18pt" style:font-weight-complex="normal"/>
    </style:style>
    <style:style style:name="P128" style:family="paragraph" style:parent-style-name="Text_20_body">
      <style:paragraph-properties fo:margin-left="-1.251cm" fo:margin-right="0cm" fo:text-align="start" style:justify-single-word="false" fo:text-indent="0cm" style:auto-text-indent="false"/>
      <style:text-properties fo:color="#ff0000" style:font-name="Cambria" fo:font-size="18pt" style:text-underline-style="none" fo:background-color="#ffffff" style:font-size-asian="18pt" style:font-size-complex="18pt"/>
    </style:style>
    <style:style style:name="P129" style:family="paragraph" style:parent-style-name="Text_20_body">
      <style:paragraph-properties fo:margin-left="-1.251cm" fo:margin-right="0cm" fo:text-align="start" style:justify-single-word="false" fo:text-indent="0cm" style:auto-text-indent="false"/>
      <style:text-properties fo:color="#0000cc" style:font-name="Cambria" fo:font-size="18pt" style:text-underline-style="none" fo:font-weight="normal" fo:background-color="#ffffff" style:font-size-asian="18pt" style:font-weight-asian="normal" style:font-size-complex="18pt" style:font-weight-complex="normal"/>
    </style:style>
    <style:style style:name="P130" style:family="paragraph" style:parent-style-name="Text_20_body">
      <style:paragraph-properties fo:margin-left="-1.251cm" fo:margin-right="0cm" fo:text-align="start" style:justify-single-word="false" fo:text-indent="0cm" style:auto-text-indent="false"/>
      <style:text-properties fo:font-size="18pt" fo:background-color="#ffffff" style:font-size-asian="18pt" style:font-size-complex="18pt"/>
    </style:style>
    <style:style style:name="P131"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ffffff" style:font-name="Cambria" fo:font-size="18pt" style:text-underline-style="none" fo:background-color="#ffffff" style:font-size-asian="18pt" style:font-size-complex="18pt"/>
    </style:style>
    <style:style style:name="P132"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style:font-name="Cambria" fo:font-size="18pt" style:text-underline-style="none" fo:background-color="#ffffff" style:font-size-asian="18pt" style:font-size-complex="18pt"/>
    </style:style>
    <style:style style:name="P133"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ff" style:font-size-asian="18pt" style:font-size-complex="18pt"/>
    </style:style>
    <style:style style:name="P134" style:family="paragraph" style:parent-style-name="Standard">
      <style:paragraph-properties fo:margin-left="-1.251cm" fo:margin-right="0cm" fo:text-align="start" style:justify-single-word="false" fo:text-indent="0cm" style:auto-text-indent="false" fo:background-color="#ffffff">
        <style:tab-stops>
          <style:tab-stop style:position="15.002cm"/>
        </style:tab-stops>
        <style:background-image/>
      </style:paragraph-properties>
      <style:text-properties fo:color="#000000" style:font-name="Cambria" fo:font-size="18pt" style:text-underline-style="none" fo:background-color="#ffffff" style:font-size-asian="18pt" style:font-size-complex="18pt"/>
    </style:style>
    <style:style style:name="P135"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36" style:family="paragraph" style:parent-style-name="Standard">
      <style:paragraph-properties fo:margin-left="-1.251cm" fo:margin-right="0cm" fo:text-align="start" style:justify-single-word="false" fo:text-indent="0cm" style:auto-text-indent="false" fo:background-color="#ffffff">
        <style:tab-stops>
          <style:tab-stop style:position="15.002cm"/>
        </style:tab-stops>
        <style:background-image/>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37"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00" style:font-size-asian="18pt" style:font-size-complex="18pt"/>
    </style:style>
    <style:style style:name="P138" style:family="paragraph" style:parent-style-name="Text_20_body">
      <style:paragraph-properties fo:margin-left="-1.251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00" style:font-size-asian="18pt" style:font-size-complex="18pt"/>
    </style:style>
    <style:style style:name="P139" style:family="paragraph" style:parent-style-name="Text_20_body">
      <style:paragraph-properties fo:margin-left="-1.251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ff" style:font-size-asian="18pt" style:font-size-complex="18pt"/>
    </style:style>
    <style:style style:name="P140" style:family="paragraph" style:parent-style-name="Text_20_body">
      <style:paragraph-properties fo:margin-left="-1.251cm" fo:margin-right="0cm" fo:text-align="start" style:justify-single-word="false" fo:text-indent="0cm" style:auto-text-indent="false" fo:background-color="#ffffff">
        <style:background-image/>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41" style:family="paragraph" style:parent-style-name="Text_20_body">
      <style:paragraph-properties fo:margin-left="-1.251cm" fo:margin-right="0cm" fo:text-align="start" style:justify-single-word="false" fo:text-indent="0cm" style:auto-text-indent="false" fo:background-color="#ffffff">
        <style:background-image/>
      </style:paragraph-properties>
      <style:text-properties fo:color="#ffffff" style:font-name="Cambria" fo:font-size="18pt" style:text-underline-style="none" fo:background-color="#ffffff" style:font-size-asian="18pt" style:font-size-complex="18pt"/>
    </style:style>
    <style:style style:name="P142" style:family="paragraph" style:parent-style-name="Standard">
      <style:paragraph-properties fo:margin-left="-1.251cm" fo:margin-right="0cm" fo:text-align="start" style:justify-single-word="false" fo:text-indent="0cm" style:auto-text-indent="false" fo:background-color="transparent">
        <style:tab-stops>
          <style:tab-stop style:position="13.877cm"/>
        </style:tab-stops>
        <style:background-image/>
      </style:paragraph-properties>
      <style:text-properties style:font-name="Cambria" fo:font-size="18pt" style:text-underline-style="none" fo:background-color="#ffffff" style:font-size-asian="18pt" style:font-size-complex="18pt"/>
    </style:style>
    <style:style style:name="P143" style:family="paragraph" style:parent-style-name="Standard">
      <style:paragraph-properties fo:margin-left="0cm" fo:margin-right="0cm" fo:text-align="start" style:justify-single-word="false" fo:text-indent="0cm" style:auto-text-indent="false"/>
      <style:text-properties style:font-name="Cambria" fo:font-size="14pt" style:text-underline-style="none" style:font-size-asian="14pt" style:font-size-complex="14pt"/>
    </style:style>
    <style:style style:name="P144" style:family="paragraph" style:parent-style-name="Standard">
      <style:paragraph-properties fo:margin-left="0cm" fo:margin-right="0cm" fo:text-align="start" style:justify-single-word="false" fo:text-indent="0cm" style:auto-text-indent="false"/>
      <style:text-properties style:font-name="Cambria" fo:font-size="18pt" style:text-underline-style="none" style:font-size-asian="18pt" style:font-size-complex="18pt"/>
    </style:style>
    <style:style style:name="P145" style:family="paragraph" style:parent-style-name="Standard">
      <style:paragraph-properties fo:margin-left="0cm" fo:margin-right="0cm" fo:text-align="start" style:justify-single-word="false" fo:text-indent="0cm" style:auto-text-indent="false"/>
      <style:text-properties style:font-name="Cambria" fo:font-size="18pt" style:text-underline-style="none" fo:background-color="#ffffff" style:font-size-asian="18pt" style:font-size-complex="18pt"/>
    </style:style>
    <style:style style:name="P146" style:family="paragraph" style:parent-style-name="Standard">
      <style:paragraph-properties fo:margin-left="0cm" fo:margin-right="0cm" fo:text-align="start" style:justify-single-word="false" fo:text-indent="0cm" style:auto-text-indent="false"/>
      <style:text-properties style:font-name="Cambria" fo:font-size="18pt" style:text-underline-style="none" fo:background-color="#ffff00" style:font-size-asian="18pt" style:font-size-complex="18pt"/>
    </style:style>
    <style:style style:name="P147" style:family="paragraph" style:parent-style-name="Standard">
      <style:paragraph-properties fo:margin-left="0cm" fo:margin-right="0cm" fo:text-align="start" style:justify-single-word="false" fo:text-indent="0cm" style:auto-text-indent="false"/>
      <style:text-properties fo:color="#000000" style:font-name="Cambria" fo:font-size="15pt" style:text-underline-style="none" fo:background-color="#ffffff" style:font-size-asian="15pt" style:font-size-complex="15pt"/>
    </style:style>
    <style:style style:name="P148"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background-color="#ffffff" style:font-size-asian="18pt" style:font-size-complex="18pt"/>
    </style:style>
    <style:style style:name="P149" style:family="paragraph" style:parent-style-name="Standard">
      <style:paragraph-properties fo:margin-left="0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background-color="#ffffff" style:font-size-asian="18pt" style:font-size-complex="18pt"/>
    </style:style>
    <style:style style:name="P150" style:family="paragraph" style:parent-style-name="Standard">
      <style:paragraph-properties fo:margin-left="0cm" fo:margin-right="0cm" fo:text-align="start" style:justify-single-word="false" fo:text-indent="0cm" style:auto-text-indent="false">
        <style:tab-stops>
          <style:tab-stop style:position="14.817cm"/>
        </style:tab-stops>
      </style:paragraph-properties>
      <style:text-properties fo:color="#000000" style:font-name="Cambria" fo:font-size="18pt" style:text-underline-style="none" fo:background-color="#ffffff" style:font-size-asian="18pt" style:font-size-complex="18pt"/>
    </style:style>
    <style:style style:name="P151" style:family="paragraph" style:parent-style-name="Standard">
      <style:paragraph-properties fo:margin-left="0cm" fo:margin-right="0cm" fo:text-align="start" style:justify-single-word="false" fo:text-indent="0cm" style:auto-text-indent="false">
        <style:tab-stops>
          <style:tab-stop style:position="9.033cm"/>
        </style:tab-stops>
      </style:paragraph-properties>
      <style:text-properties fo:color="#000000" style:font-name="Cambria" fo:font-size="18pt" style:text-underline-style="none" fo:background-color="#ffffff" style:font-size-asian="18pt" style:font-size-complex="18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style:font-size-asian="18pt" style:font-size-complex="18pt"/>
    </style:style>
    <style:style style:name="P153" style:family="paragraph" style:parent-style-name="Standard">
      <style:paragraph-properties fo:margin-left="0cm" fo:margin-right="0cm" fo:text-align="start" style:justify-single-word="false" fo:text-indent="0cm" style:auto-text-indent="false">
        <style:tab-stops>
          <style:tab-stop style:position="14.817cm"/>
        </style:tab-stops>
      </style:paragraph-properties>
      <style:text-properties fo:color="#000000" style:font-name="Cambria" fo:font-size="18pt" style:text-underline-style="none" style:font-size-asian="18pt" style:font-size-complex="18pt"/>
    </style:style>
    <style:style style:name="P154"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background-color="#83caff" style:font-size-asian="18pt" style:font-size-complex="18pt"/>
    </style:style>
    <style:style style:name="P155"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background-color="#ffff00" style:font-size-asian="18pt" style:font-size-complex="18pt"/>
    </style:style>
    <style:style style:name="P156"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157" style:family="paragraph" style:parent-style-name="Standard">
      <style:paragraph-properties fo:margin-left="0cm" fo:margin-right="0cm" fo:text-align="start" style:justify-single-word="false" fo:text-indent="0cm" style:auto-text-indent="false">
        <style:tab-stops>
          <style:tab-stop style:position="9.033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font-weight="normal" fo:background-color="#83caff" style:font-size-asian="18pt" style:font-weight-asian="normal" style:font-size-complex="18pt" style:font-weight-complex="normal"/>
    </style:style>
    <style:style style:name="P159"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font-weight="normal" fo:background-color="#ffff00" style:font-size-asian="18pt" style:font-weight-asian="normal" style:font-size-complex="18pt"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color="#000000" style:font-name="Cambria" fo:font-size="18pt" style:text-underline-style="none" fo:background-color="transparent" style:font-size-asian="18pt" style:font-size-complex="18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Cambria" fo:font-size="16pt" style:text-underline-style="none" fo:font-weight="normal" fo:background-color="#ffffff" style:font-size-asian="16pt" style:font-weight-asian="normal" style:font-size-complex="16pt"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fo:font-size="18pt" fo:background-color="#ffffff" style:font-size-asian="18pt" style:font-size-complex="18pt"/>
    </style:style>
    <style:style style:name="P163" style:family="paragraph" style:parent-style-name="Standard">
      <style:paragraph-properties fo:margin-left="0cm" fo:margin-right="0cm" fo:text-align="start" style:justify-single-word="false" fo:text-indent="0cm" style:auto-text-indent="false">
        <style:tab-stops>
          <style:tab-stop style:position="9.033cm"/>
        </style:tab-stops>
      </style:paragraph-properties>
      <style:text-properties fo:font-size="18pt" fo:background-color="#ffffff" style:font-size-asian="18pt" style:font-size-complex="18pt"/>
    </style:style>
    <style:style style:name="P164" style:family="paragraph" style:parent-style-name="Standard">
      <style:paragraph-properties fo:margin-left="0cm" fo:margin-right="0cm" fo:text-align="start" style:justify-single-word="false" fo:text-indent="0cm" style:auto-text-indent="false"/>
      <style:text-properties fo:font-size="18pt" style:font-size-asian="18pt" style:font-size-complex="18pt"/>
    </style:style>
    <style:style style:name="P165" style:family="paragraph" style:parent-style-name="Standard">
      <style:paragraph-properties fo:margin-left="0cm" fo:margin-right="0cm" fo:text-align="start" style:justify-single-word="false" fo:text-indent="0cm" style:auto-text-indent="false"/>
      <style:text-properties fo:color="#ff0000" style:font-name="Cambria" fo:font-size="18pt" style:text-underline-style="none" fo:background-color="#ffffff" style:font-size-asian="18pt" style:font-size-complex="18pt"/>
    </style:style>
    <style:style style:name="P166" style:family="paragraph" style:parent-style-name="Standard">
      <style:paragraph-properties fo:margin-left="0cm" fo:margin-right="0cm" fo:text-align="start" style:justify-single-word="false" fo:text-indent="0cm" style:auto-text-indent="false"/>
      <style:text-properties fo:color="#ffffff" style:font-name="Cambria" fo:font-size="18pt" style:text-underline-style="none" fo:background-color="#ffffff" style:font-size-asian="18pt" style:font-size-complex="18pt"/>
    </style:style>
    <style:style style:name="P167" style:family="paragraph" style:parent-style-name="Text_20_body">
      <style:paragraph-properties fo:margin-left="0cm" fo:margin-right="0cm" fo:text-align="start" style:justify-single-word="false" fo:text-indent="0cm" style:auto-text-indent="false"/>
      <style:text-properties fo:color="#000000" style:font-name="Cambria" fo:font-size="15pt" style:text-underline-style="none" fo:background-color="#ffffff" style:font-size-asian="15pt" style:font-size-complex="15pt"/>
    </style:style>
    <style:style style:name="P168"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fo:background-color="#ffffff" style:font-size-asian="18pt" style:font-size-complex="18pt"/>
    </style:style>
    <style:style style:name="P169" style:family="paragraph" style:parent-style-name="Text_20_body">
      <style:paragraph-properties fo:margin-left="0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background-color="#ffffff" style:font-size-asian="18pt" style:font-size-complex="18pt"/>
    </style:style>
    <style:style style:name="P170" style:family="paragraph" style:parent-style-name="Text_20_body">
      <style:paragraph-properties fo:margin-left="0cm" fo:margin-right="0cm" fo:text-align="start" style:justify-single-word="false" fo:text-indent="0cm" style:auto-text-indent="false">
        <style:tab-stops>
          <style:tab-stop style:position="9.033cm"/>
        </style:tab-stops>
      </style:paragraph-properties>
      <style:text-properties fo:color="#000000" style:font-name="Cambria" fo:font-size="18pt" style:text-underline-style="none" fo:background-color="#ffffff" style:font-size-asian="18pt" style:font-size-complex="18pt"/>
    </style:style>
    <style:style style:name="P171" style:family="paragraph" style:parent-style-name="Text_20_body">
      <style:paragraph-properties fo:margin-left="0cm" fo:margin-right="0cm" fo:text-align="start" style:justify-single-word="false" fo:text-indent="0cm" style:auto-text-indent="false">
        <style:tab-stops>
          <style:tab-stop style:position="11.06cm"/>
        </style:tab-stops>
      </style:paragraph-properties>
      <style:text-properties fo:color="#000000" style:font-name="Cambria" fo:font-size="18pt" style:text-underline-style="none" fo:background-color="#ffffff" style:font-size-asian="18pt" style:font-size-complex="18pt"/>
    </style:style>
    <style:style style:name="P172"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fo:background-color="#ffff00" style:font-size-asian="18pt" style:font-size-complex="18pt"/>
    </style:style>
    <style:style style:name="P173"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style:font-size-asian="18pt" style:font-size-complex="18pt"/>
    </style:style>
    <style:style style:name="P174" style:family="paragraph" style:parent-style-name="Text_20_body">
      <style:paragraph-properties fo:margin-left="0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background-color="#83caff" style:font-size-asian="18pt" style:font-size-complex="18pt"/>
    </style:style>
    <style:style style:name="P175"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176" style:family="paragraph" style:parent-style-name="Text_20_body">
      <style:paragraph-properties fo:margin-left="0cm" fo:margin-right="0cm" fo:text-align="start" style:justify-single-word="false" fo:text-indent="0cm" style:auto-text-indent="false">
        <style:tab-stops>
          <style:tab-stop style:position="15.002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177"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fo:font-weight="normal" fo:background-color="#ffff00" style:font-size-asian="18pt" style:font-weight-asian="normal" style:font-size-complex="18pt" style:font-weight-complex="normal"/>
    </style:style>
    <style:style style:name="P178" style:family="paragraph" style:parent-style-name="Text_20_body">
      <style:paragraph-properties fo:margin-left="0cm" fo:margin-right="0cm" fo:text-align="start" style:justify-single-word="false" fo:text-indent="0cm" style:auto-text-indent="false">
        <style:tab-stops>
          <style:tab-stop style:position="9.033cm"/>
        </style:tab-stops>
      </style:paragraph-properties>
      <style:text-properties fo:color="#000000" style:font-name="Cambria" fo:font-size="18pt" style:text-underline-style="none" fo:font-weight="normal" fo:background-color="#ffff00" style:font-size-asian="18pt" style:font-weight-asian="normal" style:font-size-complex="18pt" style:font-weight-complex="normal"/>
    </style:style>
    <style:style style:name="P179"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fo:font-weight="normal" fo:background-color="transparent" style:font-size-asian="18pt" style:font-weight-asian="normal" style:font-size-complex="18pt" style:font-weight-complex="normal"/>
    </style:style>
    <style:style style:name="P180" style:family="paragraph" style:parent-style-name="Text_20_body">
      <style:paragraph-properties fo:margin-left="0cm" fo:margin-right="0cm" fo:text-align="start" style:justify-single-word="false" fo:text-indent="0cm" style:auto-text-indent="false"/>
      <style:text-properties fo:color="#000000" style:font-name="Cambria" fo:font-size="18pt" style:text-underline-style="none" fo:background-color="transparent" style:font-size-asian="18pt" style:font-size-complex="18pt"/>
    </style:style>
    <style:style style:name="P181" style:family="paragraph" style:parent-style-name="Text_20_body">
      <style:paragraph-properties fo:margin-left="0cm" fo:margin-right="0cm" fo:text-align="start" style:justify-single-word="false" fo:text-indent="0cm" style:auto-text-indent="false"/>
      <style:text-properties fo:color="#000000" style:font-name="Cambria" fo:font-size="20pt" style:text-underline-style="none" fo:background-color="#ffffff" style:font-size-asian="20pt" style:font-size-complex="20pt"/>
    </style:style>
    <style:style style:name="P182" style:family="paragraph" style:parent-style-name="Text_20_body">
      <style:paragraph-properties fo:margin-left="0cm" fo:margin-right="0cm" fo:text-align="start" style:justify-single-word="false" fo:text-indent="0cm" style:auto-text-indent="false"/>
      <style:text-properties fo:color="#000000" style:font-name="Cambria" fo:font-size="16pt" style:text-underline-style="none" fo:background-color="#ffffff" style:font-size-asian="16pt" style:font-size-complex="16pt"/>
    </style:style>
    <style:style style:name="P183" style:family="paragraph" style:parent-style-name="Text_20_body">
      <style:paragraph-properties fo:margin-left="0cm" fo:margin-right="0cm" fo:text-align="start" style:justify-single-word="false" fo:text-indent="0cm" style:auto-text-indent="false">
        <style:tab-stops>
          <style:tab-stop style:position="15.002cm"/>
        </style:tab-stops>
      </style:paragraph-properties>
      <style:text-properties fo:color="#000000" style:font-name="Cambria" fo:font-size="16pt" style:text-underline-style="none" fo:font-weight="normal" fo:background-color="#ffffff" style:font-size-asian="16pt" style:font-weight-asian="normal" style:font-size-complex="16pt" style:font-weight-complex="normal"/>
    </style:style>
    <style:style style:name="P184" style:family="paragraph" style:parent-style-name="Text_20_body">
      <style:paragraph-properties fo:margin-left="0cm" fo:margin-right="0cm" fo:text-align="start" style:justify-single-word="false" fo:text-indent="0cm" style:auto-text-indent="false">
        <style:tab-stops>
          <style:tab-stop style:position="15.002cm"/>
        </style:tab-stops>
      </style:paragraph-properties>
      <style:text-properties fo:color="#000000" fo:font-size="18pt" fo:background-color="#ffffff" style:font-size-asian="18pt" style:font-size-complex="18pt"/>
    </style:style>
    <style:style style:name="P185" style:family="paragraph" style:parent-style-name="Text_20_body">
      <style:paragraph-properties fo:margin-left="0cm" fo:margin-right="0cm" fo:text-align="start" style:justify-single-word="false" fo:text-indent="0cm" style:auto-text-indent="false"/>
      <style:text-properties style:font-name="Cambria" fo:font-size="18pt" style:text-underline-style="none" fo:background-color="#ffffff" style:font-size-asian="18pt" style:font-size-complex="18pt"/>
    </style:style>
    <style:style style:name="P186" style:family="paragraph" style:parent-style-name="Text_20_body">
      <style:paragraph-properties fo:margin-left="0cm" fo:margin-right="0cm" fo:text-align="start" style:justify-single-word="false" fo:text-indent="0cm" style:auto-text-indent="false"/>
      <style:text-properties style:font-name="Cambria" fo:font-size="18pt" style:text-underline-style="none" style:font-size-asian="18pt" style:font-size-complex="18pt"/>
    </style:style>
    <style:style style:name="P187" style:family="paragraph" style:parent-style-name="Text_20_body">
      <style:paragraph-properties fo:margin-left="0cm" fo:margin-right="0cm" fo:text-align="start" style:justify-single-word="false" fo:text-indent="0cm" style:auto-text-indent="false"/>
      <style:text-properties style:font-name="Cambria" fo:font-size="18pt" style:text-underline-style="none" fo:background-color="#ffff00" style:font-size-asian="18pt" style:font-size-complex="18pt"/>
    </style:style>
    <style:style style:name="P188" style:family="paragraph" style:parent-style-name="Text_20_body">
      <style:paragraph-properties fo:margin-left="0cm" fo:margin-right="0cm" fo:text-align="start" style:justify-single-word="false" fo:text-indent="0cm" style:auto-text-indent="false"/>
      <style:text-properties fo:font-size="18pt" style:font-size-asian="18pt" style:font-size-complex="18pt"/>
    </style:style>
    <style:style style:name="P189" style:family="paragraph" style:parent-style-name="Text_20_body">
      <style:paragraph-properties fo:margin-left="0cm" fo:margin-right="0cm" fo:text-align="start" style:justify-single-word="false" fo:text-indent="0cm" style:auto-text-indent="false"/>
      <style:text-properties fo:font-size="18pt" fo:background-color="#ffff00" style:font-size-asian="18pt" style:font-size-complex="18pt"/>
    </style:style>
    <style:style style:name="P190" style:family="paragraph" style:parent-style-name="Text_20_body">
      <style:paragraph-properties fo:margin-left="0cm" fo:margin-right="0cm" fo:text-align="start" style:justify-single-word="false" fo:text-indent="0cm" style:auto-text-indent="false"/>
      <style:text-properties fo:color="#ff0000" style:font-name="Cambria" fo:font-size="18pt" style:text-underline-style="none" fo:background-color="#ffffff" style:font-size-asian="18pt" style:font-size-complex="18pt"/>
    </style:style>
    <style:style style:name="P191" style:family="paragraph" style:parent-style-name="Text_20_body">
      <style:paragraph-properties fo:margin-left="0cm" fo:margin-right="0cm" fo:text-align="start" style:justify-single-word="false" fo:text-indent="0cm" style:auto-text-indent="false"/>
      <style:text-properties fo:color="#ff0000" style:font-name="Cambria" fo:font-size="18pt" style:text-underline-style="none" fo:font-weight="normal" fo:background-color="#ffffff" style:font-size-asian="18pt" style:font-weight-asian="normal" style:font-size-complex="18pt" style:font-weight-complex="normal"/>
    </style:style>
    <style:style style:name="P192"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ff" style:font-size-asian="18pt" style:font-size-complex="18pt"/>
    </style:style>
    <style:style style:name="P193" style:family="paragraph" style:parent-style-name="Text_20_body">
      <style:paragraph-properties fo:margin-left="0cm" fo:margin-right="0cm" fo:text-align="start" style:justify-single-word="false" fo:text-indent="0cm" style:auto-text-indent="false" fo:background-color="#ffffff">
        <style:tab-stops>
          <style:tab-stop style:position="15.002cm"/>
        </style:tab-stops>
        <style:background-image/>
      </style:paragraph-properties>
      <style:text-properties fo:color="#000000" style:font-name="Cambria" fo:font-size="18pt" style:text-underline-style="none" fo:background-color="#ffffff" style:font-size-asian="18pt" style:font-size-complex="18pt"/>
    </style:style>
    <style:style style:name="P194"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00" style:font-size-asian="18pt" style:font-size-complex="18pt"/>
    </style:style>
    <style:style style:name="P195"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font-name="Cambria" fo:font-size="18pt" style:text-underline-style="none" fo:background-color="#ffffff" style:font-size-asian="18pt" style:font-size-complex="18pt"/>
    </style:style>
    <style:style style:name="P196" style:family="paragraph" style:parent-style-name="Text_20_body">
      <style:text-properties fo:font-size="15pt" style:font-size-asian="15pt" style:font-size-complex="15pt"/>
    </style:style>
    <style:style style:name="P197" style:family="paragraph" style:parent-style-name="Text_20_body">
      <style:text-properties fo:font-size="15pt" fo:background-color="#ffff00" style:font-size-asian="15pt" style:font-size-complex="15pt"/>
    </style:style>
    <style:style style:name="P198" style:family="paragraph" style:parent-style-name="Text_20_body">
      <style:text-properties fo:font-size="15pt" fo:background-color="#ffffff" style:font-size-asian="15pt" style:font-size-complex="15pt"/>
    </style:style>
    <style:style style:name="P199" style:family="paragraph" style:parent-style-name="Text_20_body">
      <style:text-properties fo:font-size="15pt" fo:background-color="#0084d1" style:font-size-asian="15pt" style:font-size-complex="15pt"/>
    </style:style>
    <style:style style:name="P200" style:family="paragraph" style:parent-style-name="Text_20_body">
      <style:text-properties fo:color="#ff0000" fo:font-size="15pt" style:font-size-asian="15pt" style:font-size-complex="15pt"/>
    </style:style>
    <style:style style:name="P201" style:family="paragraph" style:parent-style-name="Text_20_body">
      <style:text-properties fo:color="#ff0000" style:font-name="Cambria" fo:font-size="18pt" style:text-underline-style="none" fo:background-color="#ffffff" style:font-size-asian="18pt" style:font-size-complex="18pt"/>
    </style:style>
    <style:style style:name="P202" style:family="paragraph" style:parent-style-name="Text_20_body">
      <style:text-properties fo:color="#ff0000" style:font-name="Cambria" fo:font-size="18pt" style:text-underline-style="none" style:font-size-asian="18pt" style:font-size-complex="18pt"/>
    </style:style>
    <style:style style:name="P203" style:family="paragraph" style:parent-style-name="Text_20_body">
      <style:text-properties fo:color="#000000" fo:font-size="15pt" style:font-size-asian="15pt" style:font-size-complex="15pt"/>
    </style:style>
    <style:style style:name="P204" style:family="paragraph" style:parent-style-name="Text_20_body">
      <style:text-properties fo:color="#000000" fo:font-size="15pt" fo:background-color="#ffff00" style:font-size-asian="15pt" style:font-size-complex="15pt"/>
    </style:style>
    <style:style style:name="P205" style:family="paragraph" style:parent-style-name="Text_20_body">
      <style:text-properties fo:color="#000000" fo:font-size="15pt" fo:background-color="#ffffff" style:font-size-asian="15pt" style:font-size-complex="15pt"/>
    </style:style>
    <style:style style:name="P206" style:family="paragraph" style:parent-style-name="Text_20_body">
      <style:text-properties fo:color="#000000" style:font-name="Cambria" fo:font-size="15pt" style:text-underline-style="none" fo:background-color="#ffffff" style:font-size-asian="15pt" style:font-size-complex="15pt"/>
    </style:style>
    <style:style style:name="P207" style:family="paragraph" style:parent-style-name="Text_20_body">
      <style:text-properties fo:color="#000000" style:font-name="Cambria" fo:font-size="15pt" style:text-underline-style="none" fo:background-color="#ffff00" style:font-size-asian="15pt" style:font-size-complex="15pt"/>
    </style:style>
    <style:style style:name="P208" style:family="paragraph" style:parent-style-name="Text_20_body">
      <style:text-properties fo:color="#000000" style:font-name="Cambria" fo:font-size="15pt" style:text-underline-style="none" style:font-size-asian="15pt" style:font-size-complex="15pt"/>
    </style:style>
    <style:style style:name="P209" style:family="paragraph" style:parent-style-name="Text_20_body">
      <style:text-properties fo:color="#000000" style:font-name="Cambria" fo:font-size="15pt" style:text-underline-style="none" fo:background-color="#83caff" style:font-size-asian="15pt" style:font-size-complex="15pt"/>
    </style:style>
    <style:style style:name="P210" style:family="paragraph" style:parent-style-name="Text_20_body">
      <style:text-properties fo:color="#000000" style:font-name="Cambria" fo:font-size="16pt" style:text-underline-style="none" fo:background-color="#ffffff" style:font-size-asian="16pt" style:font-size-complex="16pt"/>
    </style:style>
    <style:style style:name="P211" style:family="paragraph" style:parent-style-name="Text_20_body">
      <style:text-properties fo:color="#000000" style:font-name="Cambria" fo:font-size="16pt" style:text-underline-style="none" fo:background-color="#ffff00" style:font-size-asian="16pt" style:font-size-complex="16pt"/>
    </style:style>
    <style:style style:name="P212" style:family="paragraph" style:parent-style-name="Text_20_body">
      <style:text-properties fo:color="#000000" style:font-name="Cambria" fo:font-size="16pt" style:text-underline-style="none" fo:background-color="#0084d1" style:font-size-asian="16pt" style:font-size-complex="16pt"/>
    </style:style>
    <style:style style:name="P213" style:family="paragraph" style:parent-style-name="Text_20_body">
      <style:text-properties fo:color="#000000" style:font-name="Cambria" fo:font-size="16pt" style:text-underline-style="none" fo:background-color="#83caff" style:font-size-asian="16pt" style:font-size-complex="16pt"/>
    </style:style>
    <style:style style:name="P214" style:family="paragraph" style:parent-style-name="Text_20_body">
      <style:text-properties fo:color="#000000" style:font-name="Cambria" fo:font-size="16pt" style:text-underline-style="none" fo:font-weight="normal" fo:background-color="#ffffff" style:font-size-asian="16pt" style:font-weight-asian="normal" style:font-size-complex="16pt" style:font-weight-complex="normal"/>
    </style:style>
    <style:style style:name="P215" style:family="paragraph" style:parent-style-name="Text_20_body">
      <style:text-properties fo:color="#000000" style:font-name="Cambria" fo:font-size="16pt" style:text-underline-style="none" fo:font-weight="normal" fo:background-color="#ffff00" style:font-size-asian="16pt" style:font-weight-asian="normal" style:font-size-complex="16pt" style:font-weight-complex="normal"/>
    </style:style>
    <style:style style:name="P216" style:family="paragraph" style:parent-style-name="Text_20_body">
      <style:text-properties fo:color="#000000" style:font-name="Cambria" fo:font-size="14pt" style:text-underline-style="none" fo:background-color="#ffffff" style:font-size-asian="14pt" style:font-size-complex="14pt"/>
    </style:style>
    <style:style style:name="P217" style:family="paragraph" style:parent-style-name="Text_20_body">
      <style:text-properties fo:color="#000000" style:font-name="Cambria" fo:font-size="18pt" style:text-underline-style="none" fo:background-color="#ffffff" style:font-size-asian="18pt" style:font-size-complex="18pt"/>
    </style:style>
    <style:style style:name="P218" style:family="paragraph" style:parent-style-name="Text_20_body">
      <style:paragraph-properties>
        <style:tab-stops>
          <style:tab-stop style:position="15.716cm"/>
        </style:tab-stops>
      </style:paragraph-properties>
      <style:text-properties fo:color="#000000" style:font-name="Cambria" fo:font-size="18pt" style:text-underline-style="none" fo:background-color="#ffffff" style:font-size-asian="18pt" style:font-size-complex="18pt"/>
    </style:style>
    <style:style style:name="P219" style:family="paragraph" style:parent-style-name="Text_20_body">
      <style:paragraph-properties fo:text-align="start" style:justify-single-word="false"/>
      <style:text-properties fo:color="#000000" style:font-name="Cambria" fo:font-size="18pt" style:text-underline-style="none" fo:background-color="#ffffff" style:font-size-asian="18pt" style:font-size-complex="18pt"/>
    </style:style>
    <style:style style:name="P220" style:family="paragraph" style:parent-style-name="Text_20_body">
      <style:paragraph-properties fo:text-align="start" style:justify-single-word="false">
        <style:tab-stops>
          <style:tab-stop style:position="11.06cm"/>
        </style:tab-stops>
      </style:paragraph-properties>
      <style:text-properties fo:color="#000000" style:font-name="Cambria" fo:font-size="18pt" style:text-underline-style="none" fo:background-color="#ffffff" style:font-size-asian="18pt" style:font-size-complex="18pt"/>
    </style:style>
    <style:style style:name="P221" style:family="paragraph" style:parent-style-name="Text_20_body">
      <style:text-properties fo:color="#000000" style:font-name="Cambria" fo:font-size="18pt" style:text-underline-style="none" fo:background-color="#ffff00" style:font-size-asian="18pt" style:font-size-complex="18pt"/>
    </style:style>
    <style:style style:name="P222" style:family="paragraph" style:parent-style-name="Text_20_body">
      <style:paragraph-properties fo:text-align="start" style:justify-single-word="false"/>
      <style:text-properties fo:color="#000000" style:font-name="Cambria" fo:font-size="18pt" style:text-underline-style="none" fo:background-color="#ffff00" style:font-size-asian="18pt" style:font-size-complex="18pt"/>
    </style:style>
    <style:style style:name="P223" style:family="paragraph" style:parent-style-name="Text_20_body">
      <style:text-properties fo:color="#000000" style:font-name="Cambria" fo:font-size="18pt" style:text-underline-style="none" fo:background-color="#83caff" style:font-size-asian="18pt" style:font-size-complex="18pt"/>
    </style:style>
    <style:style style:name="P224" style:family="paragraph" style:parent-style-name="Text_20_body">
      <style:text-properties fo:color="#000000" style:font-name="Cambria" fo:font-size="18pt" style:text-underline-style="none" style:font-size-asian="18pt" style:font-size-complex="18pt"/>
    </style:style>
    <style:style style:name="P225" style:family="paragraph" style:parent-style-name="Text_20_body">
      <style:text-properties fo:color="#000000" style:font-name="Cambria" fo:font-size="18pt" style:text-underline-style="none" fo:font-weight="normal" fo:background-color="#ffffff" style:font-size-asian="18pt" style:font-weight-asian="normal" style:font-size-complex="18pt" style:font-weight-complex="normal"/>
    </style:style>
    <style:style style:name="P226" style:family="paragraph" style:parent-style-name="Text_20_body">
      <style:paragraph-properties>
        <style:tab-stops>
          <style:tab-stop style:position="15.716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227" style:family="paragraph" style:parent-style-name="Text_20_body">
      <style:paragraph-properties fo:text-align="start" style:justify-single-word="false"/>
      <style:text-properties fo:color="#000000" style:font-name="Cambria" fo:font-size="18pt" style:text-underline-style="none" fo:font-weight="normal" fo:background-color="#ffffff" style:font-size-asian="18pt" style:font-weight-asian="normal" style:font-size-complex="18pt" style:font-weight-complex="normal"/>
    </style:style>
    <style:style style:name="P228" style:family="paragraph" style:parent-style-name="Text_20_body">
      <style:paragraph-properties fo:text-align="start" style:justify-single-word="false">
        <style:tab-stops>
          <style:tab-stop style:position="11.06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229" style:family="paragraph" style:parent-style-name="Text_20_body">
      <style:text-properties fo:color="#000000" style:font-name="Cambria" fo:font-size="18pt" style:text-underline-style="none" fo:font-weight="normal" fo:background-color="#83caff" style:font-size-asian="18pt" style:font-weight-asian="normal" style:font-size-complex="18pt" style:font-weight-complex="normal"/>
    </style:style>
    <style:style style:name="P230" style:family="paragraph" style:parent-style-name="Text_20_body">
      <style:paragraph-properties fo:text-align="start" style:justify-single-word="false"/>
      <style:text-properties fo:color="#000000" style:font-name="Cambria" fo:font-size="18pt" style:text-underline-style="none" fo:font-weight="normal" fo:background-color="#83caff" style:font-size-asian="18pt" style:font-weight-asian="normal" style:font-size-complex="18pt" style:font-weight-complex="normal"/>
    </style:style>
    <style:style style:name="P231" style:family="paragraph" style:parent-style-name="Text_20_body">
      <style:text-properties fo:color="#000000" style:font-name="Cambria" fo:font-size="18pt" style:text-underline-style="none" fo:font-weight="normal" fo:background-color="#ffff00" style:font-size-asian="18pt" style:font-weight-asian="normal" style:font-size-complex="18pt" style:font-weight-complex="normal"/>
    </style:style>
    <style:style style:name="P232" style:family="paragraph" style:parent-style-name="Text_20_body">
      <style:text-properties fo:color="#000000" style:font-name="Cambria" fo:font-size="18pt" style:text-underline-style="none" fo:font-weight="normal" fo:background-color="transparent" style:font-size-asian="18pt" style:font-weight-asian="normal" style:font-size-complex="18pt" style:font-weight-complex="normal"/>
    </style:style>
    <style:style style:name="P233" style:family="paragraph" style:parent-style-name="Text_20_body">
      <style:text-properties fo:color="#000000" style:font-name="Cambria" fo:font-size="18pt" style:text-underline-style="none" fo:background-color="transparent" style:font-size-asian="18pt" style:font-size-complex="18pt"/>
    </style:style>
    <style:style style:name="P234" style:family="paragraph" style:parent-style-name="Text_20_body">
      <style:paragraph-properties fo:text-align="start" style:justify-single-word="false">
        <style:tab-stops>
          <style:tab-stop style:position="11.06cm"/>
        </style:tab-stops>
      </style:paragraph-properties>
      <style:text-properties fo:color="#000000" style:font-name="Cambria" fo:font-size="18pt" style:text-underline-style="none" fo:background-color="transparent" style:font-size-asian="18pt" style:font-size-complex="18pt"/>
    </style:style>
    <style:style style:name="P235" style:family="paragraph" style:parent-style-name="Text_20_body">
      <style:text-properties fo:color="#000000" style:font-name="Cambria" fo:font-size="18pt" style:text-underline-style="none" fo:background-color="#0084d1" style:font-size-asian="18pt" style:font-size-complex="18pt"/>
    </style:style>
    <style:style style:name="P236" style:family="paragraph" style:parent-style-name="Text_20_body">
      <style:text-properties fo:color="#000000" style:font-name="Cambria" fo:font-size="20pt" style:text-underline-style="none" fo:background-color="#ffffff" style:font-size-asian="20pt" style:font-size-complex="20pt"/>
    </style:style>
    <style:style style:name="P237" style:family="paragraph" style:parent-style-name="Text_20_body">
      <style:text-properties fo:color="#000000" fo:font-size="16pt" fo:background-color="#ffffff" style:font-size-asian="16pt" style:font-size-complex="16pt"/>
    </style:style>
    <style:style style:name="P238" style:family="paragraph" style:parent-style-name="Text_20_body">
      <style:text-properties fo:color="#000000" fo:font-size="18pt" fo:background-color="#ffffff" style:font-size-asian="18pt" style:font-size-complex="18pt"/>
    </style:style>
    <style:style style:name="P239" style:family="paragraph" style:parent-style-name="Text_20_body">
      <style:text-properties fo:color="#000000" fo:font-size="18pt" fo:background-color="#ffff00" style:font-size-asian="18pt" style:font-size-complex="18pt"/>
    </style:style>
    <style:style style:name="P240" style:family="paragraph" style:parent-style-name="Text_20_body">
      <style:text-properties style:font-name="Cambria" fo:font-size="15pt" style:text-underline-style="none" fo:background-color="#ffff00" style:font-size-asian="15pt" style:font-size-complex="15pt"/>
    </style:style>
    <style:style style:name="P241" style:family="paragraph" style:parent-style-name="Text_20_body">
      <style:text-properties style:font-name="Cambria" fo:font-size="15pt" style:text-underline-style="none" style:font-size-asian="15pt" style:font-size-complex="15pt"/>
    </style:style>
    <style:style style:name="P242" style:family="paragraph" style:parent-style-name="Text_20_body">
      <style:text-properties style:font-name="Cambria" fo:font-size="15pt" style:text-underline-style="none" fo:background-color="#ffffff" style:font-size-asian="15pt" style:font-size-complex="15pt"/>
    </style:style>
    <style:style style:name="P243" style:family="paragraph" style:parent-style-name="Text_20_body">
      <style:text-properties style:font-name="Cambria" fo:font-size="14pt" style:text-underline-style="none" fo:background-color="#ffffff" style:font-size-asian="14pt" style:font-size-complex="14pt"/>
    </style:style>
    <style:style style:name="P244" style:family="paragraph" style:parent-style-name="Text_20_body">
      <style:text-properties style:font-name="Cambria" fo:font-size="14pt" style:text-underline-style="none" style:font-size-asian="14pt" style:font-size-complex="14pt"/>
    </style:style>
    <style:style style:name="P245" style:family="paragraph" style:parent-style-name="Text_20_body">
      <style:text-properties style:font-name="Cambria" fo:font-size="16pt" style:text-underline-style="none" fo:background-color="#ffffff" style:font-size-asian="16pt" style:font-size-complex="16pt"/>
    </style:style>
    <style:style style:name="P246" style:family="paragraph" style:parent-style-name="Text_20_body">
      <style:text-properties style:font-name="Cambria" fo:font-size="16pt" style:text-underline-style="none" fo:background-color="#0084d1" style:font-size-asian="16pt" style:font-size-complex="16pt"/>
    </style:style>
    <style:style style:name="P247" style:family="paragraph" style:parent-style-name="Text_20_body">
      <style:text-properties style:font-name="Cambria" fo:font-size="16pt" style:text-underline-style="none" style:font-size-asian="16pt" style:font-size-complex="16pt"/>
    </style:style>
    <style:style style:name="P248" style:family="paragraph" style:parent-style-name="Text_20_body">
      <style:text-properties style:font-name="Cambria" fo:font-size="18pt" style:text-underline-style="none" style:font-size-asian="18pt" style:font-size-complex="18pt"/>
    </style:style>
    <style:style style:name="P249" style:family="paragraph" style:parent-style-name="Text_20_body">
      <style:paragraph-properties fo:text-align="start" style:justify-single-word="false"/>
      <style:text-properties style:font-name="Cambria" fo:font-size="18pt" style:text-underline-style="none" style:font-size-asian="18pt" style:font-size-complex="18pt"/>
    </style:style>
    <style:style style:name="P250" style:family="paragraph" style:parent-style-name="Text_20_body">
      <style:text-properties style:font-name="Cambria" fo:font-size="18pt" style:text-underline-style="none" fo:background-color="#ffffff" style:font-size-asian="18pt" style:font-size-complex="18pt"/>
    </style:style>
    <style:style style:name="P251" style:family="paragraph" style:parent-style-name="Text_20_body">
      <style:paragraph-properties>
        <style:tab-stops>
          <style:tab-stop style:position="15.716cm"/>
        </style:tab-stops>
      </style:paragraph-properties>
      <style:text-properties style:font-name="Cambria" fo:font-size="18pt" style:text-underline-style="none" fo:background-color="#ffffff" style:font-size-asian="18pt" style:font-size-complex="18pt"/>
    </style:style>
    <style:style style:name="P252" style:family="paragraph" style:parent-style-name="Text_20_body">
      <style:text-properties style:font-name="Cambria" fo:font-size="18pt" style:text-underline-style="none" fo:background-color="#ffff00" style:font-size-asian="18pt" style:font-size-complex="18pt"/>
    </style:style>
    <style:style style:name="P253" style:family="paragraph" style:parent-style-name="Text_20_body">
      <style:text-properties style:font-name="Cambria" fo:font-size="18pt" style:text-underline-style="none" fo:background-color="#83caff" style:font-size-asian="18pt" style:font-size-complex="18pt"/>
    </style:style>
    <style:style style:name="P254" style:family="paragraph" style:parent-style-name="Text_20_body">
      <style:text-properties style:font-name="Cambria" fo:font-size="20pt" style:text-underline-style="none" fo:background-color="#ffffff" style:font-size-asian="20pt" style:font-size-complex="20pt"/>
    </style:style>
    <style:style style:name="P255" style:family="paragraph" style:parent-style-name="Text_20_body">
      <style:text-properties fo:font-size="20pt" fo:font-weight="bold" style:font-size-asian="20pt" style:font-weight-asian="bold" style:font-size-complex="20pt" style:font-weight-complex="bold"/>
    </style:style>
    <style:style style:name="P256" style:family="paragraph" style:parent-style-name="Text_20_body">
      <style:text-properties fo:font-size="16pt" fo:background-color="#0084d1" style:font-size-asian="16pt" style:font-size-complex="16pt"/>
    </style:style>
    <style:style style:name="P257" style:family="paragraph" style:parent-style-name="Text_20_body">
      <style:text-properties fo:font-size="16pt" fo:background-color="#ffffff" style:font-size-asian="16pt" style:font-size-complex="16pt"/>
    </style:style>
    <style:style style:name="P258" style:family="paragraph" style:parent-style-name="Text_20_body">
      <style:text-properties fo:background-color="#ffffff"/>
    </style:style>
    <style:style style:name="P259" style:family="paragraph" style:parent-style-name="Text_20_body">
      <style:text-properties fo:font-size="14pt" style:font-size-asian="14pt" style:font-size-complex="14pt"/>
    </style:style>
    <style:style style:name="P260" style:family="paragraph" style:parent-style-name="Text_20_body">
      <style:text-properties fo:color="#0000cc" style:font-name="Cambria" fo:font-size="16pt" style:text-underline-style="none" fo:background-color="#83caff" style:font-size-asian="16pt" style:font-size-complex="16pt"/>
    </style:style>
    <style:style style:name="P261" style:family="paragraph" style:parent-style-name="Text_20_body">
      <style:text-properties fo:color="#0000cc" style:font-name="Cambria" fo:font-size="18pt" style:text-underline-style="none" fo:background-color="#ffffff" style:font-size-asian="18pt" style:font-size-complex="18pt"/>
    </style:style>
    <style:style style:name="P262" style:family="paragraph" style:parent-style-name="Text_20_body">
      <style:text-properties fo:font-size="18pt" style:font-size-asian="18pt" style:font-size-complex="18pt"/>
    </style:style>
    <style:style style:name="P263" style:family="paragraph" style:parent-style-name="Text_20_body">
      <style:paragraph-properties fo:text-align="start" style:justify-single-word="false"/>
      <style:text-properties fo:font-size="18pt" style:font-size-asian="18pt" style:font-size-complex="18pt"/>
    </style:style>
    <style:style style:name="P264" style:family="paragraph" style:parent-style-name="Text_20_body">
      <style:text-properties fo:font-size="18pt" fo:background-color="#ffff00" style:font-size-asian="18pt" style:font-size-complex="18pt"/>
    </style:style>
    <style:style style:name="P265" style:family="paragraph" style:parent-style-name="Text_20_body">
      <style:text-properties fo:font-size="18pt" fo:background-color="#ffffff" style:font-size-asian="18pt" style:font-size-complex="18pt"/>
    </style:style>
    <style:style style:name="P266" style:family="paragraph" style:parent-style-name="Text_20_body">
      <style:paragraph-properties fo:text-align="start" style:justify-single-word="false"/>
      <style:text-properties fo:font-size="18pt" fo:background-color="#ffffff" style:font-size-asian="18pt" style:font-size-complex="18pt"/>
    </style:style>
    <style:style style:name="P267" style:family="paragraph" style:parent-style-name="Text_20_body">
      <style:paragraph-properties>
        <style:tab-stops>
          <style:tab-stop style:position="15.716cm"/>
        </style:tab-stops>
      </style:paragraph-properties>
      <style:text-properties fo:font-size="18pt" fo:background-color="#ffffff" style:font-size-asian="18pt" style:font-size-complex="18pt"/>
    </style:style>
    <style:style style:name="P268" style:family="paragraph" style:parent-style-name="Text_20_body">
      <style:text-properties fo:color="#0000ff" style:font-name="Cambria" fo:font-size="18pt" style:text-underline-style="none" fo:background-color="#ffffff" style:font-size-asian="18pt" style:font-size-complex="18pt"/>
    </style:style>
    <style:style style:name="P269" style:family="paragraph" style:parent-style-name="Text_20_body">
      <style:text-properties fo:color="#0000ff" style:font-name="Cambria" fo:font-size="18pt" style:text-underline-style="none" fo:background-color="transparent" style:font-size-asian="18pt" style:font-size-complex="18pt"/>
    </style:style>
    <style:style style:name="P270" style:family="paragraph" style:parent-style-name="Text_20_body">
      <style:text-properties fo:color="#ffffff" style:font-name="Cambria" fo:font-size="18pt" style:text-underline-style="none" fo:background-color="#ffffff" style:font-size-asian="18pt" style:font-size-complex="18pt"/>
    </style:style>
    <style:style style:name="P271" style:family="paragraph" style:parent-style-name="Text_20_body">
      <style:text-properties fo:color="#ffffff" style:font-name="Cambria" fo:font-size="18pt" style:text-underline-style="none" fo:background-color="#83caff" style:font-size-asian="18pt" style:font-size-complex="18pt"/>
    </style:style>
    <style:style style:name="P272" style:family="paragraph" style:parent-style-name="Text_20_body">
      <style:text-properties fo:color="#ffffff" style:font-name="Cambria" fo:font-size="18pt" style:text-underline-style="none" fo:font-weight="normal" fo:background-color="#ffffff" style:font-size-asian="18pt" style:font-weight-asian="normal" style:font-size-complex="18pt" style:font-weight-complex="normal"/>
    </style:style>
    <style:style style:name="P273" style:family="paragraph" style:parent-style-name="Text_20_body">
      <style:text-properties fo:color="#ffffff" style:font-name="Cambria" fo:font-size="18pt" style:text-underline-style="none" fo:font-weight="normal" fo:background-color="transparent" style:font-size-asian="18pt" style:font-weight-asian="normal" style:font-size-complex="18pt" style:font-weight-complex="normal"/>
    </style:style>
    <style:style style:name="P274" style:family="paragraph" style:parent-style-name="Text_20_body">
      <style:text-properties fo:color="#ffffff" style:font-name="Cambria" fo:font-size="16pt" style:text-underline-style="none" fo:font-weight="normal" fo:background-color="#ffffff" style:font-size-asian="16pt" style:font-weight-asian="normal" style:font-size-complex="16pt" style:font-weight-complex="normal"/>
    </style:style>
    <style:style style:name="P275" style:family="paragraph" style:parent-style-name="Text_20_body">
      <style:paragraph-properties fo:background-color="#ffffff">
        <style:background-image/>
      </style:paragraph-properties>
      <style:text-properties fo:font-size="15pt" style:font-size-asian="15pt" style:font-size-complex="15pt"/>
    </style:style>
    <style:style style:name="P276" style:family="paragraph" style:parent-style-name="Text_20_body">
      <style:paragraph-properties fo:background-color="#ffffff">
        <style:background-image/>
      </style:paragraph-properties>
      <style:text-properties fo:color="#000000" style:font-name="Cambria" fo:font-size="18pt" style:text-underline-style="none" fo:background-color="#ffffff" style:font-size-asian="18pt" style:font-size-complex="18pt"/>
    </style:style>
    <style:style style:name="P277" style:family="paragraph" style:parent-style-name="Text_20_body">
      <style:paragraph-properties fo:background-color="#ffffff">
        <style:background-image/>
      </style:paragraph-properties>
      <style:text-properties fo:color="#000000" style:font-name="Cambria" fo:font-size="18pt" style:text-underline-style="none" fo:background-color="#ffff00" style:font-size-asian="18pt" style:font-size-complex="18pt"/>
    </style:style>
    <style:style style:name="P278" style:family="paragraph" style:parent-style-name="Text_20_body">
      <style:paragraph-properties fo:background-color="#ffffff">
        <style:background-image/>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P279" style:family="paragraph" style:parent-style-name="Text_20_body">
      <style:paragraph-properties fo:background-color="#ffffff">
        <style:background-image/>
      </style:paragraph-properties>
      <style:text-properties fo:color="#000000" style:font-name="Cambria" fo:font-size="15pt" style:text-underline-style="none" fo:background-color="#ffffff" style:font-size-asian="15pt" style:font-size-complex="15pt"/>
    </style:style>
    <style:style style:name="P280" style:family="paragraph" style:parent-style-name="Text_20_body">
      <style:paragraph-properties fo:background-color="#ffffff">
        <style:background-image/>
      </style:paragraph-properties>
      <style:text-properties style:font-name="Cambria" fo:font-size="18pt" style:text-underline-style="none" style:font-size-asian="18pt" style:font-size-complex="18pt"/>
    </style:style>
    <style:style style:name="P281" style:family="paragraph" style:parent-style-name="Text_20_body">
      <style:paragraph-properties fo:background-color="#ffffff">
        <style:background-image/>
      </style:paragraph-properties>
      <style:text-properties style:font-name="Cambria" fo:font-size="18pt" style:text-underline-style="none" fo:background-color="#ffffff" style:font-size-asian="18pt" style:font-size-complex="18pt"/>
    </style:style>
    <style:style style:name="P282" style:family="paragraph" style:parent-style-name="Text_20_body">
      <style:paragraph-properties fo:background-color="#ffffff">
        <style:background-image/>
      </style:paragraph-properties>
      <style:text-properties style:font-name="Cambria" fo:font-size="18pt" style:text-underline-style="none" fo:background-color="#83caff" style:font-size-asian="18pt" style:font-size-complex="18pt"/>
    </style:style>
    <style:style style:name="P283" style:family="paragraph" style:parent-style-name="Text_20_body">
      <style:paragraph-properties fo:background-color="#ffffff">
        <style:background-image/>
      </style:paragraph-properties>
      <style:text-properties fo:color="#ffffff" style:font-name="Cambria" fo:font-size="18pt" style:text-underline-style="none" fo:background-color="#ffffff" style:font-size-asian="18pt" style:font-size-complex="18pt"/>
    </style:style>
    <style:style style:name="P284" style:family="paragraph" style:parent-style-name="Text_20_body">
      <style:paragraph-properties fo:background-color="#ffffff">
        <style:background-image/>
      </style:paragraph-properties>
      <style:text-properties fo:color="#0000ff" fo:font-size="18pt" fo:background-color="#ffffff" style:font-size-asian="18pt" style:font-size-complex="18pt"/>
    </style:style>
    <style:style style:name="P285" style:family="paragraph" style:parent-style-name="Text_20_body">
      <style:paragraph-properties fo:background-color="#ffffff">
        <style:background-image/>
      </style:paragraph-properties>
      <style:text-properties fo:color="#0000ff" style:font-name="Cambria" fo:font-size="18pt" style:text-underline-style="none" fo:font-weight="normal" fo:background-color="transparent" style:font-size-asian="18pt" style:font-weight-asian="normal" style:font-size-complex="18pt" style:font-weight-complex="normal"/>
    </style:style>
    <style:style style:name="P286" style:family="paragraph" style:parent-style-name="Text_20_body">
      <style:paragraph-properties fo:background-color="#ffffff">
        <style:background-image/>
      </style:paragraph-properties>
      <style:text-properties fo:color="#ff0000" style:font-name="Cambria" fo:font-size="18pt" style:text-underline-style="none" fo:background-color="#ffffff" style:font-size-asian="18pt" style:font-size-complex="18pt"/>
    </style:style>
    <style:style style:name="P287" style:family="paragraph" style:parent-style-name="Heading_20_5">
      <style:paragraph-properties fo:text-align="start" style:justify-single-word="false">
        <style:tab-stops>
          <style:tab-stop style:position="11.06cm"/>
        </style:tab-stops>
      </style:paragraph-properties>
      <style:text-properties fo:color="#000000" style:font-name="Cambria" fo:font-size="18pt" style:text-underline-style="none" fo:font-weight="normal" fo:background-color="#ffffff" style:font-size-asian="18pt" style:font-weight-asian="normal" style:font-size-complex="18pt" style:font-weight-complex="normal"/>
    </style:style>
    <style:style style:name="T1" style:family="text">
      <style:text-properties fo:font-size="15pt" style:font-size-asian="15pt" style:font-size-complex="15pt"/>
    </style:style>
    <style:style style:name="T2" style:family="text">
      <style:text-properties fo:font-size="15pt" fo:background-color="#ffffff"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normal" fo:background-color="transparent" style:font-size-asian="15pt" style:font-weight-asian="normal" style:font-size-complex="15pt" style:font-weight-complex="normal"/>
    </style:style>
    <style:style style:name="T5" style:family="text">
      <style:text-properties fo:color="#000000"/>
    </style:style>
    <style:style style:name="T6" style:family="text">
      <style:text-properties fo:color="#000000" fo:background-color="#ffff00"/>
    </style:style>
    <style:style style:name="T7" style:family="text">
      <style:text-properties fo:color="#000000" fo:font-size="15pt" style:font-size-asian="15pt" style:font-size-complex="15pt"/>
    </style:style>
    <style:style style:name="T8" style:family="text">
      <style:text-properties fo:color="#000000" fo:font-size="15pt" fo:background-color="#ffffff" style:font-size-asian="15pt" style:font-size-complex="15pt"/>
    </style:style>
    <style:style style:name="T9" style:family="text">
      <style:text-properties fo:color="#000000" fo:font-weight="normal" fo:background-color="#ffff00" style:font-weight-asian="normal" style:font-weight-complex="normal"/>
    </style:style>
    <style:style style:name="T10" style:family="text">
      <style:text-properties fo:color="#000000" fo:font-weight="normal" fo:background-color="#ffffff"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weight="normal" fo:background-color="#83caff"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0000" fo:background-color="#ffffff"/>
    </style:style>
    <style:style style:name="T15" style:family="text">
      <style:text-properties fo:color="#000000" style:font-name="Cambria" style:text-underline-style="none"/>
    </style:style>
    <style:style style:name="T16" style:family="text">
      <style:text-properties fo:color="#000000" style:font-name="Cambria" style:text-underline-style="none" fo:background-color="#ffff00"/>
    </style:style>
    <style:style style:name="T17" style:family="text">
      <style:text-properties fo:color="#000000" style:font-name="Cambria" style:text-underline-style="none" fo:background-color="#ffffff"/>
    </style:style>
    <style:style style:name="T18" style:family="text">
      <style:text-properties fo:color="#000000" style:font-name="Cambria" style:text-underline-style="none" fo:background-color="#83caff"/>
    </style:style>
    <style:style style:name="T19" style:family="text">
      <style:text-properties fo:color="#000000" style:font-name="Cambria" style:text-underline-style="none" fo:font-weight="normal" fo:background-color="#ffffff" style:font-weight-asian="normal" style:font-weight-complex="normal"/>
    </style:style>
    <style:style style:name="T20" style:family="text">
      <style:text-properties fo:color="#000000" style:font-name="Cambria" style:text-underline-style="none" fo:font-weight="normal" style:font-weight-asian="normal" style:font-weight-complex="normal"/>
    </style:style>
    <style:style style:name="T21" style:family="text">
      <style:text-properties fo:color="#000000" style:font-name="Cambria" style:text-underline-style="none" fo:font-weight="normal" fo:background-color="#83caff" style:font-weight-asian="normal" style:font-weight-complex="normal"/>
    </style:style>
    <style:style style:name="T22" style:family="text">
      <style:text-properties fo:color="#000000" style:font-name="Cambria" style:text-underline-style="none" fo:background-color="transparent"/>
    </style:style>
    <style:style style:name="T23" style:family="text">
      <style:text-properties fo:color="#000000" style:font-name="Cambria" fo:font-size="15pt" style:text-underline-style="none" fo:background-color="#ffffff" style:font-size-asian="15pt" style:font-size-complex="15pt"/>
    </style:style>
    <style:style style:name="T24" style:family="text">
      <style:text-properties fo:color="#000000" style:font-name="Cambria" fo:font-size="15pt" style:text-underline-style="none" fo:font-weight="normal" fo:background-color="#83caff" style:font-size-asian="15pt" style:font-weight-asian="normal" style:font-size-complex="15pt" style:font-weight-complex="normal"/>
    </style:style>
    <style:style style:name="T25" style:family="text">
      <style:text-properties fo:color="#000000" style:font-name="Cambria" fo:font-size="16pt" style:text-underline-style="none" style:font-size-asian="16pt" style:font-size-complex="16pt"/>
    </style:style>
    <style:style style:name="T26" style:family="text">
      <style:text-properties fo:color="#000000" style:font-name="Cambria" fo:font-size="16pt" style:text-underline-style="none" fo:background-color="#ffffff" style:font-size-asian="16pt" style:font-size-complex="16pt"/>
    </style:style>
    <style:style style:name="T27" style:family="text">
      <style:text-properties fo:color="#000000" style:font-name="Cambria" fo:font-size="16pt" style:text-underline-style="none" fo:font-weight="normal" fo:background-color="#83caff" style:font-size-asian="16pt" style:font-weight-asian="normal" style:font-size-complex="16pt" style:font-weight-complex="normal"/>
    </style:style>
    <style:style style:name="T28" style:family="text">
      <style:text-properties fo:color="#000000" style:font-name="Cambria" fo:font-size="18pt" style:text-underline-style="none" fo:background-color="#ffffff" style:font-size-asian="18pt" style:font-size-complex="18pt"/>
    </style:style>
    <style:style style:name="T29" style:family="text">
      <style:text-properties fo:color="#000000" fo:font-size="16pt" fo:background-color="#ffffff" style:font-size-asian="16pt" style:font-size-complex="16pt"/>
    </style:style>
    <style:style style:name="T30" style:family="text">
      <style:text-properties fo:color="#000000" fo:font-size="16pt" style:font-size-asian="16pt" style:font-size-complex="16pt"/>
    </style:style>
    <style:style style:name="T31" style:family="text">
      <style:text-properties fo:color="#000000" fo:font-size="16pt" fo:font-weight="normal" style:font-size-asian="16pt" style:font-weight-asian="normal" style:font-size-complex="16pt" style:font-weight-complex="normal"/>
    </style:style>
    <style:style style:name="T32" style:family="text">
      <style:text-properties fo:color="#000000" fo:font-size="14pt" style:font-size-asian="14pt" style:font-size-complex="14pt"/>
    </style:style>
    <style:style style:name="T33" style:family="text">
      <style:text-properties fo:color="#000000" fo:font-size="14pt" fo:background-color="#ffffff" style:font-size-asian="14pt" style:font-size-complex="14pt"/>
    </style:style>
    <style:style style:name="T34" style:family="text">
      <style:text-properties fo:color="#000000" fo:background-color="#83caff"/>
    </style:style>
    <style:style style:name="T35" style:family="text">
      <style:text-properties fo:color="#000000" fo:font-size="20pt" style:font-size-asian="20pt" style:font-size-complex="20pt"/>
    </style:style>
    <style:style style:name="T36" style:family="text">
      <style:text-properties fo:color="#000000" fo:font-size="18pt" fo:background-color="#ffffff" style:font-size-asian="18pt" style:font-size-complex="18pt"/>
    </style:style>
    <style:style style:name="T37" style:family="text">
      <style:text-properties fo:color="#000000" fo:font-size="18pt" fo:background-color="#ffff00" style:font-size-asian="18pt" style:font-size-complex="18pt"/>
    </style:style>
    <style:style style:name="T38" style:family="text">
      <style:text-properties fo:color="#000000" fo:font-size="18pt" style:font-size-asian="18pt" style:font-size-complex="18pt"/>
    </style:style>
    <style:style style:name="T39" style:family="text">
      <style:text-properties fo:color="#000000" fo:background-color="transparent"/>
    </style:style>
    <style:style style:name="T40" style:family="text">
      <style:text-properties fo:color="#ff0000"/>
    </style:style>
    <style:style style:name="T41" style:family="text">
      <style:text-properties fo:color="#ff0000" fo:background-color="#ffff00"/>
    </style:style>
    <style:style style:name="T42" style:family="text">
      <style:text-properties fo:color="#ff0000" fo:background-color="#ffffff"/>
    </style:style>
    <style:style style:name="T43" style:family="text">
      <style:text-properties fo:color="#ff0000" style:font-name="Cambria" style:text-underline-style="none"/>
    </style:style>
    <style:style style:name="T44" style:family="text">
      <style:text-properties fo:color="#ff0000" style:font-name="Cambria" style:text-underline-style="none" fo:background-color="#ffffff"/>
    </style:style>
    <style:style style:name="T45" style:family="text">
      <style:text-properties fo:color="#ff0000" style:font-name="Cambria" style:text-underline-style="none" fo:font-weight="normal" style:font-weight-asian="normal" style:font-weight-complex="normal"/>
    </style:style>
    <style:style style:name="T46" style:family="text">
      <style:text-properties fo:color="#ff0000" fo:font-size="18pt" fo:background-color="#ffff00" style:font-size-asian="18pt" style:font-size-complex="18pt"/>
    </style:style>
    <style:style style:name="T47" style:family="text">
      <style:text-properties fo:color="#ff0000" fo:font-size="18pt" style:font-size-asian="18pt" style:font-size-complex="18pt"/>
    </style:style>
    <style:style style:name="T48" style:family="text">
      <style:text-properties fo:color="#ff0000" fo:font-size="18pt" fo:font-weight="normal" style:font-size-asian="18pt" style:font-weight-asian="normal" style:font-size-complex="18pt" style:font-weight-complex="normal"/>
    </style:style>
    <style:style style:name="T49" style:family="text">
      <style:text-properties fo:color="#ff0000" fo:font-weight="normal" style:font-weight-asian="normal" style:font-weight-complex="normal"/>
    </style:style>
    <style:style style:name="T50" style:family="text">
      <style:text-properties fo:color="#ff0000" fo:font-weight="normal" fo:background-color="transparent" style:font-weight-asian="normal" style:font-weight-complex="normal"/>
    </style:style>
    <style:style style:name="T51" style:family="text">
      <style:text-properties fo:color="#ff0000" fo:font-weight="normal" fo:background-color="#ffffff" style:font-weight-asian="normal" style:font-weight-complex="normal"/>
    </style:style>
    <style:style style:name="T52" style:family="text">
      <style:text-properties fo:color="#800000"/>
    </style:style>
    <style:style style:name="T53" style:family="text">
      <style:text-properties fo:color="#800000" fo:background-color="#ffffff"/>
    </style:style>
    <style:style style:name="T54" style:family="text">
      <style:text-properties fo:color="#0000cc"/>
    </style:style>
    <style:style style:name="T55" style:family="text">
      <style:text-properties fo:color="#0000cc" fo:font-size="16pt" fo:background-color="#ffffff" style:font-size-asian="16pt" style:font-size-complex="16pt"/>
    </style:style>
    <style:style style:name="T56" style:family="text">
      <style:text-properties fo:color="#0000cc" fo:background-color="#ffffff"/>
    </style:style>
    <style:style style:name="T57" style:family="text">
      <style:text-properties fo:color="#0000cc" style:font-name="Cambria" style:text-underline-style="none"/>
    </style:style>
    <style:style style:name="T58" style:family="text">
      <style:text-properties fo:color="#0000cc" style:font-name="Cambria" style:text-underline-style="none" fo:background-color="#ffffff"/>
    </style:style>
    <style:style style:name="T59" style:family="text">
      <style:text-properties fo:color="#0000cc" style:font-name="Cambria" fo:font-size="14pt" style:text-underline-style="none" style:font-size-asian="14pt" style:font-size-complex="14pt"/>
    </style:style>
    <style:style style:name="T60" style:family="text">
      <style:text-properties fo:color="#0000cc" fo:font-size="14pt" style:font-size-asian="14pt" style:font-size-complex="14pt"/>
    </style:style>
    <style:style style:name="T61" style:family="text">
      <style:text-properties fo:color="#0000cc" fo:background-color="transparent"/>
    </style:style>
    <style:style style:name="T62" style:family="text">
      <style:text-properties fo:color="#0000cc" fo:font-weight="normal" style:font-weight-asian="normal" style:font-weight-complex="normal"/>
    </style:style>
    <style:style style:name="T63" style:family="text">
      <style:text-properties fo:color="#0000cc" fo:font-weight="normal" fo:background-color="#ffffff" style:font-weight-asian="normal" style:font-weight-complex="normal"/>
    </style:style>
    <style:style style:name="T64" style:family="text">
      <style:text-properties fo:color="#0000cc" fo:font-size="15pt" style:font-size-asian="15pt" style:font-size-complex="15pt"/>
    </style:style>
    <style:style style:name="T65" style:family="text">
      <style:text-properties fo:background-color="#ffff00"/>
    </style:style>
    <style:style style:name="T66" style:family="text">
      <style:text-properties fo:background-color="transparent"/>
    </style:style>
    <style:style style:name="T67" style:family="text">
      <style:text-properties fo:font-size="18pt" style:font-size-asian="18pt" style:font-size-complex="18pt"/>
    </style:style>
    <style:style style:name="T68" style:family="text">
      <style:text-properties fo:font-size="18pt" fo:background-color="#ffff00" style:font-size-asian="18pt" style:font-size-complex="18pt"/>
    </style:style>
    <style:style style:name="T69" style:family="text">
      <style:text-properties fo:font-size="18pt" fo:background-color="#ffffff" style:font-size-asian="18pt" style:font-size-complex="18pt"/>
    </style:style>
    <style:style style:name="T70" style:family="text">
      <style:text-properties fo:font-size="18pt" fo:background-color="transparent" style:font-size-asian="18pt" style:font-size-complex="18pt"/>
    </style:style>
    <style:style style:name="T71" style:family="text">
      <style:text-properties fo:font-size="18pt" fo:font-weight="normal" style:font-size-asian="18pt" style:font-weight-asian="normal" style:font-size-complex="18pt" style:font-weight-complex="normal"/>
    </style:style>
    <style:style style:name="T72" style:family="text">
      <style:text-properties fo:background-color="#ffffff"/>
    </style:style>
    <style:style style:name="T73" style:family="text">
      <style:text-properties style:font-name="Cambria" style:text-underline-style="none"/>
    </style:style>
    <style:style style:name="T74" style:family="text">
      <style:text-properties style:font-name="Cambria" style:text-underline-style="none" fo:background-color="#ffffff"/>
    </style:style>
    <style:style style:name="T75" style:family="text">
      <style:text-properties style:font-name="Cambria" style:text-underline-style="none" fo:background-color="#ffff00"/>
    </style:style>
    <style:style style:name="T76" style:family="text">
      <style:text-properties style:font-name="Cambria" style:text-underline-style="none" fo:font-weight="normal" style:font-weight-asian="normal" style:font-weight-complex="normal"/>
    </style:style>
    <style:style style:name="T77" style:family="text">
      <style:text-properties style:font-name="Cambria" style:text-underline-style="none" fo:background-color="transparent"/>
    </style:style>
    <style:style style:name="T78" style:family="text">
      <style:text-properties style:font-name="Cambria" fo:font-size="15pt" style:text-underline-style="none" style:font-size-asian="15pt" style:font-size-complex="15pt"/>
    </style:style>
    <style:style style:name="T79" style:family="text">
      <style:text-properties style:font-name="Cambria" fo:font-size="15pt" style:text-underline-style="none" fo:background-color="#ffffff" style:font-size-asian="15pt" style:font-size-complex="15pt"/>
    </style:style>
    <style:style style:name="T80" style:family="text">
      <style:text-properties style:font-name="Cambria" fo:font-size="16pt" style:text-underline-style="none" fo:background-color="#ffffff" style:font-size-asian="16pt" style:font-size-complex="16pt"/>
    </style:style>
    <style:style style:name="T81" style:family="text">
      <style:text-properties style:font-name="Cambria" fo:font-size="16pt" style:text-underline-style="none" style:font-size-asian="16pt" style:font-size-complex="16pt"/>
    </style:style>
    <style:style style:name="T82" style:family="text">
      <style:text-properties style:font-name="Cambria" fo:font-size="18pt" style:text-underline-style="none" style:font-size-asian="18pt" style:font-size-complex="18pt"/>
    </style:style>
    <style:style style:name="T83" style:family="text">
      <style:text-properties style:font-name="Cambria" fo:font-size="18pt" style:text-underline-style="none" fo:background-color="#ffffff" style:font-size-asian="18pt" style:font-size-complex="18pt"/>
    </style:style>
    <style:style style:name="T84" style:family="text">
      <style:text-properties style:font-name="Cambria" fo:font-size="18pt" style:text-underline-style="none" fo:background-color="#ffff00" style:font-size-asian="18pt" style:font-size-complex="18pt"/>
    </style:style>
    <style:style style:name="T85" style:family="text">
      <style:text-properties fo:color="#0000ff"/>
    </style:style>
    <style:style style:name="T86" style:family="text">
      <style:text-properties fo:color="#0000ff" fo:background-color="#ffffff"/>
    </style:style>
    <style:style style:name="T87" style:family="text">
      <style:text-properties fo:color="#0000ff" style:font-name="Cambria" style:text-underline-style="none"/>
    </style:style>
    <style:style style:name="T88" style:family="text">
      <style:text-properties fo:color="#0000ff" style:font-name="Cambria" style:text-underline-style="none" fo:background-color="#ffffff"/>
    </style:style>
    <style:style style:name="T89" style:family="text">
      <style:text-properties fo:color="#0000ff" fo:font-size="15pt" style:font-size-asian="15pt" style:font-size-complex="15pt"/>
    </style:style>
    <style:style style:name="T90" style:family="text">
      <style:text-properties fo:color="#0000ff" fo:font-size="15pt" fo:font-weight="normal" style:font-size-asian="15pt" style:font-weight-asian="normal" style:font-size-complex="15pt" style:font-weight-complex="normal"/>
    </style:style>
    <style:style style:name="T91" style:family="text">
      <style:text-properties fo:color="#0000ff" fo:background-color="transparent"/>
    </style:style>
    <style:style style:name="T92" style:family="text">
      <style:text-properties fo:color="#0000ff" fo:font-weight="normal" style:font-weight-asian="normal" style:font-weight-complex="normal"/>
    </style:style>
    <style:style style:name="T93" style:family="text">
      <style:text-properties fo:color="#0000ff" fo:font-weight="normal" fo:background-color="transparent" style:font-weight-asian="normal" style:font-weight-complex="normal"/>
    </style:style>
    <style:style style:name="T94" style:family="text">
      <style:text-properties fo:font-size="20pt" style:font-size-asian="20pt" style:font-size-complex="20pt"/>
    </style:style>
    <style:style style:name="T95" style:family="text">
      <style:text-properties fo:font-size="20pt" fo:font-weight="normal" style:font-size-asian="20pt" style:font-weight-asian="normal" style:font-size-complex="20pt" style:font-weight-complex="normal"/>
    </style:style>
    <style:style style:name="T96" style:family="text">
      <style:text-properties fo:font-size="14pt" style:font-size-asian="14pt" style:font-size-complex="14pt"/>
    </style:style>
    <style:style style:name="T97" style:family="text">
      <style:text-properties fo:font-size="14pt" fo:background-color="#ffffff" style:font-size-asian="14pt" style:font-size-complex="14pt"/>
    </style:style>
    <style:style style:name="T98" style:family="text">
      <style:text-properties fo:font-size="14pt" fo:background-color="transparent" style:font-size-asian="14pt" style:font-size-complex="14pt"/>
    </style:style>
    <style:style style:name="T99" style:family="text">
      <style:text-properties fo:font-size="14pt" fo:font-weight="normal" style:font-size-asian="14pt" style:font-weight-asian="normal" style:font-size-complex="14pt" style:font-weight-complex="normal"/>
    </style:style>
    <style:style style:name="T100" style:family="text">
      <style:text-properties fo:font-size="16pt" style:font-size-asian="16pt" style:font-size-complex="16pt"/>
    </style:style>
    <style:style style:name="T101" style:family="text">
      <style:text-properties fo:font-size="16pt" fo:background-color="#ffffff" style:font-size-asian="16pt" style:font-size-complex="16pt"/>
    </style:style>
    <style:style style:name="T102" style:family="text">
      <style:text-properties fo:font-size="16pt" fo:font-weight="normal" style:font-size-asian="16pt" style:font-weight-asian="normal" style:font-size-complex="16pt" style:font-weight-complex="normal"/>
    </style:style>
    <style:style style:name="T103" style:family="text">
      <style:text-properties fo:color="#ffffff"/>
    </style:style>
    <style:style style:name="T104" style:family="text">
      <style:text-properties fo:color="#ffffff" fo:background-color="#ffffff"/>
    </style:style>
    <style:style style:name="T105" style:family="text">
      <style:text-properties fo:color="#ffffff" fo:font-size="14pt" style:font-size-asian="14pt" style:font-size-complex="14pt"/>
    </style:style>
    <style:style style:name="T106" style:family="text">
      <style:text-properties fo:color="#ffffff" style:font-name="Cambria" style:text-underline-style="none"/>
    </style:style>
    <style:style style:name="T107" style:family="text">
      <style:text-properties fo:color="#ffffff" style:font-name="Cambria" style:text-underline-style="none" fo:background-color="#ffffff"/>
    </style:style>
    <style:style style:name="T108" style:family="text">
      <style:text-properties fo:color="#ffffff" style:font-name="Cambria" style:text-underline-style="none" fo:font-weight="normal" style:font-weight-asian="normal" style:font-weight-complex="normal"/>
    </style:style>
    <style:style style:name="T109" style:family="text">
      <style:text-properties fo:color="#ffffff" style:font-name="Cambria" fo:font-size="14pt" style:text-underline-style="none" fo:font-weight="normal" style:font-size-asian="14pt" style:font-weight-asian="normal" style:font-size-complex="14pt" style:font-weight-complex="normal"/>
    </style:style>
    <style:style style:name="T110" style:family="text">
      <style:text-properties fo:color="#ffffff" fo:font-size="15pt" style:font-size-asian="15pt" style:font-size-complex="15pt"/>
    </style:style>
    <style:style style:name="T111" style:family="text">
      <style:text-properties fo:color="#ffffff" fo:font-size="15pt" fo:font-weight="normal" style:font-size-asian="15pt" style:font-weight-asian="normal" style:font-size-complex="15pt" style:font-weight-complex="normal"/>
    </style:style>
    <style:style style:name="T112" style:family="text">
      <style:text-properties fo:color="#ffffff" fo:font-weight="normal" style:font-weight-asian="normal" style:font-weight-complex="normal"/>
    </style:style>
    <style:style style:name="T113" style:family="text">
      <style:text-properties fo:color="#ffffff" fo:font-weight="normal" fo:background-color="transparent" style:font-weight-asian="normal" style:font-weight-complex="normal"/>
    </style:style>
    <style:style style:name="T114" style:family="text">
      <style:text-properties fo:color="#ffffff" fo:font-weight="normal" fo:background-color="#ffffff" style:font-weight-asian="normal" style:font-weight-complex="normal"/>
    </style:style>
    <style:style style:name="T115" style:family="text">
      <style:text-properties fo:color="#ffffff" fo:background-color="transparent"/>
    </style:style>
    <style:style style:name="T116" style:family="text">
      <style:text-properties fo:background-color="#83caff"/>
    </style:style>
    <style:style style:name="T117" style:family="text">
      <style:text-properties fo:font-weight="normal" style:font-weight-asian="normal" style:font-weight-complex="normal"/>
    </style:style>
    <style:style style:name="T118" style:family="text">
      <style:text-properties fo:font-weight="normal" fo:background-color="#ffff00" style:font-weight-asian="normal" style:font-weight-complex="normal"/>
    </style:style>
    <style:style style:name="T119" style:family="text">
      <style:text-properties fo:font-weight="normal" fo:background-color="#ffffff" style:font-weight-asian="normal" style:font-weight-complex="normal"/>
    </style:style>
    <style:style style:name="T120" style:family="text">
      <style:text-properties fo:font-weight="normal" fo:background-color="#83caff" style:font-weight-asian="normal" style:font-weight-complex="normal"/>
    </style:style>
    <style:style style:name="T121" style:family="text">
      <style:text-properties fo:font-weight="normal" fo:background-color="transparen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s Loco Register</text:p>
      <text:p text:style-name="P1"/>
      <text:p text:style-name="P1"/>
      <text:p text:style-name="P1">* <text:span text:style-name="T67">IT IS PIC</text:span></text:p>
      <text:p text:style-name="P2"/>
      <text:p text:style-name="P25">Aln Valley Railway</text:p>
      <text:p text:style-name="P3">COACHES</text:p>
      <text:p text:style-name="P3"><text:span text:style-name="T6">31407</text:span> <text:s/><text:span text:style-name="T65">5210 </text:span><text:s/><text:span text:style-name="T65">35072</text:span> <text:s/><text:span text:style-name="T65">41</text:span> <text:s/><text:span text:style-name="T65">99950</text:span> <text:s/><text:span text:style-name="T65">24576</text:span> <text:s/><text:span text:style-name="T65">14122</text:span> <text:s/><text:span text:style-name="T6">25020</text:span> <text:s/><text:span text:style-name="T65">25032</text:span> <text:s/>4755 <text:s/><text:span text:style-name="T65">94606</text:span></text:p>
      <text:p text:style-name="P7"/>
      <text:p text:style-name="P4">Ground coach</text:p>
      <text:p text:style-name="P7"><text:s/><text:span text:style-name="T5">2688</text:span> </text:p>
      <text:p text:style-name="P3"/>
      <text:p text:style-name="P3">Ground Wagons</text:p>
      <text:p text:style-name="P3"><text:span text:style-name="T65">78XXXXX</text:span> <text:span text:style-name="T65">296698</text:span></text:p>
      <text:p text:style-name="P3"/>
      <text:p text:style-name="P3">993822 <text:span text:style-name="T65">992834</text:span> <text:span text:style-name="T65">993406</text:span> <text:span text:style-name="T65">993819</text:span> <text:span text:style-name="T65">1749 CR</text:span> <text:span text:style-name="T65">193254</text:span> <text:span text:style-name="T65">12101</text:span> <text:span text:style-name="T65">40344</text:span> <text:span text:style-name="T65">153320</text:span> <text:span text:style-name="T65">107 </text:span><text:s text:c="2"/><text:span text:style-name="T65">66</text:span> <text:span text:style-name="T65">923123</text:span> <text:span text:style-name="T65">928068</text:span> <text:span text:style-name="T65">40299</text:span> <text:span text:style-name="T65">6275</text:span> 952195 <text:span text:style-name="T65">954789*</text:span><text:span text:style-name="T72"> </text:span><text:span text:style-name="T65">784747*</text:span></text:p>
      <text:p text:style-name="P3"><text:s/></text:p>
      <text:p text:style-name="P3">STEAMS</text:p>
      <text:p text:style-name="P3">3799 2864 1243 3686 </text:p>
      <text:p text:style-name="P3"/>
      <text:p text:style-name="P3">DIESELS</text:p>
      <text:p text:style-name="P3"><text:s/><text:span text:style-name="T65">312989</text:span> <text:span text:style-name="T65">12088</text:span><text:span text:style-name="T72"> <text:s/></text:span><text:span text:style-name="T65">424839*</text:span><text:span text:style-name="T72"> <text:s/></text:span><text:s/>615 8199 </text:p>
      <text:p text:style-name="P3"/>
      <text:p text:style-name="P3">DMU</text:p>
      <text:p text:style-name="P4"><text:span text:style-name="T65">144004</text:span> <text:span text:style-name="T65">144016</text:span></text:p>
      <text:p text:style-name="P3"/>
      <text:p text:style-name="P3">TROLLEYS</text:p>
      <text:p text:style-name="P3">19XX 19XX 19XX 19XX </text:p>
      <text:p text:style-name="P3"/>
      <text:p text:style-name="P3">SMALL PLANT</text:p>
      <text:p text:style-name="P4"><text:span text:style-name="T65">56084</text:span> <text:s/>(74096 74019)</text:p>
      <text:p text:style-name="P3"/>
      <text:p text:style-name="P3">ROAD RAILERS </text:p>
      <text:p text:style-name="P3"><text:s/>28260 <text:s/><text:span text:style-name="T65">28277</text:span><text:span text:style-name="T72"> <text:s text:c="2"/></text:span></text:p>
      <text:p text:style-name="P3"/>
      <text:p text:style-name="P3">TAMPER</text:p>
      <text:p text:style-name="P3"><text:span text:style-name="T65">73010</text:span> </text:p>
      <text:p text:style-name="P3"/>
      <text:p text:style-name="P3">CRANES</text:p>
      <text:p text:style-name="P3"><text:span text:style-name="T65">1749</text:span> <text:span text:style-name="T65">23561</text:span></text:p>
      <text:p text:style-name="P3"/>
      <text:p text:style-name="P3">WICKHAM S</text:p>
      <text:p text:style-name="P3">68008 <text:s/>4985</text:p>
      <text:p text:style-name="P3"/>
      <text:p text:style-name="P3">APPLEBY FRODINGHAM RAILWAY <text:s text:c="5"/></text:p>
      <text:p text:style-name="P3">Ground Wagons </text:p>
      <text:p text:style-name="P3">7XXXXX <text:s/>7XXXXX 85XXXX </text:p>
      <text:p text:style-name="P3"/>
      <text:p text:style-name="P3">4702 7605 955010 295516 955160 993829 8553 (GER FLAT) 4421 68494 8552 4023 197 33 506322 503515 3 </text:p>
      <text:p text:style-name="P3"/>
      <text:p text:style-name="P3">COACHES</text:p>
      <text:p text:style-name="P3">4668 395280 <text:s/>44015 42511 42504 44059 40713</text:p>
      <text:p text:style-name="P3"/>
      <text:p text:style-name="P3">STEAMS</text:p>
      <text:p text:style-name="P3">2369 3138 1919 3844 1438 </text:p>
      <text:p text:style-name="P3"/>
      <text:p text:style-name="P3">DIESELS</text:p>
      <text:p text:style-name="P3">8368 10277 7409 2877 317V 2661 </text:p>
      <text:p text:style-name="P3"/>
      <text:p text:style-name="P3">DMUS</text:p>
      <text:p text:style-name="P3">59245 56207 <text:span text:style-name="T65">144017</text:span> </text:p>
      <text:p text:style-name="P3"/>
      <text:p text:style-name="P3">AMBERLEY MUSEUM <text:s/>BN18 9LT</text:p>
      <text:p text:style-name="P3">WAGONS</text:p>
      <text:p text:style-name="P3">3153 EX GUINNESS BREWERY 97012 34511 3828 58 </text:p>
      <text:p text:style-name="P3"/>
      <text:p text:style-name="P3"><text:s/>DIESEL</text:p>
      <text:p text:style-name="P3">9019 </text:p>
      <text:p text:style-name="P3"/>
      <text:p text:style-name="P3">DIESELS 3NG</text:p>
      <text:p text:style-name="P3">4013 STICKY 872 3097 2208 1980 1381 3653 DM686 3751 80 5 BLUE STAR 7269 6193 5863 11001 </text:p>
      <text:p text:style-name="P3">4 9514 187081 166024 45913 34521 33937 21295 3627 10161 8969 7741 </text:p>
      <text:p text:style-name="P3"/>
      <text:p text:style-name="P3">STEAMS 3NG</text:p>
      <text:p text:style-name="P3">2067 1781 23L 1126 </text:p>
      <text:p text:style-name="P3"/>
      <text:p text:style-name="P3">ELECTRIC 3NG</text:p>
      <text:p text:style-name="P3">808 T8033 16303 5034 5031 4998 </text:p>
      <text:p text:style-name="P3"/>
      <text:p text:style-name="P3">AVON VALLEY RAILWAY</text:p>
      <text:p text:style-name="P3">COACHES</text:p>
      <text:p text:style-name="P3"><text:span text:style-name="T65">1971**</text:span><text:span text:style-name="T66"> </text:span><text:span text:style-name="T65">13231</text:span> <text:span text:style-name="T65">1933</text:span> <text:span text:style-name="T65">3089</text:span> <text:span text:style-name="T65">3745*</text:span> <text:span text:style-name="T65">3991</text:span> <text:span text:style-name="T65">4035</text:span> <text:span text:style-name="T65">4058*</text:span><text:span text:style-name="T66"> </text:span><text:span text:style-name="T65">9208</text:span> <text:span text:style-name="T65">35255*</text:span> <text:span text:style-name="T65">25040* SR1153*</text:span><text:span text:style-name="T66"> </text:span><text:span text:style-name="T65">10555*</text:span><text:span text:style-name="T66"> </text:span><text:span text:style-name="T65">35299*</text:span><text:span text:style-name="T66"> </text:span><text:span text:style-name="T65">25972</text:span><text:span text:style-name="T66"> <text:s text:c="3"/></text:span><text:span text:style-name="T65">3749</text:span><text:span text:style-name="T66"> <text:s text:c="10"/></text:span><text:span text:style-name="T65">34111*</text:span><text:span text:style-name="T66"> <text:s text:c="2"/></text:span><text:span text:style-name="T65">99153</text:span><text:span text:style-name="T66"> </text:span><text:span text:style-name="T65">81227</text:span><text:span text:style-name="T66"> </text:span><text:span text:style-name="T65">SR1698</text:span> <text:span text:style-name="T65">34531</text:span> <text:span text:style-name="T65">18735</text:span><text:span text:style-name="T72"> </text:span><text:span text:style-name="T65">3746 </text:span></text:p>
      <text:p text:style-name="P7"/>
      <text:p text:style-name="P3">Ground Wagons </text:p>
      <text:p text:style-name="P3"><text:span text:style-name="T65">164704*</text:span> <text:span text:style-name="T65">763471*</text:span><text:span text:style-name="T72"> <text:s/></text:span><text:span text:style-name="T65">7XXXXX*</text:span> <text:s/><text:span text:style-name="T65">92095*</text:span></text:p>
      <text:p text:style-name="P3"/>
      <text:p text:style-name="P3"><text:span text:style-name="T65"><text:s/>4108</text:span> <text:span text:style-name="T65">783717*</text:span><text:span text:style-name="T66"> </text:span><text:span text:style-name="T65">783739*</text:span><text:span text:style-name="T66"> </text:span><text:span text:style-name="T65">983584</text:span><text:span text:style-name="T66"> </text:span><text:span text:style-name="T65">783354*</text:span><text:span text:style-name="T66"> </text:span><text:span text:style-name="T65">5700XX*</text:span> 341919 <text:span text:style-name="T65">56971*</text:span><text:span text:style-name="T72"> <text:s/></text:span><text:span text:style-name="T65">80703*</text:span><text:span text:style-name="T72"> </text:span><text:span text:style-name="T65">922693*</text:span> <text:span text:style-name="T65">741901*</text:span><text:span text:style-name="T72"> </text:span><text:span text:style-name="T65">86582</text:span> <text:span text:style-name="T65">48331</text:span> <text:span text:style-name="T65">7454*</text:span><text:span text:style-name="T72"> </text:span><text:span text:style-name="T65">52624</text:span> 258 <text:span text:style-name="T65">10931*</text:span><text:span text:style-name="T72"> </text:span><text:span text:style-name="T65">744084*</text:span><text:span text:style-name="T72"> </text:span><text:span text:style-name="T65">4271*</text:span><text:span text:style-name="T72"> </text:span><text:span text:style-name="T65">733150*</text:span><text:span text:style-name="T66"> </text:span><text:span text:style-name="T65">983583*</text:span> <text:span text:style-name="T65">905051*</text:span><text:span text:style-name="T72"> </text:span><text:span text:style-name="T65">982894* </text:span>200453 <text:span text:style-name="T65"><text:s/>17464</text:span> <text:s/><text:span text:style-name="T65">52243</text:span><text:span text:style-name="T72"> </text:span><text:span text:style-name="T65">75745</text:span><text:span text:style-name="T72"> </text:span><text:span text:style-name="T65">954127 68784</text:span> <text:span text:style-name="T65">47324*</text:span> <text:span text:style-name="T65">524430*</text:span> 252823</text:p>
      <text:p text:style-name="P3"><text:s/></text:p>
      <text:p text:style-name="P3">DIESELS</text:p>
      <text:p text:style-name="P7">07010*<text:span text:style-name="T66"> </text:span>08202* <text:span text:style-name="T72"><text:s/></text:span>5518<text:span text:style-name="T72"> </text:span>31130<text:span text:style-name="T72"> </text:span>70043*<text:span text:style-name="T72"> </text:span>446<text:span text:style-name="T72"> </text:span>10143<text:span text:style-name="T72"> <text:s/></text:span>235519 </text:p>
      <text:p text:style-name="P7">09015<text:span text:style-name="T72"> </text:span>466618</text:p>
      <text:p text:style-name="P7"/>
      <text:p text:style-name="P3">STEAMS</text:p>
      <text:p text:style-name="P3">3163 3063 1798 <text:span text:style-name="T65">2018</text:span> <text:span text:style-name="T65">7151</text:span> 7492 5658 4015 <text:span text:style-name="T65">2201</text:span></text:p>
      <text:p text:style-name="P4"><text:s/></text:p>
      <text:p text:style-name="P3"/>
      <text:p text:style-name="P3"><text:s/>TROLLEYS </text:p>
      <text:p text:style-name="P3">BARE WOOD 19XX </text:p>
      <text:p text:style-name="P3"/>
      <text:p text:style-name="P3">WICKHAM </text:p>
      <text:p text:style-name="P3">3769</text:p>
      <text:p text:style-name="P7"/>
      <text:p text:style-name="P3">TRACK MACHINE</text:p>
      <text:p text:style-name="P3"><text:s/>74100 DX</text:p>
      <text:p text:style-name="P3"/>
      <text:p text:style-name="P3"><text:s/>CRANES</text:p>
      <text:p text:style-name="P3"><text:s/><text:span text:style-name="T65">34571</text:span> <text:span text:style-name="T65">23724*</text:span> <text:span text:style-name="T65">24080*</text:span></text:p>
      <text:p text:style-name="P3"><text:s/></text:p>
      <text:p text:style-name="P3"><text:s/>DMUS </text:p>
      <text:p text:style-name="P4"><text:span text:style-name="T65">52006</text:span> <text:s/><text:span text:style-name="T65">52025*</text:span></text:p>
      <text:p text:style-name="P3"/>
      <text:p text:style-name="P3">APPLEBY T <text:s text:c="11"/>CA16 <text:s/>6UL</text:p>
      <text:p text:style-name="P3">COACHES</text:p>
      <text:p text:style-name="P14"><text:span text:style-name="T65">96169</text:span> <text:span text:style-name="T65">86753*</text:span> <text:span text:style-name="T65">86749*</text:span> <text:span text:style-name="T65">86910*</text:span> <text:span text:style-name="T65">5173</text:span> <text:span text:style-name="T65">5159</text:span> <text:span text:style-name="T65">3357 </text:span></text:p>
      <text:p text:style-name="P17"/>
      <text:p text:style-name="P17"/>
      <text:p text:style-name="P13">WAGONS</text:p>
      <text:p text:style-name="P3"><text:span text:style-name="T6">SALT VAN*</text:span><text:span text:style-name="T41"> </text:span>47305<text:span text:style-name="T40"> </text:span><text:span text:style-name="T6">4257*</text:span></text:p>
      <text:p text:style-name="P3"/>
      <text:p text:style-name="P3">BARROW HILL <text:s text:c="7"/>S43 2PR</text:p>
      <text:p text:style-name="P3">COACHES</text:p>
      <text:p text:style-name="P3"><text:s text:c="2"/><text:span text:style-name="T65">5125*</text:span><text:span text:style-name="T72"> <text:s/></text:span><text:s/><text:span text:style-name="T65">975460</text:span> <text:span text:style-name="T65">25362</text:span> <text:span text:style-name="T65">9388*</text:span> <text:s/></text:p>
      <text:p text:style-name="P3"/>
      <text:p text:style-name="P3">WAGONS </text:p>
      <text:p text:style-name="P3">904150 <text:span text:style-name="T65">726143*</text:span><text:span text:style-name="T72"> </text:span><text:span text:style-name="T65">61976*</text:span><text:span text:style-name="T72"> <text:s/></text:span><text:span text:style-name="T65">733221*</text:span> 278496 8070 <text:span text:style-name="T65">1112* </text:span><text:s/><text:span text:style-name="T65">402*</text:span><text:span text:style-name="T72"> </text:span><text:span text:style-name="T65">542*</text:span> <text:s/>201064 201052 <text:s/><text:span text:style-name="T65">954215</text:span> <text:span text:style-name="T65">953231</text:span> 8041 210382 <text:span text:style-name="T65">1101*</text:span> 202-7 4W FLAT 61052 IUPC 001 <text:span text:style-name="T65">782891*</text:span> <text:span text:style-name="T65">276232*</text:span></text:p>
      <text:p text:style-name="P7">786968<text:span text:style-name="T72"> </text:span>983088*<text:span text:style-name="T72"> </text:span>753792*<text:span text:style-name="T72"> </text:span>730687<text:span text:style-name="T72"> </text:span>40252*<text:span text:style-name="T72"> </text:span>SR1874*</text:p>
      <text:p text:style-name="P7"/>
      <text:p text:style-name="P3">STEAMS</text:p>
      <text:p text:style-name="P3"><text:s/><text:span text:style-name="T65">1795*</text:span> <text:span text:style-name="T65">3272</text:span> <text:span text:style-name="T65">2491*</text:span> <text:span text:style-name="T65">8217*</text:span><text:span text:style-name="T66"> </text:span><text:span text:style-name="T65">506*</text:span> <text:s text:c="2"/><text:span text:style-name="T65">41708</text:span> <text:s/><text:span text:style-name="T65"><text:s/>1000*</text:span> <text:span text:style-name="T65">5164*</text:span> <text:span text:style-name="T65">68006*</text:span> <text:span text:style-name="T65">2000*</text:span></text:p>
      <text:p text:style-name="P7"/>
      <text:p text:style-name="P3">DIESELS</text:p>
      <text:p text:style-name="P3"><text:s/>08943 <text:span text:style-name="T6">27066*</text:span> <text:span text:style-name="T65">26007</text:span> <text:span text:style-name="T65">D213*</text:span> <text:span text:style-name="T65">07012*</text:span> <text:span text:style-name="T65">03066</text:span> <text:span text:style-name="T6">02003*</text:span><text:span text:style-name="T5"> </text:span><text:span text:style-name="T65">D4092</text:span> <text:span text:style-name="T65">D2868</text:span> <text:span text:style-name="T65">81002</text:span> <text:s text:c="2"/><text:span text:style-name="T65">D5910</text:span> <text:span text:style-name="T65">L127</text:span> <text:span text:style-name="T65">L149</text:span> D1228 612 <text:span text:style-name="T65">89001</text:span> <text:span text:style-name="T65">85006</text:span> <text:span text:style-name="T65">E3035*</text:span> <text:span text:style-name="T65">82008</text:span> 10213 <text:span text:style-name="T65">45105</text:span> <text:span text:style-name="T65">45060*</text:span><text:span text:style-name="T72"> <text:s/></text:span><text:span text:style-name="T65">DC2589*</text:span><text:span text:style-name="T72"> </text:span><text:span text:style-name="T72"><text:s text:c="3"/></text:span></text:p>
      <text:p text:style-name="P7">08417<text:span text:style-name="T72"> </text:span>08956*<text:span text:style-name="T72"> </text:span><text:s/>09002*<text:span text:style-name="T72"> </text:span>20905<text:span text:style-name="T72"> <text:s text:c="2"/></text:span>20189<text:span text:style-name="T72"> </text:span></text:p>
      <text:p text:style-name="P3"/>
      <text:p text:style-name="P3">TROLLEYS</text:p>
      <text:p text:style-name="P3"><text:s/>XXXX<text:span text:style-name="T72"> </text:span><text:span text:style-name="T65">AVG 64</text:span> 0242 <text:s/><text:span text:style-name="T65">(99709 11202)*</text:span> <text:s/><text:span text:style-name="T65">(99709 909133)</text:span></text:p>
      <text:p text:style-name="P3"/>
      <text:p text:style-name="P3">ROAD RAILER</text:p>
      <text:p text:style-name="P3">132889</text:p>
      <text:p text:style-name="P3"/>
      <text:p text:style-name="P3">EMUS</text:p>
      <text:p text:style-name="P3"><text:span text:style-name="T65"><text:s/>62364</text:span> <text:s/>70155 <text:s text:c="2"/><text:span text:style-name="T65">76762</text:span></text:p>
      <text:p text:style-name="P3"/>
      <text:p text:style-name="P3">BARRY RAIL CENTRE <text:s text:c="2"/>CF62 5QR</text:p>
      <text:p text:style-name="P3">WAGONS</text:p>
      <text:p text:style-name="P3">10842 10803 351500 960000 201011 <text:span text:style-name="T65">375088</text:span></text:p>
      <text:p text:style-name="P3"/>
      <text:p text:style-name="P3">COACHES</text:p>
      <text:p text:style-name="P3"><text:span text:style-name="T72"><text:s/>2360 72621 <text:s/>72710 <text:s text:c="2"/></text:span><text:span text:style-name="T65">11072</text:span><text:span text:style-name="T72"> </text:span></text:p>
      <text:p text:style-name="P3"><text:s/></text:p>
      <text:p text:style-name="P3"/>
      <text:p text:style-name="P3">STEAMS</text:p>
      <text:p text:style-name="P3">92245 <text:span text:style-name="T65">9537</text:span> 5539 6686 </text:p>
      <text:p text:style-name="P3"/>
      <text:p text:style-name="P3"/>
      <text:p text:style-name="P3">DIESELS</text:p>
      <text:p text:style-name="P3">73118 <text:s/>08503 2183 </text:p>
      <text:p text:style-name="P3"/>
      <text:p text:style-name="P3">DMUS </text:p>
      <text:p text:style-name="P3">977693 977694 </text:p>
      <text:p text:style-name="P3"/>
      <text:p text:style-name="P3">ROAD RAILERS</text:p>
      <text:p text:style-name="P3">315076 F591 RWP F621 PWP </text:p>
      <text:p text:style-name="P3"/>
      <text:p text:style-name="P3">TRACK MACHINES</text:p>
      <text:p text:style-name="P3"><text:span text:style-name="T65">98308</text:span> 92206 </text:p>
      <text:p text:style-name="P3"/>
      <text:p text:style-name="P3">BARRY DOCKS</text:p>
      <text:p text:style-name="P3">STEAM</text:p>
      <text:p text:style-name="P3">1421</text:p>
      <text:p text:style-name="P3"/>
      <text:p text:style-name="P3">BERE FERRERS STATION <text:s text:c="2"/>PL20 7LT</text:p>
      <text:p text:style-name="P3">Ground Wagons</text:p>
      <text:p text:style-name="P3">853752 <text:s/>341</text:p>
      <text:p text:style-name="P3"/>
      <text:p text:style-name="P3">882196 403 <text:span text:style-name="T65">364</text:span> 178 357173 </text:p>
      <text:p text:style-name="P3"/>
      <text:p text:style-name="P3">COACHES</text:p>
      <text:p text:style-name="P3"><text:span text:style-name="T65">1815*</text:span> <text:span text:style-name="T65">379</text:span> <text:span text:style-name="T65">3132*</text:span> <text:span text:style-name="T65">3107</text:span> <text:span text:style-name="T65">1459*</text:span></text:p>
      <text:p text:style-name="P3"/>
      <text:p text:style-name="P3">STEAM</text:p>
      <text:p text:style-name="P7">1963*</text:p>
      <text:p text:style-name="P3"/>
      <text:p text:style-name="P3">DIESELS</text:p>
      <text:p text:style-name="P3"><text:span text:style-name="T65">2642*</text:span> <text:s/><text:span text:style-name="T65">3133*</text:span> <text:s/>3395 <text:s/>186318</text:p>
      <text:p text:style-name="P3"/>
      <text:p text:style-name="P3">TROLLEY</text:p>
      <text:p text:style-name="P3">XXXX</text:p>
      <text:p text:style-name="P7"/>
      <text:p text:style-name="P3">BATTLEFIELD LINE</text:p>
      <text:p text:style-name="P3">COACHES</text:p>
      <text:p text:style-name="P3"><text:s/>977084 1104 1816 4918 4939 5220 25729 <text:span text:style-name="T65">6060</text:span> 10205 34935 SR1333 34953 13447 25454 <text:span text:style-name="T65">975459</text:span> 99241 81428 92125 94142 748 <text:span text:style-name="T65">10708</text:span> 93701 SR1220 SR1312</text:p>
      <text:p text:style-name="P3"/>
      <text:p text:style-name="P3">Ground Wagons</text:p>
      <text:p text:style-name="P3">7XXXXX <text:s/>179553 <text:s/>4971 <text:s/>205878 <text:s text:c="2"/>762719 <text:s/>783023</text:p>
      <text:p text:style-name="P3"><text:s/></text:p>
      <text:p text:style-name="P3"><text:span text:style-name="T65">FLAT XXXX</text:span> 787330 993138 4046 451227 47795 144878 757301 780060 782960 983175 56134 904107 905092 943286 499254 936443 301596 955025 998539 195 390010 386628 38XXXX 5029 6694 226125 306305 996XXX 30406 30412 30467 35403 BRAKE VAN BARE WOOD 26XXXXX </text:p>
      <text:p text:style-name="P3"/>
      <text:p text:style-name="P3"><text:s/>STEAM</text:p>
      <text:p text:style-name="P3"><text:span text:style-name="T72"><text:s/></text:span><text:span text:style-name="T65">1859</text:span> <text:s text:c="12"/></text:p>
      <text:p text:style-name="P3"/>
      <text:p text:style-name="P3">DIESELS </text:p>
      <text:p text:style-name="P144"><text:span text:style-name="T72"><text:s text:c="3"/></text:span>04110 <text:span text:style-name="T65">D2867 </text:span>12083 20063 <text:span text:style-name="T65">D6508</text:span> <text:s/>594 <text:s/><text:span text:style-name="T14">20087</text:span></text:p>
      <text:p text:style-name="P144"><text:span text:style-name="T14"><text:s text:c="2"/></text:span>33208 <text:s/>263001 281271 905 268881 <text:span text:style-name="T65">45015</text:span> 58048 <text:span text:style-name="T65">D8110</text:span></text:p>
      <text:p text:style-name="P144"><text:s text:c="3"/>08706 <text:s text:c="2"/><text:span text:style-name="T65">40118</text:span> <text:s/>58012 <text:span text:style-name="T65">D7523</text:span></text:p>
      <text:p text:style-name="P3"><text:s/></text:p>
      <text:p text:style-name="P3"><text:s text:c="2"/></text:p>
      <text:p text:style-name="P3">TROLLEYS</text:p>
      <text:p text:style-name="P7"><text:s/>19XX</text:p>
      <text:p text:style-name="P3"/>
      <text:p text:style-name="P3">ROAD RAILERS</text:p>
      <text:p text:style-name="P3"><text:s/>C958 YOR <text:s/>C951 YOR A 231019 </text:p>
      <text:p text:style-name="P3"/>
      <text:p text:style-name="P3">DMUS </text:p>
      <text:p text:style-name="P3">51321 <text:span text:style-name="T65">51131</text:span> 55005 </text:p>
      <text:p text:style-name="P3"/>
      <text:p text:style-name="P3">EMUS</text:p>
      <text:p text:style-name="P3">65321 77172 60750</text:p>
      <text:p text:style-name="P7"/>
      <text:p text:style-name="P3">CRANES</text:p>
      <text:p text:style-name="P4"><text:s/>5011 14751 <text:s/>ADM22</text:p>
      <text:p text:style-name="P3"/>
      <text:p text:style-name="P3">BIRMINGHAM <text:s text:c="7"/>B11 2HL</text:p>
      <text:p text:style-name="P3">Ground Coach</text:p>
      <text:p text:style-name="P3"><text:s/>5300</text:p>
      <text:p text:style-name="P3"/>
      <text:p text:style-name="P3"><text:span text:style-name="T65">5191</text:span> 3119 <text:span text:style-name="T65">5157 </text:span><text:s/><text:span text:style-name="T65">5177</text:span> 5183 <text:span text:style-name="T65">99361</text:span> <text:span text:style-name="T65">349</text:span> 5194 5198 5212 5314 <text:span text:style-name="T65">9101</text:span> <text:span text:style-name="T65">17018</text:span> 5179 99353 <text:span text:style-name="T65">35470</text:span> <text:span text:style-name="T65">99403</text:span> 6320 5420 <text:span text:style-name="T65">80898</text:span> 93178 <text:span text:style-name="T65">93533</text:span> 92076 96100 <text:span text:style-name="T65">174</text:span> 17015</text:p>
      <text:p text:style-name="P3"/>
      <text:p text:style-name="P3">WAGONS <text:s/></text:p>
      <text:p text:style-name="P3">126348 126984 998526CR <text:span text:style-name="T65">35938</text:span> 954154 1XXXXX 900907 42194 60911 44069 174 <text:span text:style-name="T65">43958</text:span> (1PL CR) 14984 <text:span text:style-name="T65">281137</text:span> 949578 31175 <text:s text:c="2"/></text:p>
      <text:p text:style-name="P3"/>
      <text:p text:style-name="P3">STEAMS </text:p>
      <text:p text:style-name="P3">7812 <text:span text:style-name="T65">9600</text:span> <text:span text:style-name="T65">34070</text:span> <text:span text:style-name="T65">2885</text:span> 3278 4121 4588 <text:span text:style-name="T65">4965</text:span> <text:span text:style-name="T65">5043</text:span> 5080 6080 7903 <text:span text:style-name="T65">71000 </text:span><text:span text:style-name="T72">7289 1967 1631 2968 <text:s/>3597 1977</text:span></text:p>
      <text:p text:style-name="P3"><text:s/><text:span text:style-name="T65">2004</text:span> 2918 <text:span text:style-name="T65">7029</text:span> 670<text:span text:style-name="T72"> </text:span><text:span text:style-name="T65">7752</text:span> <text:span text:style-name="T65">7760</text:span></text:p>
      <text:p text:style-name="P3"/>
      <text:p text:style-name="P3"/>
      <text:p text:style-name="P3">DIESELS </text:p>
      <text:p text:style-name="P4">376 13029 <text:s/><text:span text:style-name="T65">47773</text:span> 299099</text:p>
      <text:p text:style-name="P4"/>
      <text:p text:style-name="P4">DMUS</text:p>
      <text:p text:style-name="P4"><text:span text:style-name="T65">144014</text:span> <text:span text:style-name="T65">144019</text:span> <text:span text:style-name="T65">144023</text:span></text:p>
      <text:p text:style-name="P7"/>
      <text:p text:style-name="P8">BIG PIT<text:span text:style-name="T72"> <text:s text:c="5"/></text:span><text:s/>NP4 <text:s/>9XP</text:p>
      <text:p text:style-name="P3">WAGONS</text:p>
      <text:p text:style-name="P3"><text:span text:style-name="T65"><text:s/>743303</text:span><text:span text:style-name="T72"> </text:span><text:span text:style-name="T65">40230*</text:span> <text:span text:style-name="T65">743249</text:span> <text:span text:style-name="T65">743404</text:span> <text:span text:style-name="T65">743836</text:span> <text:span text:style-name="T65">60501*</text:span> <text:span text:style-name="T65">403</text:span> <text:span text:style-name="T65">1472</text:span><text:span text:style-name="T72"> </text:span><text:span text:style-name="T65">7205*</text:span> <text:s text:c="2"/><text:span text:style-name="T65">40348*</text:span><text:span text:style-name="T72"> <text:s/></text:span><text:span text:style-name="T65">SLUDGE TANK*</text:span></text:p>
      <text:p text:style-name="P7"/>
      <text:p text:style-name="P3"><text:s text:c="2"/>STEAMS</text:p>
      <text:p text:style-name="P4"><text:span text:style-name="T65">PD10*</text:span> <text:span text:style-name="T65">1680*</text:span></text:p>
      <text:p text:style-name="P4"/>
      <text:p text:style-name="P3"><text:s/>CRANE</text:p>
      <text:p text:style-name="P3"><text:s/><text:span text:style-name="T65">LEON </text:span></text:p>
      <text:p text:style-name="P3"/>
      <text:p text:style-name="P3">DIESELS</text:p>
      <text:p text:style-name="P4"><text:span text:style-name="T65"><text:s/>6049</text:span> <text:span text:style-name="T65">3147</text:span> <text:span text:style-name="T65">8289</text:span></text:p>
      <text:p text:style-name="P7"/>
      <text:p text:style-name="P3">BLUE BELL <text:s text:c="9"/>RH17 <text:s text:c="2"/>7BB</text:p>
      <text:p text:style-name="P3"><text:s/>Ground Coaches</text:p>
      <text:p text:style-name="P3">2159 SR1728 <text:s/>18XX 35</text:p>
      <text:p text:style-name="P3"/>
      <text:p text:style-name="P3"/>
      <text:p text:style-name="P3"><text:s/><text:span text:style-name="T65">16210 </text:span>1838 <text:span text:style-name="T65">94181</text:span> 93722 <text:span text:style-name="T65">81478</text:span> <text:span text:style-name="T65">34556</text:span> 21246 16012 35207 <text:span text:style-name="T65">25871</text:span> 25776 <text:span text:style-name="T65">25769</text:span> <text:span text:style-name="T65">25728</text:span> <text:span text:style-name="T65">4957</text:span> <text:span text:style-name="T65">4941</text:span> 8806 <text:span text:style-name="T65">3069</text:span> <text:span text:style-name="T65">3064</text:span> 975143 21271 6686 6575 5644 7874 <text:span text:style-name="T65">1818 </text:span>99888 2515 <text:span text:style-name="T65">2462</text:span> <text:s/>2411 <text:span text:style-name="T65">2356</text:span> 2276 70140 2306 <text:span text:style-name="T65">2186</text:span> <text:span text:style-name="T65">1788</text:span> 1728 1536 <text:s/>2531 1482 3680 <text:span text:style-name="T65">1464 </text:span>975669 1336 <text:span text:style-name="T65">1309</text:span> DS143 DS166 1184 442 <text:span text:style-name="T65">419</text:span> 404 1507 32975 <text:span text:style-name="T65">1674</text:span> 5307 1365 7864 <text:span text:style-name="T65">5768</text:span> 4922 4601 4444 4441 <text:span text:style-name="T65">4279</text:span> 150785 4036 4035 <text:span text:style-name="T65">3724</text:span> 3687 DS1035 153 <text:span text:style-name="T65">394</text:span> <text:span text:style-name="T65">387</text:span> <text:span text:style-name="T65">412</text:span> 43909 1050 971 <text:span text:style-name="T65">1098</text:span> 3410 3363 950 DS1119 <text:span text:style-name="T65">661</text:span> 1288 494 60 <text:span text:style-name="T65">3360</text:span> DS873 719 <text:span text:style-name="T65">270 </text:span>94 <text:s/>1061 398 <text:span text:style-name="T65">368</text:span> <text:span text:style-name="T65">603</text:span> 623 5510 5498<text:span text:style-name="T65"> 977166</text:span> <text:span text:style-name="T65">7598 </text:span><text:span text:style-name="T72"><text:s/></text:span><text:span text:style-name="T65">114</text:span><text:span text:style-name="T72"> </text:span><text:s/>1503 <text:span text:style-name="T65">157</text:span> 175 99202 328 2462 10693 10690 10526 BIRD CAGE <text:span text:style-name="T65">949</text:span> <text:span text:style-name="T65">4824</text:span></text:p>
      <text:p text:style-name="P3"/>
      <text:p text:style-name="P3">Ground Wagons </text:p>
      <text:p text:style-name="P4">1259 <text:s/>49908 <text:s/>50687 855XX 7XXXXXX 778669 (7XXXXXX BLUE)</text:p>
      <text:p text:style-name="P3"/>
      <text:p text:style-name="P3"/>
      <text:p text:style-name="P3">87720 993348 993217 983103 772972 <text:span text:style-name="T65">570027</text:span> <text:span text:style-name="T65">411245</text:span> 66071 1032 7XXXX 2773 <text:span text:style-name="T65">44611</text:span> 59685 61107 <text:span text:style-name="T65">19211 </text:span>12058 951676 55490 1577 <text:span text:style-name="T65">567</text:span> 39617 <text:span text:style-name="T65">30004</text:span> 37786 4497 970038UF 3182CR 57949 5542 16358 <text:span text:style-name="T65">16194</text:span> <text:span text:style-name="T65">4430</text:span> <text:span text:style-name="T65">91</text:span> 474558 <text:span text:style-name="T65">46507</text:span> 100677 87782 <text:span text:style-name="T65">741381</text:span> <text:span text:style-name="T65">67341</text:span> <text:span text:style-name="T65">904134</text:span> <text:span text:style-name="T65">900036</text:span> 5706 <text:span text:style-name="T65">8196</text:span> 993933 3346 <text:span text:style-name="T65">17908</text:span> 56290 <text:span text:style-name="T65">991391</text:span> <text:span text:style-name="T65">10013</text:span> <text:span text:style-name="T65">9608</text:span> <text:span text:style-name="T65">986419 </text:span>985854 984506 <text:span text:style-name="T65">984082</text:span> 15750 8112 <text:span text:style-name="T65">62002</text:span> <text:span text:style-name="T65">47588</text:span> <text:span text:style-name="T65">480222</text:span> <text:span text:style-name="T65">1921</text:span> 70225 <text:span text:style-name="T65">458525</text:span> <text:span text:style-name="T65">461224</text:span> <text:span text:style-name="T65">62864</text:span><text:span text:style-name="T72"> </text:span><text:span text:style-name="T65">11916</text:span><text:span text:style-name="T72"> <text:s/></text:span><text:span text:style-name="T65">55993</text:span><text:span text:style-name="T72"> <text:s/></text:span><text:span text:style-name="T65">978290</text:span><text:span text:style-name="T72"> 988395</text:span></text:p>
      <text:p text:style-name="P3"/>
      <text:p text:style-name="P26"><text:s/>STEAMS</text:p>
      <text:p text:style-name="P3"><text:s/><text:span text:style-name="T65">80100</text:span> <text:span text:style-name="T65">9017</text:span> <text:span text:style-name="T65">30096</text:span> <text:span text:style-name="T65">541</text:span> <text:span text:style-name="T65">672</text:span> 92240 84030 <text:span text:style-name="T65">80151</text:span> <text:span text:style-name="T65">80064</text:span> <text:span text:style-name="T65">75027</text:span> <text:span text:style-name="T65">73082</text:span> <text:span text:style-name="T65">27505</text:span> <text:span text:style-name="T65">34059</text:span> <text:span text:style-name="T65">1959 </text:span><text:span text:style-name="T72"><text:s/></text:span><text:span text:style-name="T65">55</text:span> <text:span text:style-name="T65">473</text:span> <text:span text:style-name="T65">638</text:span> <text:span text:style-name="T65">31618</text:span> <text:span text:style-name="T65">592</text:span> <text:span text:style-name="T65">323</text:span> <text:span text:style-name="T65">263</text:span><text:span text:style-name="T72"> </text:span><text:span text:style-name="T65">178</text:span> <text:span text:style-name="T65">65</text:span> 27 <text:span text:style-name="T65">928</text:span> <text:span text:style-name="T65">847</text:span> <text:span text:style-name="T65">488</text:span> <text:span text:style-name="T65">21C123</text:span> <text:s text:c="2"/><text:span text:style-name="T65">58850</text:span><text:span text:style-name="T72"> <text:s/>641 <text:s text:c="2"/>158</text:span></text:p>
      <text:p text:style-name="P4"/>
      <text:p text:style-name="P3">DIESELS</text:p>
      <text:p text:style-name="P3"><text:s/><text:span text:style-name="T65">09018</text:span> <text:span text:style-name="T65">10241</text:span> 957</text:p>
      <text:p text:style-name="P3"/>
      <text:p text:style-name="P3">ROAD RAILERS</text:p>
      <text:p text:style-name="P3"><text:s/>(99709 940259) (99709 943057) <text:s/>(99709 901120)</text:p>
      <text:p text:style-name="P3"/>
      <text:p text:style-name="P3">WICKHAMS</text:p>
      <text:p text:style-name="P3"><text:span text:style-name="T65">10705</text:span> 10708</text:p>
      <text:p text:style-name="P3"/>
      <text:p text:style-name="P3">CRANES</text:p>
      <text:p text:style-name="P3"><text:span text:style-name="T65">1748</text:span> 95215</text:p>
      <text:p text:style-name="P3"/>
      <text:p text:style-name="P3">BODMIN RAILWAY <text:s text:c="6"/>PL30 <text:s text:c="2"/>4BB</text:p>
      <text:p text:style-name="P3">COACHES</text:p>
      <text:p text:style-name="P4"><text:s text:c="2"/><text:span text:style-name="T65">35130</text:span> <text:span text:style-name="T65">1873</text:span> <text:span text:style-name="T65">4037</text:span> <text:s/><text:span text:style-name="T65">4484</text:span> 4656 4789 <text:span text:style-name="T65">4963</text:span> <text:span text:style-name="T65">975033</text:span> 2994 2434 <text:span text:style-name="T65">10618</text:span> 392 <text:span text:style-name="T65">25807</text:span> 232 80973 18560 <text:span text:style-name="T65">34620</text:span> 34627 80702 94257 94772 <text:span text:style-name="T65">SR1855</text:span></text:p>
      <text:p text:style-name="P7"/>
      <text:p text:style-name="P3">Ground Wagon</text:p>
      <text:p text:style-name="P7">512988</text:p>
      <text:p text:style-name="P7"/>
      <text:p text:style-name="P3">993895 <text:span text:style-name="T65">983622</text:span> 103999 104663 <text:span text:style-name="T65">261052</text:span><text:span text:style-name="T72"> <text:s/></text:span><text:span text:style-name="T65">983591</text:span> 743495 <text:span text:style-name="T65">700709</text:span> 743031 <text:span text:style-name="T65">743171</text:span> <text:span text:style-name="T65">743443</text:span> 904546 <text:span text:style-name="T65">5442</text:span> 489672 2506 301568 5108 41799 94XXXX <text:span text:style-name="T65">743353</text:span> 222814 <text:s/><text:span text:style-name="T65">952045</text:span><text:span text:style-name="T72"> </text:span><text:span text:style-name="T65">955166</text:span><text:span text:style-name="T72"> <text:s/></text:span><text:span text:style-name="T65">35302</text:span><text:span text:style-name="T72"> 4W FLAT JONES</text:span></text:p>
      <text:p text:style-name="P4"/>
      <text:p text:style-name="P3">DIESELS </text:p>
      <text:p text:style-name="P4">D3452 <text:span text:style-name="T65">O8444</text:span> <text:span text:style-name="T65">37142</text:span> <text:span text:style-name="T65">47306</text:span> <text:span text:style-name="T65">50042</text:span> 22928 <text:s/>10029</text:p>
      <text:p text:style-name="P7"/>
      <text:p text:style-name="P14">STEAMS </text:p>
      <text:p text:style-name="P3"><text:span text:style-name="T65">2572</text:span> <text:span text:style-name="T65">75078</text:span> <text:span text:style-name="T65">3058</text:span> 2962 <text:span text:style-name="T65">5552</text:span> <text:span text:style-name="T65">4612</text:span> <text:span text:style-name="T65">6435</text:span> <text:span text:style-name="T65">30120</text:span> <text:span text:style-name="T65">4247</text:span></text:p>
      <text:p text:style-name="P3"><text:s/></text:p>
      <text:p text:style-name="P3">DMU</text:p>
      <text:p text:style-name="P3"><text:s/>55020</text:p>
      <text:p text:style-name="P3"/>
      <text:p text:style-name="P3">PLUMP TROLLEY CAMEL</text:p>
      <text:p text:style-name="P3"/>
      <text:p text:style-name="P3">BO'NESS RAILWAY <text:s text:c="4"/>EH51 <text:s text:c="2"/>9AQ</text:p>
      <text:p text:style-name="P3">Ground Coaches</text:p>
      <text:p text:style-name="P3"><text:span text:style-name="T65">(NBR <text:s/>1168)*</text:span> <text:s/>GSWR</text:p>
      <text:p text:style-name="P3"/>
      <text:p text:style-name="P3"/>
      <text:p text:style-name="P3"><text:span text:style-name="T6">4529</text:span><text:span text:style-name="T14"> <text:s/></text:span><text:span text:style-name="T6">5028</text:span><text:span text:style-name="T14"> </text:span>1866 <text:span text:style-name="T65">4422</text:span> 3115 3150 <text:span text:style-name="T6">1730</text:span><text:span text:style-name="T14"> </text:span><text:span text:style-name="T6">4831</text:span><text:span text:style-name="T14"> </text:span><text:span text:style-name="T6">4836</text:span><text:span text:style-name="T5"> </text:span>4844 4832 4856 4215 1859 9237 4871 <text:span text:style-name="T65">13230</text:span> <text:span text:style-name="T6">35185</text:span><text:span text:style-name="T14"> </text:span><text:span text:style-name="T6">80218</text:span><text:span text:style-name="T14"> </text:span><text:span text:style-name="T6">80221</text:span><text:span text:style-name="T14"> </text:span><text:span text:style-name="T6">35405</text:span><text:span text:style-name="T14"> </text:span><text:span text:style-name="T6">10668</text:span><text:span text:style-name="T5"> </text:span>13229 99814 <text:span text:style-name="T6">21241 </text:span>24895 31036<text:span text:style-name="T14"> </text:span><text:span text:style-name="T6">SR1856*</text:span>27407 5 320680 80417 731 122 57A 99801 17 198614 15498 464 1375 1184<text:span text:style-name="T40"> </text:span><text:span text:style-name="T6">663</text:span><text:span text:style-name="T40"> </text:span>1211 461 565 467 999502<text:span text:style-name="T65"> 80382</text:span><text:span text:style-name="T40"> </text:span><text:span text:style-name="T6">80437*</text:span><text:span text:style-name="T14"> <text:s/></text:span><text:span text:style-name="T6">3096</text:span><text:span text:style-name="T14"> </text:span><text:span text:style-name="T6">82113</text:span><text:span text:style-name="T14"> 32817 4258X 4271 SR151 10580 </text:span><text:span text:style-name="T6">791</text:span><text:span text:style-name="T14"> 644 10021 27389 395918 24725 13803 </text:span></text:p>
      <text:p text:style-name="P27">94160</text:p>
      <text:p text:style-name="P27"/>
      <text:p text:style-name="P3">Ground Wagons</text:p>
      <text:p text:style-name="P3">4258X GWR <text:span text:style-name="T65">(CONTAINER BLUE)</text:span> </text:p>
      <text:p text:style-name="P3"/>
      <text:p text:style-name="P3">167459 996914 <text:span text:style-name="T65">996945</text:span> 951148 983055 778368 70190<text:span text:style-name="T42"> </text:span><text:span text:style-name="T6">555710</text:span> <text:span text:style-name="T6">882517</text:span><text:span text:style-name="T14"> </text:span><text:span text:style-name="T6">786095</text:span><text:span text:style-name="T14"> <text:s/></text:span><text:span text:style-name="T6">579284*</text:span><text:span text:style-name="T14"> </text:span><text:span text:style-name="T6">731916*</text:span><text:span text:style-name="T14"> </text:span><text:span text:style-name="T6"><text:s/>20*</text:span><text:span text:style-name="T14"> </text:span><text:span text:style-name="T6"><text:s/>206 F</text:span></text:p>
      <text:p text:style-name="P3"><text:span text:style-name="T65">769990</text:span> <text:span text:style-name="T65">778520</text:span>55251 <text:s/>7XXXXX 73007 508675 300041</text:p>
      <text:p text:style-name="P3"><text:s/>40226 989521 992748 993771 256063 249317 <text:s/><text:span text:style-name="T65">978426</text:span></text:p>
      <text:p text:style-name="P3">773187 <text:span text:style-name="T72">f</text:span>205 <text:s/>241 5 13 <text:s/>416133 971568 4 <text:span text:style-name="T65">43</text:span> 78 </text:p>
      <text:p text:style-name="P3">984151 21 <text:span text:style-name="T65">51026</text:span> 40 212 1329 <text:span text:style-name="T65">252</text:span> 65013 93177 57</text:p>
      <text:p text:style-name="P3"><text:s/>041957 437 <text:span text:style-name="T6">252*</text:span><text:span text:style-name="T5"> </text:span>78 45 261<text:span text:style-name="T65"> 286</text:span><text:span text:style-name="T72"> <text:s/></text:span><text:span text:style-name="T65">755</text:span> 40002 978474 900123 904141 978069 531008 50 67496 <text:span text:style-name="T65">634355</text:span> 120</text:p>
      <text:p text:style-name="P3"><text:span text:style-name="T5"><text:s/></text:span><text:span text:style-name="T6">507115*</text:span> <text:span text:style-name="T65">931752*</text:span> 904586 7232 <text:span text:style-name="T65">28144</text:span> BKR3 978224 <text:span text:style-name="T65">314632*</text:span> <text:span text:style-name="T65">314633*</text:span> 14 84005 932307 <text:span text:style-name="T6">314636*</text:span><text:span text:style-name="T65"> </text:span></text:p>
      <text:p text:style-name="P3">934809 350001 110349 722160 458977 40297 948251 3159134W ROLL BOGLE LONG FLAT<text:span text:style-name="T5"> </text:span><text:span text:style-name="T14">3 </text:span><text:span text:style-name="T6">ROF24*</text:span></text:p>
      <text:p text:style-name="P3"><text:s/><text:span text:style-name="T14">2 </text:span><text:span text:style-name="T6">993279</text:span><text:span text:style-name="T14"> <text:s text:c="2"/></text:span><text:span text:style-name="T6">(773039 <text:s/>773149)</text:span></text:p>
      <text:p text:style-name="P7"/>
      <text:p text:style-name="P3">DIESELS </text:p>
      <text:p text:style-name="P3">D3558 <text:span text:style-name="T65">20020</text:span> 25235 26024 26038 27005 27001 <text:span text:style-name="T6">37261*</text:span> <text:span text:style-name="T65">37214</text:span> D2767 <text:span text:style-name="T65">27415</text:span> 262998<text:span text:style-name="T40"> </text:span><text:span text:style-name="T6">312984*</text:span> 421439 423658 457299 506500 552 <text:span text:style-name="T6">275883*</text:span><text:span text:style-name="T14"> <text:s text:c="3"/></text:span><text:span text:style-name="T65">110V082</text:span> <text:span text:style-name="T6">37403</text:span><text:span text:style-name="T14"> </text:span><text:span text:style-name="T72"><text:s text:c="2"/></text:span><text:span text:style-name="T65">84001*</text:span><text:span text:style-name="T42"> </text:span><text:span text:style-name="T6">47643</text:span><text:span text:style-name="T14"> </text:span><text:span text:style-name="T6">312733</text:span><text:span text:style-name="T14"> <text:s/></text:span><text:span text:style-name="T6">343 </text:span></text:p>
      <text:p text:style-name="P3"/>
      <text:p text:style-name="P3">STEAMS</text:p>
      <text:p text:style-name="P3"><text:span text:style-name="T65">61994</text:span> 22563 <text:span text:style-name="T65">65243</text:span> <text:span text:style-name="T65">42</text:span> 24755 80105 <text:span text:style-name="T65">9627 </text:span>9631 5710 3837 912 1937 1989 2043 9561 2068 <text:span text:style-name="T65">2203</text:span> 2335<text:span text:style-name="T40"> </text:span><text:span text:style-name="T6">68007</text:span> 2880 3640 3818 <text:span text:style-name="T6">2046</text:span> 840 </text:p>
      <text:p text:style-name="P3"/>
      <text:p text:style-name="P3">DMUS </text:p>
      <text:p text:style-name="P7">51017<text:span text:style-name="T72"> </text:span>59404<text:span text:style-name="T72"> </text:span>51043<text:span text:style-name="T72"> 79443 </text:span></text:p>
      <text:p text:style-name="P7"/>
      <text:p text:style-name="P3"><text:s/>EMUS </text:p>
      <text:p text:style-name="P7">61503<text:span text:style-name="T72"> </text:span>75597<text:span text:style-name="T72"> </text:span>75632<text:span text:style-name="T72"> 64599 71458</text:span></text:p>
      <text:p text:style-name="P4"/>
      <text:p text:style-name="P3">ROAD RAILERS </text:p>
      <text:p text:style-name="P7"><text:span text:style-name="T72">ST0603C <text:s/>909264=2 </text:span><text:span text:style-name="T5">909131-3**</text:span> <text:span text:style-name="T72"><text:s/>970214 </text:span><text:span text:style-name="T53"><text:s/></text:span><text:span text:style-name="T5">10482**</text:span> <text:s/></text:p>
      <text:p text:style-name="P3">L208 OMP XXXX 011168-7 <text:s/>XXXX 011197-9 <text:span text:style-name="T65">HCTO22</text:span></text:p>
      <text:p text:style-name="P7"/>
      <text:p text:style-name="P3">CRANES</text:p>
      <text:p text:style-name="P14">313/6 <text:s/><text:span text:style-name="T65">RS1034/4*</text:span> 80001 95200</text:p>
      <text:p text:style-name="P14"/>
      <text:p text:style-name="P3">BOWES RAILWAY <text:s/>NE9 <text:s/>7QJ</text:p>
      <text:p text:style-name="P3">WAGONS</text:p>
      <text:p text:style-name="P3">939 642 197 210 225 289 364 525 573 701 717 775 780 1183 12 G4 B1 B3 B39 790 A18 842 13 256 1615 1611 971 B24 1195 511 1255 B49 782 572 308 122 1289 1104 1254 1220 1212 1160 1111 944 2 1424 605 80 B33 056 6977 406 BOWES REEL 516 53 6972 6005 DANDY CART PWD 6196 </text:p>
      <text:p text:style-name="P3"><text:s/></text:p>
      <text:p text:style-name="P3">STEAMS</text:p>
      <text:p text:style-name="P3">2274 2361 </text:p>
      <text:p text:style-name="P3"/>
      <text:p text:style-name="P3">DIESELS</text:p>
      <text:p text:style-name="P3">471640 3922 6263 395294 416210 DM842 2476 5921</text:p>
      <text:p text:style-name="P3"><text:s/>8515 B1840 B3060 </text:p>
      <text:p text:style-name="P3"/>
      <text:p text:style-name="P3">TROLLEY</text:p>
      <text:p text:style-name="P3">XXXX </text:p>
      <text:p text:style-name="P3"/>
      <text:p text:style-name="P3">CRANE</text:p>
      <text:p text:style-name="P4">18773 </text:p>
      <text:p text:style-name="P7"/>
      <text:p text:style-name="P3">BRISTOL I M <text:s text:c="6"/>BS1 4RN</text:p>
      <text:p text:style-name="P3">Ground Wagon</text:p>
      <text:p text:style-name="P7">RED*</text:p>
      <text:p text:style-name="P3"/>
      <text:p text:style-name="P15"><text:span text:style-name="T65">46281*</text:span> <text:span text:style-name="T65">32*</text:span> <text:span text:style-name="T65">31568*</text:span> <text:span text:style-name="T65">27*</text:span> <text:span text:style-name="T65">X11*</text:span> <text:span text:style-name="T65">506002*</text:span> 297147 <text:span text:style-name="T65">186630*</text:span> <text:span text:style-name="T65">3285*</text:span> <text:span text:style-name="T65">80633*</text:span> <text:span text:style-name="T65">900910*</text:span> <text:span text:style-name="T65">978121*</text:span> <text:span text:style-name="T65">65814*</text:span> <text:span text:style-name="T65">4043*</text:span> <text:span text:style-name="T65">17391*</text:span> <text:span text:style-name="T65">uf </text:span><text:span text:style-name="T65">red*</text:span> <text:span text:style-name="T65"><text:s/>61110*</text:span> <text:span text:style-name="T65">66045*</text:span> <text:span text:style-name="T65">4413*</text:span> 700320 <text:span text:style-name="T65">UF with 855123*</text:span> <text:s/><text:span text:style-name="T65">4w Heavy Trolley</text:span></text:p>
      <text:p text:style-name="P17"/>
      <text:p text:style-name="P3">COACH </text:p>
      <text:p text:style-name="P3">319</text:p>
      <text:p text:style-name="P7"/>
      <text:p text:style-name="P3">STEAMS </text:p>
      <text:p text:style-name="P3">1764 <text:s text:c="2"/>242 <text:s text:c="3"/>1940 </text:p>
      <text:p text:style-name="P3"/>
      <text:p text:style-name="P3">CRANE</text:p>
      <text:p text:style-name="P3"><text:s/>14090</text:p>
      <text:p text:style-name="P3"/>
      <text:p text:style-name="P4">DIESEL</text:p>
      <text:p text:style-name="P3">418792</text:p>
      <text:p text:style-name="P7"/>
      <text:p text:style-name="P3">BEAMISH OPED <text:s text:c="3"/>DH9 <text:s/>0RG</text:p>
      <text:p text:style-name="P3"><text:s/>COACHES</text:p>
      <text:p text:style-name="P3">YELLOW BLUE 58A L&amp;MR <text:span text:style-name="T65">POCKELEY WAGGONWAY*</text:span> 179 ?S&amp;DR 118</text:p>
      <text:p text:style-name="P3"/>
      <text:p text:style-name="P3">Ground Wagons</text:p>
      <text:p text:style-name="P3">1XXXXX GREEN <text:s/>7XXXXX <text:span text:style-name="T65">BARE WOOD*</text:span></text:p>
      <text:p text:style-name="P7"/>
      <text:p text:style-name="P7"/>
      <text:p text:style-name="P3"><text:span text:style-name="T65">1115*</text:span> <text:span text:style-name="T65">64994*</text:span> <text:s/><text:span text:style-name="T65">434</text:span> 25 <text:span text:style-name="T65">12*</text:span> 1357 <text:span text:style-name="T65">1281</text:span> <text:span text:style-name="T65">1219*</text:span> 829 <text:span text:style-name="T65">1209*</text:span><text:span text:style-name="T72"> </text:span><text:span text:style-name="T65">1828 *</text:span> <text:span text:style-name="T65">328</text:span> <text:span text:style-name="T65">45</text:span> <text:span text:style-name="T65">46</text:span> 160 1210 <text:span text:style-name="T65">41* </text:span>1077 14/9 1218 122</text:p>
      <text:p text:style-name="P3"><text:span text:style-name="T65">92189</text:span> <text:span text:style-name="T65">46153*</text:span> 03938 0 1319 47877 26 70 181</text:p>
      <text:p text:style-name="P3">108653 44842 177 749 V3 B2 289 848 978 <text:span text:style-name="T65">2485</text:span> 179 178 7025 <text:span text:style-name="T65">102833</text:span><text:span text:style-name="T72"> </text:span><text:span text:style-name="T65">54556</text:span><text:span text:style-name="T72"> </text:span><text:span text:style-name="T65">15*</text:span><text:span text:style-name="T72"> </text:span><text:span text:style-name="T65">BARE WOOD1</text:span><text:span text:style-name="T72"> </text:span><text:span text:style-name="T65">BARE </text:span></text:p>
      <text:p text:style-name="P4"><text:span text:style-name="T65">180021</text:span> <text:span text:style-name="T65">830</text:span> <text:span text:style-name="T65">95861</text:span> <text:span text:style-name="T65">WOOD2</text:span> <text:s/>BARE <text:span text:style-name="T65">MOORE*</text:span></text:p>
      <text:p text:style-name="P3">WOOD3 WATER TANK 529 FLAT 96 HAWKES <text:s text:c="2"/>2PL OPED 1<text:span text:style-name="T72"> </text:span></text:p>
      <text:p text:style-name="P4">8PL<text:span text:style-name="T65"> HOPPER*</text:span> <text:span text:style-name="T65">DANDY CART*</text:span> 107 900574 SP</text:p>
      <text:p text:style-name="P3"/>
      <text:p text:style-name="P3">STEAMS</text:p>
      <text:p text:style-name="P4">SAMSON <text:span text:style-name="T65">1370 </text:span>1532 721 7006 17 <text:span text:style-name="T65">(1900 5)*</text:span> STEAM ELEPHANT COFFEE POT 897 18 LION GLYDER <text:span text:style-name="T65">PUFFING BILLY</text:span></text:p>
      <text:p text:style-name="P7"/>
      <text:p text:style-name="P3">DIESELS</text:p>
      <text:p text:style-name="P3">(ASHOVER 3307) 1377 <text:span text:style-name="T65">2</text:span></text:p>
      <text:p text:style-name="P7"/>
      <text:p text:style-name="P28">BUCKINGHAMSHIRE RAILWAY <text:s/>HP22 <text:s/>4BY</text:p>
      <text:p text:style-name="P28">WAGONS IN THE MUSEUM</text:p>
      <text:p text:style-name="P28">875690 853151 4188 778992 47271 <text:s/>1CR B557 506161 7553 4415 68642 12986</text:p>
      <text:p text:style-name="P7"/>
      <text:p text:style-name="P4">993778 75250 992568 983905 787329 763570 34676 954171 585 893928 952510 8118 784699 731381 1023 78XXXXX 35 S0837 68766 48103 46054 18300 85 97 98 578 2536 312450 418128 386917 801 8956 50 329 MET 92</text:p>
      <text:p text:style-name="P3"><text:s/>84 YELLOW CR ( UNKNOW TANK) (2 UNKNOW TANK) 9085 709313 506195 <text:s/>955238 950048 35036 306307 20 </text:p>
      <text:p text:style-name="P3">TPC35 4417 7612 4722 8502 66189 418 885280 731708 1869 105777 263289 </text:p>
      <text:p text:style-name="P3"/>
      <text:p text:style-name="P3">COACHES IN THE MUSEUM</text:p>
      <text:p text:style-name="P4">5025 22219 5913 11388 16076 </text:p>
      <text:p text:style-name="P17"/>
      <text:p text:style-name="P3">COACHES STATIC </text:p>
      <text:p text:style-name="P3"><text:span text:style-name="T65">9001</text:span> <text:span text:style-name="T65">249</text:span> <text:span text:style-name="T65">112</text:span> </text:p>
      <text:p text:style-name="P3"/>
      <text:p text:style-name="P3">BODY ONLY </text:p>
      <text:p text:style-name="P13"><text:span text:style-name="T65">5324</text:span> SR1647 4569 279982</text:p>
      <text:p text:style-name="P13"/>
      <text:p text:style-name="P3">25500 24993 16235 35192 99017 80394 80423 43190</text:p>
      <text:p text:style-name="P4">96403 94578 86450 <text:s/>459 9 652 182 </text:p>
      <text:p text:style-name="P4">33014 2242 2115 1108 1037 2342 102 1727 1470 1076 <text:s/></text:p>
      <text:p text:style-name="P4"/>
      <text:p text:style-name="P3">STEAMS IN THE MUSEUM</text:p>
      <text:p text:style-name="P3"><text:span text:style-name="T65">3020</text:span> <text:span text:style-name="T65">3717</text:span> 807 1477 1334 24564 <text:span text:style-name="T65">5080</text:span></text:p>
      <text:p text:style-name="P3"/>
      <text:p text:style-name="P3">STEAMS</text:p>
      <text:p text:style-name="P3">6989 <text:span text:style-name="T65">9466</text:span> 30585 7200 6984 3405 1 3782 2498 2469 2243 <text:span text:style-name="T65">1472</text:span> 2105 9366 3890 1742 <text:s/>699 3567 <text:s/><text:span text:style-name="T65">(L44 1)</text:span> 1159 <text:span text:style-name="T65">27291</text:span></text:p>
      <text:p text:style-name="P7"/>
      <text:p text:style-name="P3">DIESELS</text:p>
      <text:p text:style-name="P3">D2298 459518 2067 463153 2102 425477 22</text:p>
      <text:p text:style-name="P3"/>
      <text:p text:style-name="P3">DIESELS IN MUSEUM</text:p>
      <text:p text:style-name="P3">3765 20067 <text:span text:style-name="T65">4428</text:span> 3271 803 <text:span text:style-name="T65">9537</text:span></text:p>
      <text:p text:style-name="P7"/>
      <text:p text:style-name="P3">DMUS</text:p>
      <text:p text:style-name="P3"><text:span text:style-name="T65">51899</text:span> <text:span text:style-name="T65">51886</text:span> <text:span text:style-name="T65">59761</text:span> <text:span text:style-name="T65">5208 </text:span></text:p>
      <text:p text:style-name="P3"/>
      <text:p text:style-name="P3">TAMPER</text:p>
      <text:p text:style-name="P3">346 </text:p>
      <text:p text:style-name="P3"/>
      <text:p text:style-name="P3">GEISMAR</text:p>
      <text:p text:style-name="P14">RTU9219</text:p>
      <text:p text:style-name="P14"/>
      <text:p text:style-name="P3">WICKHAMS</text:p>
      <text:p text:style-name="P4">8197 8263 6963 </text:p>
      <text:p text:style-name="P4"/>
      <text:p text:style-name="P3">TROLLEYS</text:p>
      <text:p text:style-name="P30">19XX XXXX1 XXXX2 XXXX3 XXXX4 XXXXM (XXXX BAREWOOD) PUMP TROLLEY 19XX XXXX5</text:p>
      <text:p text:style-name="P4"/>
      <text:p text:style-name="P3">CRANES </text:p>
      <text:p text:style-name="P3">ADM27 3282 <text:s/></text:p>
      <text:p text:style-name="P3"/>
      <text:p text:style-name="P3">CALEDONIAN RAILWAY <text:s text:c="6"/>DD9 7AF <text:s text:c="2"/>DD10 9LH</text:p>
      <text:p text:style-name="P3"/>
      <text:p text:style-name="P3">COACHES</text:p>
      <text:p text:style-name="P3">5049 <text:span text:style-name="T65">4495*</text:span> <text:span text:style-name="T65">1251*</text:span> 4676 5145 4864 <text:s/>9315 <text:span text:style-name="T65">14059*</text:span> <text:span text:style-name="T65">25857*</text:span> <text:span text:style-name="T65">34539*</text:span> 80735 <text:span text:style-name="T65">94259*</text:span> <text:s/><text:span text:style-name="T65">10706*</text:span> <text:s/><text:span text:style-name="T65">21019*</text:span> <text:span text:style-name="T65">10250* </text:span></text:p>
      <text:p text:style-name="P7">3353</text:p>
      <text:p text:style-name="P7"/>
      <text:p text:style-name="P3">DEMUS</text:p>
      <text:p text:style-name="P3">60146 <text:span text:style-name="T65">60150</text:span> <text:s/><text:span text:style-name="T65">60673</text:span> 60827 <text:span text:style-name="T65">60831</text:span></text:p>
      <text:p text:style-name="P7"/>
      <text:p text:style-name="P3">Ground Wagon</text:p>
      <text:p text:style-name="P7">GREEN </text:p>
      <text:p text:style-name="P3"/>
      <text:p text:style-name="P3"><text:span text:style-name="T65">787132*</text:span> 983249 992876 993047 <text:span text:style-name="T65">993265*</text:span> 989307 993750 514053 770118 <text:span text:style-name="T65">6062*</text:span> <text:span text:style-name="T65">983912*</text:span> 230124 230162 785896 568742 096054 992773 298323 284464<text:span text:style-name="T65"> 502660*</text:span> 595155 <text:span text:style-name="T65">732538*</text:span> 763226 <text:span text:style-name="T65">769267*</text:span> 769607 770127 6054 773040 783124 84007 278491 <text:span text:style-name="T65">60194*</text:span> 722595 386134 749030 749070 707107 84000 450178 991288 202183 497387CR <text:s/>(4WFLAT1)358 11 355 110 950883 10T VAN <text:s/>(WD-FVF XXX1) <text:span text:style-name="T65">(WD_FVF XXX2)*</text:span> 216013 <text:span text:style-name="T65">(WD­FVF XXX3)*</text:span> <text:span text:style-name="T65">201071*</text:span> <text:span text:style-name="T65">900004*</text:span> 900011 900105 904503 904667 531001 922649 933640 504504 706036 (WD .FVF XXX4) <text:s/>10T VAN</text:p>
      <text:p text:style-name="P4">7XXXXX 924848</text:p>
      <text:p text:style-name="P3"/>
      <text:p text:style-name="P3">STEAMS</text:p>
      <text:p text:style-name="P3">1376 1863 1889 2107 <text:span text:style-name="T65">2749</text:span> <text:span text:style-name="T65">2759</text:span> <text:span text:style-name="T65">2879</text:span> 46464 </text:p>
      <text:p text:style-name="P3"/>
      <text:p text:style-name="P3">DIESELS</text:p>
      <text:p text:style-name="P3"><text:span text:style-name="T65">12093</text:span> <text:span text:style-name="T65">13059*</text:span> <text:span text:style-name="T65">3747</text:span> 12052 <text:span text:style-name="T65">20016</text:span> <text:span text:style-name="T65">20081</text:span> 37097 <text:span text:style-name="T65">20088</text:span> <text:span text:style-name="T65">25072</text:span> 25083 (D5353 27007) (D5370 27024) (D5314 26014) (D5301 26001) 26035 458957 2628 <text:span text:style-name="T65">2684*</text:span></text:p>
      <text:p text:style-name="P7"/>
      <text:p text:style-name="P3">ROAD RAILERS</text:p>
      <text:p text:style-name="P7">BP051* <text:span text:style-name="T72">BP052</text:span> PL030*<text:span text:style-name="T72"> PL045 56079</text:span> 4455*<text:span text:style-name="T72"> </text:span>MDT 333 W* <text:s/><text:span text:style-name="T72"><text:s/></text:span>99709 911066*</text:p>
      <text:p text:style-name="P7"/>
      <text:p text:style-name="P5"/>
      <text:p text:style-name="P3">TROLLEY</text:p>
      <text:p text:style-name="P7">XXXX* </text:p>
      <text:p text:style-name="P3"/>
      <text:p text:style-name="P3">CRANE </text:p>
      <text:p text:style-name="P7">81367</text:p>
      <text:p text:style-name="P7"/>
      <text:p text:style-name="P3">CAMBRIAN <text:s text:c="2"/>SY10 8BX <text:s/>SY11 2LP</text:p>
      <text:p text:style-name="P3">Ground coach</text:p>
      <text:p text:style-name="P7">GREEN* </text:p>
      <text:p text:style-name="P3"/>
      <text:p text:style-name="P3">35334 35342 <text:span text:style-name="T65">15632</text:span> 16025 <text:span text:style-name="T65">4610</text:span> 1019 <text:s/><text:span text:style-name="T65">80213</text:span> <text:span text:style-name="T65">1850</text:span> <text:span text:style-name="T65">94532*</text:span> <text:s/><text:span text:style-name="T65">35444*</text:span> <text:span text:style-name="T65">43145</text:span><text:span text:style-name="T72"> <text:s/>4965 <text:s/></text:span><text:span text:style-name="T65">10722</text:span><text:span text:style-name="T72"> <text:s/>40751 <text:s/></text:span><text:span text:style-name="T65">43046</text:span></text:p>
      <text:p text:style-name="P7"/>
      <text:p text:style-name="P3">Ground Wagons</text:p>
      <text:p text:style-name="P3"><text:span text:style-name="T65">37107*</text:span><text:span text:style-name="T72"> <text:s text:c="2"/></text:span><text:span text:style-name="T65">1XXXXX*</text:span> <text:span text:style-name="T65">85714*</text:span> <text:s/><text:span text:style-name="T65">28XX</text:span> <text:span text:style-name="T65"><text:s/>LAY*</text:span> </text:p>
      <text:p text:style-name="P3"/>
      <text:p text:style-name="P3"><text:span text:style-name="T65">278481</text:span> <text:s/>103349 <text:span text:style-name="T65">504801</text:span> <text:span text:style-name="T65">230377</text:span> <text:s/><text:span text:style-name="T65">230000</text:span> <text:s/><text:span text:style-name="T65">230281</text:span> <text:s/><text:span text:style-name="T65">230336</text:span> <text:span text:style-name="T65">783898</text:span> <text:span text:style-name="T65">993854</text:span> <text:s/><text:span text:style-name="T65">993261</text:span> <text:span text:style-name="T65">983101</text:span> <text:span text:style-name="T65">34556*</text:span> <text:span text:style-name="T65">932335</text:span> <text:s/><text:span text:style-name="T65">462732</text:span> <text:span text:style-name="T65">783392*</text:span> <text:span text:style-name="T65">502431*</text:span> <text:s/><text:span text:style-name="T65">284255*</text:span> <text:span text:style-name="T65">1813*</text:span> <text:span text:style-name="T65">(150445 DW19)* 732435</text:span> <text:span text:style-name="T65">6255</text:span> <text:span text:style-name="T65">3188</text:span> <text:span text:style-name="T65">989205</text:span> <text:span text:style-name="T65">47794*</text:span> <text:span text:style-name="T65">955055*</text:span> <text:span text:style-name="T65">611852*</text:span> 265794 <text:span text:style-name="T65">(4W FLAT1)*</text:span> (4W FLAT2) <text:span text:style-name="T65">CONTAINER</text:span> <text:s text:c="3"/><text:span text:style-name="T65"><text:s/>101*</text:span> <text:span text:style-name="T65">186*</text:span> <text:s/>4367</text:p>
      <text:p text:style-name="P3"/>
      <text:p text:style-name="P3">DlESELS</text:p>
      <text:p text:style-name="P3"><text:span text:style-name="T65">D1230</text:span> D1201 <text:span text:style-name="T65">11517*</text:span> <text:span text:style-name="T65">13019</text:span> <text:span text:style-name="T65">D295*</text:span> D843 <text:span text:style-name="T65">412427*</text:span> <text:span text:style-name="T65">3953*</text:span></text:p>
      <text:p text:style-name="P3"><text:s/>73129</text:p>
      <text:p text:style-name="P3"/>
      <text:p text:style-name="P3">STEAMS</text:p>
      <text:p text:style-name="P3"><text:span text:style-name="T65">885*</text:span> <text:span text:style-name="T65">1430*</text:span> 2131 3770 <text:s/><text:span text:style-name="T65">2261*</text:span></text:p>
      <text:p text:style-name="P3"/>
      <text:p text:style-name="P4"><text:s/>DMUS</text:p>
      <text:p text:style-name="P4"><text:span text:style-name="T65">51512</text:span> <text:span text:style-name="T65">51187</text:span> <text:span text:style-name="T65">51205</text:span> <text:s/><text:span text:style-name="T65">144006</text:span> <text:s/><text:span text:style-name="T65">144007</text:span></text:p>
      <text:p text:style-name="P3"/>
      <text:p text:style-name="P3">ROAD RAILERS</text:p>
      <text:p text:style-name="P4">98/28 <text:s/>EM05AB117 <text:s/>4 XXXX <text:s/>(98205A 98205B)</text:p>
      <text:p text:style-name="P7"><text:span text:style-name="T72"><text:s/></text:span>(99709 970036-8)*</text:p>
      <text:p text:style-name="P7"/>
      <text:p text:style-name="P4">TROLLEYS</text:p>
      <text:p text:style-name="P7">1 YELLOW* <text:span text:style-name="T72"><text:s/>2 YELLOW</text:span></text:p>
      <text:p text:style-name="P4"/>
      <text:p text:style-name="P4">NG DIESELS</text:p>
      <text:p text:style-name="P4">8937 3834 <text:s/>52885 198287 496039 3465 412427 <text:s/>4565 6502 6503 6504 6505 7002 7522 8738 8905 22031 8885 433388 444208 479760 4069 </text:p>
      <text:p text:style-name="P4"/>
      <text:p text:style-name="P3"/>
      <text:p text:style-name="P3">CHASEWATER <text:s text:c="2"/>WS8 <text:s/>7NL</text:p>
      <text:p text:style-name="P3">COACHES </text:p>
      <text:p text:style-name="P3">14024 94240 53160 94581 44 7080 11 68 SR1350 SR2202 <text:span text:style-name="T65">1470</text:span> </text:p>
      <text:p text:style-name="P3"><text:s/></text:p>
      <text:p text:style-name="P3">Ground Wagons</text:p>
      <text:p text:style-name="P3"><text:span text:style-name="T65"><text:s/>777434</text:span> <text:span text:style-name="T65">7XXXXX</text:span> <text:s/>blood custard <text:span text:style-name="T65">mabel shop</text:span> </text:p>
      <text:p text:style-name="P3"/>
      <text:p text:style-name="P3">592234 83 63 60 68 401732 993736 993632 993908 769865 <text:s/>760335 274600 100684 900045 396 891988 544440 <text:s/>144 230258 759106 49011 741161 355798 352203 353224 351111 368103 354966 503 75 47 948398 <text:span text:style-name="T65">749678</text:span> 69 301580 715021 151245 6056 498 47757 688 15 23053 950167 120116 354 <text:span text:style-name="T65">581948</text:span> 4W flat <text:span text:style-name="T65">200406</text:span> <text:span text:style-name="T65">354456</text:span></text:p>
      <text:p text:style-name="P7"><text:span text:style-name="T72"><text:s/></text:span><text:s/>4306<text:span text:style-name="T72"> <text:s text:c="2"/></text:span>550359</text:p>
      <text:p text:style-name="P7"/>
      <text:p text:style-name="P3">DIESELS</text:p>
      <text:p text:style-name="P4">27656 52726 15097 21 5475 5464 5430 5425 1470 5414 8366 26v 3208 D615 2028 5418 305306 3590 10220 200V 410013 27876 <text:span text:style-name="T65">6678</text:span> 3410 3119 3097 3027 420015 08730</text:p>
      <text:p text:style-name="P7"/>
      <text:p text:style-name="P7"/>
      <text:p text:style-name="P4">STEAMS</text:p>
      <text:p text:style-name="P4">917 431 2648 3783 750 1822 2937 2780 </text:p>
      <text:p text:style-name="P4"/>
      <text:p text:style-name="P3">TROLLEY</text:p>
      <text:p text:style-name="P3">XXXX</text:p>
      <text:p text:style-name="P3"/>
      <text:p text:style-name="P3">WICKHAMS</text:p>
      <text:p text:style-name="P3"><text:s/>6857 900331</text:p>
      <text:p text:style-name="P3"/>
      <text:p text:style-name="P3">ROAD RAILERS</text:p>
      <text:p text:style-name="P3">99709 011390-0 314958 BP045 BP047</text:p>
      <text:p text:style-name="P3"/>
      <text:p text:style-name="P3">DMUS </text:p>
      <text:p text:style-name="P3"><text:span text:style-name="T65">142027</text:span> <text:span text:style-name="T65">142029</text:span> 59444 <text:s text:c="2"/>59603 <text:s text:c="2"/>143603 <text:s/><text:span text:style-name="T65">142030</text:span></text:p>
      <text:p text:style-name="P3"/>
      <text:p text:style-name="P3">DIESELS NG</text:p>
      <text:p text:style-name="P3">7448 <text:s/>9081 <text:s/>52756 <text:s/>235729 <text:s/>441424 476106 <text:s/>7385</text:p>
      <text:p text:style-name="P4">175434 <text:s/>5609 <text:s/>480678 1464 44142 52726 235729</text:p>
      <text:p text:style-name="P4"/>
      <text:p text:style-name="P3">CHINNOR <text:s/>OX39 4ER</text:p>
      <text:p text:style-name="P4">Ground Coach</text:p>
      <text:p text:style-name="P3"><text:s/><text:span text:style-name="T65">247*</text:span></text:p>
      <text:p text:style-name="P3"/>
      <text:p text:style-name="P3"><text:span text:style-name="T65">4584</text:span> <text:span text:style-name="T65">4902</text:span> <text:span text:style-name="T65">1845</text:span> <text:span text:style-name="T65">80501</text:span> <text:span text:style-name="T65">34671</text:span> <text:span text:style-name="T65">35337</text:span> <text:span text:style-name="T65">7340</text:span> </text:p>
      <text:p text:style-name="P3"><text:span text:style-name="T65">3958</text:span> <text:span text:style-name="T65">4903</text:span> <text:span text:style-name="T65">25562</text:span> <text:s/><text:span text:style-name="T65">35305</text:span></text:p>
      <text:p text:style-name="P3"/>
      <text:p text:style-name="P3">WAGONS</text:p>
      <text:p text:style-name="P4"><text:span text:style-name="T65">854583</text:span> <text:span text:style-name="T65">731833</text:span> <text:s/><text:span text:style-name="T65">993790</text:span> <text:span text:style-name="T65">850250</text:span> <text:span text:style-name="T65">518975</text:span><text:span text:style-name="T66"> </text:span><text:span text:style-name="T65">515438</text:span> <text:span text:style-name="T65">410890</text:span> <text:span text:style-name="T65">993256</text:span> <text:span text:style-name="T65">992908</text:span> <text:span text:style-name="T65">311887</text:span> <text:span text:style-name="T65">992725</text:span> <text:span text:style-name="T65">786994</text:span> <text:span text:style-name="T65">786980</text:span> <text:s text:c="3"/><text:span text:style-name="T65">278505</text:span> <text:span text:style-name="T65">60174</text:span> <text:span text:style-name="T65">730305</text:span> <text:span text:style-name="T65">503877</text:span> <text:span text:style-name="T65">67439</text:span> <text:span text:style-name="T65">945798</text:span> <text:span text:style-name="T65">904666</text:span> <text:span text:style-name="T65">56153</text:span> <text:span text:style-name="T65">17424</text:span> <text:span text:style-name="T65">35883</text:span> <text:span text:style-name="T65">4041</text:span> <text:s/><text:span text:style-name="T65">710031</text:span></text:p>
      <text:p text:style-name="P7"/>
      <text:p text:style-name="P3">DIESELS</text:p>
      <text:p text:style-name="P7"><text:span text:style-name="T72">97205 <text:s text:c="2"/></text:span>D3018<text:span text:style-name="T72"> </text:span>D8568<text:span text:style-name="T72"> </text:span>459515<text:span text:style-name="T72"> 37227 </text:span>47771*</text:p>
      <text:p text:style-name="P7"/>
      <text:p text:style-name="P3">DMUS</text:p>
      <text:p text:style-name="P7">55023<text:span text:style-name="T72"> <text:s text:c="2"/></text:span>55024</text:p>
      <text:p text:style-name="P7"/>
      <text:p text:style-name="P7"/>
      <text:p text:style-name="P3">EMUS </text:p>
      <text:p text:style-name="P4"><text:span text:style-name="T65">70573</text:span> <text:span text:style-name="T65">61737</text:span> <text:span text:style-name="T65">61736</text:span></text:p>
      <text:p text:style-name="P4"/>
      <text:p text:style-name="P3">TROLLEY</text:p>
      <text:p text:style-name="P29">XXXX</text:p>
      <text:p text:style-name="P9"/>
      <text:p text:style-name="P3">ROAD RAILERS</text:p>
      <text:p text:style-name="P4">241Z301504 <text:s/>99709 041001-7 25/95 <text:s/>WB9024</text:p>
      <text:p text:style-name="P4"/>
      <text:p text:style-name="P3">WICKHAM</text:p>
      <text:p text:style-name="P3"><text:s/>7090</text:p>
      <text:p text:style-name="P3"/>
      <text:p text:style-name="P3">CRANE</text:p>
      <text:p text:style-name="P7">18798</text:p>
      <text:p text:style-name="P7"/>
      <text:p text:style-name="P4">CHOLSEY <text:s text:c="3"/>OX10 9DQ</text:p>
      <text:p text:style-name="P3">Ground Coach </text:p>
      <text:p text:style-name="P7">250</text:p>
      <text:p text:style-name="P3"/>
      <text:p text:style-name="P4"><text:span text:style-name="T65">184</text:span> <text:span text:style-name="T65">2225</text:span> <text:span text:style-name="T65">3436</text:span> <text:span text:style-name="T65">3736</text:span> <text:span text:style-name="T65">4508</text:span> <text:span text:style-name="T65">35129</text:span> <text:s/><text:span text:style-name="T65">1043 FMO</text:span></text:p>
      <text:p text:style-name="P7"/>
      <text:p text:style-name="P3">WAGONS </text:p>
      <text:p text:style-name="P10">35208 <text:s/>780637 992949 8082 45 60933 460765 998000 2606 155 1 mod <text:s/>617 47433 </text:p>
      <text:p text:style-name="P28"/>
      <text:p text:style-name="P3">DIESELS</text:p>
      <text:p text:style-name="P4">08022 08060 08123 3270</text:p>
      <text:p text:style-name="P4"/>
      <text:p text:style-name="P4"><text:s/>ROAD RAILER</text:p>
      <text:p text:style-name="P28">68097 </text:p>
      <text:p text:style-name="P28"/>
      <text:p text:style-name="P3">WICKHAMS</text:p>
      <text:p text:style-name="P28">8774 7598</text:p>
      <text:p text:style-name="P3"/>
      <text:p text:style-name="P4">CRANE</text:p>
      <text:p text:style-name="P10">27132</text:p>
      <text:p text:style-name="P4"/>
      <text:p text:style-name="P3">COLNE VALLEY RAILWAY <text:s text:c="3"/>CO9 3DZ</text:p>
      <text:p text:style-name="P3">Ground Coaches </text:p>
      <text:p text:style-name="P4"><text:s/>397 845 <text:s/>207 </text:p>
      <text:p text:style-name="P4"/>
      <text:p text:style-name="P3">4810 81507 1809 4628 25697 35169 10511 15984 15981</text:p>
      <text:p text:style-name="P3"><text:s/>34623 80318 80405 80429 4512 SR2105 31281 80792 194</text:p>
      <text:p text:style-name="P3"><text:s/>2440 94434 94536 94737 94889 96347 43571 82121 1019</text:p>
      <text:p text:style-name="P3">41088 44058 </text:p>
      <text:p text:style-name="P3"/>
      <text:p text:style-name="P3"><text:s/>Ground Wagons </text:p>
      <text:p text:style-name="P3">767574 783602 <text:s/>612666 <text:s/><text:span text:style-name="T65">9191B*</text:span> green </text:p>
      <text:p text:style-name="P3"/>
      <text:p text:style-name="P3"><text:s/>783494 70192CR 87885 <text:span text:style-name="T65">765936</text:span> <text:span text:style-name="T65">989385*</text:span> 58116 459707 301595 4057 3168CR 202440 900013 955009 47700</text:p>
      <text:p text:style-name="P144"><text:s text:c="5"/>936413 <text:span text:style-name="T65">462763</text:span> 994126 1855 507255 952212</text:p>
      <text:p text:style-name="P3"><text:s/>514426 <text:s/><text:span text:style-name="T65">904641</text:span> 499852 320878CR 96347 70229 <text:s/>banana <text:s text:c="3"/>HV421</text:p>
      <text:p text:style-name="P3"/>
      <text:p text:style-name="P3">DIESELS</text:p>
      <text:p text:style-name="P3"><text:span text:style-name="T65">D2284</text:span> 1 349 2109 3147 221639 D2041 7284 281266</text:p>
      <text:p text:style-name="P3"><text:span text:style-name="T65">43071</text:span> <text:span text:style-name="T65">43073 </text:span></text:p>
      <text:p text:style-name="P3"/>
      <text:p text:style-name="P3"><text:s/>STEAMS</text:p>
      <text:p text:style-name="P10">3800 1875 3715 4790 7671 35010 1204 1348 </text:p>
      <text:p text:style-name="P10"/>
      <text:p text:style-name="P4">DMUS</text:p>
      <text:p text:style-name="P28"><text:span text:style-name="T65">55033*</text:span> 51339 51382</text:p>
      <text:p text:style-name="P4"/>
      <text:p text:style-name="P3">ROAD RAILERS</text:p>
      <text:p text:style-name="P10">1946 960701 HCT 005</text:p>
      <text:p text:style-name="P4"/>
      <text:p text:style-name="P4"/>
      <text:p text:style-name="P3">TROLLEYS </text:p>
      <text:p text:style-name="P4">XXXX 1 <text:s/>XXXX 2 <text:s/>XXXX XXXX (XXXX bogle)</text:p>
      <text:p text:style-name="P3"/>
      <text:p text:style-name="P3">CRANES</text:p>
      <text:p text:style-name="P3">80103 81318</text:p>
      <text:p text:style-name="P3"/>
      <text:p text:style-name="P3"><text:s/>CHURNET VALLEY RAILWAY <text:s text:c="2"/>ST13 7EQ</text:p>
      <text:p text:style-name="P3">COACHES</text:p>
      <text:p text:style-name="P3"><text:span text:style-name="T6">35343*</text:span><text:span text:style-name="T5"> </text:span><text:span text:style-name="T6">4046</text:span><text:span text:style-name="T5"> </text:span>4354<text:span text:style-name="T5"> </text:span><text:span text:style-name="T6">4366*</text:span>4392 4779<text:span text:style-name="T65"> </text:span><text:span text:style-name="T6">4786*</text:span><text:span text:style-name="T40"> </text:span>4795 4651 4667 <text:span text:style-name="T65">35094</text:span> 13236 16155 35473 80030 <text:span text:style-name="T6">80960*</text:span> 86197 93470 37225 9390 32994 3809 1929</text:p>
      <text:p text:style-name="P3"/>
      <text:p text:style-name="P3">Ground Wagons </text:p>
      <text:p text:style-name="P3">776848 <text:s/>771075 65716B 9918 </text:p>
      <text:p text:style-name="P3"/>
      <text:p text:style-name="P4">299460 <text:span text:style-name="T65">731790</text:span> 731945 785811 983710 993363 993545 230017 230029 230327 230235 362545 993431 4709 97XXB 983290 994943 4054 909012 8123 996724 200056 200155 <text:span text:style-name="T65">993707</text:span> 900113 061085 30025 700724 2305 461051 461230 740140 740971 181358 901103 3014 4341 70185 95001 <text:s/>(oil tank) <text:span text:style-name="T65">30025</text:span></text:p>
      <text:p text:style-name="P7"/>
      <text:p text:style-name="P3">DIESELS</text:p>
      <text:p text:style-name="P9">2748* <text:span text:style-name="T72">2672</text:span> 33102<text:span text:style-name="T72"> <text:s/>33021 08633</text:span><text:span text:style-name="T42"> </text:span><text:span text:style-name="T5">20057**</text:span><text:span text:style-name="T72"> 25322 </text:span>31271</text:p>
      <text:p text:style-name="P7"/>
      <text:p text:style-name="P3">STEAMS</text:p>
      <text:p text:style-name="P28">5197 2944 6046 <text:span text:style-name="T65">44422</text:span> 48173 2871 2253<text:span text:style-name="T6"> 2226*</text:span></text:p>
      <text:p text:style-name="P19"/>
      <text:p text:style-name="P3">ROAD RAILERS</text:p>
      <text:p text:style-name="P3">68801 PCT010 <text:s/>PTC011 PTC012 307097 PC017 <text:span text:style-name="T6">68803**</text:span><text:span text:style-name="T65"> </text:span></text:p>
      <text:p text:style-name="P7"/>
      <text:p text:style-name="P4">TROLLEYS</text:p>
      <text:p text:style-name="P14"><text:s/>590 PL063 XXXX XXXX XXXX </text:p>
      <text:p text:style-name="P14"/>
      <text:p text:style-name="P3">CRANE </text:p>
      <text:p text:style-name="P7">27322</text:p>
      <text:p text:style-name="P7"/>
      <text:p text:style-name="P4">CREWE H C <text:s text:c="3"/>CW1 2DB</text:p>
      <text:p text:style-name="P3">COACHES</text:p>
      <text:p text:style-name="P4"><text:span text:style-name="T65">25079</text:span> 94463 <text:span text:style-name="T65">82118</text:span> 12011 <text:span text:style-name="T65">2997</text:span> 12114 86745 <text:span text:style-name="T65">93568</text:span> <text:s/>11007 </text:p>
      <text:p text:style-name="P17"/>
      <text:p text:style-name="P4">WAGONS</text:p>
      <text:p text:style-name="P3"><text:span text:style-name="T65">(904541 7627)</text:span> 210462 360337 504354 904671 <text:span text:style-name="T65">904519</text:span> 900411 280219 <text:span text:style-name="T65">954536</text:span> 905076 941766CR <text:s/>vip carrier </text:p>
      <text:p text:style-name="P3"/>
      <text:p text:style-name="P3">DIESELS</text:p>
      <text:p text:style-name="P3"><text:span text:style-name="T65">37108</text:span> <text:span text:style-name="T65">03073</text:span><text:span text:style-name="T72"> </text:span><text:span text:style-name="T65">D1842</text:span> 22982 <text:span text:style-name="T65">43018</text:span><text:span text:style-name="T72"> <text:s/></text:span></text:p>
      <text:p text:style-name="P3"/>
      <text:p text:style-name="P3">ELECTRIC</text:p>
      <text:p text:style-name="P3"><text:s/><text:span text:style-name="T65">87035</text:span></text:p>
      <text:p text:style-name="P3"/>
      <text:p text:style-name="P3">ROAD RAILER </text:p>
      <text:p text:style-name="P17">XXXX</text:p>
      <text:p text:style-name="P7"/>
      <text:p text:style-name="P4">APTS</text:p>
      <text:p text:style-name="P4"><text:s/><text:span text:style-name="T65">48103</text:span> <text:span text:style-name="T65">48106</text:span> <text:span text:style-name="T65">48404</text:span> <text:span text:style-name="T65">48602</text:span> <text:span text:style-name="T65">48603</text:span> <text:span text:style-name="T65">49002</text:span> <text:span text:style-name="T65">49006</text:span></text:p>
      <text:p text:style-name="P3"/>
      <text:p text:style-name="P4">CREWE CD</text:p>
      <text:p text:style-name="P3">DIESELS</text:p>
      <text:p text:style-name="P3"><text:span text:style-name="T65">E 6001</text:span> <text:span text:style-name="T65">D 8107</text:span> <text:span text:style-name="T65">47805</text:span> <text:span text:style-name="T65">47828</text:span> 47853 <text:span text:style-name="T65">55016</text:span> 55022 <text:span text:style-name="T65">08483</text:span> <text:span text:style-name="T65">37521*</text:span> <text:s text:c="2"/>47501 <text:span text:style-name="T65">43046</text:span> <text:span text:style-name="T65">43055</text:span> <text:span text:style-name="T65">43058</text:span> <text:span text:style-name="T65">43059</text:span> <text:span text:style-name="T65">43083</text:span></text:p>
      <text:p text:style-name="P7"><text:span text:style-name="T5">47712*</text:span><text:span text:style-name="T14"> <text:s text:c="2"/>47593 <text:s/>20302</text:span></text:p>
      <text:p text:style-name="P4"/>
      <text:p text:style-name="P3"><text:s/>ELECTRICS</text:p>
      <text:p text:style-name="P14">86101 <text:s text:c="2"/>87002</text:p>
      <text:p text:style-name="P14"/>
      <text:p text:style-name="P14"><text:s/>STEAMS</text:p>
      <text:p text:style-name="P17">35028<text:span text:style-name="T72"> 45231 46100 </text:span>5029<text:span text:style-name="T72"> 34046 35027</text:span> 60532 <text:span text:style-name="T72"><text:s text:c="2"/>35022 </text:span>70000<text:span text:style-name="T72"> </text:span></text:p>
      <text:p text:style-name="P4"><text:s text:c="2"/></text:p>
      <text:p text:style-name="P4"><text:s text:c="5"/></text:p>
      <text:p text:style-name="P14">COACHES</text:p>
      <text:p text:style-name="P4">977169 (6412 3168) <text:s/>3229 3231 <text:s/>3330 3348</text:p>
      <text:p text:style-name="P3">35467 5366 3122 35317 35333 13227 17056 35511 </text:p>
      <text:p text:style-name="P3">16204 3384 3426 <text:s/>35451 80043 <text:span text:style-name="T65">11087</text:span> <text:span text:style-name="T65">6705</text:span> 82139 </text:p>
      <text:p text:style-name="P6">(16208 84) 35461 99993 80044 282 310 3148 1658</text:p>
      <text:p text:style-name="P6">1863 1883 3045 3051 3060 3100 3112 999509 3125 </text:p>
      <text:p text:style-name="P4"><text:s/>94170 6708 41108 40416 40411 1696 1200 41162</text:p>
      <text:p text:style-name="P3">94522 10520 <text:span text:style-name="T65">6706</text:span> 6311 351 <text:span text:style-name="T65">94538</text:span> 41059 11070</text:p>
      <text:p text:style-name="P3"><text:s/><text:span text:style-name="T65">17159</text:span> <text:s/><text:span text:style-name="T65">35465</text:span><text:span text:style-name="T72"> </text:span><text:span text:style-name="T65">11076</text:span><text:span text:style-name="T72"> 11098 </text:span><text:span text:style-name="T65">5912</text:span><text:span text:style-name="T72"> 1203 </text:span><text:span text:style-name="T14">40802 41176</text:span></text:p>
      <text:p text:style-name="P14">40801 41182 41169 44078 <text:span text:style-name="T65">12171</text:span> <text:s/><text:span text:style-name="T65">11091</text:span> <text:s/><text:span text:style-name="T65">11077</text:span> <text:s/></text:p>
      <text:p text:style-name="P14"><text:span text:style-name="T65">11075 <text:s/></text:span><text:s text:c="3"/>10404 11066 11082 <text:s/><text:span text:style-name="T65">11068</text:span> <text:s text:c="2"/></text:p>
      <text:p text:style-name="P4"/>
      <text:p text:style-name="P14">EMU</text:p>
      <text:p text:style-name="P4">62266</text:p>
      <text:p text:style-name="P4"/>
      <text:p text:style-name="P14">CREWE LNWR</text:p>
      <text:p text:style-name="P3">DIESELS</text:p>
      <text:p text:style-name="P14">08868 09204</text:p>
      <text:p text:style-name="P7"/>
      <text:p text:style-name="P3">WAGON </text:p>
      <text:p text:style-name="P14">FLAT</text:p>
      <text:p text:style-name="P14"/>
      <text:p text:style-name="P3">DARTMOOR <text:s text:c="4"/>EX20 4LT</text:p>
      <text:p text:style-name="P3">COACHES</text:p>
      <text:p text:style-name="P145"><text:s text:c="4"/>975046 13436 <text:s text:c="2"/></text:p>
      <text:p text:style-name="P4"/>
      <text:p text:style-name="P3"><text:span text:style-name="T72">GROUND</text:span> <text:span text:style-name="T72"><text:s/>WAGON </text:span></text:p>
      <text:p text:style-name="P17"><text:span text:style-name="T72"><text:s/></text:span><text:s/>87554</text:p>
      <text:p text:style-name="P17"/>
      <text:p text:style-name="P3"><text:s/><text:span text:style-name="T72"><text:s/></text:span><text:span text:style-name="T6">731411</text:span><text:span text:style-name="T14"> </text:span><text:span text:style-name="T6">992929</text:span><text:span text:style-name="T14"> 983187 </text:span><text:span text:style-name="T6">55625</text:span><text:span text:style-name="T14"> <text:s/>726277 </text:span><text:span text:style-name="T6">390133</text:span><text:span text:style-name="T14"> </text:span></text:p>
      <text:p text:style-name="P7"><text:span text:style-name="T14"><text:s text:c="2"/>994XXXX <text:s text:c="2"/></text:span><text:span text:style-name="T5">999045</text:span></text:p>
      <text:p text:style-name="P3"/>
      <text:p text:style-name="P14"><text:s text:c="2"/>DIESELS</text:p>
      <text:p text:style-name="P14"><text:s text:c="2"/><text:span text:style-name="T65">08937</text:span></text:p>
      <text:p text:style-name="P14"/>
      <text:p text:style-name="P3">STEAM</text:p>
      <text:p text:style-name="P16">1864</text:p>
      <text:p text:style-name="P16"/>
      <text:p text:style-name="P3">ROAD RAILERS</text:p>
      <text:p text:style-name="P3">98303 <text:span text:style-name="T65">74048</text:span></text:p>
      <text:p text:style-name="P4"/>
      <text:p text:style-name="P4">HEAD OF STEAM <text:s text:c="5"/>DL3 6ST</text:p>
      <text:p text:style-name="P3">Ground coach </text:p>
      <text:p text:style-name="P7">Body Only </text:p>
      <text:p text:style-name="P3"><text:s/></text:p>
      <text:p text:style-name="P3">Steams</text:p>
      <text:p text:style-name="P4"><text:span text:style-name="T65">901</text:span> <text:span text:style-name="T65">1463</text:span> <text:s/><text:span text:style-name="T65">25</text:span> </text:p>
      <text:p text:style-name="P3"/>
      <text:p text:style-name="P3"><text:s/>wagons</text:p>
      <text:p text:style-name="P4">5133 953364 <text:s/>9386<text:span text:style-name="T41"> </text:span><text:span text:style-name="T6">8501**</text:span> 2374 2323 2662 2606 <text:span text:style-name="T6">8717</text:span><text:span text:style-name="T5"> <text:s/></text:span></text:p>
      <text:p text:style-name="P14"><text:s/><text:span text:style-name="T65">617</text:span> <text:span text:style-name="T65">166497*</text:span> 157214 28 998022 Bogie well 189</text:p>
      <text:p text:style-name="P4"/>
      <text:p text:style-name="P3">ELECTRIC </text:p>
      <text:p text:style-name="P14">1 <text:s text:c="45"/></text:p>
      <text:p text:style-name="P17"/>
      <text:p text:style-name="P3">Diesels</text:p>
      <text:p text:style-name="P14">4110006 <text:s/><text:span text:style-name="T65">312988 </text:span><text:s/><text:span text:style-name="T65"><text:s/>279591** </text:span>7925 <text:span text:style-name="T65">4200018</text:span> <text:s/><text:span text:style-name="T65">37198</text:span></text:p>
      <text:p text:style-name="P14"/>
      <text:p text:style-name="P14">Steams</text:p>
      <text:p text:style-name="P14">6947 2898 2142</text:p>
      <text:p text:style-name="P14"/>
      <text:p text:style-name="P3">ROAD RAILER</text:p>
      <text:p text:style-name="P17">pc035*</text:p>
      <text:p text:style-name="P17"/>
      <text:p text:style-name="P3">WICKHAMS</text:p>
      <text:p text:style-name="P14">10647 7611</text:p>
      <text:p text:style-name="P17"/>
      <text:p text:style-name="P3">Crane</text:p>
      <text:p text:style-name="P14">1 <text:s/></text:p>
      <text:p text:style-name="P4"/>
      <text:p text:style-name="P3">DIESEL NG</text:p>
      <text:p text:style-name="P4"><text:s/>476124</text:p>
      <text:p text:style-name="P7"/>
      <text:p text:style-name="P3"><text:s text:c="2"/><text:span text:style-name="T72">DARTMOUTH <text:s text:c="2"/>TQ4 6AF </text:span></text:p>
      <text:p text:style-name="P3">COACHES</text:p>
      <text:p text:style-name="P7">4507<text:span text:style-name="T72"> <text:s/></text:span>13<text:span text:style-name="T72"> </text:span>4665<text:span text:style-name="T72"> </text:span>4915<text:span text:style-name="T72"> </text:span>4916<text:span text:style-name="T72"> </text:span>4081<text:span text:style-name="T72"> </text:span>4233<text:span text:style-name="T72"> </text:span>4642<text:span text:style-name="T72"> <text:s/></text:span>4756<text:span text:style-name="T72"> <text:s/></text:span>9275<text:span text:style-name="T72"> </text:span>34535<text:span text:style-name="T72"> </text:span>34550*<text:span text:style-name="T72"> <text:s/>4643 16071</text:span></text:p>
      <text:p text:style-name="P4"/>
      <text:p text:style-name="P3">WAGONS </text:p>
      <text:p text:style-name="P3">983245 <text:span text:style-name="T65">993582</text:span> <text:span text:style-name="T65">992772</text:span> 993035 993369 900915 989369 992838 <text:span text:style-name="T65">761319 </text:span><text:span text:style-name="T72">993868 <text:s/>740562 100694 984741</text:span><text:span text:style-name="T65">941841</text:span><text:span text:style-name="T72"> </text:span></text:p>
      <text:p text:style-name="P30">993165 993570 <text:s/>994564 994980 996599 996606 941391 <text:s/>984223 931465 <text:s/>978760 900101 <text:span text:style-name="T65">905117 </text:span>952258 <text:s/>ew101 <text:s/>4w flat2 <text:span text:style-name="T65">991300</text:span> <text:span text:style-name="T65">998012</text:span> <text:span text:style-name="T65">934467</text:span> <text:span text:style-name="T65">730321</text:span> <text:span text:style-name="T65">991235</text:span> <text:span text:style-name="T65">67450</text:span> </text:p>
      <text:p text:style-name="P3"><text:span text:style-name="T72">994471 </text:span><text:span text:style-name="T65">985217</text:span><text:span text:style-name="T72"> </text:span><text:span text:style-name="T65">990564</text:span><text:span text:style-name="T72"> </text:span><text:span text:style-name="T65">65495</text:span><text:span text:style-name="T72"> </text:span><text:span text:style-name="T65">986094</text:span><text:span text:style-name="T72"> </text:span><text:span text:style-name="T65">900108</text:span><text:span text:style-name="T72"> <text:s/></text:span><text:span text:style-name="T65">996985</text:span><text:span text:style-name="T72"> </text:span></text:p>
      <text:p text:style-name="P7"><text:span text:style-name="T72">61091 </text:span>993550<text:span text:style-name="T72"> </text:span>4WFLAT1<text:span text:style-name="T72"> </text:span>80355</text:p>
      <text:p text:style-name="P14"/>
      <text:p text:style-name="P3">DIESELS</text:p>
      <text:p text:style-name="P14"><text:span text:style-name="T65">D2192</text:span> <text:span text:style-name="T65">37275</text:span> <text:s/><text:span text:style-name="T65">03371</text:span> <text:s/><text:span text:style-name="T65">D3014</text:span></text:p>
      <text:p text:style-name="P17"/>
      <text:p text:style-name="P4"><text:s/><text:span text:style-name="T5"><text:s/>STEAMS</text:span></text:p>
      <text:p text:style-name="P4"><text:span text:style-name="T65">7827</text:span> <text:span text:style-name="T65">4277</text:span> <text:span text:style-name="T65">5239</text:span> <text:span text:style-name="T65">75014</text:span> </text:p>
      <text:p text:style-name="P145"><text:s/></text:p>
      <text:p text:style-name="P3">Crane</text:p>
      <text:p text:style-name="P17">81523 </text:p>
      <text:p text:style-name="P3">DMUS</text:p>
      <text:p text:style-name="P14"><text:span text:style-name="T65">59513</text:span> <text:span text:style-name="T65">59517</text:span> <text:span text:style-name="T65">59719</text:span> <text:span text:style-name="T65">59502</text:span> <text:span text:style-name="T65">59494</text:span> <text:span text:style-name="T65">59507</text:span> <text:span text:style-name="T65">59003</text:span> <text:span text:style-name="T65">59004</text:span> <text:span text:style-name="T65">59488</text:span> <text:span text:style-name="T65">59503</text:span></text:p>
      <text:p text:style-name="P7"/>
      <text:p text:style-name="P3"/>
      <text:p text:style-name="P4">ROAD RAILERS</text:p>
      <text:p text:style-name="P4">60127 4253 1331 <text:span text:style-name="T65">68200</text:span> (99709 901185)</text:p>
      <text:p text:style-name="P7"/>
      <text:p text:style-name="P3">TROLLEYS</text:p>
      <text:p text:style-name="P4">XXXX XXXX</text:p>
      <text:p text:style-name="P4"/>
      <text:p text:style-name="P3">WICKHAM</text:p>
      <text:p text:style-name="P4">68088</text:p>
      <text:p text:style-name="P7"/>
      <text:p text:style-name="P4">DEAN FOREST RAILWAY <text:s/>GL15 5EW</text:p>
      <text:p text:style-name="P4">COACHES</text:p>
      <text:p text:style-name="P4">1665 4923 4729 34594 94518 86898 93847 86823 1803 80654 2834 <text:span text:style-name="T65">21129</text:span> 34742 9003 5341 5175 4980 4891 4862</text:p>
      <text:p text:style-name="P4"><text:s/>92387 5863 3411 2902 <text:span text:style-name="T65">2790</text:span> <text:s/>SR227 SR1227 7362</text:p>
      <text:p text:style-name="P4"><text:s/>31406UF <text:span text:style-name="T65">2988</text:span> 5813 80943 723</text:p>
      <text:p text:style-name="P3"/>
      <text:p text:style-name="P3">Ground Wagons</text:p>
      <text:p text:style-name="P14">82442 <text:s/>852655 55860 <text:s/>2 <text:s/>mr conianer</text:p>
      <text:p text:style-name="P7"/>
      <text:p text:style-name="P14">993398 82487 993901 493593 <text:span text:style-name="T65">993370</text:span> 5521 <text:span text:style-name="T65">993591</text:span></text:p>
      <text:p text:style-name="P14">17488 992932 <text:span text:style-name="T65">992886</text:span> 992873 <text:span text:style-name="T65">983232</text:span> <text:span text:style-name="T65">983231</text:span> <text:span text:style-name="T65">983181</text:span></text:p>
      <text:p text:style-name="P3"><text:span text:style-name="T65">993324</text:span> 993072 768358 104040 38 5802 <text:span text:style-name="T65">993464</text:span> 28553</text:p>
      <text:p text:style-name="P3"><text:s/>742582 749650 255252 58044 14111 60828 352 421612</text:p>
      <text:p text:style-name="P145"><text:s text:c="5"/>732400 732268 <text:s/>41152 17 61015 95750 28709 110717 </text:p>
      <text:p text:style-name="P3"><text:s/>778782 30426 730386 5259 955224 17931 112857</text:p>
      <text:p text:style-name="P3"><text:s/>781091 <text:span text:style-name="T65">972219</text:span> 200021 200680 68480 56303 <text:s/>708424</text:p>
      <text:p text:style-name="P3">967545 5261 900425 5252 985152 941616 504817</text:p>
      <text:p text:style-name="P3"><text:s/>419388 <text:s/>889014 30XXX <text:s/><text:span text:style-name="T65">998005</text:span> 6041<text:span text:style-name="T65">998009</text:span> 998007</text:p>
      <text:p text:style-name="P3">75607 993916 30403 5258 48305 60923 997621</text:p>
      <text:p text:style-name="P3"><text:s/>5246 985479 070047 80646 80232 <text:span text:style-name="T65">978713</text:span> <text:span text:style-name="T65">978749</text:span> 40233 </text:p>
      <text:p text:style-name="P3"><text:s text:c="2"/>904050 262 107115CR 138cr 4w 4w 3 oped 4 flat</text:p>
      <text:p text:style-name="P4"><text:s/>4w weed k DW161 <text:span text:style-name="T65">41975</text:span></text:p>
      <text:p text:style-name="P7"/>
      <text:p text:style-name="P4">DIESELS</text:p>
      <text:p text:style-name="P14">08473 08238 D9555 31210 6688 4210127 5622 3947 08769 31235 D7633</text:p>
      <text:p text:style-name="P4"/>
      <text:p text:style-name="P3">STEAMS</text:p>
      <text:p text:style-name="P14">2411 9682 5541 5521 1466 9681 WD152 2413 3823 3806 2221 2147 3889 </text:p>
      <text:p text:style-name="P4"/>
      <text:p text:style-name="P3">DMUS </text:p>
      <text:p text:style-name="P4">59387 56492 51914 51566 50619</text:p>
      <text:p text:style-name="P4"/>
      <text:p text:style-name="P3">ROAD RAILERS</text:p>
      <text:p text:style-name="P4">99709 976014-9 00064 ST0410 BP039 BP040 60123</text:p>
      <text:p text:style-name="P4"/>
      <text:p text:style-name="P3">WICKHAM</text:p>
      <text:p text:style-name="P14">4254 </text:p>
      <text:p text:style-name="P3"><text:s/></text:p>
      <text:p text:style-name="P3">TROLLEYS</text:p>
      <text:p text:style-name="P4"><text:s/>XXXX <text:s/>XXXX XXXX XXXX 19XX 19XX 19XX <text:s/>P TROLLEY</text:p>
      <text:p text:style-name="P14"><text:s/>WOODEN</text:p>
      <text:p text:style-name="P14"/>
      <text:p text:style-name="P3">CRANES</text:p>
      <text:p text:style-name="P4">240 538 81548</text:p>
      <text:p text:style-name="P3"/>
      <text:p text:style-name="P14"><text:s/>DERWENT VALLEY RAILWAY <text:s/>YO 9 5UF</text:p>
      <text:p text:style-name="P3">Ground Coaches </text:p>
      <text:p text:style-name="P3"><text:s/><text:span text:style-name="T6">1057*</text:span><text:span text:style-name="T40"> </text:span><text:s/>712 </text:p>
      <text:p text:style-name="P3"/>
      <text:p text:style-name="P14"><text:span text:style-name="T65">3805</text:span> 1214 <text:span text:style-name="T65">37222</text:span> <text:span text:style-name="T65">SR1367*</text:span></text:p>
      <text:p text:style-name="P17"/>
      <text:p text:style-name="P3">Ground Wagons </text:p>
      <text:p text:style-name="P17">40311<text:span text:style-name="T72"> <text:s/></text:span>40288*<text:span text:style-name="T72"> </text:span><text:span text:style-name="T42"><text:s/></text:span>brake van *</text:p>
      <text:p text:style-name="P17"/>
      <text:p text:style-name="P14"><text:span text:style-name="T65">ex hopper uf*</text:span> <text:span text:style-name="T65">291264*</text:span> <text:span text:style-name="T65">239666*</text:span> <text:span text:style-name="T65">993312*</text:span> 95166<text:span text:style-name="T40"> </text:span><text:span text:style-name="T65">951144*</text:span> <text:span text:style-name="T65">5081*</text:span> 775810 <text:span text:style-name="T65">762112**</text:span></text:p>
      <text:p text:style-name="P3"/>
      <text:p text:style-name="P3"><text:s/>DIESELS </text:p>
      <text:p text:style-name="P17">D2245*<text:span text:style-name="T72"> </text:span>421419** 327964<text:span text:style-name="T72"> <text:s/></text:span>417892<text:span text:style-name="T72"> </text:span>466630*<text:span text:style-name="T72"> </text:span>4100005**<text:span text:style-name="T72"> </text:span>4200022*<text:span text:style-name="T72"> </text:span>441934*<text:span text:style-name="T72"> </text:span>03079*<text:span text:style-name="T72"> <text:s/></text:span>(D3690 08528)</text:p>
      <text:p text:style-name="P17"/>
      <text:p text:style-name="P3">WICKHAM</text:p>
      <text:p text:style-name="P17">7665</text:p>
      <text:p text:style-name="P4"/>
      <text:p text:style-name="P3">TROLLEY</text:p>
      <text:p text:style-name="P14">XXXX</text:p>
      <text:p text:style-name="P3"/>
      <text:p text:style-name="P3">D B</text:p>
      <text:p text:style-name="P3">COACH</text:p>
      <text:p text:style-name="P17">94540<text:span text:style-name="T66"> </text:span></text:p>
      <text:p text:style-name="P17"/>
      <text:p text:style-name="P3">DIDCOT RAILWAY <text:s text:c="2"/>OX11 7NJ</text:p>
      <text:p text:style-name="P4">COACHES</text:p>
      <text:p text:style-name="P14">35453 333 80224 10509 5495 5458 9083 9118 9113 9112 9002 484 2511 33002 2202 1289 1184 1159 1111 933 814</text:p>
      <text:p text:style-name="P4"><text:s/>565 316 2796 111 2913 3963 536 2232 8313 7371 7285 5952 5787 5085 4553 3756 3299 7372 975 10527 1580 92 93 231 1357 824 1941 290 416 6W full oped 6w coped</text:p>
      <text:p text:style-name="P4"/>
      <text:p text:style-name="P3">Ground Wagons </text:p>
      <text:p text:style-name="P14">89268 <text:s/>50566 <text:s/>50845 </text:p>
      <text:p text:style-name="P14"/>
      <text:p text:style-name="P3">4166 985007 994854 17447 105742 4167 2671 68684</text:p>
      <text:p text:style-name="P4">101836 101720 82917 42239 11152 752 47886 145428 2862 63066 80789 100377 56400 749039 56 110772</text:p>
      <text:p text:style-name="P3"><text:s/>146366 101 135 <text:s/>47 3030 105860 79933 4409 263</text:p>
      <text:p text:style-name="P3"><text:s text:c="2"/>110711 110664 10153 105781 745 18553 41934</text:p>
      <text:p text:style-name="P3"><text:s/>143698 32337 32338 741583 92943 84998 84997 </text:p>
      <text:p text:style-name="P3">91200 <text:span text:style-name="T65">5267</text:span> <text:span text:style-name="T65">5268</text:span> 41723 117993 94835 901002</text:p>
      <text:p text:style-name="P3"><text:s/>19818 85000 113026 105599 109 535 950592 80659 42193 112843 42271 70335 <text:s/>grw1 tar tank 1 299855cr 205cr 24203uf 3 bd contas </text:p>
      <text:p text:style-name="P7"/>
      <text:p text:style-name="P3">DIESELS</text:p>
      <text:p text:style-name="P4">18000 08604 D9516 5238 5 DL26 </text:p>
      <text:p text:style-name="P3"/>
      <text:p text:style-name="P3">STEAMS </text:p>
      <text:p text:style-name="P3">2999 1363 1338 1014 5 5322 7808 7202 3822 6697 3650</text:p>
      <text:p text:style-name="P3"><text:s/>6998 3738 6106 6023 5900 5572 5527 5051<text:span text:style-name="T65"> 4144</text:span> 4079</text:p>
      <text:p text:style-name="P17"><text:span text:style-name="T72"><text:s/>2409 7544 <text:s/>fire fly</text:span> iron duke*</text:p>
      <text:p text:style-name="P4"/>
      <text:p text:style-name="P14">WICKHAM</text:p>
      <text:p text:style-name="P14">(68007 7506)</text:p>
      <text:p text:style-name="P14"/>
      <text:p text:style-name="P3">TROLLEYS</text:p>
      <text:p text:style-name="P14">XXXX XXXX XXXX 6892 TROLLEY FLAT 6948</text:p>
      <text:p text:style-name="P14"/>
      <text:p text:style-name="P14">CRANES</text:p>
      <text:p text:style-name="P14">23059 24 537 ADW205 1054/50</text:p>
      <text:p text:style-name="P3"/>
      <text:p text:style-name="P14">EAST ANGLIAN RAILWAY <text:s text:c="6"/>CO6 2DS</text:p>
      <text:p text:style-name="P4"/>
      <text:p text:style-name="P4"><text:s/>Ground Coaches</text:p>
      <text:p text:style-name="P14">1041 <text:s/>247 <text:s/>307 <text:s/>part body</text:p>
      <text:p text:style-name="P17"/>
      <text:p text:style-name="P14">43157 23953 5455 553 24959 21927 3779 308 19 2155 210234 70 SR1152 </text:p>
      <text:p text:style-name="P14"/>
      <text:p text:style-name="P3">Ground Wagons </text:p>
      <text:p text:style-name="P32">246132 grey green <text:s text:c="2"/>black br</text:p>
      <text:p text:style-name="P32"/>
      <text:p text:style-name="P4">055 951171 17898 632518 200480 <text:s/>700704 960701</text:p>
      <text:p text:style-name="P3"><text:s/>160206 155918 892156 vent van <text:s/>724000uf <text:s/>ralsed p <text:s/></text:p>
      <text:p text:style-name="P14"><text:s/>47893 405032 760651 5474 13 530237 5478 732205 691762 749659 68231 437781 745522 39 765 steel van w </text:p>
      <text:p text:style-name="P4"/>
      <text:p text:style-name="P3">DIESELS</text:p>
      <text:p text:style-name="P14">333 2039 420039 5265 D2279 </text:p>
      <text:p text:style-name="P3"/>
      <text:p text:style-name="P14"><text:s text:c="2"/>STEAMS</text:p>
      <text:p text:style-name="P3">2670 1047 <text:span text:style-name="T65">2039</text:span> 2542 7031 69621</text:p>
      <text:p text:style-name="P7"/>
      <text:p text:style-name="P3">DMUS </text:p>
      <text:p text:style-name="P31">51213 56358 79963</text:p>
      <text:p text:style-name="P4"/>
      <text:p text:style-name="P14">ROAD RAILERS</text:p>
      <text:p text:style-name="P4">HCT008 SMALL PLATFORM </text:p>
      <text:p text:style-name="P4"/>
      <text:p text:style-name="P3">TROLLEYS </text:p>
      <text:p text:style-name="P14">PLUMP TROLLEY RED PLUMP TROLLEY GREY GRAY</text:p>
      <text:p text:style-name="P3"><text:s/>YELLOW RUST</text:p>
      <text:p text:style-name="P14"/>
      <text:p text:style-name="P3"><text:s/>WICKHAMS</text:p>
      <text:p text:style-name="P14">68064 6896 </text:p>
      <text:p text:style-name="P22"/>
      <text:p text:style-name="P3">CRANES</text:p>
      <text:p text:style-name="P14">81521 762</text:p>
      <text:p text:style-name="P17"/>
      <text:p text:style-name="P17"/>
      <text:p text:style-name="P3"><text:s/>EAST KENT RAILWAY <text:s/>CT15 7PD</text:p>
      <text:p text:style-name="P3">COACHES </text:p>
      <text:p text:style-name="P3">1215 <text:span text:style-name="T65">14123</text:span> 80785 <text:span text:style-name="T65">4595</text:span> 395903 43140fo <text:s/>72620 72629 72505 68509</text:p>
      <text:p text:style-name="P3"/>
      <text:p text:style-name="P3"><text:s text:c="2"/>Ground Wagons</text:p>
      <text:p text:style-name="P4"><text:span text:style-name="T65"><text:s/>green</text:span> <text:s text:c="2"/><text:span text:style-name="T65">green</text:span></text:p>
      <text:p text:style-name="P7"/>
      <text:p text:style-name="P3"/>
      <text:p text:style-name="P3"><text:span text:style-name="T65">881879</text:span> <text:span text:style-name="T65">293</text:span> 731687 776084 <text:span text:style-name="T65">776619</text:span> 786467 365 170 161 </text:p>
      <text:p text:style-name="P3">55126 67443 <text:span text:style-name="T65">130</text:span> 82261 292 221 854239 116flat</text:p>
      <text:p text:style-name="P7"><text:span text:style-name="T72"><text:s text:c="2"/>460487 </text:span>SR1770<text:span text:style-name="T72"> <text:s text:c="2"/></text:span>905073<text:span text:style-name="T72"> <text:s text:c="2"/></text:span>49027</text:p>
      <text:p text:style-name="P4"/>
      <text:p text:style-name="P3">DIESELS</text:p>
      <text:p text:style-name="P3"><text:span text:style-name="T65">08502</text:span> 08676 08685 D1197 466616 4160002 </text:p>
      <text:p text:style-name="P14">01530 08804 3682 <text:s/>01546</text:p>
      <text:p text:style-name="P22"/>
      <text:p text:style-name="P3">STEAM </text:p>
      <text:p text:style-name="P7">2004</text:p>
      <text:p text:style-name="P7"/>
      <text:p text:style-name="P3">EMUS</text:p>
      <text:p text:style-name="P14">67300 68002 11161 62385 11187 76398 76875 76397</text:p>
      <text:p text:style-name="P7"><text:span text:style-name="T14"><text:s/>70904 76747 </text:span><text:span text:style-name="T5">70273</text:span></text:p>
      <text:p text:style-name="P14"/>
      <text:p text:style-name="P3">DEMU </text:p>
      <text:p text:style-name="P4">205001</text:p>
      <text:p text:style-name="P4"/>
      <text:p text:style-name="P3">DMUS</text:p>
      <text:p text:style-name="P17"><text:span text:style-name="T66">142017</text:span><text:span text:style-name="T72"> </text:span><text:span text:style-name="T66">142036</text:span></text:p>
      <text:p text:style-name="P4"/>
      <text:p text:style-name="P3">ROAD RAILERS</text:p>
      <text:p text:style-name="P7"><text:span text:style-name="T72">(99709 901014-9) <text:s/></text:span>(21D0001295 <text:s text:c="2"/>355)</text:p>
      <text:p text:style-name="P4"/>
      <text:p text:style-name="P3">TROLLEYS </text:p>
      <text:p text:style-name="P14"><text:s/>1 XXXX 2 XXXX 3 XXXX TROLLEY FLAT</text:p>
      <text:p text:style-name="P14"/>
      <text:p text:style-name="P3">EAST LANCASHIRE RAILWAY <text:s text:c="3"/>BL9 0EY</text:p>
      <text:p text:style-name="P3">COACHES</text:p>
      <text:p text:style-name="P3">1837 3144 1833 1848 1871 3114 3124 <text:span text:style-name="T65">1875</text:span> 1829 3771</text:p>
      <text:p text:style-name="P3"><text:s/>5031 5040 5238 5254 3127 5333 5439 5685 9356 9418</text:p>
      <text:p text:style-name="P3"><text:s/>5396 4996 9431 975493 4937 4866 975489</text:p>
      <text:p text:style-name="P3">5277 4784 4917 4928 4199 4232 4350 4371 4992 4767</text:p>
      <text:p text:style-name="P3">4873 4880 4885 4895 4647 31217 32978 150266 35314 </text:p>
      <text:p text:style-name="P3">15412 2333 10565 10529 LT 94442 81341 86283 <text:span text:style-name="T65">86500</text:span> </text:p>
      <text:p text:style-name="P3"><text:s/>86654 35517 <text:s/>16400 80788 25385 SR1747 <text:s text:c="2"/>SR2233</text:p>
      <text:p text:style-name="P3"><text:s/>86702 80933 94705 86869 35452 10573 17019 35513 </text:p>
      <text:p text:style-name="P3">15928 92933 975492 80993 35455 <text:span text:style-name="T65">35457</text:span> 35478 80731 </text:p>
      <text:p text:style-name="P148"><text:s text:c="4"/>35070 889011 31387 86918 4933 LTR 604 SR1360 SR1391</text:p>
      <text:p text:style-name="P14"/>
      <text:p text:style-name="P3"/>
      <text:p text:style-name="P3">WAGONS IN MUSEUM </text:p>
      <text:p text:style-name="P49"><text:s text:c="16"/>54003 722101 149146 915390 P12CY 3187</text:p>
      <text:p text:style-name="P7"/>
      <text:p text:style-name="P3">GROUND WAGONS</text:p>
      <text:p text:style-name="P61"><text:s text:c="14"/>ground 1 ground 2</text:p>
      <text:p text:style-name="P4"/>
      <text:p text:style-name="P4">773727 569575 750081 758509 975510 784557 772143</text:p>
      <text:p text:style-name="P3"><text:s/>780991 781900 <text:s/>761490 <text:span text:style-name="T72">993477 478278</text:span> <text:s/>310582 62073 <text:s text:c="2"/></text:p>
      <text:p text:style-name="P46"><text:s text:c="14"/>783097 783271 762392 775102 764355 784770 784520 </text:p>
      <text:p text:style-name="P49"><text:s text:c="13"/><text:span text:style-name="T65">782939</text:span> <text:s/>760214 298070 78472X 783410 785327 993476 </text:p>
      <text:p text:style-name="P3">23 70 7190 206 471345 472364 474048 041985 720937 </text:p>
      <text:p text:style-name="P49"><text:s text:c="12"/>982540 61104 555659 55170 460530 278508 1945 </text:p>
      <text:p text:style-name="P3"><text:s/>2232 388667 2184 904532 <text:s/>732607 950606 993708 </text:p>
      <text:p text:style-name="P61"><text:s text:c="12"/>732837 460675 461516 457543 992396 95572 701080 </text:p>
      <text:p text:style-name="P14"><text:s text:c="4"/>PLOCY 36280 <text:s/>5871 2564 904668 316124 900911 955127 <text:s/>167 201008 900100 201004 901019 <text:s/>90160</text:p>
      <text:p text:style-name="P49"><text:s text:c="14"/>187 950606 904632 200669 17448 200000 904514</text:p>
      <text:p text:style-name="P4"><text:s/>904502 <text:s/>954762 994750 950136 950835 953942 </text:p>
      <text:p text:style-name="P46"><text:s text:c="13"/>277 8108 113 494334 56283 954762 306XXX 52356</text:p>
      <text:p text:style-name="P144"><text:s text:c="4"/>125 982390 201 <text:span text:style-name="T14"><text:s/>998538CR <text:s/>569575</text:span></text:p>
      <text:p text:style-name="P61"><text:s text:c="12"/></text:p>
      <text:p text:style-name="P61"/>
      <text:p text:style-name="P4">DIESELS </text:p>
      <text:p text:style-name="P46"><text:s text:c="13"/><text:span text:style-name="T65">50015</text:span> 08944 <text:span text:style-name="T65">D9502*</text:span> D9531 D2062 <text:span text:style-name="T65">07013*</text:span> 01003 </text:p>
      <text:p text:style-name="P46"><text:s text:c="13"/>08479 <text:span text:style-name="T65">D5705</text:span> 20087 <text:span text:style-name="T65">33117</text:span> <text:span text:style-name="T65">D8233</text:span> <text:span text:style-name="T65">D7076 45135</text:span> </text:p>
      <text:p text:style-name="P46"><text:s text:c="13"/><text:span text:style-name="T65">33109</text:span> 08164 <text:span text:style-name="T65">45108</text:span> <text:span text:style-name="T65">D1041</text:span> <text:s/><text:span text:style-name="T65">(D1501 47402</text:span>) <text:span text:style-name="T65">33035</text:span> <text:s text:c="38"/></text:p>
      <text:p text:style-name="P133"><text:s text:c="13"/>09024 D5054 37109 D832 (D1076 4002) 31106 <text:span text:style-name="T65">47765</text:span></text:p>
      <text:p text:style-name="P4"/>
      <text:p text:style-name="P4">STEAMS</text:p>
      <text:p text:style-name="P46"><text:s text:c="12"/>2890 2800 7229 35009 13065 1927 45212 680 </text:p>
      <text:p text:style-name="P46"><text:s text:c="13"/>80080 3855 1097 80097 48518 5981 47324</text:p>
      <text:p text:style-name="P148"><text:s text:c="3"/>34092 45407 46428 <text:s/><text:span text:style-name="T65">44871*</text:span></text:p>
      <text:p text:style-name="P14"/>
      <text:p text:style-name="P14">DMUS</text:p>
      <text:p text:style-name="P49"><text:s text:c="13"/>54289 <text:span text:style-name="T65">50517</text:span> <text:s/>50437 59701 50494 59137 50556</text:p>
      <text:p text:style-name="P49"><text:s text:c="13"/>51485 55001 56121 51842 59228 <text:s text:c="3"/><text:span text:style-name="T65">50455</text:span> <text:span text:style-name="T65">51813</text:span></text:p>
      <text:p text:style-name="P50"/>
      <text:p text:style-name="P145"><text:s text:c="4"/>DEMU</text:p>
      <text:p text:style-name="P49"><text:s text:c="13"/>8099</text:p>
      <text:p text:style-name="P4"/>
      <text:p text:style-name="P4"><text:s/>EMUS</text:p>
      <text:p text:style-name="P49"><text:s text:c="13"/>65451 77172</text:p>
      <text:p text:style-name="P7"/>
      <text:p text:style-name="P145"><text:s text:c="3"/>ROAD RAILER</text:p>
      <text:p text:style-name="P49"><text:s text:c="13"/>L253 HKK</text:p>
      <text:p text:style-name="P3"/>
      <text:p text:style-name="P4">TROLLEYS</text:p>
      <text:p text:style-name="P145"><text:s text:c="4"/>XXXX XXXX <text:s/>XXXX</text:p>
      <text:p text:style-name="P61"><text:s text:c="17"/></text:p>
      <text:p text:style-name="P3">GRANES</text:p>
      <text:p text:style-name="P49"><text:s text:c="12"/>95205 96503 96707 331400M</text:p>
      <text:p text:style-name="P49"/>
      <text:p text:style-name="P3"><text:s/><text:span text:style-name="T72">EASTLEIGH WORKS</text:span></text:p>
      <text:p text:style-name="P46"><text:s text:c="12"/>DIESELS</text:p>
      <text:p text:style-name="P46"><text:s text:c="12"/>73002 73139 73101 01508 323 539 7</text:p>
      <text:p text:style-name="P46"><text:s text:c="13"/>47818<text:span text:style-name="T72"> 50021 </text:span><text:span text:style-name="T65">50026</text:span><text:span text:style-name="T72"> <text:s text:c="2"/></text:span></text:p>
      <text:p text:style-name="P4"><text:span text:style-name="T65">08567</text:span> <text:span text:style-name="T65">E6016</text:span> <text:s/><text:span text:style-name="T65">07007</text:span></text:p>
      <text:p text:style-name="P4">STEAM</text:p>
      <text:p text:style-name="P49"><text:s text:c="13"/>35005 </text:p>
      <text:p text:style-name="P4"/>
      <text:p text:style-name="P144"><text:s text:c="4"/></text:p>
      <text:p text:style-name="P46"><text:s text:c="20"/>DMUS</text:p>
      <text:p text:style-name="P61"><text:s text:c="13"/>51392 59492 <text:span text:style-name="T65">977987</text:span> <text:span text:style-name="T65">977988</text:span></text:p>
      <text:p text:style-name="P14"/>
      <text:p text:style-name="P46"><text:s text:c="13"/></text:p>
      <text:p text:style-name="P4"/>
      <text:p text:style-name="P4"><text:s/>COACHES</text:p>
      <text:p text:style-name="P46"><text:s text:c="16"/>3120 4991 1813 1832 975982 <text:s text:c="2"/>3097</text:p>
      <text:p text:style-name="P46"><text:s text:c="17"/>3110 3121 3140 3147 <text:s/>975978 72635 </text:p>
      <text:p text:style-name="P46"><text:s text:c="16"/>3149 72509 <text:span text:style-name="T65">4927</text:span> 4946 3107 1671 4998 4949</text:p>
      <text:p text:style-name="P46"><text:s text:c="16"/><text:span text:style-name="T65">64664</text:span> <text:span text:style-name="T65">64707</text:span> <text:s text:c="2"/>35469 975974 68501</text:p>
      <text:p text:style-name="P46"><text:s text:c="17"/>17013 21269 68504 68505</text:p>
      <text:p text:style-name="P46"><text:s/></text:p>
      <text:p text:style-name="P49"><text:s text:c="18"/>WAGONS</text:p>
      <text:p text:style-name="P46"><text:s text:c="16"/>900922 <text:s/>900929 3380 4647 030-2/ </text:p>
      <text:p text:style-name="P14"><text:s text:c="4"/>EAST SOMERSET RAILWAY <text:s text:c="4"/>BA4 4QP</text:p>
      <text:p text:style-name="P148"><text:s text:c="8"/>Ground Coaches </text:p>
      <text:p text:style-name="P49"><text:s text:c="18"/><text:span text:style-name="T65">041842</text:span> <text:span text:style-name="T65">041843</text:span></text:p>
      <text:p text:style-name="P46"><text:s text:c="11"/></text:p>
      <text:p text:style-name="P7"><text:span text:style-name="T72"><text:s text:c="4"/>18572 3063 4907 4562 </text:span>4764<text:span text:style-name="T72"> </text:span>5034<text:span text:style-name="T72"> </text:span>35204<text:span text:style-name="T72"> 16263 </text:span></text:p>
      <text:p text:style-name="P46"><text:s text:c="17"/>81156 99450 35020 <text:span text:style-name="T65">1000</text:span><text:span text:style-name="T72"> 94006 35487 94798</text:span></text:p>
      <text:p text:style-name="P46"><text:s text:c="17"/>25917 86868 <text:s/>17013 2391 889017 <text:span text:style-name="T65">255</text:span></text:p>
      <text:p text:style-name="P46"><text:s text:c="17"/>SR2157 <text:s/>SR1396 <text:s/>SR1650 <text:s/></text:p>
      <text:p text:style-name="P145"><text:s text:c="8"/>WAGONS</text:p>
      <text:p text:style-name="P46"><text:s text:c="16"/>92069 92091 763162 452847 <text:s/>983247 900933</text:p>
      <text:p text:style-name="P46"><text:s text:c="17"/>983582 983620 <text:s/>461225 66024 1800 289 100684</text:p>
      <text:p text:style-name="P46"><text:s text:c="17"/>49028 94XXXX 63033 998028 743730 80637</text:p>
      <text:p text:style-name="P3"><text:s text:c="2"/>94XXXXX 35234 35413 40065 278494 150434cr </text:p>
      <text:p text:style-name="P46"><text:s text:c="15"/><text:span text:style-name="T65">854907</text:span> <text:s text:c="2"/><text:span text:style-name="T72"><text:s/></text:span><text:span text:style-name="T65">3035</text:span><text:span text:style-name="T72"> <text:s/></text:span><text:span text:style-name="T65">740700</text:span><text:span text:style-name="T72"> </text:span><text:span text:style-name="T65">904542</text:span><text:span text:style-name="T72"> </text:span><text:span text:style-name="T65">984281 </text:span><text:span text:style-name="T72"><text:s/></text:span><text:span text:style-name="T65">lner lowmac</text:span></text:p>
      <text:p text:style-name="P49"><text:s text:c="15"/>930323 730093 460239 740065 998990 730339</text:p>
      <text:p text:style-name="P145"><text:s text:c="7"/>boister rail flat 954896fo lmsr 5XXXX br crampus <text:s/></text:p>
      <text:p text:style-name="P4"/>
      <text:p text:style-name="P46"><text:s text:c="13"/></text:p>
      <text:p text:style-name="P46"><text:s text:c="16"/><text:span text:style-name="T72">DIESELS</text:span></text:p>
      <text:p text:style-name="P49"><text:s text:c="16"/>10175 10165 10199 10221</text:p>
      <text:p text:style-name="P3"/>
      <text:p text:style-name="P46"><text:s text:c="16"/>STEAMS</text:p>
      <text:p text:style-name="P46"><text:s text:c="15"/>1719 7609 4110 <text:span text:style-name="T65">4555</text:span><text:span text:style-name="T72"> <text:s/></text:span><text:span text:style-name="T65">46447</text:span></text:p>
      <text:p text:style-name="P46"><text:s text:c="14"/></text:p>
      <text:p text:style-name="P46"><text:s text:c="14"/>DMUS</text:p>
      <text:p text:style-name="P46"><text:s text:c="14"/><text:span text:style-name="T65">51909</text:span> <text:span text:style-name="T65">54271</text:span></text:p>
      <text:p text:style-name="P50"/>
      <text:p text:style-name="P49"><text:s text:c="15"/>Ground DMU</text:p>
      <text:p text:style-name="P49"><text:s text:c="16"/>51947</text:p>
      <text:p text:style-name="P46"/>
      <text:p text:style-name="P46"><text:s text:c="15"/>EMU</text:p>
      <text:p text:style-name="P145"><text:s text:c="6"/>129</text:p>
      <text:p text:style-name="P145"/>
      <text:p text:style-name="P46"><text:s text:c="14"/>TROLLEYS </text:p>
      <text:p text:style-name="P61"><text:s text:c="13"/>XXXX XXXX XXXX </text:p>
      <text:p text:style-name="P14"/>
      <text:p text:style-name="P14"><text:s/>CRANES</text:p>
      <text:p text:style-name="P148"><text:s text:c="4"/>2 14 63063 <text:s text:c="6"/></text:p>
      <text:p text:style-name="P4"><text:s/><text:span text:style-name="T5"><text:s text:c="23"/></text:span></text:p>
      <text:p text:style-name="P3"/>
      <text:p text:style-name="P49"><text:s text:c="15"/>ECCLESBOURNE RAILWAY <text:s text:c="6"/>DE4 4FB <text:s text:c="2"/></text:p>
      <text:p text:style-name="P4"/>
      <text:p text:style-name="P3"><text:s text:c="2"/>COACHES</text:p>
      <text:p text:style-name="P61"><text:s text:c="16"/>4440 <text:span text:style-name="T65">1779*</text:span> 3825 4682 (34698 977383) </text:p>
      <text:p text:style-name="P61"><text:s text:c="15"/>(35006 975660) <text:span text:style-name="T65">(35323 80214)</text:span> <text:s/>79 27001</text:p>
      <text:p text:style-name="P49"><text:s text:c="15"/>15849 24918 24984 <text:span text:style-name="T65">26157</text:span> 34625 999504 3727</text:p>
      <text:p text:style-name="P49"><text:s text:c="15"/>394 621 <text:span text:style-name="T65">10597*</text:span> 23890<text:span text:style-name="T5"> 27162 43087 43654 5054 </text:span></text:p>
      <text:p text:style-name="P49"><text:span text:style-name="T5"><text:s text:c="15"/></text:span><text:span text:style-name="T6">1874</text:span></text:p>
      <text:p text:style-name="P67"/>
      <text:p text:style-name="P14">Ground Wagon</text:p>
      <text:p text:style-name="P14"><text:s text:c="2"/><text:span text:style-name="T65"><text:s/>783996</text:span> <text:s/></text:p>
      <text:p text:style-name="P4"><text:s/></text:p>
      <text:p text:style-name="P46"><text:s text:c="17"/><text:span text:style-name="T65">4110</text:span> 983192 4039 784652 994206 992732 992904 </text:p>
      <text:p text:style-name="P3">024798 771392 <text:span text:style-name="T65">6090</text:span><text:span text:style-name="T72"> 950003 950173 984302 985561</text:span></text:p>
      <text:p text:style-name="P46"><text:s/><text:span text:style-name="T72"><text:s text:c="12"/></text:span><text:span text:style-name="T65">749690</text:span> 498325 <text:span text:style-name="T65">787011*</text:span> 986179 988418 004 <text:s/></text:p>
      <text:p text:style-name="P46"><text:s text:c="13"/>991364 900032 955104 904508 904639 761561 </text:p>
      <text:p text:style-name="P46"><text:s text:c="14"/><text:span text:style-name="T65">003*</text:span> 784752 955209 <text:s text:c="3"/><text:span text:style-name="T65">(5 PLANK TATMAC)</text:span></text:p>
      <text:p text:style-name="P144"><text:s text:c="5"/></text:p>
      <text:p text:style-name="P46"/>
      <text:p text:style-name="P46"><text:s text:c="15"/><text:span text:style-name="T72"><text:s text:c="2"/>DIESELS</text:span></text:p>
      <text:p text:style-name="P50"><text:span text:style-name="T72"><text:s text:c="16"/>08605 402803 10275 9390 </text:span>73210<text:span text:style-name="T72"> 188C </text:span>D9537 </text:p>
      <text:p text:style-name="P49"><text:s text:c="17"/>08704 31601 <text:span text:style-name="T65">33103</text:span> 26288</text:p>
      <text:p text:style-name="P4"><text:s text:c="4"/></text:p>
      <text:p text:style-name="P3"><text:s text:c="2"/>STEAMS</text:p>
      <text:p text:style-name="P46"><text:s text:c="14"/>1884 2217 2360 2746</text:p>
      <text:p text:style-name="P46"><text:s text:c="13"/></text:p>
      <text:p text:style-name="P46"><text:s text:c="14"/>DMUS</text:p>
      <text:p text:style-name="P46"><text:s text:c="14"/>50170 <text:span text:style-name="T65">79990</text:span> <text:span text:style-name="T65">50599</text:span> <text:s/><text:span text:style-name="T65">50253</text:span> <text:span text:style-name="T65">51073</text:span> <text:span text:style-name="T65">977854</text:span><text:span text:style-name="T72"> </text:span><text:span text:style-name="T65">51567</text:span></text:p>
      <text:p text:style-name="P61"><text:s text:c="15"/>977976 977975 79612 <text:span text:style-name="T65">51505</text:span> <text:span text:style-name="T65">55006</text:span> <text:span text:style-name="T65">55034</text:span> 59303 79018</text:p>
      <text:p text:style-name="P14"/>
      <text:p text:style-name="P14"><text:s text:c="5"/>TRAM</text:p>
      <text:p text:style-name="P49"><text:s text:c="16"/>636</text:p>
      <text:p text:style-name="P49"/>
      <text:p text:style-name="P4"><text:s text:c="3"/>EMUS</text:p>
      <text:p text:style-name="P144"><text:span text:style-name="T14"><text:s text:c="6"/></text:span><text:span text:style-name="T6">68500</text:span><text:span text:style-name="T14"> </text:span><text:span text:style-name="T6">68506 </text:span><text:span text:style-name="T14"><text:s text:c="3"/></text:span><text:span text:style-name="T6">(72617 6046)</text:span><text:span text:style-name="T14"> <text:s/></text:span><text:span text:style-name="T6">(72701 3382)* </text:span><text:span text:style-name="T14"><text:s/></text:span></text:p>
      <text:p text:style-name="P3"><text:s text:c="4"/></text:p>
      <text:p text:style-name="P14"><text:s/>ROAD RAILERS </text:p>
      <text:p text:style-name="P46"><text:s text:c="14"/><text:span text:style-name="T65">L263 mnu*</text:span> <text:s/><text:span text:style-name="T65">fr 504*</text:span> (99709 901209-5) </text:p>
      <text:p text:style-name="P61"><text:s text:c="16"/>(99709 970051_7) CDT 812T <text:s text:c="3"/>R482 JGE <text:s text:c="2"/>R447 XRA</text:p>
      <text:p text:style-name="P61"><text:s text:c="2"/></text:p>
      <text:p text:style-name="P14"><text:s text:c="2"/>TROLLEYS</text:p>
      <text:p text:style-name="P46"><text:s text:c="14"/>20XX RAILCAR XXXX 19XX 19XX 19XX HAND TROLLEY</text:p>
      <text:p text:style-name="P46"><text:span text:style-name="T72"><text:s text:c="14"/></text:span><text:span text:style-name="T65">26288</text:span></text:p>
      <text:p text:style-name="P50"/>
      <text:p text:style-name="P4"><text:s/>EDEN RAILWAY <text:s text:c="4"/>CA16 6PR</text:p>
      <text:p text:style-name="P3"><text:s/>COACHES</text:p>
      <text:p text:style-name="P36"><text:span text:style-name="T5"><text:s text:c="12"/></text:span><text:span text:style-name="T38"><text:s text:c="4"/></text:span><text:span text:style-name="T37">84271*</text:span><text:span text:style-name="T46"> </text:span><text:span text:style-name="T67">94749 </text:span><text:span text:style-name="T68">80721</text:span><text:span text:style-name="T67"> 80610</text:span><text:span text:style-name="T37"> 13344*</text:span><text:span text:style-name="T46"> </text:span><text:span text:style-name="T67">13308</text:span><text:span text:style-name="T38"> </text:span><text:span text:style-name="T37">899020*</text:span></text:p>
      <text:p text:style-name="P17"/>
      <text:p text:style-name="P3"><text:s/><text:span text:style-name="T14">GROUND <text:s/>WAGON </text:span></text:p>
      <text:p text:style-name="P12"><text:span text:style-name="T38"><text:s text:c="4"/>7XXXXX</text:span> </text:p>
      <text:p text:style-name="P61"><text:s text:c="11"/></text:p>
      <text:p text:style-name="P14"><text:s text:c="2"/><text:span text:style-name="T65">983197</text:span> <text:span text:style-name="T65">993054*</text:span> <text:span text:style-name="T65">983010</text:span> <text:span text:style-name="T65"><text:s/>787319</text:span> <text:span text:style-name="T65">787277</text:span> <text:span text:style-name="T65">786897</text:span></text:p>
      <text:p text:style-name="P46"><text:s text:c="16"/>785252<text:span text:style-name="T5"> </text:span><text:span text:style-name="T6">762586</text:span> 740255 994430 983860<text:span text:style-name="T5"> </text:span><text:span text:style-name="T6">965197*</text:span></text:p>
      <text:p text:style-name="P46"><text:s text:c="13"/>730189 263282 741271<text:span text:style-name="T14"> </text:span><text:span text:style-name="T6">70281</text:span></text:p>
      <text:p text:style-name="P67"/>
      <text:p text:style-name="P46"><text:s text:c="17"/><text:span text:style-name="T14">DIESELS</text:span></text:p>
      <text:p text:style-name="P67"><text:span text:style-name="T72"><text:s text:c="15"/></text:span>(22971 130c*)<text:span text:style-name="T72"> </text:span>2389*<text:span text:style-name="T72"> <text:s text:c="2"/></text:span>4220045**<text:span text:style-name="T72"> <text:s text:c="2"/></text:span>37042**<text:span text:style-name="T42"> </text:span>47799</text:p>
      <text:p text:style-name="P61"><text:s text:c="15"/>5262<text:span text:style-name="T40"> </text:span><text:s/>8343<text:span text:style-name="T40"> </text:span></text:p>
      <text:p text:style-name="P4"/>
      <text:p text:style-name="P4"><text:s text:c="2"/>EMUS</text:p>
      <text:p text:style-name="P46"><text:s text:c="16"/>9003 <text:span text:style-name="T6">61805</text:span> 61804 <text:span text:style-name="T6">61798</text:span> 61799 931095 <text:span text:style-name="T6">68010</text:span> </text:p>
      <text:p text:style-name="P61"><text:s text:c="16"/><text:span text:style-name="T65">69335* </text:span>70539 70229 <text:span text:style-name="T65">70354</text:span></text:p>
      <text:p text:style-name="P4"/>
      <text:p text:style-name="P4"><text:s text:c="4"/>DEMUS</text:p>
      <text:p text:style-name="P4"><text:s text:c="4"/>60808 70658<text:span text:style-name="T5"> </text:span><text:span text:style-name="T6">60108</text:span></text:p>
      <text:p text:style-name="P3"><text:s text:c="2"/><text:span text:style-name="T72"><text:s/></text:span></text:p>
      <text:p text:style-name="P14"><text:s text:c="4"/>WICKHAM</text:p>
      <text:p text:style-name="P61"><text:s text:c="16"/>320468</text:p>
      <text:p text:style-name="P14"><text:s text:c="4"/></text:p>
      <text:p text:style-name="P3"><text:s/><text:span text:style-name="T14"><text:s/>TROLLEYS <text:s/></text:span></text:p>
      <text:p text:style-name="P14"><text:s text:c="5"/>3 RAIL CY 730</text:p>
      <text:p text:style-name="P14"/>
      <text:p text:style-name="P14"><text:s text:c="5"/>ELSECAR RAILWAY <text:s text:c="4"/>S74 8HJ</text:p>
      <text:p text:style-name="P46"><text:s text:c="18"/>Ground Coach <text:s text:c="21"/></text:p>
      <text:p text:style-name="P46"><text:s text:c="13"/><text:span text:style-name="T72"><text:s text:c="2"/></text:span><text:span text:style-name="T65"><text:s/>hbr 1</text:span></text:p>
      <text:p text:style-name="P50"/>
      <text:p text:style-name="P46"><text:s text:c="14"/><text:span text:style-name="T72"><text:s text:c="2"/></text:span><text:span text:style-name="T65">94869 </text:span></text:p>
      <text:p text:style-name="P50"/>
      <text:p text:style-name="P49"><text:s text:c="15"/>WAGONS </text:p>
      <text:p text:style-name="P61"><text:s text:c="15"/><text:span text:style-name="T65">633433</text:span> <text:s/><text:span text:style-name="T65">68499</text:span> <text:span text:style-name="T65">95091</text:span> <text:span text:style-name="T65">57873 FO</text:span> <text:span text:style-name="T65">57873 BARRE</text:span></text:p>
      <text:p text:style-name="P61"><text:s text:c="13"/></text:p>
      <text:p text:style-name="P3"><text:s text:c="2"/><text:span text:style-name="T72"><text:s text:c="5"/>DIESELS</text:span></text:p>
      <text:p text:style-name="P46"><text:s text:c="6"/><text:span text:style-name="T72"><text:s text:c="10"/></text:span><text:span text:style-name="T65">382808</text:span> <text:span text:style-name="T65">6950</text:span> <text:s text:c="2"/><text:span text:style-name="T65">9584 </text:span></text:p>
      <text:p text:style-name="P49"/>
      <text:p text:style-name="P49"><text:s text:c="20"/>STEAMS</text:p>
      <text:p text:style-name="P49"><text:s text:c="16"/>9376 <text:span text:style-name="T65">7386</text:span> <text:s text:c="2"/></text:p>
      <text:p text:style-name="P49"><text:s text:c="16"/></text:p>
      <text:p text:style-name="P46"><text:s text:c="14"/>ROAD RAILERS</text:p>
      <text:p text:style-name="P46"><text:s text:c="16"/>XXXX dumper tr</text:p>
      <text:p text:style-name="P46"><text:s text:c="16"/></text:p>
      <text:p text:style-name="P49"><text:s text:c="16"/>WICKHAM</text:p>
      <text:p text:style-name="P14"><text:s text:c="5"/><text:span text:style-name="T65">965949</text:span> <text:s text:c="4"/></text:p>
      <text:p text:style-name="P46"><text:s text:c="18"/></text:p>
      <text:p text:style-name="P3">TROLLEY</text:p>
      <text:p text:style-name="P61"><text:s text:c="15"/>19XX </text:p>
      <text:p text:style-name="P49"><text:s text:c="11"/></text:p>
      <text:p text:style-name="P3"><text:s/>CRANE</text:p>
      <text:p text:style-name="P61"><text:s text:c="15"/><text:span text:style-name="T65">0645 20/20</text:span></text:p>
      <text:p text:style-name="P3"/>
      <text:p text:style-name="P46"><text:s text:c="10"/><text:span text:style-name="T14"><text:s/>EMBSAY RAILWAY <text:s text:c="9"/>BD23 6AF</text:span></text:p>
      <text:p text:style-name="P46"><text:s text:c="11"/><text:span text:style-name="T72"><text:s/></text:span><text:span text:style-name="T14"><text:s text:c="4"/>Ground Coach</text:span></text:p>
      <text:p text:style-name="P61"><text:s text:c="15"/>8 <text:s/></text:p>
      <text:p text:style-name="P3"/>
      <text:p text:style-name="P3"><text:span text:style-name="T72"><text:s text:c="3"/>4575 94605 1826 1857 4460 4666 5003 </text:span><text:span text:style-name="T65">10698</text:span><text:span text:style-name="T72"> </text:span></text:p>
      <text:p text:style-name="P49"><text:s text:c="15"/>9011 15952 16165 21261 3170 <text:s/>34 <text:s/>45037 17</text:p>
      <text:p text:style-name="P49"><text:s text:c="14"/>25472 34558 80830 <text:span text:style-name="T65">81517</text:span> 4406 37 5757 17uf</text:p>
      <text:p text:style-name="P46"><text:s text:c="15"/><text:span text:style-name="T72">238 241 3453 14 45053 70687fo SR798 </text:span><text:span text:style-name="T65">SR1711</text:span><text:span text:style-name="T72"> <text:s/></text:span><text:span text:style-name="T65">gnr3</text:span><text:span text:style-name="T72"> <text:s/></text:span></text:p>
      <text:p text:style-name="P3"/>
      <text:p text:style-name="P14">Ground Wagons </text:p>
      <text:p text:style-name="P14"><text:s/><text:span text:style-name="T65">I m s</text:span> <text:span text:style-name="T65">cattle van</text:span> <text:s/><text:span text:style-name="T65">88xxxx</text:span> <text:s/>2479 <text:s text:c="2"/>2097 <text:s/>60656 <text:span text:style-name="T65"><text:s/>lner </text:span><text:s/></text:p>
      <text:p text:style-name="P14"/>
      <text:p text:style-name="P61"><text:s text:c="15"/>992910 983617 993624 1B 47729 327466 </text:p>
      <text:p text:style-name="P46"><text:s text:c="14"/><text:span text:style-name="T14"><text:s/>452392 732141 </text:span><text:span text:style-name="T6">783688</text:span><text:span text:style-name="T14"> 47023 7031 197266</text:span></text:p>
      <text:p text:style-name="P46"><text:s text:c="15"/>47042 531003 149239 105742 158389 <text:s/>50 47121</text:p>
      <text:p text:style-name="P46"><text:s text:c="15"/>955095 7026 991515 5247 68900 133357 904510</text:p>
      <text:p text:style-name="P46"><text:s text:c="15"/>49007 993186 503045 42367 904520 5 plank</text:p>
      <text:p text:style-name="P46"><text:s text:c="15"/>4w low mac ydr40 <text:s/>ydr41 ydr21 4w flat container mr</text:p>
      <text:p text:style-name="P46"><text:s text:c="16"/>lyr 10t <text:s text:c="3"/>l ms lcr grey ncb20 927949cr 7031 </text:p>
      <text:p text:style-name="P46"><text:s text:c="15"/>ydr20 ncb21</text:p>
      <text:p text:style-name="P46"><text:span text:style-name="T72"><text:s text:c="13"/></text:span><text:span text:style-name="T14"><text:s/></text:span></text:p>
      <text:p text:style-name="P61"><text:s text:c="17"/>DIESELS</text:p>
      <text:p text:style-name="P46"><text:s text:c="15"/>D2203 <text:span text:style-name="T65">47004</text:span> <text:span text:style-name="T65">37294</text:span> D9513 <text:span text:style-name="T65">08054</text:span> <text:span text:style-name="T65">08773</text:span> <text:span text:style-name="T65">31119</text:span></text:p>
      <text:p text:style-name="P46"><text:span text:style-name="T72"><text:s text:c="15"/></text:span><text:s/>440 D1037 2136 394009 <text:span text:style-name="T72"><text:s/>4100003 4200003</text:span></text:p>
      <text:p text:style-name="P67"><text:span text:style-name="T72"><text:s text:c="15"/></text:span>(31435 D5600)</text:p>
      <text:p text:style-name="P46"><text:s text:c="16"/></text:p>
      <text:p text:style-name="P46"><text:s text:c="15"/><text:span text:style-name="T14"><text:s text:c="2"/>STEAMS</text:span></text:p>
      <text:p text:style-name="P49"><text:s text:c="14"/>1208 1440 1459 1709 1821 2320 2474 2705 3715</text:p>
      <text:p text:style-name="P61"><text:s text:c="16"/>3785 3788 7661 5643 7232</text:p>
      <text:p text:style-name="P61"/>
      <text:p text:style-name="P61"><text:s text:c="17"/>ROAD RAILERS</text:p>
      <text:p text:style-name="P49"><text:s text:c="15"/>3164 21.12 RNS <text:s/>BP023</text:p>
      <text:p text:style-name="P46"><text:s text:c="14"/></text:p>
      <text:p text:style-name="P4"><text:s/>WICKHAM</text:p>
      <text:p text:style-name="P4"><text:s text:c="2"/>965095</text:p>
      <text:p text:style-name="P61"><text:s text:c="11"/></text:p>
      <text:p text:style-name="P61"><text:s text:c="14"/>EPPING O R <text:s text:c="3"/>CM5 9BN <text:s/>CM16 6BT</text:p>
      <text:p text:style-name="P35"><text:s text:c="17"/><text:span text:style-name="T67"><text:s text:c="3"/>COACHES</text:span></text:p>
      <text:p text:style-name="P46"><text:s text:c="14"/><text:span text:style-name="T72"><text:s text:c="3"/></text:span><text:span text:style-name="T65">5005</text:span><text:span text:style-name="T72"> </text:span><text:span text:style-name="T65">4925</text:span> <text:span text:style-name="T65">1699</text:span> 3465 5186 <text:span text:style-name="T65">5136</text:span><text:span text:style-name="T72"> </text:span><text:span text:style-name="T65">1214</text:span><text:span text:style-name="T72"> <text:s/></text:span><text:span text:style-name="T65">9385</text:span> 9410 <text:span text:style-name="T65">13341</text:span></text:p>
      <text:p text:style-name="P144"><text:s text:c="9"/><text:span text:style-name="T65">16237</text:span><text:span text:style-name="T72"> </text:span><text:span text:style-name="T65">24082</text:span><text:span text:style-name="T72"> <text:s/></text:span><text:span text:style-name="T65">80892</text:span><text:span text:style-name="T72"> </text:span><text:span text:style-name="T65">5181</text:span><text:span text:style-name="T72"> 21059</text:span><text:span text:style-name="T65"> 4809</text:span><text:span text:style-name="T72"> </text:span><text:span text:style-name="T65">4976*</text:span><text:span text:style-name="T72"> </text:span></text:p>
      <text:p text:style-name="P61"><text:s text:c="18"/>4947 </text:p>
      <text:p text:style-name="P61"/>
      <text:p text:style-name="P35"><text:span text:style-name="T36"><text:s text:c="2"/></text:span><text:span text:style-name="T14"><text:s text:c="16"/></text:span><text:span text:style-name="T36"><text:s/>WAGONS</text:span></text:p>
      <text:p text:style-name="P46"><text:s text:c="16"/><text:span text:style-name="T65">993577*</text:span><text:span text:style-name="T72"> </text:span><text:span text:style-name="T65">783653</text:span> 993760 993856 909074 <text:span text:style-name="T65">955096</text:span><text:span text:style-name="T72"> </text:span></text:p>
      <text:p text:style-name="P46"><text:span text:style-name="T33"><text:s text:c="20"/></text:span><text:span text:style-name="T6">4311</text:span><text:span text:style-name="T14"> 980002 980061 <text:s/>914383cr 341895cr</text:span><text:span text:style-name="T33"> <text:s text:c="2"/></text:span></text:p>
      <text:p text:style-name="P46"><text:s text:c="12"/><text:span text:style-name="T72"><text:s/></text:span></text:p>
      <text:p text:style-name="P3"><text:s text:c="4"/>94XXXX <text:s/><text:span text:style-name="T65">(gwr long flat) <text:s/></text:span><text:span text:style-name="T72">986348 (lms <text:s text:c="9"/></text:span></text:p>
      <text:p text:style-name="P50"><text:span text:style-name="T72"><text:s text:c="16"/></text:span>F362<text:span text:style-name="T72"> </text:span>200780<text:span text:style-name="T72"> </text:span>Bogie bolster<text:span text:style-name="T72"> <text:s text:c="5"/></text:span></text:p>
      <text:p text:style-name="P54"/>
      <text:p text:style-name="P46"><text:s text:c="5"/><text:span text:style-name="T72"><text:s text:c="11"/>GROUND <text:s/>WAGON </text:span></text:p>
      <text:p text:style-name="P49"><text:s text:c="15"/><text:span text:style-name="T65">(lms12t )</text:span></text:p>
      <text:p text:style-name="P50"/>
      <text:p text:style-name="P46"><text:s text:c="12"/><text:span text:style-name="T72"><text:s/></text:span><text:span text:style-name="T14"><text:s text:c="3"/>DIESELS</text:span></text:p>
      <text:p text:style-name="P46"><text:span text:style-name="T14"><text:s text:c="16"/></text:span><text:span text:style-name="T6">(D6729 37029)</text:span><text:span text:style-name="T14"> <text:s/></text:span><text:span text:style-name="T6">398616</text:span><text:span text:style-name="T14"> 31438 </text:span><text:span text:style-name="T6">D8001</text:span><text:span text:style-name="T14"> </text:span><text:span text:style-name="T6">45132</text:span><text:span text:style-name="T14"> <text:s/></text:span></text:p>
      <text:p text:style-name="P61"><text:s text:c="15"/><text:span text:style-name="T65">47635 </text:span>03119 <text:span text:style-name="T65">03170</text:span> <text:s/></text:p>
      <text:p text:style-name="P46"><text:s text:c="16"/></text:p>
      <text:p text:style-name="P46"><text:s text:c="13"/><text:span text:style-name="T14"><text:s text:c="5"/>STEAMS</text:span></text:p>
      <text:p text:style-name="P49"><text:span text:style-name="T5"><text:s text:c="16"/></text:span><text:span text:style-name="T6">3437</text:span><text:span text:style-name="T5"> </text:span><text:span text:style-name="T6">3837*</text:span><text:span text:style-name="T5"> <text:s/>3 </text:span><text:span text:style-name="T6"><text:s/>1008</text:span><text:span text:style-name="T5"> </text:span><text:span text:style-name="T6">4953</text:span></text:p>
      <text:p text:style-name="P3"><text:s text:c="3"/></text:p>
      <text:p text:style-name="P49"><text:s text:c="18"/>EMUS</text:p>
      <text:p text:style-name="P61"><text:s text:c="16"/>70235 69013</text:p>
      <text:p text:style-name="P4"/>
      <text:p text:style-name="P14"><text:s text:c="4"/>DMUS</text:p>
      <text:p text:style-name="P49"><text:span text:style-name="T5"><text:s text:c="16"/></text:span><text:span text:style-name="T6">51384</text:span><text:span text:style-name="T5"> </text:span><text:span text:style-name="T6">51342</text:span><text:span text:style-name="T5"> </text:span><text:span text:style-name="T6">56287</text:span><text:span text:style-name="T5"> <text:s text:c="13"/></text:span></text:p>
      <text:p text:style-name="P46"><text:s text:c="12"/><text:span text:style-name="T14"><text:s/></text:span><text:span text:style-name="T33"><text:s/></text:span></text:p>
      <text:p text:style-name="P4"><text:s text:c="3"/>DEMUS</text:p>
      <text:p text:style-name="P49"><text:span text:style-name="T5"><text:s text:c="16"/></text:span><text:span text:style-name="T6">60810</text:span><text:span text:style-name="T5"> </text:span><text:span text:style-name="T6">60110</text:span><text:span text:style-name="T5"> </text:span></text:p>
      <text:p text:style-name="P46"><text:s text:c="12"/><text:span text:style-name="T72"><text:s/></text:span></text:p>
      <text:p text:style-name="P49"><text:s text:c="16"/><text:span text:style-name="T5">TUBE STOCK</text:span></text:p>
      <text:p text:style-name="P49"><text:span text:style-name="T5"><text:s text:c="15"/></text:span><text:span text:style-name="T6">1031</text:span></text:p>
      <text:p text:style-name="P17"/>
      <text:p text:style-name="P46"><text:s text:c="11"/><text:span text:style-name="T14"><text:s text:c="2"/>ROAD RAILERS</text:span></text:p>
      <text:p text:style-name="P61"><text:s text:c="15"/>PL041 <text:s/>73241 <text:span text:style-name="T65">T002</text:span></text:p>
      <text:p text:style-name="P145"><text:s text:c="7"/><text:span text:style-name="T5">TROLLEY</text:span></text:p>
      <text:p text:style-name="P148"><text:s text:c="16"/>XXXX</text:p>
      <text:p text:style-name="P14"/>
      <text:p text:style-name="P46"><text:s text:c="13"/><text:span text:style-name="T14"><text:s text:c="2"/>FOXFIELD RAILWAY <text:s text:c="3"/>ST11 9BG</text:span></text:p>
      <text:p text:style-name="P46"><text:s text:c="15"/>Ground Coaches</text:p>
      <text:p text:style-name="P61"><text:s text:c="15"/>1108 <text:s/>MR</text:p>
      <text:p text:style-name="P46"/>
      <text:p text:style-name="P49"/>
      <text:p text:style-name="P46"><text:s text:c="20"/>25607 23 <text:span text:style-name="T65">37519*</text:span> 34672 37518 4762 <text:span text:style-name="T65">35225</text:span> 35289 </text:p>
      <text:p text:style-name="P49"><text:s text:c="15"/>27249 45028 127 61 <text:s text:c="3"/>SR1703 38268 <text:s text:c="2"/>4243</text:p>
      <text:p text:style-name="P46"><text:s text:c="14"/></text:p>
      <text:p text:style-name="P49"/>
      <text:p text:style-name="P49"><text:s text:c="12"/>Ground Wagon</text:p>
      <text:p text:style-name="P148"><text:s text:c="4"/>(container) <text:s text:c="2"/></text:p>
      <text:p text:style-name="P61"><text:s text:c="15"/></text:p>
      <text:p text:style-name="P4">568839 785734 780153 765621 732444 595308 </text:p>
      <text:p text:style-name="P46"><text:s text:c="15"/>983207 578488 989256 56300 950661 <text:s/>(2 165597)</text:p>
      <text:p text:style-name="P3"><text:s text:c="3"/>565154 556132 555261 500851 594225 881724 126447 </text:p>
      <text:p text:style-name="P49"><text:s text:c="15"/>56120 <text:span text:style-name="T65">11*</text:span> 1 <text:s/>(1 155343) (3 165606) 696 54 <text:span text:style-name="T65">1017*</text:span></text:p>
      <text:p text:style-name="P49"><text:s text:c="14"/>531006 <text:span text:style-name="T65">48527*</text:span> 904696 <text:s/>7404189 993867 266409</text:p>
      <text:p text:style-name="P46"><text:s text:c="13"/><text:span text:style-name="T72"><text:s/>969 951863 (15 11995) 23 428141 3731 52441</text:span></text:p>
      <text:p text:style-name="P46"><text:s text:c="14"/>30 430631 43219 (single bolster )48539uf <text:s/>741715uf</text:p>
      <text:p text:style-name="P46"><text:s text:c="14"/>426618 455492 558698 <text:s/>558411 (12 5039) 740676</text:p>
      <text:p text:style-name="P49"><text:s text:c="14"/>386389 81277FO 197695 sis202 sis3 58uf <text:s text:c="2"/>ncb20</text:p>
      <text:p text:style-name="P49"><text:s text:c="13"/>(43415 184111uf) <text:s text:c="2"/>sis23 sis2 ncb5 48521uf <text:s/></text:p>
      <text:p text:style-name="P46"><text:s text:c="14"/><text:span text:style-name="T14">ncb293 ncb16 <text:s/>(po4 151245)</text:span></text:p>
      <text:p text:style-name="P46"><text:s text:c="13"/></text:p>
      <text:p text:style-name="P61"><text:s text:c="18"/>DIESELS</text:p>
      <text:p text:style-name="P46"><text:s text:c="14"/>2262 1130 1188 486 275886 424841 408496 <text:span text:style-name="T65">2868* </text:span></text:p>
      <text:p text:style-name="P67"><text:span text:style-name="T72"><text:s text:c="15"/></text:span>3207*<text:span text:style-name="T72"> 3150</text:span></text:p>
      <text:p text:style-name="P14"><text:s text:c="14"/></text:p>
      <text:p text:style-name="P46"><text:soft-page-break/><text:s text:c="14"/>STEAMS</text:p>
      <text:p text:style-name="P46"><text:s text:c="14"/>1207 192 2623 2262 2221 2081 1827 1803 <text:span text:style-name="T65">3059</text:span> 933</text:p>
      <text:p text:style-name="P46"><text:s text:c="16"/>(6 BLACK) (C BLACK) <text:span text:style-name="T65">3839*</text:span> 3694 4388 <text:s text:c="16"/><text:span text:style-name="T72"><text:s/></text:span></text:p>
      <text:p text:style-name="P50"><text:span text:style-name="T72"><text:s text:c="16"/>4167 </text:span>1563<text:span text:style-name="T72"> 9535 2842 1567</text:span></text:p>
      <text:p text:style-name="P46"/>
      <text:p text:style-name="P46"><text:s text:c="15"/>ROAD RAILERS</text:p>
      <text:p text:style-name="P46"><text:s text:c="15"/>89068-612 54705 6643 054/98 680413</text:p>
      <text:p text:style-name="P46"/>
      <text:p text:style-name="P46"><text:s text:c="19"/>DMU</text:p>
      <text:p text:style-name="P46"><text:span text:style-name="T72"><text:s text:c="16"/></text:span><text:span text:style-name="T65">142055</text:span></text:p>
      <text:p text:style-name="P46"><text:s text:c="14"/></text:p>
      <text:p text:style-name="P49"><text:s text:c="13"/>CRANE</text:p>
      <text:p text:style-name="P49"><text:s text:c="14"/>23564</text:p>
      <text:p text:style-name="P49"><text:s text:c="13"/></text:p>
      <text:p text:style-name="P49"><text:s text:c="11"/><text:span text:style-name="T5"><text:s/>GLOUCESTER WARWICKSHIRE RAILWAY <text:s/>G54 5DT</text:span></text:p>
      <text:p text:style-name="P46"><text:s text:c="15"/>COACHES</text:p>
      <text:p text:style-name="P145"><text:s text:c="9"/>3188 4986 5023 5042 (9000 9276) 25618</text:p>
      <text:p text:style-name="P49"><text:s text:c="14"/>(7221 16221) 25743 4806 34929 <text:s/>1675 1808</text:p>
      <text:p text:style-name="P49"><text:s text:c="14"/>35308 13326 13329 13337 25646 4614 1672 1876</text:p>
      <text:p text:style-name="P46"><text:s text:c="13"/>4869 3960 94486 94557 16195 80435 94051 80926 </text:p>
      <text:p text:style-name="P46"><text:span text:style-name="T72"><text:s text:c="14"/>4867 1965 4763 4772 4787 4790 4798</text:span><text:span text:style-name="T65"> 21092* </text:span><text:span text:style-name="T72">3132 </text:span></text:p>
      <text:p text:style-name="P46"><text:s text:c="12"/>95195 86539) 80893 24006 24949 25341 25451 86828 </text:p>
      <text:p text:style-name="P46"><text:s text:c="14"/>81039 (92350 81049) 92418 86235 25501 600 185 </text:p>
      <text:p text:style-name="P46"><text:s text:c="13"/>4590 (94462 81289) 2983 5539 25488 24804</text:p>
      <text:p text:style-name="P49"><text:s text:c="14"/>SR1863 SR1563 </text:p>
      <text:p text:style-name="P4"><text:s text:c="2"/></text:p>
      <text:p text:style-name="P145"><text:s text:c="5"/>Ground Wagons</text:p>
      <text:p text:style-name="P49"><text:s text:c="13"/>105521 <text:s/>778042 <text:s/>778671 144439 <text:s/>47558 <text:span text:style-name="T65">112850</text:span> </text:p>
      <text:p text:style-name="P49"/>
      <text:p text:style-name="P46"><text:s text:c="14"/>993863 124589 142594 989374 144678 27018 774445</text:p>
      <text:p text:style-name="P46"><text:s text:c="14"/>983671 <text:s/>595229 755964 764539 47109 983813 772065</text:p>
      <text:p text:style-name="P46"><text:s text:c="13"/>781058 588509 992548 4342 913767 874172 84</text:p>
      <text:p text:style-name="P46"><text:s text:c="14"/>749028 707111 992930 740224 947352 <text:s text:c="2"/>388822</text:p>
      <text:p text:style-name="P46"><text:s text:c="14"/>732463 854082 989299 77037 2869 14111 98016 161026 </text:p>
      <text:p text:style-name="P46"><text:s text:c="10"/><text:span text:style-name="T5"><text:s text:c="3"/>983217 989162 992958 787004 870832 983239 783946 <text:s text:c="3"/></text:span><text:s/></text:p>
      <text:p text:style-name="P46"><text:s text:c="15"/>993061 993121 (07844 2876) 953846 4207 998025 </text:p>
      <text:p text:style-name="P49"><text:s text:c="13"/>994444 709 2806 311717 143760 17312 733588 17716 </text:p>
      <text:p text:style-name="P3"><text:s text:c="4"/>725694 552635 436702 4727 733021 460419 740135 </text:p>
      <text:p text:style-name="P46"><text:s text:c="15"/>100717 510042 <text:s/>388107 4728 346194 4715 998003 </text:p>
      <text:p text:style-name="P46"><text:s text:c="15"/>4723 439717 5049 (071692 310315) 31554 1985</text:p>
      <text:p text:style-name="P46"><text:s text:c="14"/>84022 703843 84974 56518 951455 774445</text:p>
      <text:p text:style-name="P46"><text:s text:c="14"/>201570 <text:s/>904716 904122 905102 200169 17244 </text:p>
      <text:p text:style-name="P46"><text:s text:c="15"/>65742 481 484 95003 <text:s/>(150260 80005) 1388 950575 </text:p>
      <text:p text:style-name="P46"><text:s text:c="14"/>45099 2835 <text:s/>8370 4755 023 732296 200065 904115 </text:p>
      <text:p text:style-name="P14"><text:s text:c="3"/>79636 904111 <text:s/>900109 901102 <text:s/>941793 28833 5245 <text:s/></text:p>
      <text:p text:style-name="P46"><text:s text:c="12"/><text:span text:style-name="T72"><text:s text:c="4"/>024816 <text:s/>99879 <text:s/>901000 112869 <text:s/>954962 <text:s/>30500 703819 </text:span></text:p>
      <text:p text:style-name="P46"><text:s text:c="16"/><text:span text:style-name="T72">56305 65643 901005 909011 889016 <text:s text:c="2"/>730311 105560</text:span></text:p>
      <text:p text:style-name="P148"><text:s text:c="4"/>35357 743835 100839 936348 43914 43930 <text:s/>84667 <text:s/>82234 </text:p>
      <text:p text:style-name="P49"><text:s text:c="18"/>107328 52355 481982 22823 100703 <text:s/>90873 854239 </text:p>
      <text:p text:style-name="P46"><text:s text:c="15"/>296740 732195 17390 174711 <text:s/>115 <text:s/>67986uf</text:p>
      <text:p text:style-name="P46"><text:s text:c="14"/>(4w flat cable drum) a46 4416cr <text:s text:c="2"/>323555uf </text:p>
      <text:p text:style-name="P61"><text:s text:c="14"/>63049CR 138flat</text:p>
      <text:p text:style-name="P46"><text:s text:c="12"/></text:p>
      <text:p text:style-name="P4"><text:s text:c="2"/>DIESELS </text:p>
      <text:p text:style-name="P46"><text:s text:c="15"/>45149 <text:span text:style-name="T65">47376</text:span> <text:span text:style-name="T65">37215</text:span> D2182 11230 2760 421030 </text:p>
      <text:p text:style-name="P46"><text:s text:c="13"/>(D1693 47105) D2280 <text:s/>20228 <text:span text:style-name="T65">(D6948 37248)</text:span><text:span text:style-name="T72"> </text:span></text:p>
      <text:p text:style-name="P49"><text:span text:style-name="T32"><text:s text:c="18"/></text:span><text:span text:style-name="T5"><text:s/>20137 (D5343 26043) </text:span><text:s text:c="2"/></text:p>
      <text:p text:style-name="P3"><text:s text:c="6"/></text:p>
      <text:p text:style-name="P61"><text:s text:c="12"/>STEAMS</text:p>
      <text:p text:style-name="P46"><text:s text:c="16"/>4270 2850 7820 2807 3850 35006 76077 2874 </text:p>
      <text:p text:style-name="P46"><text:s text:c="16"/>JOHN <text:span text:style-name="T65">5521</text:span></text:p>
      <text:p text:style-name="P61"><text:s text:c="12"/></text:p>
      <text:p text:style-name="P144"><text:s text:c="8"/>DMUS </text:p>
      <text:p text:style-name="P61"><text:s text:c="14"/>59510 <text:s/>59505 51360 51363 51372 51405 55003 <text:s text:c="2"/></text:p>
      <text:p text:style-name="P4"><text:s/></text:p>
      <text:p text:style-name="P14"><text:s text:c="4"/>ROAD RAILERS</text:p>
      <text:p text:style-name="P61"><text:s text:c="14"/>226401 3224-2 38245 1843 11395 39245 38344 BP045 </text:p>
      <text:p text:style-name="P46"><text:s text:c="15"/></text:p>
      <text:p text:style-name="P46"><text:s text:c="13"/>TROLLEYS</text:p>
      <text:p text:style-name="P46"><text:s text:c="14"/>XXXX XXXX 6 19XX</text:p>
      <text:p text:style-name="P46"><text:s text:c="12"/></text:p>
      <text:p text:style-name="P46"><text:s text:c="16"/>CRANES</text:p>
      <text:p text:style-name="P46"><text:span text:style-name="T101"><text:s text:c="15"/>1 15 272 62006</text:span> </text:p>
      <text:p text:style-name="P46"><text:s text:c="17"/></text:p>
      <text:p text:style-name="P46"><text:s text:c="12"/><text:span text:style-name="T14"><text:s text:c="2"/>NORTH GLOUCESTERSHIRE RAILWAY <text:s/>GL54 <text:s/>5DT</text:span></text:p>
      <text:p text:style-name="P46"><text:s text:c="15"/>DIESELS NG</text:p>
      <text:p text:style-name="P46"><text:s text:c="15"/>166010 354028 34523 7053 6647 3317 101T023 </text:p>
      <text:p text:style-name="P61"><text:s text:c="13"/>200050 79412 7512 <text:s/>42345 730090 7375 295193 </text:p>
      <text:p text:style-name="P61"><text:s text:c="11"/></text:p>
      <text:p text:style-name="P46"><text:s text:c="13"/></text:p>
      <text:p text:style-name="P46"><text:s text:c="16"/>STEAMS NG </text:p>
      <text:p text:style-name="P61"><text:s text:c="15"/>3512 939 15968 2075 </text:p>
      <text:p text:style-name="P46"><text:s text:c="11"/></text:p>
      <text:p text:style-name="P61"><text:s text:c="18"/>GREAT CENTRAL RAILWAY <text:s/>LE11 <text:s/>1RW</text:p>
      <text:p text:style-name="P46"><text:s text:c="18"/>COACHES</text:p>
      <text:p text:style-name="P46"><text:s text:c="17"/><text:span text:style-name="T65">1100</text:span> <text:span text:style-name="T65">1525</text:span> 1526 <text:span text:style-name="T65">13313</text:span> 5007 5008 25711 <text:span text:style-name="T65">1898</text:span> </text:p>
      <text:p text:style-name="P46"><text:s text:c="17"/>9316 34738 <text:span text:style-name="T65">94709</text:span><text:span text:style-name="T72"> 1649 1695 </text:span><text:span text:style-name="T65">(13317 70)</text:span><text:span text:style-name="T72"> </text:span></text:p>
      <text:p text:style-name="P46"><text:span text:style-name="T72"><text:s text:c="17"/>(34990 977088) </text:span><text:span text:style-name="T65">10558</text:span><text:span text:style-name="T72"> 4857 1852 21184</text:span></text:p>
      <text:p text:style-name="P50"><text:span text:style-name="T14"><text:s text:c="18"/>14026 </text:span><text:span text:style-name="T5">17055</text:span><text:span text:style-name="T14"> 14064 96202 4788 <text:s/>21242</text:span></text:p>
      <text:p text:style-name="P46"><text:s text:c="16"/>14099 15207 (34999 975638) <text:span text:style-name="T65">3092</text:span> <text:span text:style-name="T65">321047</text:span> </text:p>
      <text:p text:style-name="P61"><text:s text:c="15"/>1962 3013 4982 3079 4948 3126 4922 <text:span text:style-name="T65">4630 </text:span>4662 <text:span text:style-name="T65">1899</text:span> </text:p>
      <text:p text:style-name="P61"><text:s text:c="16"/>4830 <text:span text:style-name="T65">3042</text:span> 4149 4050 70294 70268 70654 <text:span text:style-name="T65">21031</text:span> 1719</text:p>
      <text:p text:style-name="P46"><text:s text:c="16"/><text:span text:style-name="T65">24278</text:span><text:span text:style-name="T72"> 24778 <text:s text:c="2"/></text:span><text:span text:style-name="T65">81343*</text:span><text:span text:style-name="T72"> <text:s text:c="2"/>80401 94286 </text:span><text:span text:style-name="T65">94707</text:span><text:span text:style-name="T72"> <text:s text:c="3"/>92929 </text:span></text:p>
      <text:p text:style-name="P46"><text:s text:c="15"/><text:span text:style-name="T72">( 320907 <text:s/>1222) </text:span><text:span text:style-name="T65">(320741 10155)</text:span><text:span text:style-name="T72"> </text:span><text:span text:style-name="T65">793</text:span><text:span text:style-name="T72"> 15960 </text:span><text:span text:style-name="T65">57451</text:span></text:p>
      <text:p text:style-name="P46"><text:span text:style-name="T72"><text:s text:c="15"/>81382 96187 </text:span><text:span text:style-name="T65">96190</text:span><text:span text:style-name="T72"> </text:span><text:span text:style-name="T65">93579</text:span><text:span text:style-name="T72"> 94052 24280 96194 </text:span></text:p>
      <text:p text:style-name="P50"><text:span text:style-name="T72"><text:s text:c="15"/></text:span>(21138 3178)<text:span text:style-name="T72"> <text:s/>80345 80349 25366 16070 889006 </text:span></text:p>
      <text:p text:style-name="P46"><text:s text:c="15"/><text:span text:style-name="T72"><text:s/></text:span><text:span text:style-name="T65">(34590 3178)</text:span><text:span text:style-name="T72"> <text:s/></text:span><text:span text:style-name="T65">24421</text:span><text:span text:style-name="T72"> 25312 80458 34393 80438</text:span></text:p>
      <text:p text:style-name="P46"><text:span text:style-name="T72"><text:s text:c="17"/>999503 <text:s/>80301 80307</text:span> (321070 23981) <text:s/>sr1706</text:p>
      <text:p text:style-name="P46"><text:span text:style-name="T14"><text:s text:c="17"/></text:span><text:span text:style-name="T6">43043</text:span><text:span text:style-name="T14"> </text:span><text:span text:style-name="T6">43289*</text:span><text:span text:style-name="T14"> (86830 93830) (70294 2441</text:span></text:p>
      <text:p text:style-name="P46"><text:s text:c="16"/><text:span text:style-name="T72">(3072 977399) <text:s/>15208uf 25788 62565 <text:s text:c="2"/>(21202 977107)</text:span></text:p>
      <text:p text:style-name="P61"><text:s text:c="14"/>40704 <text:s text:c="2"/>(321069 24080) <text:s/>975397 <text:s/>(70268 6777)</text:p>
      <text:p text:style-name="P46"><text:s text:c="17"/></text:p>
      <text:p text:style-name="P46"><text:s text:c="16"/><text:span text:style-name="T72">Ground Coaches</text:span></text:p>
      <text:p text:style-name="P46"><text:span text:style-name="T14"><text:s text:c="15"/></text:span><text:span text:style-name="T6">sr1375 </text:span><text:span text:style-name="T14"><text:s/></text:span><text:span text:style-name="T6">sr1334</text:span></text:p>
      <text:p text:style-name="P46"><text:s text:c="13"/></text:p>
      <text:p text:style-name="P46"><text:s text:c="15"/><text:span text:style-name="T14"><text:s text:c="2"/>GROUND WAGONS</text:span></text:p>
      <text:p text:style-name="P46"><text:s text:c="15"/>510044 <text:span text:style-name="T65">85XXXX*</text:span> <text:span text:style-name="T65">85XXXX</text:span> 85XXXX <text:span text:style-name="T65">179998</text:span> <text:span text:style-name="T65">784186</text:span></text:p>
      <text:p text:style-name="P49"><text:s text:c="16"/><text:span text:style-name="T65">772709</text:span> <text:s/>16496 2846 66414 760940<text:span text:style-name="T65">9900</text:span> <text:span text:style-name="T65">55733</text:span> </text:p>
      <text:p text:style-name="P4"><text:s text:c="3"/><text:span text:style-name="T65">765288</text:span> 85XXXX <text:s text:c="2"/><text:span text:style-name="T65">855667</text:span> <text:span text:style-name="T65">853718</text:span> <text:s/><text:span text:style-name="T65">854371 </text:span>768010 </text:p>
      <text:p text:style-name="P46"><text:s text:c="14"/><text:span text:style-name="T65">854651</text:span> 855007 <text:span text:style-name="T65">851213</text:span> <text:span text:style-name="T65">762035</text:span> <text:span text:style-name="T65">853552</text:span> <text:span text:style-name="T65">774329</text:span> <text:span text:style-name="T65">1610</text:span> </text:p>
      <text:p text:style-name="P67"><text:span text:style-name="T72"><text:s text:c="14"/>47376 852744 </text:span>46631<text:span text:style-name="T72"> 48839 <text:s/>9232 50343 4303 4304</text:span></text:p>
      <text:p text:style-name="P4"><text:s text:c="3"/></text:p>
      <text:p text:style-name="P46"><text:s text:c="15"/><text:span text:style-name="T14">777171 786348 850498 993478 983603 983593</text:span></text:p>
      <text:p text:style-name="P49"><text:span text:style-name="T5"><text:s text:c="15"/>993757 279722 110626 439708 </text:span><text:span text:style-name="T6">279719</text:span><text:span text:style-name="T5"> 279721</text:span></text:p>
      <text:p text:style-name="P144"><text:s text:c="3"/><text:span text:style-name="T65">964122</text:span> <text:s/>507397 336550 <text:span text:style-name="T65">51408</text:span> 36 <text:span text:style-name="T65">360332</text:span> 462772 <text:s/></text:p>
      <text:p text:style-name="P46"><text:s text:c="12"/>596329 4513 279707 279711 279713 279716 <text:s/>279718 </text:p>
      <text:p text:style-name="P46"><text:s text:c="12"/>279702 279725 <text:span text:style-name="T65">279742</text:span> <text:s/>279704 279703 983393</text:p>
      <text:p text:style-name="P46"><text:s text:c="13"/>(589163 279710) 500954 99163 <text:s/>784409 581241</text:p>
      <text:p text:style-name="P145"><text:s text:c="4"/>550356 565724 <text:s/>570618 573124 47804 47758 48564</text:p>
      <text:p text:style-name="P46"><text:s text:c="16"/>273798 562230 589204 <text:s/>853841 854782 852838 </text:p>
      <text:p text:style-name="P46"><text:s text:c="16"/>989252 <text:span text:style-name="T65">992714</text:span> 993128 993304 993560 854944</text:p>
      <text:p text:style-name="P46"><text:s text:c="14"/>762855 763305 765272 769754 <text:s text:c="2"/>777356 777728 <text:s text:c="15"/></text:p>
      <text:p text:style-name="P46"><text:s text:c="16"/>779978 780282 <text:s/>783184 458484 <text:s/>901203 928135</text:p>
      <text:p text:style-name="P46"><text:s text:c="14"/>768184 732357 281882 972018 783082 507489 </text:p>
      <text:p text:style-name="P46"><text:s text:c="14"/>916549 992447 212315 737695 991408 461074 </text:p>
      <text:p text:style-name="P46"><text:s text:c="13"/>280364 740654 301588 470809 6071 269001 </text:p>
      <text:p text:style-name="P17"><text:span text:style-name="T104"><text:s/></text:span><text:span text:style-name="T72"><text:s/>505313 279723 279724 <text:s/>983166 730562 </text:span></text:p>
      <text:p text:style-name="P46"><text:s text:c="13"/>279706 425356 993886 993412 356</text:p>
      <text:p text:style-name="P46"><text:s text:c="14"/>721587<text:span text:style-name="T72"> 385782 991079 (43436 999023) 990585 18422</text:span></text:p>
      <text:p text:style-name="P46"><text:s text:c="12"/>7263 44 724540 <text:span text:style-name="T65">551846</text:span> <text:span text:style-name="T65">87674</text:span> 462709 985933 950690 </text:p>
      <text:p text:style-name="P46"><text:s text:c="13"/>954268 954433 984642 984713 996000 985884 994761 </text:p>
      <text:p text:style-name="P46"><text:s text:c="13"/>5254 <text:span text:style-name="T65">47528</text:span> <text:span text:style-name="T65">47534</text:span> <text:s/>954546 56010 985730 889006 </text:p>
      <text:p text:style-name="P46"><text:s text:c="12"/>972608 972681 8127 <text:s/>212705 <text:s/>45056 539 654</text:p>
      <text:p text:style-name="P46"><text:s text:c="14"/>994240 556436 595478 165121 2335 98858</text:p>
      <text:p text:style-name="P46"><text:s text:c="16"/>731833 771908 7514 589204 568314 954406</text:p>
      <text:p text:style-name="P46"><text:span text:style-name="T14"><text:s text:c="16"/></text:span><text:span text:style-name="T6"><text:s/>854097</text:span><text:span text:style-name="T14"> <text:s text:c="3"/></text:span><text:span text:style-name="T6">107110cr</text:span><text:span text:style-name="T14"> (50xxxx 780680) </text:span><text:span text:style-name="T6">998926</text:span></text:p>
      <text:p text:style-name="P14">crb 5 998540cr (47235 7xxxx) 7xxxxxuf 041498</text:p>
      <text:p text:style-name="P49"><text:span text:style-name="T5"><text:s/></text:span><text:s text:c="7"/></text:p>
      <text:p text:style-name="P46"><text:s text:c="19"/><text:span text:style-name="T14">DMUS</text:span></text:p>
      <text:p text:style-name="P46"><text:s text:c="16"/>59276 <text:span text:style-name="T65">51427</text:span> 59575 54342 <text:span text:style-name="T65">50321</text:span> 50203 977898 50266</text:p>
      <text:p text:style-name="P46"><text:s text:c="16"/><text:span text:style-name="T65">55009 </text:span></text:p>
      <text:p text:style-name="P46"><text:s text:c="15"/></text:p>
      <text:p text:style-name="P46"><text:s text:c="14"/><text:span text:style-name="T72"><text:s/>STEAMS</text:span></text:p>
      <text:p text:style-name="P46"><text:s text:c="15"/>7684 3809 <text:span text:style-name="T65">6990</text:span> 78018 45305 45491 <text:span text:style-name="T65">47406</text:span> <text:span text:style-name="T65">48305</text:span></text:p>
      <text:p text:style-name="P46"><text:s text:c="15"/>48624 <text:span text:style-name="T65">63601</text:span> <text:span text:style-name="T65">73156</text:span><text:span text:style-name="T72"> 777 <text:s/>(1752 68067) 62712</text:span></text:p>
      <text:p text:style-name="P49"><text:span text:style-name="T5"><text:s text:c="15"/></text:span><text:span text:style-name="T6">78019</text:span><text:span text:style-name="T5"> 92214 </text:span><text:span text:style-name="T6">70013</text:span><text:span text:style-name="T5"> <text:s/></text:span></text:p>
      <text:p text:style-name="P61"/>
      <text:p text:style-name="P46"><text:s text:c="16"/><text:span text:style-name="T14">DIESELS </text:span></text:p>
      <text:p text:style-name="P46"><text:span text:style-name="T72"><text:s text:c="16"/></text:span><text:span text:style-name="T65">50017</text:span><text:span text:style-name="T72"> <text:s/></text:span><text:span text:style-name="T65">08694</text:span><text:span text:style-name="T72"> </text:span><text:span text:style-name="T65">13101</text:span><text:span text:style-name="T72"> <text:s/></text:span><text:span text:style-name="T65">37714*</text:span><text:span text:style-name="T72"> <text:s text:c="2"/></text:span><text:span text:style-name="T65">(D4137 08907*)</text:span></text:p>
      <text:p text:style-name="P46"><text:s text:c="15"/><text:span text:style-name="T65">07005 </text:span><text:s text:c="2"/><text:span text:style-name="T65">4210079 </text:span><text:s/><text:span text:style-name="T65">D8098</text:span><text:span text:style-name="T72"> <text:s text:c="2"/></text:span><text:span text:style-name="T65">D5185*</text:span><text:span text:style-name="T72"> </text:span><text:span text:style-name="T65">(31563 D5830*)</text:span></text:p>
      <text:p text:style-name="P46"><text:s text:c="12"/><text:span text:style-name="T72"><text:s text:c="3"/></text:span><text:span text:style-name="T65">(33116 D6535*)</text:span><text:span text:style-name="T72"> </text:span><text:span text:style-name="T65">(45125 D123)</text:span> <text:span text:style-name="T65">(D5401 27056)</text:span></text:p>
      <text:p text:style-name="P61"><text:s text:c="14"/><text:span text:style-name="T65">(D1705 47117) <text:s text:c="2"/>(10119 <text:s/>D4067)</text:span></text:p>
      <text:p text:style-name="P14"/>
      <text:p text:style-name="P14"><text:s text:c="3"/>ROAD RAILERS</text:p>
      <text:p text:style-name="P46"><text:s text:c="15"/>037/95 <text:s/>10401 002/93 <text:s/>A685 PYD </text:p>
      <text:p text:style-name="P4"><text:s/></text:p>
      <text:p text:style-name="P14"><text:s text:c="4"/>CRANES</text:p>
      <text:p text:style-name="P61"><text:s text:c="16"/>95208 96709 81549 <text:s text:c="2"/></text:p>
      <text:p text:style-name="P46"><text:s text:c="17"/></text:p>
      <text:p text:style-name="P46"><text:s text:c="16"/>GWILI RAILWAY <text:s text:c="3"/>SA33 6HT</text:p>
      <text:p text:style-name="P46"><text:s text:c="13"/>GROUND COACHES</text:p>
      <text:p text:style-name="P4"><text:s/>6409 <text:s/>6414 <text:s/>4006 <text:s/>6410 <text:s/>793 <text:s text:c="7"/></text:p>
      <text:p text:style-name="P49"/>
      <text:p text:style-name="P46"><text:s text:c="12"/><text:span text:style-name="T14"><text:s text:c="4"/>COACHES</text:span></text:p>
      <text:p text:style-name="P14"><text:s text:c="4"/>16232 4420 4906 10517 24825 35448 80371 94404</text:p>
      <text:p text:style-name="P49"><text:s text:c="17"/>86748 35012 4012 3846 <text:s text:c="2"/>216 8 SR1168</text:p>
      <text:p text:style-name="P49"/>
      <text:p text:style-name="P3"><text:s text:c="3"/>GROUND WAGONS </text:p>
      <text:p text:style-name="P49"><text:s text:c="16"/><text:span text:style-name="T65">767684</text:span> <text:span text:style-name="T65">762378</text:span></text:p>
      <text:p text:style-name="P7"/>
      <text:p text:style-name="P61"><text:s text:c="17"/>WAGONS</text:p>
      <text:p text:style-name="P46"><text:s text:c="15"/>47107 292071 30408 2887 993568 2009 2002</text:p>
      <text:p text:style-name="P46"><text:s text:c="14"/>41946 28021 30773 30449 <text:s/>42155 <text:s/>107105CR </text:p>
      <text:p text:style-name="P46"><text:s text:c="15"/>915761CR 996761 80746 079030 80880 </text:p>
      <text:p text:style-name="P148"><text:s text:c="6"/>68645 114762 978804 943064</text:p>
      <text:p text:style-name="P61"><text:s text:c="16"/></text:p>
      <text:p text:style-name="P148"><text:s text:c="11"/>DMUS</text:p>
      <text:p text:style-name="P49"><text:span text:style-name="T5"><text:s text:c="20"/></text:span><text:span text:style-name="T6">51401</text:span><text:span text:style-name="T5"> </text:span><text:span text:style-name="T6">59508</text:span><text:span text:style-name="T5"> </text:span><text:span text:style-name="T6">51347</text:span></text:p>
      <text:p text:style-name="P4"><text:s/></text:p>
      <text:p text:style-name="P61"><text:s text:c="18"/>DIESELS</text:p>
      <text:p text:style-name="P61"><text:s text:c="18"/><text:span text:style-name="T65">D2069</text:span> D2178 312433 5014 <text:s text:c="2"/><text:span text:style-name="T65">43056</text:span></text:p>
      <text:p text:style-name="P46"><text:s text:c="17"/></text:p>
      <text:p text:style-name="P50"/>
      <text:p text:style-name="P46"><text:s text:c="15"/>STEAMS</text:p>
      <text:p text:style-name="P49"><text:s text:c="14"/>306 7058 5272 3829 1345 </text:p>
      <text:p text:style-name="P46"><text:s text:c="15"/></text:p>
      <text:p text:style-name="P46"><text:s text:c="15"/><text:span text:style-name="T72"><text:s text:c="4"/>ROAD RAILERS</text:span></text:p>
      <text:p text:style-name="P46"><text:s text:c="15"/>9010 37-0 <text:s/>E576 4402</text:p>
      <text:p text:style-name="P49"><text:s text:c="16"/></text:p>
      <text:p text:style-name="P46"><text:s text:c="15"/>TROLLEY</text:p>
      <text:p text:style-name="P61"><text:s text:c="16"/>XXXX</text:p>
      <text:p text:style-name="P14"><text:s/></text:p>
      <text:p text:style-name="P49"><text:s text:c="15"/>CRANES</text:p>
      <text:p text:style-name="P61"><text:s text:c="14"/>225 547</text:p>
      <text:p text:style-name="P61"><text:s text:c="12"/></text:p>
      <text:p text:style-name="P23"><text:s text:c="4"/><text:span text:style-name="T67"><text:s text:c="3"/>HELSTON <text:s text:c="2"/>TR13 0RY </text:span></text:p>
      <text:p text:style-name="P46"><text:s text:c="14"/>COACHES</text:p>
      <text:p text:style-name="P61"><text:s text:c="13"/><text:span text:style-name="T65"><text:s/>43147*</text:span> <text:span text:style-name="T65">94148*</text:span> <text:s/></text:p>
      <text:p text:style-name="P49"><text:s text:c="15"/></text:p>
      <text:p text:style-name="P61"><text:s text:c="15"/>Ground Wagons</text:p>
      <text:p text:style-name="P49"><text:span text:style-name="T5"><text:s text:c="15"/></text:span><text:span text:style-name="T6">100418*</text:span><text:span text:style-name="T5"> <text:s/></text:span><text:span text:style-name="T6">882583*</text:span><text:span text:style-name="T5"> <text:s text:c="4"/></text:span></text:p>
      <text:p text:style-name="P61"><text:s text:c="4"/></text:p>
      <text:p text:style-name="P46"><text:s text:c="16"/><text:span text:style-name="T72"><text:s/></text:span><text:span text:style-name="T65"><text:s text:c="2"/>954353* </text:span><text:span text:style-name="T72"><text:s text:c="2"/>624 <text:s/></text:span><text:span text:style-name="T65">508682</text:span><text:span text:style-name="T72"> </text:span><text:span text:style-name="T65">954673*</text:span><text:span text:style-name="T72"> </text:span><text:span text:style-name="T65">2 plank</text:span></text:p>
      <text:p text:style-name="P46"><text:span text:style-name="T72"><text:s text:c="15"/></text:span><text:s/>oped tank 80964 <text:s/>761407 </text:p>
      <text:p text:style-name="P7"/>
      <text:p text:style-name="P46"><text:s text:c="13"/><text:span text:style-name="T72"><text:s/>DIESELS </text:span></text:p>
      <text:p text:style-name="P4"><text:s text:c="2"/><text:span text:style-name="T65">97649*</text:span> <text:span text:style-name="T65">395305*</text:span></text:p>
      <text:p text:style-name="P4"><text:s text:c="5"/>DMUS</text:p>
      <text:p text:style-name="P4"><text:span text:style-name="T5"><text:s text:c="4"/></text:span><text:span text:style-name="T6">51616*</text:span><text:span text:style-name="T5"> 51622 </text:span><text:span text:style-name="T6">50413*</text:span><text:span text:style-name="T5"> </text:span><text:span text:style-name="T6">56169*</text:span><text:span text:style-name="T5"> <text:s/></text:span><text:span text:style-name="T6">59521*</text:span></text:p>
      <text:p text:style-name="P17"/>
      <text:p text:style-name="P46"><text:s text:c="17"/>STEAM</text:p>
      <text:p text:style-name="P46"><text:span text:style-name="T14"><text:s text:c="16"/></text:span><text:span text:style-name="T6">2000*</text:span><text:span text:style-name="T14"> <text:s text:c="3"/></text:span><text:span text:style-name="T6">2100</text:span></text:p>
      <text:p text:style-name="P49"><text:s text:c="12"/></text:p>
      <text:p text:style-name="P49"><text:s text:c="13"/><text:span text:style-name="T5"><text:s/>ROAD RAILERS</text:span></text:p>
      <text:p text:style-name="P46"><text:s text:c="19"/><text:span text:style-name="T72">HR2005 <text:s/></text:span><text:span text:style-name="T65">(99709 97053-3)*</text:span><text:span text:style-name="T72"> <text:s/>7594 </text:span><text:s text:c="17"/></text:p>
      <text:p text:style-name="P46"><text:s text:c="15"/></text:p>
      <text:p text:style-name="P49"><text:s text:c="17"/>TROLLEYS</text:p>
      <text:p text:style-name="P46"><text:span text:style-name="T14"><text:s text:c="15"/></text:span><text:span text:style-name="T6">19XX*</text:span><text:span text:style-name="T14"> 19XX <text:s/>20XX 56 20XX XXXX <text:s/></text:span><text:span text:style-name="T6">(99709 011283)*</text:span> <text:s text:c="14"/></text:p>
      <text:p text:style-name="P46"><text:s text:c="8"/></text:p>
      <text:p text:style-name="P46"><text:s text:c="12"/><text:span text:style-name="T72"><text:s/></text:span><text:span text:style-name="T14">ISLE OF WIGHT STEAM RAILWAY <text:s text:c="2"/>PO33 4DS</text:span></text:p>
      <text:p text:style-name="P46"><text:s text:c="13"/>Ground Coaches</text:p>
      <text:p text:style-name="P46"><text:s text:c="15"/>70014 SR1750 SR1617 6376 SR1783 35 4116 1185 9 </text:p>
      <text:p text:style-name="P46"><text:s text:c="14"/>1075 <text:s/>BARE WOOD1 348 <text:s text:c="12"/></text:p>
      <text:p text:style-name="P46"><text:s text:c="12"/></text:p>
      <text:p text:style-name="P46"><text:s text:c="15"/>4134 6369 4134 2343 SR1603 SR1566 2515 </text:p>
      <text:p text:style-name="P46"><text:s text:c="13"/>SR1046 SR1692 SR2181 6336 <text:s text:c="2"/>2403 SR1930 <text:s text:c="4"/></text:p>
      <text:p text:style-name="P46"><text:s text:c="15"/>SR1458 1019 S210 99014 4589 4115 SR1803 </text:p>
      <text:p text:style-name="P46"><text:s text:c="15"/>4112 6349 10 <text:s/>2403 2416 4168 <text:s/>6378 6369 <text:s/></text:p>
      <text:p text:style-name="P46"><text:s text:c="15"/>21 39 70239 5/6/7/8 6375 4145 2515 <text:s/>38 <text:s text:c="3"/></text:p>
      <text:p text:style-name="P46"><text:s text:c="9"/></text:p>
      <text:p text:style-name="P46"><text:s text:c="18"/><text:span text:style-name="T14"><text:s text:c="2"/>WAGONS IN MUSEUM</text:span></text:p>
      <text:p text:style-name="P61"><text:s text:c="15"/>46923 741934 74 1382 741157 56046 993853</text:p>
      <text:p text:style-name="P3"><text:s text:c="3"/>453374 1343 62888 <text:s/>61056 450157 28345 27936</text:p>
      <text:p text:style-name="P49"><text:s text:c="14"/>60579 <text:s/>59050 59045 429CR 59043 27730 <text:s/>27834 </text:p>
      <text:p text:style-name="P46"><text:s text:c="19"/>483725 15 46924 263276 900103 47726 993103</text:p>
      <text:p text:style-name="P46"><text:s text:c="14"/>453255 70000 452715 <text:s/>59049 63435 <text:s/>483733 </text:p>
      <text:p text:style-name="P46"><text:s text:c="15"/>992804 63437 27884 740232 452219 <text:s/>451341 </text:p>
      <text:p text:style-name="P145"><text:s text:c="2"/><text:span text:style-name="T5"><text:s text:c="2"/>59038 27744 1231 55724 55710 27766 27910</text:span></text:p>
      <text:p text:style-name="P46"><text:s text:c="30"/></text:p>
      <text:p text:style-name="P46"><text:s text:c="17"/><text:span text:style-name="T14">Ground Wagons </text:span></text:p>
      <text:p text:style-name="P46"><text:span text:style-name="T14"><text:s text:c="15"/></text:span><text:span text:style-name="T39">87 3705 <text:s text:c="2"/></text:span></text:p>
      <text:p text:style-name="P46"><text:s text:c="14"/><text:span text:style-name="T14"><text:s/></text:span><text:span text:style-name="T39"><text:s text:c="2"/>STEAMS</text:span></text:p>
      <text:p text:style-name="P69"><text:span text:style-name="T72"><text:s text:c="16"/>32110 41313 41298 32640 CALBOURNE 32646 198 92</text:span> <text:s text:c="3"/></text:p>
      <text:p text:style-name="P22"><text:s text:c="3"/>38 W37</text:p>
      <text:p text:style-name="P46"><text:s text:c="18"/></text:p>
      <text:p text:style-name="P46"><text:s text:c="13"/><text:span text:style-name="T72"><text:s/>DIESELS</text:span></text:p>
      <text:p text:style-name="P61"><text:s text:c="16"/>235 D2059 D2554</text:p>
      <text:p text:style-name="P61"/>
      <text:p text:style-name="P49"><text:s text:c="16"/><text:span text:style-name="T5">ROAD RAILERS</text:span></text:p>
      <text:p text:style-name="P49"><text:s text:c="15"/>XOH2218 68809 <text:s/>68800</text:p>
      <text:p text:style-name="P61"><text:s text:c="14"/></text:p>
      <text:p text:style-name="P49"><text:s text:c="16"/>WICKHAMS</text:p>
      <text:p text:style-name="P49"><text:s text:c="16"/>6645 6944 68095</text:p>
      <text:p text:style-name="P46"><text:s text:c="17"/></text:p>
      <text:p text:style-name="P4"><text:s text:c="5"/>GEISMAR </text:p>
      <text:p text:style-name="P49"><text:s text:c="16"/>99709 01137-4</text:p>
      <text:p text:style-name="P46"><text:s text:c="12"/></text:p>
      <text:p text:style-name="P46"><text:s text:c="13"/><text:span text:style-name="T72"><text:s/>TROLLEYS</text:span></text:p>
      <text:p text:style-name="P46"><text:s text:c="18"/>XXXX1 XXXX2 XXXX3 XXXX4 <text:s/>lROMAN 6 </text:p>
      <text:p text:style-name="P46"><text:s text:c="7"/></text:p>
      <text:p text:style-name="P4">CRANE </text:p>
      <text:p text:style-name="P46"><text:s text:c="15"/>429</text:p>
      <text:p text:style-name="P61"><text:s text:c="14"/></text:p>
      <text:p text:style-name="P46"><text:s text:c="14"/><text:span text:style-name="T72"><text:s text:c="2"/>KEIGHLEY <text:s text:c="3"/>BD21 4HT</text:span></text:p>
      <text:p text:style-name="P46"><text:s text:c="16"/>Ground coach </text:p>
      <text:p text:style-name="P49"><text:s text:c="18"/><text:span text:style-name="T65">1867*</text:span> <text:s text:c="8"/></text:p>
      <text:p text:style-name="P49"><text:s text:c="20"/></text:p>
      <text:p text:style-name="P49"><text:span text:style-name="T5"><text:s text:c="15"/></text:span><text:span text:style-name="T6">1013</text:span><text:span text:style-name="T5"> </text:span><text:span text:style-name="T6">1824</text:span><text:span text:style-name="T5"> </text:span><text:span text:style-name="T6">1836</text:span><text:span text:style-name="T5"> </text:span><text:span text:style-name="T6">1963</text:span><text:span text:style-name="T5"> 4304 </text:span><text:span text:style-name="T6">4306</text:span><text:span text:style-name="T5"> </text:span><text:span text:style-name="T6">4467</text:span><text:span text:style-name="T5"> </text:span><text:span text:style-name="T6">4588 </text:span><text:span text:style-name="T5">4774</text:span></text:p>
      <text:p text:style-name="P61"><text:s text:c="16"/><text:span text:style-name="T65">4840*</text:span> <text:span text:style-name="T65">4900</text:span> <text:span text:style-name="T65">4955*</text:span> <text:span text:style-name="T65">9273*</text:span> <text:span text:style-name="T65">279*</text:span> <text:span text:style-name="T65">48018</text:span> 80591 <text:s/>1474 <text:span text:style-name="T65">1507*</text:span></text:p>
      <text:p text:style-name="P46"><text:s text:c="16"/>43003 <text:s/><text:span text:style-name="T65"><text:s/>1963</text:span><text:span text:style-name="T72"> <text:s text:c="2"/></text:span><text:span text:style-name="T65">43128*</text:span> <text:span text:style-name="T65">43345*</text:span> <text:span text:style-name="T65">46157*</text:span> <text:span text:style-name="T65">48011</text:span> <text:span text:style-name="T65">80796</text:span> </text:p>
      <text:p text:style-name="P46"><text:span text:style-name="T14"><text:s text:c="18"/></text:span><text:span text:style-name="T6">8761</text:span><text:span text:style-name="T14"> 12066 12244 </text:span><text:span text:style-name="T6">31082</text:span><text:span text:style-name="T14"> <text:s/></text:span><text:span text:style-name="T6">70470*</text:span><text:span text:style-name="T14"> </text:span><text:span text:style-name="T6">261</text:span><text:span text:style-name="T14"> </text:span><text:span text:style-name="T6">262*</text:span><text:span text:style-name="T14"> </text:span><text:span text:style-name="T6">1661*</text:span></text:p>
      <text:p text:style-name="P46"><text:s text:c="15"/>589 2856 427 509 358 <text:span text:style-name="T65">sr1304</text:span><text:span text:style-name="T72"> <text:s text:c="2"/></text:span><text:span text:style-name="T65"><text:s/>sr1550</text:span><text:span text:style-name="T72"> </text:span><text:span text:style-name="T65">35475</text:span></text:p>
      <text:p text:style-name="P49"><text:span text:style-name="T14"><text:s text:c="15"/>81013 154 1469 3554 </text:span><text:span text:style-name="T6">46145uf</text:span><text:span text:style-name="T14"> <text:s/></text:span><text:span text:style-name="T6">47*</text:span><text:span text:style-name="T14"> </text:span><text:span text:style-name="T6">sr1125</text:span><text:span text:style-name="T14"> </text:span><text:span text:style-name="T6">sr1334*</text:span><text:span text:style-name="T14"> <text:s/></text:span></text:p>
      <text:p text:style-name="P61"><text:s text:c="16"/></text:p>
      <text:p text:style-name="P69"/>
      <text:p text:style-name="P51"><text:span text:style-name="T5"><text:s text:c="17"/></text:span><text:span text:style-name="T14"><text:s/>GROUND WAGONS</text:span></text:p>
      <text:p text:style-name="P46"><text:span text:style-name="T72"><text:s text:c="18"/>780623 </text:span><text:span text:style-name="T65">887156 </text:span><text:s text:c="4"/></text:p>
      <text:p text:style-name="P36"><text:s text:c="14"/></text:p>
      <text:p text:style-name="P46"><text:s text:c="17"/><text:span text:style-name="T72"><text:s/></text:span><text:span text:style-name="T14">WAGONS </text:span></text:p>
      <text:p text:style-name="P46"><text:s text:c="16"/><text:span text:style-name="T65">757430</text:span> <text:span text:style-name="T65">768645</text:span> 1854 <text:span text:style-name="T65">44002</text:span> <text:span text:style-name="T65">457878</text:span> <text:span text:style-name="T65">732887 </text:span></text:p>
      <text:p text:style-name="P46"><text:s text:c="16"/><text:span text:style-name="T65">931692</text:span> <text:span text:style-name="T65">230927*</text:span> <text:span text:style-name="T65">230965</text:span> <text:span text:style-name="T65">87582</text:span> <text:span text:style-name="T65">951634</text:span> <text:span text:style-name="T65">87706 </text:span></text:p>
      <text:p text:style-name="P46"><text:s text:c="16"/><text:span text:style-name="T65">92977</text:span> <text:span text:style-name="T65">980114*</text:span> <text:span text:style-name="T65">106739</text:span> <text:span text:style-name="T65">5066</text:span> <text:span text:style-name="T65">311756</text:span> <text:span text:style-name="T65">933947</text:span></text:p>
      <text:p text:style-name="P61"><text:s text:c="15"/>904133 <text:span text:style-name="T65">900802</text:span> 56287 <text:span text:style-name="T65"><text:s/>950179</text:span> <text:s text:c="2"/><text:span text:style-name="T65">996581*</text:span> 5281 </text:p>
      <text:p text:style-name="P46"><text:s text:c="17"/><text:span text:style-name="T65">764071</text:span> <text:span text:style-name="T65">299853cr</text:span> <text:s text:c="2"/><text:span text:style-name="T65">299851cr</text:span><text:span text:style-name="T72"> <text:s/></text:span><text:span text:style-name="T65">87948</text:span><text:span text:style-name="T72"> </text:span><text:span text:style-name="T65">900916</text:span></text:p>
      <text:p text:style-name="P46"><text:span text:style-name="T72"><text:s text:c="14"/></text:span><text:span text:style-name="T65"><text:s/>881839*</text:span><text:span text:style-name="T72"> </text:span><text:span text:style-name="T65">263298</text:span><text:span text:style-name="T72"> <text:s/></text:span><text:span text:style-name="T65">784404 </text:span><text:span text:style-name="T72"><text:s text:c="2"/></text:span><text:span text:style-name="T65">755466 </text:span><text:span text:style-name="T72"><text:s/></text:span><text:span text:style-name="T65">122615</text:span><text:span text:style-name="T72"> </text:span></text:p>
      <text:p text:style-name="P46"><text:s text:c="14"/>lner dolpon<text:span text:style-name="T65"> 989388</text:span> <text:span text:style-name="T65">992926</text:span> <text:span text:style-name="T65">983230*</text:span><text:span text:style-name="T72"> <text:s/></text:span><text:span text:style-name="T65">70279cr</text:span> </text:p>
      <text:p text:style-name="P46"><text:s text:c="15"/><text:span text:style-name="T72">782892 </text:span><text:span text:style-name="T65">780938</text:span><text:span text:style-name="T72"> </text:span><text:span text:style-name="T65">778980</text:span><text:span text:style-name="T72"> </text:span><text:span text:style-name="T65">777427</text:span></text:p>
      <text:p text:style-name="P49"><text:s text:c="14"/><text:span text:style-name="T65">764071</text:span> <text:span text:style-name="T65">588438</text:span> 279900 <text:span text:style-name="T65">122615</text:span></text:p>
      <text:p text:style-name="P46"><text:s text:c="15"/><text:span text:style-name="T72"><text:s/></text:span></text:p>
      <text:p text:style-name="P49"><text:s text:c="15"/>DIESELS</text:p>
      <text:p text:style-name="P142"><text:s text:c="17"/><text:span text:style-name="T65">08266**</text:span> <text:span text:style-name="T65">20031*</text:span> <text:span text:style-name="T65">D2511</text:span> <text:s/><text:span text:style-name="T65">37075</text:span> <text:s text:c="2"/><text:span text:style-name="T65">25059</text:span> <text:span text:style-name="T65">2699*</text:span> <text:span text:style-name="T65">D226*</text:span> </text:p>
      <text:p text:style-name="P49"><text:s text:c="16"/><text:span text:style-name="T5"><text:s text:c="5"/>D761 </text:span><text:span text:style-name="T6">431763</text:span><text:span text:style-name="T5"> 08993 </text:span></text:p>
      <text:p text:style-name="P46"/>
      <text:p text:style-name="P46"><text:s text:c="17"/>STEAMS IN MUSEUM</text:p>
      <text:p text:style-name="P46"><text:s text:c="17"/><text:span text:style-name="T65">402</text:span> 679 <text:span text:style-name="T65">47279*</text:span> <text:span text:style-name="T65">5775*</text:span> <text:span text:style-name="T65">48431</text:span> <text:s/><text:span text:style-name="T65">(68 <text:s/>51218)*</text:span></text:p>
      <text:p text:style-name="P49"><text:s text:c="19"/><text:span text:style-name="T65">80002</text:span> <text:s text:c="2"/><text:span text:style-name="T65">(1782 118)*</text:span></text:p>
      <text:p text:style-name="P46"><text:s text:c="12"/></text:p>
      <text:p text:style-name="P49"><text:s text:c="21"/>STEAMS</text:p>
      <text:p text:style-name="P46"><text:s text:c="16"/>7069 2258 <text:span text:style-name="T65">45596</text:span> <text:span text:style-name="T65">43924</text:span> <text:span text:style-name="T65">41241</text:span> 1989 5820 <text:span text:style-name="T65">85*</text:span> 957 </text:p>
      <text:p text:style-name="P49"><text:s text:c="16"/><text:span text:style-name="T65">90733</text:span> <text:s text:c="2"/><text:span text:style-name="T65">78</text:span></text:p>
      <text:p text:style-name="P7"/>
      <text:p text:style-name="P49"><text:s text:c="8"/></text:p>
      <text:p text:style-name="P49"><text:s text:c="10"/>DMUS</text:p>
      <text:p text:style-name="P61"><text:s text:c="16"/>79962 79964 <text:span text:style-name="T65">51565</text:span> <text:span text:style-name="T65">50928</text:span> <text:span text:style-name="T65">51189</text:span> <text:span text:style-name="T65">144011</text:span> <text:span text:style-name="T65">51803</text:span> <text:span text:style-name="T65">143625</text:span></text:p>
      <text:p text:style-name="P148"><text:s text:c="8"/></text:p>
      <text:p text:style-name="P61"><text:s text:c="16"/>TROLLEY</text:p>
      <text:p text:style-name="P51"><text:span text:style-name="T5"><text:s text:c="17"/></text:span><text:span text:style-name="T6"><text:s/>XXXX</text:span></text:p>
      <text:p text:style-name="P46"><text:s text:c="14"/></text:p>
      <text:p text:style-name="P49"><text:s text:c="18"/></text:p>
      <text:p text:style-name="P4"><text:s text:c="3"/><text:span text:style-name="T5">CRANES</text:span></text:p>
      <text:p text:style-name="P14"><text:s text:c="18"/>80111 81341<text:span text:style-name="T65"> 95203*</text:span> <text:span text:style-name="T65">95206</text:span></text:p>
      <text:p text:style-name="P14"><text:s text:c="3"/></text:p>
      <text:p text:style-name="P61"><text:s text:c="21"/>KEITH DUFFTOWN <text:s text:c="3"/>AB55 4BA</text:p>
      <text:p text:style-name="P46"><text:s text:c="18"/>COACHES <text:s/></text:p>
      <text:p text:style-name="P61"><text:s text:c="18"/><text:span text:style-name="T65">81295*</text:span> <text:span text:style-name="T65">25430*</text:span> <text:s/><text:span text:style-name="T65"><text:s/>6053*</text:span> <text:s text:c="3"/></text:p>
      <text:p text:style-name="P148"><text:s text:c="3"/></text:p>
      <text:p text:style-name="P3"><text:span text:style-name="T72"><text:s/></text:span><text:s text:c="6"/><text:span text:style-name="T72"><text:s/>Ground Wagons</text:span></text:p>
      <text:p text:style-name="P3"><text:span text:style-name="T72"><text:s text:c="9"/></text:span><text:span text:style-name="T65">512904*</text:span><text:span text:style-name="T72"> nbr </text:span><text:s/></text:p>
      <text:p text:style-name="P61"><text:s text:c="14"/></text:p>
      <text:p text:style-name="P144"><text:s text:c="3"/><text:span text:style-name="T65">993309*</text:span><text:span text:style-name="T72"> </text:span><text:span text:style-name="T65">996996*</text:span><text:span text:style-name="T72"> </text:span><text:span text:style-name="T65">954819*</text:span><text:span text:style-name="T72"> <text:s/></text:span><text:span text:style-name="T65">905112*</text:span><text:span text:style-name="T72"> <text:s/></text:span><text:span text:style-name="T65">30420*</text:span></text:p>
      <text:p text:style-name="P46"><text:s text:c="15"/><text:span text:style-name="T65">30418*</text:span> <text:span text:style-name="T65">988411*</text:span> <text:span text:style-name="T65">988241</text:span> <text:span text:style-name="T65">953691uf*</text:span> <text:span text:style-name="T65"><text:s/>998017*</text:span></text:p>
      <text:p text:style-name="P49"><text:span text:style-name="T5"><text:s text:c="15"/></text:span><text:span text:style-name="T6">072567*</text:span><text:span text:style-name="T5"> KDR50</text:span></text:p>
      <text:p text:style-name="P46"><text:s text:c="14"/></text:p>
      <text:p text:style-name="P4"><text:s/>DIESELS</text:p>
      <text:p text:style-name="P46"><text:s text:c="14"/><text:span text:style-name="T65"><text:s/>415*</text:span> <text:span text:style-name="T65">D1193</text:span> <text:span text:style-name="T65">D1844*</text:span></text:p>
      <text:p text:style-name="P46"><text:s text:c="16"/></text:p>
      <text:p text:style-name="P46"><text:s text:c="21"/>DMUS</text:p>
      <text:p text:style-name="P46"><text:s text:c="18"/><text:span text:style-name="T65">52053</text:span> <text:span text:style-name="T65">56491</text:span> <text:span text:style-name="T65">54224</text:span> <text:span text:style-name="T65">53628</text:span> <text:span text:style-name="T65">51568</text:span> <text:span text:style-name="T65">55500</text:span> <text:span text:style-name="T65">55501</text:span></text:p>
      <text:p text:style-name="P145"><text:span text:style-name="T72"><text:s text:c="9"/></text:span><text:span text:style-name="T65">144011</text:span><text:span text:style-name="T72"> </text:span><text:span text:style-name="T65">144022</text:span></text:p>
      <text:p text:style-name="P46"><text:s text:c="19"/><text:span text:style-name="T72"><text:s/></text:span></text:p>
      <text:p text:style-name="P3"/>
      <text:p text:style-name="P4"><text:s text:c="3"/>ROAD RAILERS</text:p>
      <text:p text:style-name="P50"><text:span text:style-name="T72"><text:s text:c="15"/></text:span>252180*<text:span text:style-name="T72"> </text:span>244095<text:span text:style-name="T72"> </text:span>K24 AXN*<text:span text:style-name="T72"> </text:span>80505*<text:span text:style-name="T72"> <text:s/></text:span></text:p>
      <text:p text:style-name="P49"/>
      <text:p text:style-name="P49"><text:s text:c="12"/>TROLLEY</text:p>
      <text:p text:style-name="P49"><text:s text:c="18"/><text:span text:style-name="T65">19XX</text:span></text:p>
      <text:p text:style-name="P49"><text:s text:c="14"/></text:p>
      <text:p text:style-name="P49"><text:s text:c="14"/></text:p>
      <text:p text:style-name="P46"><text:s text:c="12"/><text:span text:style-name="T72"><text:s/>KENT EAST SUSSEX <text:s text:c="4"/>TN30 6HE</text:span></text:p>
      <text:p text:style-name="P46"><text:s text:c="17"/>Ground Coaches </text:p>
      <text:p text:style-name="P49"><text:s text:c="17"/>1145 <text:s/>3448 <text:s/><text:span text:style-name="T6">94772*</text:span><text:span text:style-name="T5"> <text:s/></text:span><text:span text:style-name="T6">24157*</text:span><text:span text:style-name="T5"> <text:s/></text:span><text:span text:style-name="T6">93717*</text:span><text:span text:style-name="T5"> </text:span><text:span text:style-name="T40"><text:s/></text:span><text:span text:style-name="T5">219 </text:span></text:p>
      <text:p text:style-name="P49"><text:s text:c="16"/><text:span text:style-name="T5">4355</text:span><text:span text:style-name="T40"> </text:span><text:span text:style-name="T6">21275** </text:span><text:span text:style-name="T5">21238 15927 35079 </text:span><text:span text:style-name="T6">9269*</text:span></text:p>
      <text:p text:style-name="P61"><text:s text:c="17"/><text:span text:style-name="T65">92303*</text:span> <text:span text:style-name="T65">4640*</text:span> <text:s/>3753 1972 1869 4432 1808</text:p>
      <text:p text:style-name="P7"><text:span text:style-name="T72"><text:s text:c="2"/>304 9254 5618 5153 25446 </text:span><text:span text:style-name="T5">37011*</text:span><text:span text:style-name="T14"> </text:span><text:span text:style-name="T5">4443*</text:span></text:p>
      <text:p text:style-name="P46"><text:span text:style-name="T14"><text:s text:c="16"/></text:span><text:span text:style-name="T72"><text:s/></text:span>1213 37311 1119fo 2497 uf 7798 uf sr1745<text:span text:style-name="T72"> </text:span><text:span text:style-name="T6">1955*</text:span></text:p>
      <text:p text:style-name="P61"><text:s text:c="18"/>sr1770 7400uf <text:s/>2439 1218 355 <text:s/>7 959 <text:s/>27687 132</text:p>
      <text:p text:style-name="P4"><text:s text:c="3"/><text:span text:style-name="T6">100*</text:span><text:span text:style-name="T5"> </text:span>91 11 1106 <text:span text:style-name="T65">177</text:span> <text:span text:style-name="T6">3062* </text:span>49 <text:span text:style-name="T6">2947*</text:span><text:span text:style-name="T5"> </text:span><text:span text:style-name="T6">92936</text:span><text:span text:style-name="T5"> </text:span><text:span text:style-name="T6">185</text:span><text:span text:style-name="T5"> </text:span></text:p>
      <text:p text:style-name="P49"><text:span text:style-name="T5"><text:s text:c="16"/>21245 <text:s text:c="4"/></text:span><text:span text:style-name="T6">184*</text:span><text:span text:style-name="T5"> </text:span><text:span text:style-name="T6">6197*</text:span><text:span text:style-name="T5"> </text:span><text:span text:style-name="T6">353*</text:span><text:span text:style-name="T5"> </text:span><text:span text:style-name="T40"><text:s text:c="2"/></text:span><text:span text:style-name="T6">ED33*</text:span><text:span text:style-name="T5"> 1100</text:span></text:p>
      <text:p text:style-name="P46"><text:s text:c="14"/></text:p>
      <text:p text:style-name="P61"/>
      <text:p text:style-name="P46"><text:s text:c="15"/><text:span text:style-name="T14"><text:s text:c="4"/>GROUND WAGONS</text:span></text:p>
      <text:p text:style-name="P46"><text:span text:style-name="T14"><text:s text:c="17"/></text:span><text:span text:style-name="T6">887013*</text:span><text:span text:style-name="T14"> </text:span><text:span text:style-name="T6">2487*</text:span><text:span text:style-name="T14"> 12T 12T 12T 12T 12T CONTAINER </text:span><text:s text:c="6"/></text:p>
      <text:p text:style-name="P61"><text:s text:c="12"/></text:p>
      <text:p text:style-name="P3"/>
      <text:p text:style-name="P14"><text:s text:c="2"/>WAGONS </text:p>
      <text:p text:style-name="P46"><text:s text:c="18"/>982446<text:span text:style-name="T5"> </text:span><text:span text:style-name="T6">360327**</text:span> 47749 <text:span text:style-name="T6">993610*</text:span><text:span text:style-name="T14"> </text:span><text:span text:style-name="T6">994457*</text:span></text:p>
      <text:p text:style-name="P46"><text:span text:style-name="T14"><text:s text:c="17"/></text:span><text:span text:style-name="T6">993620*</text:span><text:span text:style-name="T72"> </text:span><text:span text:style-name="T6">989284*</text:span><text:span text:style-name="T14"> <text:s/>515184 501348 </text:span><text:span text:style-name="T6">103686*</text:span><text:span text:style-name="T42"> </text:span></text:p>
      <text:p text:style-name="P46"><text:span text:style-name="T42"><text:s text:c="17"/></text:span><text:span text:style-name="T14">756620 114 904011</text:span><text:span text:style-name="T53"> <text:s/></text:span><text:span text:style-name="T14">501818 993605</text:span></text:p>
      <text:p text:style-name="P46"><text:s text:c="13"/><text:span text:style-name="T6">989104*</text:span><text:span text:style-name="T5"> <text:s text:c="2"/>17436 </text:span><text:span text:style-name="T6">61103 </text:span><text:span text:style-name="T5">155</text:span><text:span text:style-name="T40"> <text:s/></text:span><text:span text:style-name="T5">63013 <text:s/>137 28966</text:span></text:p>
      <text:p text:style-name="P46"><text:s text:c="12"/><text:span text:style-name="T52"><text:s text:c="2"/></text:span><text:span text:style-name="T6">1151*</text:span><text:span text:style-name="T5"> 943904 </text:span><text:span text:style-name="T6">7522</text:span><text:span text:style-name="T5"> </text:span><text:span text:style-name="T6">107</text:span><text:span text:style-name="T5"> </text:span><text:span text:style-name="T6">62862**</text:span><text:span text:style-name="T5"> 932502</text:span></text:p>
      <text:p text:style-name="P46"><text:s text:c="10"/><text:span text:style-name="T52"><text:s text:c="2"/></text:span><text:span text:style-name="T5"><text:s text:c="4"/>741895 905096 <text:s text:c="2"/>900427 5945 13651 135</text:span></text:p>
      <text:p text:style-name="P46"><text:s text:c="18"/>2338 993210 3141cr <text:span text:style-name="T6">730242*</text:span><text:span text:style-name="T72"> </text:span>7438<text:span text:style-name="T14"> 70003cr</text:span></text:p>
      <text:p text:style-name="P46"><text:s text:c="17"/><text:span text:style-name="T6">994441*</text:span><text:span text:style-name="T14"> </text:span><text:span text:style-name="T6">11530**</text:span><text:span text:style-name="T14"> </text:span><text:span text:style-name="T6"><text:s/>943401**</text:span> <text:span text:style-name="T6">460168**</text:span><text:span text:style-name="T14"> 25xx</text:span></text:p>
      <text:p text:style-name="P61"><text:s text:c="18"/>733694 <text:span text:style-name="T65">460575**</text:span> 2010 <text:s/>153 </text:p>
      <text:p text:style-name="P82"><text:s text:c="13"/></text:p>
      <text:p text:style-name="P46"><text:span text:style-name="T14"><text:s/></text:span><text:s text:c="14"/><text:span text:style-name="T72"><text:s/>DIESELS</text:span></text:p>
      <text:p text:style-name="P49"><text:span text:style-name="T5"><text:s text:c="16"/></text:span><text:span text:style-name="T6">1MV*</text:span><text:span text:style-name="T5"> </text:span><text:span text:style-name="T6">25244</text:span><text:span text:style-name="T5"> </text:span><text:span text:style-name="T6">08108</text:span><text:span text:style-name="T5"> </text:span><text:span text:style-name="T6">08888</text:span><text:span text:style-name="T5"> </text:span><text:span text:style-name="T9">D6570</text:span><text:span text:style-name="T11"> </text:span><text:span text:style-name="T9">423661**</text:span></text:p>
      <text:p text:style-name="P61"><text:s text:c="17"/><text:span text:style-name="T65">D9504</text:span> <text:span text:style-name="T65">D2023*</text:span> D202 <text:s text:c="3"/></text:p>
      <text:p text:style-name="P4"><text:s text:c="3"/></text:p>
      <text:p text:style-name="P46"><text:s text:c="14"/><text:span text:style-name="T72"><text:s text:c="2"/></text:span><text:span text:style-name="T14">STEAMS</text:span></text:p>
      <text:p text:style-name="P68"><text:span text:style-name="T40"><text:s text:c="15"/></text:span><text:span text:style-name="T65">6619*</text:span>32670 32678 5753 30065 5668 4253 1638</text:p>
      <text:p text:style-name="P61"><text:span text:style-name="T52"><text:s text:c="17"/></text:span><text:span text:style-name="T65">376</text:span> <text:span text:style-name="T65">3797*</text:span> <text:span text:style-name="T65">1631**</text:span> <text:span text:style-name="T65">300</text:span> <text:span text:style-name="T65">3791</text:span></text:p>
      <text:p text:style-name="P67"/>
      <text:p text:style-name="P4"><text:s text:c="2"/>ROAD RAILER</text:p>
      <text:p text:style-name="P61"><text:s text:c="16"/>6603 <text:s text:c="3"/></text:p>
      <text:p text:style-name="P46"><text:s text:c="14"/><text:span text:style-name="T14"><text:s text:c="5"/></text:span></text:p>
      <text:p text:style-name="P144"><text:s text:c="4"/><text:span text:style-name="T40"><text:s/></text:span><text:span text:style-name="T14">WICKHAM</text:span></text:p>
      <text:p text:style-name="P46"><text:span text:style-name="T14"><text:s text:c="16"/></text:span><text:span text:style-name="T6">7438*</text:span></text:p>
      <text:p text:style-name="P67"/>
      <text:p text:style-name="P61"><text:s text:c="18"/>TAMPERS</text:p>
      <text:p text:style-name="P148"><text:s text:c="14"/><text:span text:style-name="T65">98211</text:span><text:span text:style-name="T40"> </text:span><text:s/>74108</text:p>
      <text:p text:style-name="P46"><text:span text:style-name="T72"><text:s text:c="16"/></text:span><text:s text:c="3"/></text:p>
      <text:p text:style-name="P14"><text:s text:c="2"/>TRACK MACHINES</text:p>
      <text:p text:style-name="P46"><text:span text:style-name="T14"><text:s text:c="15"/></text:span><text:span text:style-name="T6">77329</text:span><text:span text:style-name="T14"> </text:span><text:span text:style-name="T6">73434</text:span></text:p>
      <text:p text:style-name="P67"/>
      <text:p text:style-name="P46"><text:s text:c="13"/><text:span text:style-name="T5"><text:s/>TROLLEYS</text:span></text:p>
      <text:p text:style-name="P144"><text:s text:c="8"/>673 <text:s/>PLUMP TROLLEY <text:s/>STS525 <text:s/>CTS1549 <text:s/>L111 EED </text:p>
      <text:p text:style-name="P46"><text:s text:c="8"/></text:p>
      <text:p text:style-name="P68"><text:s text:c="16"/>DMUS</text:p>
      <text:p text:style-name="P61"><text:s text:c="16"/>50971<text:span text:style-name="T40"> </text:span><text:span text:style-name="T65">51571*</text:span> <text:span text:style-name="T65">W20</text:span></text:p>
      <text:p text:style-name="P46"><text:s text:c="12"/><text:span text:style-name="T72"><text:s text:c="5"/></text:span></text:p>
      <text:p text:style-name="P14"><text:s text:c="5"/>CRANES</text:p>
      <text:p text:style-name="P61"><text:s text:c="15"/>80135 95201</text:p>
      <text:p text:style-name="P46"><text:s text:c="5"/><text:span text:style-name="T72"><text:s text:c="7"/></text:span></text:p>
      <text:p text:style-name="P46"><text:s text:c="16"/><text:span text:style-name="T14">KINGDOM OF FIFE <text:s text:c="5"/>KY8 4RB</text:span></text:p>
      <text:p text:style-name="P46"><text:s text:c="14"/></text:p>
      <text:p text:style-name="P144"><text:s text:c="3"/><text:span text:style-name="T72"><text:s text:c="7"/>COACHES</text:span></text:p>
      <text:p text:style-name="P61"><text:s text:c="19"/><text:span text:style-name="T65">4223</text:span> 5010 <text:span text:style-name="T65">14010</text:span></text:p>
      <text:p text:style-name="P46"><text:s text:c="14"/></text:p>
      <text:p text:style-name="P46"><text:s text:c="14"/><text:span text:style-name="T72"><text:s text:c="2"/>Ground Wagons</text:span></text:p>
      <text:p text:style-name="P14"><text:s text:c="3"/><text:span text:style-name="T65">12T*</text:span> <text:span text:style-name="T65">12T*</text:span> <text:span text:style-name="T65">MR*</text:span></text:p>
      <text:p text:style-name="P17"/>
      <text:p text:style-name="P46"><text:s text:c="13"/><text:span text:style-name="T14"><text:s text:c="2"/>21117 993875 <text:s/></text:span><text:span text:style-name="T6">7948</text:span><text:span text:style-name="T14"> </text:span><text:span text:style-name="T6">1185</text:span><text:span text:style-name="T14"> 28XX </text:span><text:span text:style-name="T6">47112</text:span><text:span text:style-name="T14"> 987132 4550 </text:span></text:p>
      <text:p text:style-name="P49"><text:span text:style-name="T5"><text:s text:c="15"/></text:span><text:span text:style-name="T6">7926</text:span><text:span text:style-name="T5"> 522 5263 D5N </text:span><text:span text:style-name="T6">5 PLANK OPED</text:span><text:span text:style-name="T5"> TR1 TR2</text:span></text:p>
      <text:p text:style-name="P61"><text:s text:c="13"/>8 PLANK OPED</text:p>
      <text:p text:style-name="P49"><text:s text:c="15"/></text:p>
      <text:p text:style-name="P61"><text:s text:c="14"/>DIESELS</text:p>
      <text:p text:style-name="P14"><text:s text:c="4"/>449753 431764 421415 313390 27591 27421</text:p>
      <text:p text:style-name="P49"><text:s text:c="16"/></text:p>
      <text:p text:style-name="P46"><text:s text:c="15"/><text:span text:style-name="T14">DMU</text:span></text:p>
      <text:p text:style-name="P46"><text:s text:c="10"/>52029</text:p>
      <text:p text:style-name="P46"/>
      <text:p text:style-name="P97"><text:span text:style-name="T82"><text:s text:c="13"/></text:span><text:span text:style-name="T28"><text:s text:c="2"/>STEAMS</text:span></text:p>
      <text:p text:style-name="P61"><text:s text:c="13"/>1890 2292 </text:p>
      <text:p text:style-name="P61"/>
      <text:p text:style-name="P49"><text:s text:c="17"/><text:span text:style-name="T5"><text:s/>TROLLEY</text:span></text:p>
      <text:p text:style-name="P4"><text:span text:style-name="T5"><text:s text:c="5"/>XXXX </text:span><text:span text:style-name="T32"><text:s/></text:span><text:span text:style-name="T5"><text:s text:c="2"/></text:span><text:s/></text:p>
      <text:p text:style-name="P148"><text:s text:c="7"/></text:p>
      <text:p text:style-name="P155"/>
      <text:p text:style-name="P61"><text:s text:c="13"/>LAKESIDE <text:s/>RAILWAY <text:s/>LA12 8AL</text:p>
      <text:p text:style-name="P46"><text:s text:c="17"/>COACHES</text:p>
      <text:p text:style-name="P46"><text:s text:c="16"/>4760 4410 4255 3962 3881 35309 35330 9218 </text:p>
      <text:p text:style-name="P61"><text:s text:c="19"/>25364 25337 <text:s text:c="4"/></text:p>
      <text:p text:style-name="P46"><text:s text:c="13"/></text:p>
      <text:p text:style-name="P4"><text:s text:c="6"/>WAGONS</text:p>
      <text:p text:style-name="P35"><text:span text:style-name="T72"><text:s text:c="14"/></text:span><text:span text:style-name="T69"><text:s text:c="4"/>983399 731733 142096 515142 992754 993846</text:span></text:p>
      <text:p text:style-name="P46"><text:s text:c="8"/><text:span text:style-name="T72"><text:s text:c="7"/></text:span><text:span text:style-name="T65">40600</text:span><text:span text:style-name="T72"> 40607 <text:s/>47971 994461 750883 904531</text:span></text:p>
      <text:p text:style-name="P61"><text:s text:c="17"/>2375 706063 923264 200889 200235 46195</text:p>
      <text:p text:style-name="P46"><text:s text:c="15"/>47693 4w 475083cr bogle well</text:p>
      <text:p text:style-name="P46"/>
      <text:p text:style-name="P46"><text:s text:c="14"/><text:span text:style-name="T14"><text:s text:c="2"/>DIESELS</text:span></text:p>
      <text:p text:style-name="P3"><text:span text:style-name="T72"><text:s text:c="5"/></text:span><text:span text:style-name="T65">20214</text:span><text:span text:style-name="T72"> 03072 AD601 </text:span><text:span text:style-name="T65">2098</text:span><text:span text:style-name="T72"> D2117 <text:s/></text:span><text:s/></text:p>
      <text:p text:style-name="P46"><text:s text:c="19"/></text:p>
      <text:p text:style-name="P46"><text:s text:c="13"/>STEAMS</text:p>
      <text:p text:style-name="P46"><text:span text:style-name="T72"><text:s text:c="16"/>1245 3698 2996 2682 2333 </text:span><text:span text:style-name="T65">46441</text:span><text:span text:style-name="T72"> </text:span><text:span text:style-name="T65">42085</text:span><text:span text:style-name="T72"> 42073</text:span></text:p>
      <text:p text:style-name="P49"/>
      <text:p text:style-name="P49"><text:s text:c="12"/><text:span text:style-name="T5"><text:s/>DMUS</text:span></text:p>
      <text:p text:style-name="P68"><text:s text:c="14"/>52077 52071</text:p>
      <text:p text:style-name="P61"><text:s text:c="10"/></text:p>
      <text:p text:style-name="P46"><text:s text:c="16"/>ROAD RAILER</text:p>
      <text:p text:style-name="P46"><text:s text:c="16"/>Y265 BBC</text:p>
      <text:p text:style-name="P46"><text:s text:c="11"/></text:p>
      <text:p text:style-name="P46"><text:s text:c="16"/>TROLLEY</text:p>
      <text:p text:style-name="P14"><text:s text:c="5"/>XXXX <text:s text:c="2"/></text:p>
      <text:p text:style-name="P61"/>
      <text:p text:style-name="P148"><text:s text:c="3"/></text:p>
      <text:p text:style-name="P148"><text:s text:c="7"/>CRANES</text:p>
      <text:p text:style-name="P148"><text:s text:c="6"/>23 <text:s/>100</text:p>
      <text:p text:style-name="P14"><text:s text:c="5"/></text:p>
      <text:p text:style-name="P4"><text:s/>LAVENDER RAILWAY <text:s text:c="3"/>TN22 5XB</text:p>
      <text:p text:style-name="P46"><text:s text:c="16"/>COACH </text:p>
      <text:p text:style-name="P46"><text:s text:c="16"/><text:span text:style-name="T65">21273</text:span> </text:p>
      <text:p text:style-name="P3"><text:s text:c="14"/></text:p>
      <text:p text:style-name="P4"><text:s text:c="2"/>WAGONS </text:p>
      <text:p text:style-name="P46"><text:s text:c="15"/><text:span text:style-name="T65">4363</text:span> <text:span text:style-name="T65">230107</text:span> <text:span text:style-name="T65">882288 </text:span>783644 7XXXX <text:span text:style-name="T65">HW433</text:span> <text:span text:style-name="T65">60640</text:span> </text:p>
      <text:p text:style-name="P46"><text:s text:c="15"/>61997 <text:span text:style-name="T65">700710</text:span><text:span text:style-name="T72"> 484199 994252 17455 19 </text:span></text:p>
      <text:p text:style-name="P46"><text:s text:c="15"/><text:span text:style-name="T65">400</text:span> <text:span text:style-name="T65">68564</text:span> 98659 <text:s/><text:span text:style-name="T65">47194</text:span></text:p>
      <text:p text:style-name="P50"/>
      <text:p text:style-name="P46"><text:s text:c="10"/><text:span text:style-name="T72"><text:s text:c="8"/>DIESELS</text:span></text:p>
      <text:p text:style-name="P50"><text:span text:style-name="T72"><text:s text:c="15"/></text:span>(D4113 09025)<text:span text:style-name="T72"> <text:s/>354 <text:s/>459517 <text:s/>3658 5257</text:span></text:p>
      <text:p text:style-name="P49"><text:s text:c="15"/></text:p>
      <text:p text:style-name="P61"><text:s text:c="17"/>STEAMS</text:p>
      <text:p text:style-name="P61"><text:span text:style-name="T40"><text:s text:c="12"/></text:span><text:s text:c="4"/>2945 <text:span text:style-name="T65">3837</text:span></text:p>
      <text:p text:style-name="P61"><text:s text:c="12"/></text:p>
      <text:p text:style-name="P46"><text:s text:c="15"/>EMUS</text:p>
      <text:p text:style-name="P3"><text:span text:style-name="T72"><text:s text:c="6"/>977966 977965 977967 </text:span><text:span text:style-name="T65">69333</text:span><text:span text:style-name="T72"> <text:s/></text:span><text:s text:c="2"/></text:p>
      <text:p text:style-name="P68"><text:s text:c="14"/></text:p>
      <text:p text:style-name="P35"><text:span text:style-name="T69"><text:s text:c="16"/></text:span><text:span text:style-name="T67"><text:s/></text:span><text:span text:style-name="T69"><text:s text:c="3"/>DEMUS</text:span></text:p>
      <text:p text:style-name="P49"><text:s text:c="16"/>60832 <text:span text:style-name="T65">60828</text:span> 60820 60151 60122 60117</text:p>
      <text:p text:style-name="P46"/>
      <text:p text:style-name="P46"><text:s text:c="19"/>DMUS</text:p>
      <text:p text:style-name="P46"><text:span text:style-name="T72"><text:s text:c="19"/></text:span><text:span text:style-name="T65">54408</text:span><text:span text:style-name="T72"> <text:s text:c="4"/></text:span><text:span text:style-name="T65">54279</text:span> <text:span text:style-name="T65">999507</text:span> <text:s text:c="5"/></text:p>
      <text:p text:style-name="P49"><text:s text:c="13"/></text:p>
      <text:p text:style-name="P46"><text:s text:c="4"/><text:span text:style-name="T72"><text:s text:c="11"/>ROAD RAILERS</text:span></text:p>
      <text:p text:style-name="P49"><text:s text:c="15"/>7509 (99709 011200-1) (99709 011199-5) 9035 K30371</text:p>
      <text:p text:style-name="P14"><text:s text:c="11"/></text:p>
      <text:p text:style-name="P46"><text:s text:c="8"/><text:span text:style-name="T14"><text:s text:c="8"/>LEICESTER TMD</text:span></text:p>
      <text:p text:style-name="P49"><text:s text:c="14"/><text:span text:style-name="T5"><text:s/>DIESELS</text:span></text:p>
      <text:p text:style-name="P49"><text:s text:c="17"/>37906 <text:span text:style-name="T65">58016</text:span> <text:span text:style-name="T65">56312</text:span> 56098 <text:span text:style-name="T65">50008</text:span> <text:span text:style-name="T65">47848</text:span> 47815</text:p>
      <text:p text:style-name="P49"><text:s text:c="17"/><text:span text:style-name="T65">47727</text:span> 47812 37601 37800 37510 57305 37608</text:p>
      <text:p text:style-name="P4"><text:s text:c="5"/><text:span text:style-name="T65">37905</text:span> <text:s/><text:span text:style-name="T65">47739</text:span> 47813 57312 56106 <text:span text:style-name="T65">37884</text:span> </text:p>
      <text:p text:style-name="P4"><text:s text:c="5"/>37901 <text:s/>33053 <text:span text:style-name="T65">D5410</text:span> <text:s/>58023 <text:span text:style-name="T65">43089</text:span></text:p>
      <text:p text:style-name="P132"><text:s text:c="18"/><text:span text:style-name="T65">43076</text:span> <text:span text:style-name="T65">43052</text:span> <text:s text:c="2"/><text:span text:style-name="T65">56081</text:span> 56303 56301 37611</text:p>
      <text:p text:style-name="P61"><text:s text:c="17"/><text:span text:style-name="T65">47843 </text:span><text:s text:c="2"/>56103 <text:span text:style-name="T65">56091</text:span> 56104 <text:span text:style-name="T65">43048</text:span></text:p>
      <text:p text:style-name="P4"/>
      <text:p text:style-name="P14"><text:s text:c="2"/>LINC0LNSHIRE WOLDS RAILWAY <text:s/>DN36 5SQ</text:p>
      <text:p text:style-name="P46"><text:s text:c="18"/>COACHES</text:p>
      <text:p text:style-name="P46"><text:s text:c="16"/>(975078 34828)<text:span text:style-name="T5"> </text:span><text:span text:style-name="T6">(975468 34553*)</text:span><text:span text:style-name="T14"> </text:span><text:span text:style-name="T65">1949</text:span> 5154 5158</text:p>
      <text:p text:style-name="P61"><text:s text:c="16"/>5161 9393 <text:s/>94444 94600 <text:span text:style-name="T65">380</text:span> S434 35123 13444</text:p>
      <text:p text:style-name="P67"><text:span text:style-name="T72"><text:s text:c="15"/>40713 <text:s text:c="2"/>96162 9384 </text:span>72707<text:span text:style-name="T72"> </text:span></text:p>
      <text:p text:style-name="P46"><text:s text:c="14"/><text:span text:style-name="T72"><text:s text:c="3"/></text:span><text:span text:style-name="T14"><text:s text:c="2"/></text:span></text:p>
      <text:p text:style-name="P46"><text:s text:c="15"/><text:span text:style-name="T14">WAGONS </text:span></text:p>
      <text:p text:style-name="P46"><text:s text:c="18"/>983476 992870 983526 730794 933248 40352</text:p>
      <text:p text:style-name="P49"><text:s text:c="17"/>3017 242 20 38<text:span text:style-name="T5"> </text:span><text:span text:style-name="T6">900935*</text:span><text:span text:style-name="T5"> </text:span>352 355 994279 950847 </text:p>
      <text:p text:style-name="P61"><text:s text:c="18"/>150486 63378 3814 62067492136 55541 784451 </text:p>
      <text:p text:style-name="P4"><text:s/>8174 549931164 203834 187994 954886 210</text:p>
      <text:p text:style-name="P46"><text:s text:c="14"/><text:span text:style-name="T72"><text:s text:c="2"/>206 47705 47715 87612 <text:s/>5a flat e lcl flat</text:span></text:p>
      <text:p text:style-name="P46"><text:s text:c="15"/><text:span text:style-name="T72"><text:s text:c="3"/>87862 oped ex linsey <text:s/>992841</text:span></text:p>
      <text:p text:style-name="P49"/>
      <text:p text:style-name="P46"><text:s text:c="16"/><text:span text:style-name="T72"><text:s/>DIESELS</text:span></text:p>
      <text:p text:style-name="P46"><text:s text:c="16"/><text:span text:style-name="T65">(D3167 08102)</text:span> 421045 3151 5308 375713</text:p>
      <text:p text:style-name="P49"><text:s text:c="17"/>414303 421031 423657 421418</text:p>
      <text:p text:style-name="P49"><text:s text:c="8"/></text:p>
      <text:p text:style-name="P61"><text:s text:c="12"/>STEAMS</text:p>
      <text:p text:style-name="P46"><text:s text:c="2"/><text:span text:style-name="T72"><text:s text:c="14"/></text:span><text:span text:style-name="T65">7597</text:span><text:span text:style-name="T72"> </text:span><text:span text:style-name="T65"><text:s/>1351</text:span> <text:span text:style-name="T65">1749</text:span> 1964 <text:span text:style-name="T65">1313</text:span></text:p>
      <text:p text:style-name="P50"/>
      <text:p text:style-name="P49"><text:s text:c="16"/>TROLLEYS</text:p>
      <text:p text:style-name="P49"><text:s text:c="16"/>19XX 19XX </text:p>
      <text:p text:style-name="P46"><text:s text:c="9"/><text:span text:style-name="T72"><text:s text:c="7"/></text:span></text:p>
      <text:p text:style-name="P49"><text:s text:c="16"/>ROAD RAILERS</text:p>
      <text:p text:style-name="P61"><text:s text:c="16"/>4208 E22LDT <text:s text:c="12"/></text:p>
      <text:p text:style-name="P61"><text:s text:c="13"/></text:p>
      <text:p text:style-name="P14"><text:s text:c="3"/>LLANELLI RAILWAY <text:s/>SA15 5YG</text:p>
      <text:p text:style-name="P46"><text:s text:c="19"/>GROUND COACHES</text:p>
      <text:p text:style-name="P61"><text:s text:c="19"/><text:span text:style-name="T65">1 GWR</text:span> <text:s text:c="2"/><text:span text:style-name="T65">2GWR</text:span> <text:s text:c="8"/></text:p>
      <text:p text:style-name="P46"><text:s text:c="13"/><text:span text:style-name="T72"><text:s text:c="2"/></text:span><text:span text:style-name="T14"><text:s text:c="5"/></text:span><text:span text:style-name="T39"><text:s/></text:span></text:p>
      <text:p text:style-name="P61"><text:s text:c="19"/>1206 </text:p>
      <text:p text:style-name="P61"/>
      <text:p text:style-name="P14"><text:s text:c="7"/>WAGONS</text:p>
      <text:p text:style-name="P46"><text:span text:style-name="T72"><text:s text:c="15"/></text:span><text:span text:style-name="T65">40225*</text:span> <text:span text:style-name="T65">40229</text:span> <text:span text:style-name="T65">48325</text:span> <text:span text:style-name="T65">181058*</text:span> <text:span text:style-name="T65">2135</text:span> <text:span text:style-name="T65">35377*</text:span><text:span text:style-name="T72"> <text:s text:c="2"/></text:span><text:span text:style-name="T65"><text:s/>730579*</text:span></text:p>
      <text:p text:style-name="P69"><text:span text:style-name="T72"><text:s text:c="15"/></text:span><text:span text:style-name="T65">732744</text:span><text:span text:style-name="T72"> 951287 </text:span><text:span text:style-name="T65">187085*</text:span></text:p>
      <text:p text:style-name="P46"><text:s text:c="8"/><text:span text:style-name="T72"><text:s text:c="6"/></text:span></text:p>
      <text:p text:style-name="P49"><text:s text:c="10"/></text:p>
      <text:p text:style-name="P46"><text:s text:c="14"/><text:span text:style-name="T14"><text:s/>DIESELS</text:span></text:p>
      <text:p text:style-name="P35"><text:span text:style-name="T69"><text:s text:c="13"/>73130 <text:s text:c="2"/>394014 </text:span><text:span text:style-name="T68">43056</text:span><text:span text:style-name="T69"> <text:s text:c="2"/>2122 10222 </text:span><text:span text:style-name="T68">08795 </text:span><text:span text:style-name="T67"><text:s text:c="9"/></text:span></text:p>
      <text:p text:style-name="P61"><text:s text:c="12"/></text:p>
      <text:p text:style-name="P49"><text:s text:c="17"/>DMUS </text:p>
      <text:p text:style-name="P49"><text:span text:style-name="T5"><text:s text:c="17"/>960015 </text:span><text:span text:style-name="T6">142006 </text:span><text:span text:style-name="T5">143606 143607 <text:s text:c="2"/>143622</text:span></text:p>
      <text:p text:style-name="P4"><text:s text:c="3"/></text:p>
      <text:p text:style-name="P46"><text:s text:c="16"/><text:span text:style-name="T72"><text:s text:c="4"/>EMUS</text:span></text:p>
      <text:p text:style-name="P46"><text:span text:style-name="T72"><text:s text:c="15"/>126 226 128 <text:s/>228 <text:s/></text:span><text:s text:c="16"/></text:p>
      <text:p text:style-name="P46"><text:s text:c="13"/><text:span text:style-name="T72"><text:s text:c="4"/></text:span></text:p>
      <text:p text:style-name="P61"><text:s text:c="19"/>LLANGOLLEN RAILWAY <text:s text:c="3"/>LL208SN</text:p>
      <text:p text:style-name="P49"><text:s text:c="16"/>GROUND COACHES</text:p>
      <text:p text:style-name="P14"><text:s text:c="4"/><text:span text:style-name="T65">92058</text:span> 3412 SR GREEN</text:p>
      <text:p text:style-name="P61"/>
      <text:p text:style-name="P14"><text:s/>COACHES</text:p>
      <text:p text:style-name="P46"><text:s text:c="16"/>25421 25417 15674 15667 13340 35340</text:p>
      <text:p text:style-name="P46"><text:s text:c="14"/>35188 <text:s/>4702 34584 4316 34537 2132 46130 </text:p>
      <text:p text:style-name="P46"><text:s text:c="15"/>4503 4472 5809 34538 3950 1864 4858 </text:p>
      <text:p text:style-name="P46"><text:s text:c="15"/>94535 94335 43182 1697 174 80975 163 592</text:p>
      <text:p text:style-name="P46"><text:s text:c="15"/>94429 <text:s/>(80471 80741) 80518 48004 46147 </text:p>
      <text:p text:style-name="P46"><text:s text:c="15"/>43034 43012 <text:span text:style-name="T65">46116</text:span> 86622 31343 70250 5102 2216 167 </text:p>
      <text:p text:style-name="P49"><text:s text:c="15"/>52055 16411 15509 53170 1706 SR4588 </text:p>
      <text:p text:style-name="P3"><text:span text:style-name="T104"><text:s/></text:span><text:span text:style-name="T14"><text:s text:c="2"/>(SR435 975672) SR931 </text:span></text:p>
      <text:p text:style-name="P46"><text:s text:c="13"/></text:p>
      <text:p text:style-name="P46"><text:s text:c="19"/></text:p>
      <text:p text:style-name="P61"><text:s text:c="16"/>GROUND WAGONS</text:p>
      <text:p text:style-name="P61"><text:s text:c="17"/>701002 <text:s/>GWR RR BLACK</text:p>
      <text:p text:style-name="P61"/>
      <text:p text:style-name="P3"><text:s text:c="2"/><text:span text:style-name="T72"><text:s/></text:span><text:span text:style-name="T14">96300 774401 767796 <text:s/>024493 501085 311671</text:span></text:p>
      <text:p text:style-name="P61"><text:s text:c="14"/>96112 989118 2625 993056 989636 30 661 51411</text:p>
      <text:p text:style-name="P61"><text:s text:c="15"/>773309 764459 983005 854956 787134 787107 </text:p>
      <text:p text:style-name="P61"><text:s text:c="15"/>993900 <text:s/>183671 729014 982197954027 994771</text:p>
      <text:p text:style-name="P46"><text:s text:c="15"/>230355 506031 51416 43854 2599 183676 992050 </text:p>
      <text:p text:style-name="P49"><text:s text:c="15"/>51410 6467 6463 183978 183683 7496XX 47XX 893 </text:p>
      <text:p text:style-name="P46"><text:s text:c="16"/>950551 954870 114765 68669 35225 17294 992121 </text:p>
      <text:p text:style-name="P49"><text:s text:c="16"/>924649 <text:s text:c="2"/>998001 8953 992387 740883 119 2735</text:p>
      <text:p text:style-name="P46"><text:s text:c="17"/>3066 998002 <text:span text:style-name="T72">119339 RNAD337 932 901 432524 UF </text:span></text:p>
      <text:p text:style-name="P46"><text:s text:c="17"/><text:span text:style-name="T72">950236 17407 30454B <text:s/>982054 48310 6264 741631 </text:span></text:p>
      <text:p text:style-name="P49"><text:s text:c="17"/>94864 749677 PTSO 1 YELLOW RNAD 79 <text:s/>390008CR </text:p>
      <text:p text:style-name="P14"><text:s text:c="17"/>RNAD 313 <text:s/>48384UF</text:p>
      <text:p text:style-name="P49"><text:s text:c="18"/></text:p>
      <text:p text:style-name="P50"/>
      <text:p text:style-name="P4"><text:s text:c="5"/><text:span text:style-name="T5"><text:s/>DIESELS</text:span></text:p>
      <text:p text:style-name="P46"><text:s text:c="14"/>2854 2782 <text:span text:style-name="T72">1901</text:span> <text:span text:style-name="T65">(D5310 26010)</text:span> (13265 08195)</text:p>
      <text:p text:style-name="P61"><text:s text:c="14"/>03162 (D1566 47449)</text:p>
      <text:p text:style-name="P14"><text:s text:c="3"/></text:p>
      <text:p text:style-name="P61"/>
      <text:p text:style-name="P46"><text:span text:style-name="T72"><text:s text:c="15"/></text:span><text:span text:style-name="T14">STEAMS</text:span></text:p>
      <text:p text:style-name="P46"><text:s text:c="14"/>1498 4115 3814 <text:span text:style-name="T72">3802 </text:span><text:span text:style-name="T65">7754</text:span><text:span text:style-name="T72"> 5459 1731 5952 1338</text:span></text:p>
      <text:p text:style-name="P46"><text:span text:style-name="T72"><text:s text:c="13"/></text:span><text:span text:style-name="T65">68030</text:span><text:span text:style-name="T72"> 4709 61673 92212 80072 <text:s/>6430 </text:span><text:span text:style-name="T65">5199</text:span><text:span text:style-name="T72"> </text:span><text:span text:style-name="T65">7822</text:span></text:p>
      <text:p text:style-name="P50"/>
      <text:p text:style-name="P61"><text:s text:c="16"/>DMUS</text:p>
      <text:p text:style-name="P49"><text:s text:c="14"/>54506 <text:s text:c="2"/>51933 50528 50454 50447 50416 </text:p>
      <text:p text:style-name="P3"><text:span text:style-name="T14"><text:s/>50456 <text:s/>51618 <text:s text:c="2"/></text:span><text:span text:style-name="T6"><text:s/>56171</text:span></text:p>
      <text:p text:style-name="P46"><text:s text:c="12"/></text:p>
      <text:p text:style-name="P61"><text:s text:c="10"/>ROAD RAILERS</text:p>
      <text:p text:style-name="P46"><text:s text:c="14"/>XXXX1 XXXX2 XXXX3 XXXX4 XXXX5 XXXX6 XXXX</text:p>
      <text:p text:style-name="P49"><text:s text:c="15"/>XXXX 1HGR230 2HGR 230</text:p>
      <text:p text:style-name="P49"/>
      <text:p text:style-name="P49"><text:s text:c="16"/>CRANES</text:p>
      <text:p text:style-name="P61"><text:s text:c="16"/>81530 96718</text:p>
      <text:p text:style-name="P46"><text:s text:c="11"/></text:p>
      <text:p text:style-name="P46"><text:s text:c="11"/><text:span text:style-name="T14"><text:s text:c="4"/>M M ST <text:s text:c="4"/>M3 4FP</text:span></text:p>
      <text:p text:style-name="P61"><text:s text:c="15"/>COACHES </text:p>
      <text:p text:style-name="P61"><text:s text:c="14"/><text:span text:style-name="T65">1 BLUE</text:span> <text:span text:style-name="T65">7</text:span> <text:span text:style-name="T65">8 </text:span></text:p>
      <text:p text:style-name="P67"/>
      <text:p text:style-name="P46"><text:s text:c="11"/><text:span text:style-name="T14"><text:s text:c="4"/>WAGONS</text:span></text:p>
      <text:p text:style-name="P67"><text:span text:style-name="T72"><text:s text:c="14"/>97217 </text:span>154977<text:span text:style-name="T72"> </text:span>782903<text:span text:style-name="T72"> </text:span>783709<text:span text:style-name="T72"> 950344 </text:span>2703</text:p>
      <text:p text:style-name="P49"><text:s text:c="15"/></text:p>
      <text:p text:style-name="P61"><text:s text:c="14"/>DIESELS</text:p>
      <text:p text:style-name="P49"><text:s text:c="16"/><text:span text:style-name="T65">76039CAB</text:span> <text:s/><text:span text:style-name="T65">1505</text:span> <text:span text:style-name="T65">1378</text:span></text:p>
      <text:p text:style-name="P46"><text:s text:c="14"/></text:p>
      <text:p text:style-name="P4"><text:s text:c="3"/>STEAMS</text:p>
      <text:p text:style-name="P49"><text:span text:style-name="T5"><text:s text:c="15"/></text:span><text:span text:style-name="T6">7416*</text:span><text:span text:style-name="T5"> <text:s text:c="3"/></text:span><text:span text:style-name="T6">9PLANT </text:span><text:span text:style-name="T5"><text:s/></text:span><text:span text:style-name="T6">6639</text:span><text:span text:style-name="T5"> </text:span><text:span text:style-name="T6">2759</text:span><text:span text:style-name="T5"> </text:span><text:span text:style-name="T6">1255</text:span></text:p>
      <text:p text:style-name="P49"><text:s text:c="15"/><text:span text:style-name="T5"><text:s text:c="2"/></text:span></text:p>
      <text:p text:style-name="P46"><text:span text:style-name="T72"><text:s text:c="15"/></text:span><text:s text:c="2"/><text:span text:style-name="T72"><text:s/>MANGAPPS FARM <text:s text:c="4"/>CM0 8QG</text:span></text:p>
      <text:p text:style-name="P46"><text:s text:c="16"/>GROUND COACHES</text:p>
      <text:p text:style-name="P61"><text:s text:c="15"/>155 <text:span text:style-name="T65">347</text:span> <text:span text:style-name="T65">381 </text:span><text:s text:c="7"/></text:p>
      <text:p text:style-name="P4"/>
      <text:p text:style-name="P49"><text:s text:c="17"/>3187 320803 43264 041947 <text:span text:style-name="T65">63875</text:span> <text:span text:style-name="T65">86056</text:span></text:p>
      <text:p text:style-name="P61"><text:s text:c="14"/>5 19066 <text:s text:c="3"/>SR273 <text:s text:c="2"/><text:span text:style-name="T65">4229</text:span> <text:span text:style-name="T65">43178</text:span> 32</text:p>
      <text:p text:style-name="P61"><text:s text:c="7"/></text:p>
      <text:p text:style-name="P14">GROUND WAGONS</text:p>
      <text:p text:style-name="P49"><text:s text:c="14"/>87888 <text:span text:style-name="T65">781176</text:span> 854326 7XXXX 13351 50XXXX 852861 </text:p>
      <text:p text:style-name="P49"><text:s text:c="14"/><text:span text:style-name="T65">33</text:span></text:p>
      <text:p text:style-name="P3"/>
      <text:p text:style-name="P4"><text:s text:c="2"/>87537 141183 952401 902254 116695 612902</text:p>
      <text:p text:style-name="P49"><text:s text:c="17"/>612875 55513 46208 55711 <text:s/><text:span text:style-name="T65">620960</text:span> 891364 <text:s/>568</text:p>
      <text:p text:style-name="P46"><text:s text:c="15"/><text:span text:style-name="T65"><text:s/>280322</text:span> 731638 573852 750340 754863 787000</text:p>
      <text:p text:style-name="P46"><text:s text:c="18"/>1368 1400 82698 323117 530006 87224 <text:s/>850489 </text:p>
      <text:p text:style-name="P46"><text:s text:c="18"/>4 5 6 <text:span text:style-name="T65">548038 </text:span>339296 743664 47 2702702 43</text:p>
      <text:p text:style-name="P46"><text:s text:c="16"/>170890 67246 610 41 278492 11093 <text:s text:c="3"/>196171 40065</text:p>
      <text:p text:style-name="P61"><text:s text:c="16"/><text:span text:style-name="T65">347</text:span> <text:s/>885463 470293 56428 2009 62861</text:p>
      <text:p text:style-name="P63"><text:s text:c="14"/>106523 <text:s/>916139CR <text:span text:style-name="T65">434677</text:span></text:p>
      <text:p text:style-name="P61"><text:s text:c="19"/>DIESELS</text:p>
      <text:p text:style-name="P49"><text:s text:c="19"/><text:span text:style-name="T65">03399</text:span> 47579 31233 AB226 03020 33018 31105</text:p>
      <text:p text:style-name="P61"><text:s text:c="20"/>7502 D1153 <text:s/>11104 <text:s text:c="2"/>D2018 03081 <text:s/>D2325 <text:s/></text:p>
      <text:p text:style-name="P61"><text:s text:c="19"/>03089 </text:p>
      <text:p text:style-name="P49"><text:s text:c="18"/><text:span text:style-name="T5"><text:s/></text:span></text:p>
      <text:p text:style-name="P49"/>
      <text:p text:style-name="P49"><text:s text:c="16"/><text:span text:style-name="T5"><text:s/>STEAMS</text:span></text:p>
      <text:p text:style-name="P49"><text:s text:c="22"/>2087 358 1619 2157 2613</text:p>
      <text:p text:style-name="P46"><text:s text:c="15"/></text:p>
      <text:p text:style-name="P61"><text:s text:c="16"/>EMUS <text:s/></text:p>
      <text:p text:style-name="P46"><text:s text:c="16"/><text:span text:style-name="T65">75033</text:span> <text:span text:style-name="T65">75250</text:span></text:p>
      <text:p text:style-name="P46"><text:s text:c="15"/></text:p>
      <text:p text:style-name="P46"><text:s text:c="16"/><text:span text:style-name="T72"><text:s text:c="4"/>DMUS</text:span></text:p>
      <text:p text:style-name="P49"><text:s text:c="17"/><text:span text:style-name="T65"><text:s/>51381</text:span> <text:s text:c="8"/></text:p>
      <text:p text:style-name="P61"/>
      <text:p text:style-name="P49"><text:s text:c="14"/>TUBE STOCK</text:p>
      <text:p text:style-name="P49"><text:s text:c="18"/><text:span text:style-name="T65"><text:s/>1030</text:span> <text:span text:style-name="T65">22624</text:span> <text:span text:style-name="T65">2044</text:span></text:p>
      <text:p text:style-name="P61"><text:s text:c="12"/></text:p>
      <text:p text:style-name="P49"><text:s text:c="14"/></text:p>
      <text:p text:style-name="P49"><text:s text:c="17"/>TROLLEYS</text:p>
      <text:p text:style-name="P61"><text:s text:c="16"/>PUMP TROLLEY <text:s/>XXXX XXXX</text:p>
      <text:p text:style-name="P3"><text:s text:c="2"/></text:p>
      <text:p text:style-name="P61"><text:s text:c="16"/>ROAD RAILERS</text:p>
      <text:p text:style-name="P61"><text:s text:c="14"/>LLPW 01 <text:s/>2 CYCLES </text:p>
      <text:p text:style-name="P49"><text:s text:c="14"/></text:p>
      <text:p text:style-name="P46"><text:s text:c="14"/><text:span text:style-name="T72">CRANE</text:span></text:p>
      <text:p text:style-name="P61"><text:s text:c="16"/>47 <text:s text:c="2"/></text:p>
      <text:p text:style-name="P46"><text:s text:c="4"/></text:p>
      <text:p text:style-name="P46"><text:s text:c="17"/><text:span text:style-name="T72">MIDDLETON RAILWAY <text:s/>LS10 <text:s/>2JQ</text:span></text:p>
      <text:p text:style-name="P46"><text:s text:c="13"/>COACHES</text:p>
      <text:p text:style-name="P49"><text:s text:c="12"/>1074 1867 2084</text:p>
      <text:p text:style-name="P46"><text:s text:c="12"/></text:p>
      <text:p text:style-name="P46"><text:s text:c="14"/><text:span text:style-name="T72"><text:s text:c="3"/>WAGONS </text:span></text:p>
      <text:p text:style-name="P46"><text:s text:c="12"/>769924 993425 113084 13 6353 88 85133 1 </text:p>
      <text:p text:style-name="P50"><text:span text:style-name="T72"><text:s text:c="12"/></text:span>1758<text:span text:style-name="T72"> 860E 490310 53</text:span><text:span text:style-name="T14"> </text:span><text:span text:style-name="T5">THE HUNSLET E*</text:span></text:p>
      <text:p text:style-name="P46"><text:s text:c="14"/>2 <text:s/>EX NCB LOWMAC<text:span text:style-name="T14"> 158760</text:span></text:p>
      <text:p text:style-name="P61"/>
      <text:p text:style-name="P46"><text:s text:c="2"/><text:span text:style-name="T72"><text:s text:c="16"/></text:span><text:span text:style-name="T14">MUSEUM</text:span></text:p>
      <text:p text:style-name="P46"><text:s text:c="17"/>4220033 3900002 <text:span text:style-name="T65">1786</text:span> D631 D577 91 <text:s/>BP7856 <text:s/></text:p>
      <text:p text:style-name="P49"><text:span text:style-name="T5"><text:s text:c="17"/>6981</text:span><text:span text:style-name="T52"> </text:span><text:span text:style-name="T6">5003**</text:span><text:span text:style-name="T52"> </text:span><text:span text:style-name="T6">D1373**</text:span><text:span text:style-name="T5"> 1697 8505 7274</text:span></text:p>
      <text:p text:style-name="P49"><text:s text:c="11"/></text:p>
      <text:p text:style-name="P46"><text:s text:c="14"/>STEAMS IN MUSEUM</text:p>
      <text:p text:style-name="P49"><text:s text:c="14"/>1882 2387 2103 1309 2110</text:p>
      <text:p text:style-name="P46"><text:span text:style-name="T72"><text:s text:c="18"/></text:span><text:span text:style-name="T65">3860</text:span><text:span text:style-name="T72"> 1544 1684 1601</text:span><text:span text:style-name="T53"> </text:span><text:span text:style-name="T6">1540* </text:span><text:span text:style-name="T72">1493 1369 1210 8837</text:span></text:p>
      <text:p text:style-name="P49"><text:s text:c="14"/>38 648 </text:p>
      <text:p text:style-name="P46"/>
      <text:p text:style-name="P46"><text:s text:c="10"/><text:span text:style-name="T72">ELECTRIC</text:span></text:p>
      <text:p text:style-name="P49"><text:s text:c="13"/>420452</text:p>
      <text:p text:style-name="P49"><text:s text:c="9"/></text:p>
      <text:p text:style-name="P46"><text:s text:c="16"/>TROLLEYS</text:p>
      <text:p text:style-name="P46"><text:s text:c="15"/>XXXX 19XX 19XX</text:p>
      <text:p text:style-name="P49"><text:s text:c="14"/></text:p>
      <text:p text:style-name="P49"><text:s text:c="14"/></text:p>
      <text:p text:style-name="P46"><text:s text:c="9"/>ROAD RAILERS</text:p>
      <text:p text:style-name="P46"><text:span text:style-name="T42"><text:s text:c="12"/></text:span><text:span text:style-name="T6">998901*</text:span><text:span text:style-name="T14"> <text:s/></text:span><text:span text:style-name="T6">74058</text:span><text:span text:style-name="T14"> <text:s/></text:span><text:span text:style-name="T6"><text:s/>74059</text:span></text:p>
      <text:p text:style-name="P46"><text:s text:c="9"/></text:p>
      <text:p text:style-name="P49"><text:s text:c="14"/>CRANES </text:p>
      <text:p text:style-name="P61"><text:span text:style-name="T40"><text:s text:c="13"/></text:span><text:span text:style-name="T65">1*</text:span> <text:s/>5821 <text:s/>20054 24579 <text:span text:style-name="T65">107*</text:span></text:p>
      <text:p text:style-name="P61"><text:s text:c="13"/></text:p>
      <text:p text:style-name="P46"><text:s text:c="13"/></text:p>
      <text:p text:style-name="P46"><text:s text:c="17"/><text:span text:style-name="T72"><text:s/></text:span><text:span text:style-name="T14">MID HANTS <text:s/>GU34 2PZ</text:span></text:p>
      <text:p text:style-name="P46"><text:s text:c="13"/>GROUND COACHES</text:p>
      <text:p text:style-name="P61"><text:s text:c="12"/>7719 174 660 1646 4 CROMP <text:s/></text:p>
      <text:p text:style-name="P61"><text:s text:c="3"/></text:p>
      <text:p text:style-name="P144"><text:s text:c="9"/><text:span text:style-name="T14">3769 </text:span><text:span text:style-name="T6">25591*</text:span><text:span text:style-name="T14"> 4977 4823 4822 4600 4549 4423 </text:span><text:span text:style-name="T6">4224 *</text:span></text:p>
      <text:p text:style-name="P46"><text:s text:c="16"/><text:span text:style-name="T65">1105*</text:span> 3906 35329 3766 93460(84101 81101) 1712 </text:p>
      <text:p text:style-name="P46"><text:span text:style-name="T14"><text:s text:c="16"/>3738 3070 3067 1973 1851 1807 </text:span><text:span text:style-name="T6">4910*</text:span><text:span text:style-name="T14"> <text:s/>93690 </text:span></text:p>
      <text:p text:style-name="P46"><text:span text:style-name="T14"><text:s text:c="6"/></text:span><text:s text:c="13"/><text:span text:style-name="T72"><text:s/>34947 35277 21236 21208 </text:span><text:span text:style-name="T65">16083*</text:span><text:span text:style-name="T72">(15969 15939)</text:span></text:p>
      <text:p text:style-name="P49"><text:s text:c="15"/>14023 13502 (80223 35331) 1353 2196 45045</text:p>
      <text:p text:style-name="P46"><text:s text:c="15"/><text:span text:style-name="T65">4211*</text:span> 80753 24808 13540 <text:span text:style-name="T65">34618*</text:span> 1668 4367 <text:s/>21252</text:p>
      <text:p text:style-name="P148"><text:s text:c="15"/>1995 SR2188 1851 1768 1765 765 1456 653 2213</text:p>
      <text:p text:style-name="P148"/>
      <text:p text:style-name="P63"><text:s text:c="16"/>DIESELS</text:p>
      <text:p text:style-name="P49"><text:span text:style-name="T5"><text:s text:c="17"/>12049 08377 08032 <text:s/>(D3358 08288) </text:span><text:span text:style-name="T6">50027</text:span></text:p>
      <text:p text:style-name="P49"><text:s text:c="15"/></text:p>
      <text:p text:style-name="P61"><text:s text:c="15"/>STEAMS</text:p>
      <text:p text:style-name="P46"><text:s text:c="14"/>3781 30925 30506 <text:span text:style-name="T65">41312</text:span> 76017 92212 30499 828</text:p>
      <text:p text:style-name="P49"><text:s text:c="14"/>34058 80150 73096 <text:s text:c="2"/>34007 75079 <text:span text:style-name="T65">30850</text:span> <text:s/></text:p>
      <text:p text:style-name="P49"><text:s text:c="17"/></text:p>
      <text:p text:style-name="P46"><text:s text:c="18"/><text:span text:style-name="T72">GROUND WAGONS </text:span></text:p>
      <text:p text:style-name="P46"><text:s text:c="16"/>87XXXX 96549 continer1 continer2 <text:s/>453b continer3 </text:p>
      <text:p text:style-name="P61"><text:s text:c="17"/>continer 4 continer 5</text:p>
      <text:p text:style-name="P49"><text:s text:c="15"/></text:p>
      <text:p text:style-name="P46"><text:s text:c="16"/><text:span text:style-name="T14"><text:s text:c="3"/>872176 773655 47777 4134 453433 452718</text:span></text:p>
      <text:p text:style-name="P46"><text:s text:c="17"/>264632 49001 786834 <text:s/>2960 100713 741751 </text:p>
      <text:p text:style-name="P49"><text:s text:c="18"/>993161 993345 854732 776446 772824 763661 </text:p>
      <text:p text:style-name="P49"><text:s text:c="15"/>517317 993259 520771 992987 <text:s/>95 749 58007 57849</text:p>
      <text:p text:style-name="P144"><text:s text:c="10"/>725540 982613 2019 57959 982910 <text:s/>999103 105761</text:p>
      <text:p text:style-name="P46"><text:s text:c="17"/>246837 741764 470772 773655 870073 151 <text:s/>29 <text:s/><text:span text:style-name="T65">229*</text:span></text:p>
      <text:p text:style-name="P46"><text:s text:c="17"/>999101 460001 55506 276733 67373 972624 40147</text:p>
      <text:p text:style-name="P46"><text:s text:c="15"/>3 5907 56302 985126 984905 726064 951338 953701 </text:p>
      <text:p text:style-name="P46"><text:s text:c="15"/>083262 104 65558 730821 773700 972782 481682 </text:p>
      <text:p text:style-name="P46"><text:s text:c="15"/>700471 506889 (56506 49000) 9186cr (53845 514791) </text:p>
      <text:p text:style-name="P49"><text:span text:style-name="T5"><text:s text:c="19"/></text:span><text:span text:style-name="T6">411</text:span><text:span text:style-name="T5"> <text:s text:c="2"/></text:span><text:span text:style-name="T6">24291*</text:span><text:span text:style-name="T5"> <text:s text:c="2"/></text:span><text:span text:style-name="T6">42085*</text:span></text:p>
      <text:p text:style-name="P61"><text:s text:c="13"/></text:p>
      <text:p text:style-name="P49"><text:s text:c="12"/><text:span text:style-name="T5"><text:s text:c="3"/>DEMUS </text:span></text:p>
      <text:p text:style-name="P61"><text:s text:c="12"/>60824 60124</text:p>
      <text:p text:style-name="P61"/>
      <text:p text:style-name="P49"><text:s text:c="17"/>ROAD RAILERS </text:p>
      <text:p text:style-name="P49"><text:s text:c="12"/>7031 TRS 937 FR503 (99709 011213-4)</text:p>
      <text:p text:style-name="P4"><text:s text:c="2"/></text:p>
      <text:p text:style-name="P61"><text:s text:c="20"/>WICKHAMS</text:p>
      <text:p text:style-name="P63"><text:s text:c="21"/>10839 10707 <text:s/></text:p>
      <text:p text:style-name="P49"><text:s text:c="19"/></text:p>
      <text:p text:style-name="P46"><text:s/><text:span text:style-name="T72"><text:s text:c="14"/></text:span><text:span text:style-name="T14"><text:s text:c="4"/></text:span></text:p>
      <text:p text:style-name="P46"><text:s text:c="2"/><text:span text:style-name="T40"><text:s text:c="2"/></text:span></text:p>
      <text:p text:style-name="P46"><text:s text:c="15"/><text:span text:style-name="T14"><text:s text:c="3"/>TROLLEYS</text:span></text:p>
      <text:p text:style-name="P61"><text:s text:c="13"/>19XX 1 19XX 2 19XX 3 19XX 4 19XX 5 19XX 6</text:p>
      <text:p text:style-name="P14"><text:s/></text:p>
      <text:p text:style-name="P14"><text:s text:c="3"/>CRANES</text:p>
      <text:p text:style-name="P14"><text:s text:c="2"/>80132 80133 1580 3149</text:p>
      <text:p text:style-name="P14"><text:s text:c="3"/></text:p>
      <text:p text:style-name="P49"><text:s text:c="14"/><text:span text:style-name="T5"><text:s text:c="6"/>MIDLAND RAILWAY <text:s text:c="2"/>DE5 3QZ</text:span></text:p>
      <text:p text:style-name="P61"><text:s text:c="18"/></text:p>
      <text:p text:style-name="P144"><text:s text:c="5"/><text:span text:style-name="T5"><text:s/>COACHES IN MUSEUM</text:span></text:p>
      <text:p text:style-name="P46"><text:s text:c="12"/>117 121 <text:span text:style-name="T65">2902</text:span> 30225 253 395001 26<text:span text:style-name="T72"> </text:span><text:span text:style-name="T6">27093*</text:span><text:span text:style-name="T14"> </text:span></text:p>
      <text:p text:style-name="P46"><text:span text:style-name="T14"><text:s text:c="12"/></text:span>(10257 395222) 14718 45047 2944 <text:span text:style-name="T65">445</text:span></text:p>
      <text:p text:style-name="P46"><text:span text:style-name="T72"><text:s text:c="12"/></text:span><text:span text:style-name="T65">1910</text:span><text:span text:style-name="T72"> 45000 </text:span><text:span text:style-name="T65">78</text:span><text:span text:style-name="T72"> </text:span></text:p>
      <text:p text:style-name="P49"/>
      <text:p text:style-name="P46"><text:s text:c="12"/><text:span text:style-name="T65">4537</text:span><text:span text:style-name="T72"> </text:span><text:span text:style-name="T65">1802</text:span><text:span text:style-name="T72"> </text:span><text:span text:style-name="T65">1862</text:span><text:span text:style-name="T42"> </text:span><text:span text:style-name="T6">4480*</text:span><text:span text:style-name="T72"> 4804 4816 </text:span><text:span text:style-name="T65">4904</text:span><text:span text:style-name="T72"> </text:span><text:span text:style-name="T65">5045</text:span><text:span text:style-name="T72"> 5461 </text:span></text:p>
      <text:p text:style-name="P50"><text:span text:style-name="T72"><text:s text:c="12"/></text:span>9281 9300<text:span text:style-name="T72"> <text:s text:c="3"/></text:span><text:s/>81144 <text:s/><text:span text:style-name="T5">99040*</text:span><text:span text:style-name="T14"> <text:s text:c="2"/>86180 13328 <text:s/>45050</text:span></text:p>
      <text:p text:style-name="P46"><text:s text:c="12"/><text:span text:style-name="T6">99041</text:span><text:span text:style-name="T14"> </text:span><text:span text:style-name="T6">6390* </text:span><text:span text:style-name="T14">80590 </text:span><text:span text:style-name="T6">84020</text:span><text:span text:style-name="T14">80782 </text:span><text:span text:style-name="T6">31299*</text:span><text:span text:style-name="T42"> </text:span><text:span text:style-name="T14">32918 <text:s/>45049 <text:s/></text:span></text:p>
      <text:p text:style-name="P61"><text:s text:c="12"/>14281 <text:span text:style-name="T65">14425*</text:span> <text:span text:style-name="T65">16782*</text:span> <text:span text:style-name="T65">5734*</text:span> 16553 78 <text:s/><text:span text:style-name="T65">349*</text:span> <text:s/>1250</text:p>
      <text:p text:style-name="P49"><text:s text:c="13"/>21 198587 2885 (86380 93380) (86966 93966)</text:p>
      <text:p text:style-name="P49"><text:s text:c="13"/><text:span text:style-name="T65">(977528 13484)</text:span> <text:span text:style-name="T65">(975534 34255)</text:span> <text:s text:c="2"/>(32998 1260)</text:p>
      <text:p text:style-name="P49"><text:s text:c="15"/>(1119 32968) (395519uf mr21) <text:s/><text:span text:style-name="T5">92146 11096 12107 </text:span></text:p>
      <text:p text:style-name="P146"><text:span text:style-name="T72"><text:s text:c="12"/>6320 </text:span><text:span text:style-name="T14">(</text:span><text:span text:style-name="T5">mr634* MR211*)</text:span><text:span text:style-name="T14"> <text:s text:c="2"/></text:span><text:span text:style-name="T42"><text:s text:c="2"/></text:span><text:span text:style-name="T40"><text:s/></text:span><text:span text:style-name="T5">SR1176*</text:span><text:span text:style-name="T14"> <text:s/></text:span><text:span text:style-name="T5">SR1865*</text:span><text:span text:style-name="T14"> <text:s text:c="4"/></text:span></text:p>
      <text:p text:style-name="P148"><text:s text:c="6"/>40741 42337 42119 42120</text:p>
      <text:p text:style-name="P46"><text:s text:c="15"/></text:p>
      <text:p text:style-name="P49"><text:s text:c="14"/></text:p>
      <text:p text:style-name="P49"><text:s text:c="17"/><text:span text:style-name="T5">Ground Coaches</text:span></text:p>
      <text:p text:style-name="P49"><text:span text:style-name="T5"><text:s text:c="15"/></text:span><text:span text:style-name="T6">c395*</text:span><text:span text:style-name="T40"> </text:span><text:span text:style-name="T6">1 2 3 4 blue</text:span><text:span text:style-name="T5"> <text:s text:c="2"/></text:span><text:span text:style-name="T6">851*</text:span></text:p>
      <text:p text:style-name="P61"><text:s text:c="6"/></text:p>
      <text:p text:style-name="P61"><text:s text:c="18"/>Ground Wagons </text:p>
      <text:p text:style-name="P49"><text:s text:c="17"/><text:span text:style-name="T65">78XXXX</text:span> <text:span text:style-name="T65">784127</text:span> 112798 <text:s/>771245 <text:span text:style-name="T65"><text:s/>784627</text:span></text:p>
      <text:p text:style-name="P14"><text:s text:c="6"/></text:p>
      <text:p text:style-name="P14"><text:s/>WAGONS IN MUSEUM</text:p>
      <text:p text:style-name="P49"><text:s text:c="16"/><text:span text:style-name="T65">42608</text:span> <text:span text:style-name="T65">44018</text:span> <text:span text:style-name="T65">757090</text:span> <text:span text:style-name="T65">299854</text:span> <text:span text:style-name="T65">119812</text:span> <text:span text:style-name="T65">10867</text:span> <text:span text:style-name="T65">1136</text:span><text:span text:style-name="T5"> </text:span></text:p>
      <text:p text:style-name="P3"><text:span text:style-name="T14"><text:s text:c="3"/></text:span><text:span text:style-name="T6">48*</text:span> <text:span text:style-name="T65">M75</text:span> <text:s text:c="2"/><text:span text:style-name="T65">26481</text:span> 4W CTW <text:span text:style-name="T65">NO1 PM <text:s/>STANTEY</text:span></text:p>
      <text:p text:style-name="P61"><text:s text:c="16"/><text:span text:style-name="T65">W38</text:span> <text:span text:style-name="T65">CHARLES ROBERTS COMPY <text:s/></text:span><text:s/></text:p>
      <text:p text:style-name="P61"/>
      <text:p text:style-name="P46"><text:s text:c="12"/><text:span text:style-name="T14"><text:s text:c="4"/>70056 62272 752301 761075 </text:span><text:span text:style-name="T6">4259</text:span><text:span text:style-name="T14"> 900912</text:span></text:p>
      <text:p text:style-name="P46"><text:span text:style-name="T14"><text:s text:c="16"/></text:span><text:span text:style-name="T6">513353*</text:span><text:span text:style-name="T14"> 992329 690421 </text:span><text:span text:style-name="T6">7821</text:span><text:span text:style-name="T14"> </text:span><text:span text:style-name="T6">7823</text:span><text:span text:style-name="T14"> <text:s/>948XXX <text:s/></text:span></text:p>
      <text:p text:style-name="P46"><text:s text:c="14"/><text:span text:style-name="T14"><text:s text:c="2"/>720020 23415 67137 558 684 1035 1153 948096</text:span><text:span text:style-name="T41"> </text:span><text:span text:style-name="T6">98*</text:span></text:p>
      <text:p text:style-name="P46"><text:s text:c="17"/><text:span text:style-name="T65">62049</text:span> <text:span text:style-name="T65"><text:s/></text:span><text:span text:style-name="T6">992328*</text:span><text:span text:style-name="T65"> </text:span><text:span text:style-name="T72"><text:s text:c="3"/></text:span><text:span text:style-name="T65">62523</text:span> <text:span text:style-name="T41"><text:s/></text:span><text:span text:style-name="T6">104*</text:span><text:span text:style-name="T65"> </text:span>38 6 93631</text:p>
      <text:p text:style-name="P46"><text:s text:c="16"/>1485 77068 45 <text:span text:style-name="T65">291</text:span> <text:span text:style-name="T14">62037 992341</text:span><text:span text:style-name="T6"> 45* W36FLAT*</text:span><text:span text:style-name="T14"> </text:span><text:span text:style-name="T6">20942</text:span></text:p>
      <text:p text:style-name="P46"><text:s text:c="16"/>421 292063 904525<text:span text:style-name="T6"> 499611*</text:span> 53 660 14 <text:span text:style-name="T65">952186</text:span><text:span text:style-name="T72"> </text:span><text:span text:style-name="T6">988257*</text:span><text:span text:style-name="T14"> </text:span></text:p>
      <text:p text:style-name="P145"><text:span text:style-name="T5"><text:s text:c="7"/>991625 201017 922446</text:span><text:span text:style-name="T6"> <text:s/>3236*</text:span><text:span text:style-name="T40"> <text:s text:c="2"/></text:span><text:span text:style-name="T6">931856</text:span><text:span text:style-name="T5"> 647 </text:span><text:span text:style-name="T6">230931*</text:span><text:span text:style-name="T5"> <text:s text:c="7"/></text:span></text:p>
      <text:p text:style-name="P61"><text:s text:c="15"/>67621 619 353 52 731791 <text:s/>953768 (893021 S13) <text:s/>376</text:p>
      <text:p text:style-name="P46"><text:s text:c="15"/><text:span text:style-name="T65">1399</text:span><text:span text:style-name="T72"> <text:s/></text:span><text:span text:style-name="T65">LNER</text:span><text:span text:style-name="T14"> </text:span><text:span text:style-name="T6">233962**</text:span><text:span text:style-name="T14"> <text:s/></text:span><text:span text:style-name="T6">990X91** </text:span><text:span text:style-name="T14"><text:s text:c="3"/>UF 12T <text:s/>395780CR <text:s text:c="2"/></text:span></text:p>
      <text:p text:style-name="P46"><text:span text:style-name="T14"><text:s text:c="14"/>4W LOW M GRAY RNDA37 <text:s/></text:span><text:span text:style-name="T6">4WFLAT </text:span><text:span text:style-name="T14"><text:s text:c="2"/></text:span><text:span text:style-name="T6">15101*</text:span></text:p>
      <text:p text:style-name="P46"><text:s text:c="15"/>357615DM <text:s/>RNDA30 <text:s/><text:span text:style-name="T72"><text:s/></text:span><text:span text:style-name="T14">3 hopper </text:span><text:span text:style-name="T6">(30 5 P;ANK)</text:span></text:p>
      <text:p text:style-name="P46"><text:s text:c="15"/>42FO<text:span text:style-name="T6"> 70280CR*</text:span><text:span text:style-name="T65"> </text:span>W39 un kown plate 4 flat </text:p>
      <text:p text:style-name="P46"><text:s text:c="15"/><text:span text:style-name="T6">996290*</text:span><text:span text:style-name="T14"> </text:span><text:span text:style-name="T6">3200</text:span><text:span text:style-name="T14"> <text:s text:c="2"/></text:span><text:span text:style-name="T6">FLAT42 WITH 86603*</text:span><text:span text:style-name="T14"> <text:s/>sc ruffey </text:span></text:p>
      <text:p text:style-name="P61"><text:span text:style-name="T14"><text:s text:c="15"/>351500 732462 </text:span><text:span text:style-name="T65">(634 uf*)</text:span><text:span text:style-name="T14"> </text:span><text:span text:style-name="T65">195955*</text:span></text:p>
      <text:p text:style-name="P61"><text:s text:c="14"/></text:p>
      <text:p text:style-name="P46"><text:s text:c="15"/></text:p>
      <text:p text:style-name="P46"><text:s text:c="17"/><text:span text:style-name="T14"><text:s/>DIESELS</text:span></text:p>
      <text:p text:style-name="P46"><text:span text:style-name="T14"><text:s text:c="18"/></text:span><text:span text:style-name="T6"><text:s/>D4</text:span><text:span text:style-name="T14"> </text:span><text:span text:style-name="T6">47761*</text:span><text:span text:style-name="T14"> 31418 <text:s text:c="2"/></text:span><text:span text:style-name="T6"><text:s/>40012*</text:span><text:span text:style-name="T14"> </text:span><text:span text:style-name="T6">416</text:span><text:span text:style-name="T14"> <text:s text:c="2"/>2024 5337 </text:span><text:span text:style-name="T6">D1114</text:span><text:span text:style-name="T14"> </text:span></text:p>
      <text:p text:style-name="P46"><text:s text:c="17"/>D1121 <text:span text:style-name="T65">20007</text:span> <text:s text:c="2"/><text:span text:style-name="T6">08331</text:span><text:span text:style-name="T14"> </text:span><text:span text:style-name="T6">12077</text:span><text:span text:style-name="T14"> </text:span><text:span text:style-name="T6">20048</text:span> <text:s text:c="3"/><text:span text:style-name="T6">D2138</text:span><text:span text:style-name="T14"> </text:span><text:span text:style-name="T40"><text:s/></text:span><text:span text:style-name="T5">441</text:span> <text:s text:c="11"/></text:p>
      <text:p text:style-name="P46"><text:span text:style-name="T14"><text:s text:c="17"/></text:span><text:span text:style-name="T6">D2858*</text:span><text:span text:style-name="T14"> </text:span><text:span text:style-name="T6">31108 </text:span><text:span text:style-name="T14"><text:s/></text:span><text:span text:style-name="T6"><text:s/>D7671</text:span><text:span text:style-name="T14"> </text:span><text:span text:style-name="T6">D5814</text:span><text:span text:style-name="T14"> </text:span><text:span text:style-name="T6">08590</text:span><text:span text:style-name="T14"> </text:span><text:span text:style-name="T6">D1048</text:span><text:span text:style-name="T14"> </text:span></text:p>
      <text:p text:style-name="P49"><text:s text:c="9"/><text:span text:style-name="T5"><text:s text:c="7"/></text:span><text:span text:style-name="T6">20188*</text:span><text:span text:style-name="T5"> </text:span><text:span text:style-name="T6">20205*</text:span><text:span text:style-name="T5"> </text:span><text:span text:style-name="T6">45133</text:span><text:span text:style-name="T5"> </text:span><text:span text:style-name="T6">(47401 D1516)</text:span><text:span text:style-name="T5"> </text:span><text:span text:style-name="T6">45041</text:span><text:span text:style-name="T5"> </text:span><text:span text:style-name="T6">46045</text:span><text:span text:style-name="T5"> </text:span><text:span text:style-name="T40"><text:s/></text:span></text:p>
      <text:p text:style-name="P46"><text:s text:c="17"/><text:span text:style-name="T65">20227</text:span></text:p>
      <text:p text:style-name="P50"/>
      <text:p text:style-name="P46"><text:s text:c="14"/><text:span text:style-name="T14"><text:s text:c="3"/>ELECTRIC IN MUSEUM</text:span></text:p>
      <text:p text:style-name="P46"><text:s text:c="19"/><text:span text:style-name="T65">27000</text:span></text:p>
      <text:p text:style-name="P46"><text:s text:c="17"/></text:p>
      <text:p text:style-name="P46"><text:s text:c="19"/>STEAMS <text:s/>IN MUSEUM</text:p>
      <text:p text:style-name="P67"><text:span text:style-name="T72"><text:s text:c="20"/></text:span>158A<text:span text:style-name="T72"> <text:s/></text:span>109<text:span text:style-name="T72"> </text:span>7817<text:span text:style-name="T72"> </text:span>1547<text:span text:style-name="T72"> </text:span>2008</text:p>
      <text:p text:style-name="P46"><text:s text:c="2"/></text:p>
      <text:p text:style-name="P46"><text:s text:c="11"/><text:span text:style-name="T14"><text:s text:c="3"/>73129 6233 </text:span><text:span text:style-name="T6">46521</text:span><text:span text:style-name="T14"> <text:s/>47445 45551 47564 </text:span><text:span text:style-name="T6">46203</text:span><text:span text:style-name="T14"> </text:span></text:p>
      <text:p text:style-name="P46"><text:s text:c="16"/><text:span text:style-name="T72"><text:s text:c="3"/></text:span><text:span text:style-name="T65">46201</text:span> <text:span text:style-name="T65">454 </text:span>7214 <text:span text:style-name="T72">(23436 47357) 16038</text:span></text:p>
      <text:p text:style-name="P67"><text:span text:style-name="T72"><text:s text:c="18"/></text:span>(23406 47327*) <text:span text:style-name="T72"><text:s/></text:span>1163<text:span text:style-name="T72"> </text:span>53809<text:span text:style-name="T72"> <text:s/></text:span>80098</text:p>
      <text:p text:style-name="P46"><text:s text:c="10"/><text:span text:style-name="T5"><text:s text:c="2"/></text:span></text:p>
      <text:p text:style-name="P4"><text:s text:c="2"/>SMALL <text:s/>STEAMS</text:p>
      <text:p text:style-name="P61"><text:s text:c="17"/>6201 6203 <text:s text:c="4"/></text:p>
      <text:p text:style-name="P14"/>
      <text:p text:style-name="P4"><text:s text:c="3"/>DMUS</text:p>
      <text:p text:style-name="P46"><text:span text:style-name="T14"><text:s text:c="17"/></text:span><text:span text:style-name="T6">141113</text:span><text:span text:style-name="T14"> </text:span><text:span text:style-name="T6">51118</text:span><text:span text:style-name="T14"> 50015 </text:span><text:span text:style-name="T6">56006</text:span><text:span text:style-name="T14"> 56015 56097 </text:span><text:span text:style-name="T6">54490</text:span></text:p>
      <text:p text:style-name="P54"><text:s text:c="3"/><text:span text:style-name="T67"><text:s text:c="15"/></text:span><text:span text:style-name="T68">59609</text:span><text:span text:style-name="T67"> </text:span><text:span text:style-name="T68">59659 </text:span><text:span text:style-name="T67">51669 </text:span><text:span text:style-name="T68">50019</text:span><text:span text:style-name="T67"> </text:span><text:span text:style-name="T68">51849</text:span><text:span text:style-name="T67"> </text:span><text:span text:style-name="T68">142011</text:span><text:span text:style-name="T67"> </text:span></text:p>
      <text:p text:style-name="P46"><text:span text:style-name="T72"><text:s text:c="13"/></text:span><text:span text:style-name="T14"><text:s text:c="4"/></text:span><text:span text:style-name="T6">51907*</text:span><text:span text:style-name="T72"> <text:s/></text:span><text:span text:style-name="T65">51591</text:span><text:span text:style-name="T72"> </text:span><text:span text:style-name="T65">51625</text:span><text:span text:style-name="T72"> </text:span><text:span text:style-name="T65">51610</text:span><text:span text:style-name="T72"> </text:span><text:span text:style-name="T65">142013</text:span></text:p>
      <text:p text:style-name="P50"/>
      <text:p text:style-name="P14"><text:s text:c="12"/>ROAD RAILERS</text:p>
      <text:p text:style-name="P46"><text:s text:c="18"/>PL015 PL002<text:span text:style-name="T65"> F540 YCK</text:span> HGR230 1 HGR230 2</text:p>
      <text:p text:style-name="P14"><text:s text:c="7"/><text:span text:style-name="T65">(99709 940551-3*)</text:span>56300 <text:s text:c="2"/></text:p>
      <text:p text:style-name="P49"><text:s text:c="15"/></text:p>
      <text:p text:style-name="P46"><text:s text:c="15"/><text:span text:style-name="T14"><text:s/>WICKHAMS</text:span></text:p>
      <text:p text:style-name="P46"><text:span text:style-name="T14"><text:s text:c="18"/></text:span><text:span text:style-name="T6">6934*</text:span><text:span text:style-name="T14"> </text:span><text:span text:style-name="T6">68062*</text:span><text:span text:style-name="T14"> <text:s text:c="2"/></text:span></text:p>
      <text:p text:style-name="P61"><text:s text:c="4"/></text:p>
      <text:p text:style-name="P61"><text:s text:c="21"/>CRANES <text:s text:c="8"/></text:p>
      <text:p text:style-name="P61"><text:s text:c="12"/><text:span text:style-name="T40"><text:s/></text:span><text:s/>1 9 10 95202 81340 96704</text:p>
      <text:p text:style-name="P61"/>
      <text:p text:style-name="P61"><text:s text:c="13"/></text:p>
      <text:p text:style-name="P61"><text:s text:c="18"/>Golden Valley Light Railway ng </text:p>
      <text:p text:style-name="P46"><text:s text:c="17"/>19 53726 3703 3742 3753 7009 7178 <text:span text:style-name="T65"><text:s/>8667*</text:span><text:span text:style-name="T6"> </text:span><text:span text:style-name="T5">8739 </text:span></text:p>
      <text:p text:style-name="P46"><text:span text:style-name="T5"><text:s text:c="17"/>8855 DM1117 10249 </text:span><text:s/><text:span text:style-name="T65"><text:s/>7002 </text:span>10994 11246 11177</text:p>
      <text:p text:style-name="P61"><text:s text:c="16"/>191646 <text:s/>222068 60S364 101T020 40SD529</text:p>
      <text:p text:style-name="P61"><text:s text:c="9"/></text:p>
      <text:p text:style-name="P14"/>
      <text:p text:style-name="P46"><text:span text:style-name="T14"><text:s text:c="14"/></text:span><text:span text:style-name="T42"><text:s text:c="3"/></text:span><text:span text:style-name="T14"><text:s text:c="4"/>Steam ng</text:span></text:p>
      <text:p text:style-name="P61"><text:s text:c="17"/>Joan <text:s/>7529</text:p>
      <text:p text:style-name="P49"><text:s text:c="14"/></text:p>
      <text:p text:style-name="P49"><text:s text:c="12"/></text:p>
      <text:p text:style-name="P144"><text:s text:c="5"/><text:span text:style-name="T40"><text:s/></text:span><text:span text:style-name="T14">MID NORFOLK RAILWAY</text:span></text:p>
      <text:p text:style-name="P46"><text:s text:c="17"/>Ground coach </text:p>
      <text:p text:style-name="P46"><text:span text:style-name="T14"><text:s text:c="16"/></text:span><text:span text:style-name="T6"><text:s/>1380</text:span></text:p>
      <text:p text:style-name="P67"/>
      <text:p text:style-name="P61"><text:s text:c="17"/>1106 <text:s/>1218 <text:span text:style-name="T65">1842</text:span> 1966 <text:s/>3521 <text:span text:style-name="T65">5211*</text:span> 5219 5255 <text:span text:style-name="T65">5265</text:span> <text:s text:c="3"/></text:p>
      <text:p text:style-name="P61"><text:s text:c="17"/>5309 <text:span text:style-name="T65">4702*</text:span> 5630 5866 <text:s/>5960 (6411 977547) <text:s/><text:span text:style-name="T65">(9010</text:span></text:p>
      <text:p text:style-name="P46"><text:span text:style-name="T14"><text:s text:c="16"/></text:span><text:span text:style-name="T6">9369*)</text:span><text:span text:style-name="T14"> 9409 9423 9496 10213 </text:span><text:span text:style-name="T6">10561*</text:span><text:span text:style-name="T14"> <text:s/></text:span><text:span text:style-name="T6">10607*</text:span><text:span text:style-name="T14"> <text:s text:c="2"/></text:span><text:span text:style-name="T6">10666*</text:span> <text:s text:c="14"/></text:p>
      <text:p text:style-name="P49"><text:span text:style-name="T5"><text:s text:c="16"/>11006 <text:s text:c="2"/>11011 </text:span><text:span text:style-name="T6">11073</text:span><text:span text:style-name="T5"> </text:span><text:span text:style-name="T6">11085</text:span><text:span text:style-name="T5"> <text:s/></text:span><text:span text:style-name="T6">11100</text:span><text:span text:style-name="T5"> <text:s/>12022 </text:span><text:span text:style-name="T6">12030</text:span><text:span text:style-name="T5"> </text:span></text:p>
      <text:p text:style-name="P61"><text:s text:c="16"/>12047 <text:span text:style-name="T65">12063</text:span> <text:span text:style-name="T65">12073*</text:span> <text:span text:style-name="T65">12110 12130</text:span> <text:span text:style-name="T65">12132</text:span> <text:s/><text:span text:style-name="T65">12147</text:span> <text:span text:style-name="T65">13225</text:span> </text:p>
      <text:p text:style-name="P61"><text:s text:c="14"/>13252 <text:s/><text:span text:style-name="T65">13446*</text:span> <text:s/><text:span text:style-name="T65">13447*</text:span> <text:s text:c="2"/><text:span text:style-name="T65">16153*</text:span> <text:s/>17079 <text:s/><text:span text:style-name="T65">25994</text:span> <text:s text:c="2"/>35341 </text:p>
      <text:p text:style-name="P61"><text:s text:c="15"/>81014 <text:s text:c="3"/><text:span text:style-name="T65">82125</text:span> <text:s text:c="2"/><text:span text:style-name="T65">94320</text:span> <text:s/>94597 11080</text:p>
      <text:p text:style-name="P61"><text:s/></text:p>
      <text:p text:style-name="P46"><text:s text:c="13"/><text:span text:style-name="T14"><text:s text:c="2"/>WAGONS</text:span></text:p>
      <text:p text:style-name="P46"><text:s text:c="17"/><text:span text:style-name="T65">784254</text:span> <text:s/><text:span text:style-name="T65">525140</text:span> <text:s/>983003 993116 <text:s/>993218</text:p>
      <text:p text:style-name="P46"><text:s text:c="16"/>993580 993717 <text:s/>2408 993451 <text:span text:style-name="T65">998508cr </text:span></text:p>
      <text:p text:style-name="P148"><text:s text:c="7"/>900102 741748 230966 260859 730006 42801 <text:s text:c="2"/></text:p>
      <text:p text:style-name="P46"><text:span text:style-name="T14"><text:s text:c="17"/></text:span><text:span text:style-name="T6"><text:s/>291*</text:span><text:span text:style-name="T14"> 950567 </text:span><text:span text:style-name="T6">17438</text:span><text:span text:style-name="T14"> 37</text:span><text:span text:style-name="T6"> 998504cr</text:span><text:span text:style-name="T14"> lner snow plough</text:span></text:p>
      <text:p text:style-name="P61"><text:s text:c="17"/>927541 951843 983913 783056 <text:s/>54550 994107 </text:p>
      <text:p text:style-name="P61"><text:s text:c="22"/>(942239 900114) (042186 66233) <text:s/>506322</text:p>
      <text:p text:style-name="P61"><text:s text:c="15"/></text:p>
      <text:p text:style-name="P49"><text:s text:c="20"/></text:p>
      <text:p text:style-name="P61"><text:span text:style-name="T66"><text:s text:c="19"/></text:span>DIESELS<text:span text:style-name="T66"> <text:s text:c="3"/></text:span></text:p>
      <text:p text:style-name="P46"><text:s text:c="18"/><text:span text:style-name="T65">47596</text:span> D1049 <text:span text:style-name="T65">47367</text:span> <text:s/><text:span text:style-name="T65">D2334</text:span> <text:span text:style-name="T65">03197</text:span> <text:s/><text:span text:style-name="T65">31255</text:span> <text:span text:style-name="T65">33202</text:span> </text:p>
      <text:p text:style-name="P61"><text:s text:c="19"/><text:span text:style-name="T65">50019 </text:span><text:s text:c="3"/><text:span text:style-name="T65">D9520</text:span></text:p>
      <text:p text:style-name="P46"><text:span text:style-name="T72"><text:s text:c="8"/></text:span><text:s text:c="2"/></text:p>
      <text:p text:style-name="P46"><text:s text:c="12"/><text:span text:style-name="T42"><text:s text:c="2"/></text:span><text:span text:style-name="T14">DMUS</text:span></text:p>
      <text:p text:style-name="P46"><text:s text:c="8"/><text:span text:style-name="T72"><text:s text:c="8"/></text:span><text:s/><text:span text:style-name="T65">54270</text:span> <text:span text:style-name="T65">56301</text:span> 56347 59117 <text:span text:style-name="T65">51942</text:span> 51226 <text:span text:style-name="T65">51370</text:span></text:p>
      <text:p text:style-name="P61"><text:span text:style-name="T40"><text:s text:c="16"/></text:span><text:s/><text:span text:style-name="T65">51434</text:span> <text:span text:style-name="T65">51499</text:span> <text:span text:style-name="T65">51503</text:span> <text:span text:style-name="T65">142038</text:span> <text:s/>51412 <text:span text:style-name="T65">142061*</text:span></text:p>
      <text:p text:style-name="P50"/>
      <text:p text:style-name="P3"><text:s/><text:span text:style-name="T72"><text:s text:c="2"/></text:span><text:span text:style-name="T14"><text:s text:c="3"/>EMU</text:span></text:p>
      <text:p text:style-name="P61"><text:s text:c="16"/><text:span text:style-name="T65">68004</text:span> </text:p>
      <text:p text:style-name="P61"><text:s text:c="19"/></text:p>
      <text:p text:style-name="P61"><text:s text:c="21"/>TROLLEYS</text:p>
      <text:p text:style-name="P61"><text:s text:c="15"/>CGG002351 B445 WFO </text:p>
      <text:p text:style-name="P61"><text:s text:c="12"/></text:p>
      <text:p text:style-name="P49"><text:s text:c="12"/><text:span text:style-name="T5"><text:s text:c="3"/>WICKHAM</text:span></text:p>
      <text:p text:style-name="P61"><text:s text:c="20"/>960225 </text:p>
      <text:p text:style-name="P46"><text:s text:c="9"/></text:p>
      <text:p text:style-name="P46"><text:s text:c="17"/><text:span text:style-name="T14">CRANE</text:span></text:p>
      <text:p text:style-name="P69"><text:span text:style-name="T42"><text:s text:c="19"/></text:span><text:span text:style-name="T72"><text:s/>81330</text:span></text:p>
      <text:p text:style-name="P61"/>
      <text:p text:style-name="P46"><text:s text:c="13"/><text:span text:style-name="T14"><text:s text:c="2"/>MID SUFFOLK </text:span></text:p>
      <text:p text:style-name="P61"><text:s text:c="17"/>Ground Coaches </text:p>
      <text:p text:style-name="P61"><text:s text:c="18"/><text:span text:style-name="T65">424*</text:span> <text:s/>278 <text:s/><text:span text:style-name="T65"><text:s/>472*</text:span> <text:s text:c="2"/>506 </text:p>
      <text:p text:style-name="P46"><text:s text:c="15"/></text:p>
      <text:p text:style-name="P61"><text:s text:c="13"/><text:span text:style-name="T66">GER 140</text:span> <text:s/>12 <text:s text:c="3"/></text:p>
      <text:p text:style-name="P49"><text:s text:c="14"/></text:p>
      <text:p text:style-name="P61"><text:s text:c="16"/>Ground Wagons</text:p>
      <text:p text:style-name="P61"><text:s text:c="16"/>620262 758094 758093</text:p>
      <text:p text:style-name="P49"><text:s text:c="10"/></text:p>
      <text:p text:style-name="P4"/>
      <text:p text:style-name="P11"><text:s text:c="3"/><text:span text:style-name="T72">28601 </text:span><text:span text:style-name="T65">157787</text:span><text:span text:style-name="T72"> </text:span><text:span text:style-name="T65">470819</text:span><text:span text:style-name="T72"> 620791 612404 15 951027 </text:span></text:p>
      <text:p text:style-name="P46"><text:span text:style-name="T72"><text:s text:c="15"/>506875 </text:span><text:span text:style-name="T65">139455</text:span><text:span text:style-name="T72"> 11873 4 <text:s/>black old tank uf 106</text:span></text:p>
      <text:p text:style-name="P4"><text:span text:style-name="T52"><text:s text:c="3"/></text:span><text:span text:style-name="T5">93 36 600043 9431 604 741047 <text:s/>6055fo 9050uf </text:span></text:p>
      <text:p text:style-name="P14"/>
      <text:p text:style-name="P61"><text:s text:c="19"/>DIESELS</text:p>
      <text:p text:style-name="P61"><text:s text:c="15"/>294266 20337 304470</text:p>
      <text:p text:style-name="P67"/>
      <text:p text:style-name="P49"><text:s text:c="19"/>STEAM S</text:p>
      <text:p text:style-name="P61"><text:s text:c="15"/>985 <text:s/><text:span text:style-name="T65">2565*</text:span> <text:span text:style-name="T65">1604</text:span> <text:s/><text:span text:style-name="T65">2525*</text:span></text:p>
      <text:p text:style-name="P4"><text:s text:c="14"/></text:p>
      <text:p text:style-name="P3"><text:span text:style-name="T72"><text:s text:c="3"/></text:span><text:span text:style-name="T14"><text:s/></text:span></text:p>
      <text:p text:style-name="P49"><text:s text:c="10"/><text:span text:style-name="T5"><text:s text:c="5"/>ROAD RAILER</text:span></text:p>
      <text:p text:style-name="P14"><text:s/>1949 <text:s text:c="2"/></text:p>
      <text:p text:style-name="P46"/>
      <text:p text:style-name="P46"><text:s text:c="11"/><text:span text:style-name="T5"><text:s/></text:span><text:span text:style-name="T14">TROLLEYS</text:span></text:p>
      <text:p text:style-name="P61"><text:s text:c="15"/>XXXX XXXX </text:p>
      <text:p text:style-name="P49"><text:s text:c="10"/></text:p>
      <text:p text:style-name="P61"><text:s text:c="21"/><text:span text:style-name="T116">BROCKFORD</text:span> <text:s text:c="2"/><text:span text:style-name="T116"><text:s/>IP14 5NN </text:span><text:s text:c="12"/></text:p>
      <text:p text:style-name="P46"><text:s text:c="16"/>Ground Coaches</text:p>
      <text:p text:style-name="P46"><text:span text:style-name="T14"><text:s text:c="15"/></text:span><text:span text:style-name="T6">957*</text:span><text:span text:style-name="T14"> </text:span><text:span text:style-name="T6">1266*</text:span><text:span text:style-name="T14"> <text:s/></text:span><text:span text:style-name="T6">BARE WOOD</text:span><text:span text:style-name="T14"> <text:s text:c="2"/></text:span></text:p>
      <text:p text:style-name="P61"><text:s text:c="13"/><text:span text:style-name="T65">GREEN WHITE *</text:span></text:p>
      <text:p text:style-name="P49"><text:s/></text:p>
      <text:p text:style-name="P46"><text:span text:style-name="T72"><text:s text:c="11"/></text:span><text:span text:style-name="T14"><text:s text:c="6"/>Ground Wagons</text:span></text:p>
      <text:p text:style-name="P49"><text:s text:c="17"/><text:span text:style-name="T65">1XXXXX*</text:span> <text:span text:style-name="T65">7XXXXX </text:span></text:p>
      <text:p text:style-name="P61"><text:span text:style-name="T52"><text:s text:c="16"/></text:span><text:span text:style-name="T65"><text:s/>954XXXX*</text:span></text:p>
      <text:p text:style-name="P49"><text:s text:c="17"/></text:p>
      <text:p text:style-name="P46"><text:span text:style-name="T52"><text:s text:c="13"/></text:span><text:span text:style-name="T39">MOVERNIGHT IN <text:s text:c="3"/>B76 9AQ</text:span></text:p>
      <text:p text:style-name="P144"><text:s text:c="4"/>COACH</text:p>
      <text:p text:style-name="P51"><text:span text:style-name="T72"><text:s text:c="13"/>5500 <text:s/></text:span><text:span text:style-name="T14"><text:s/></text:span><text:s/></text:p>
      <text:p text:style-name="P49"><text:s text:c="11"/></text:p>
      <text:p text:style-name="P61"><text:s text:c="13"/>Ground Wagons </text:p>
      <text:p text:style-name="P144"><text:s text:c="3"/>87801 1XXXXX </text:p>
      <text:p text:style-name="P144"/>
      <text:p text:style-name="P144"><text:s/>96302 <text:s/>563195 141887 4178 200203 17711 56518 68776</text:p>
      <text:p text:style-name="P144"><text:s text:c="3"/>(2564 07882) 4737 200017 87867 <text:span text:style-name="T72">47484</text:span> 922946<text:span text:style-name="T72"> <text:s/>2480 2398 630-6 <text:s/>20570 </text:span><text:s/>40340 <text:s text:c="2"/><text:span text:style-name="T14"><text:s text:c="2"/>2480</text:span></text:p>
      <text:p text:style-name="P61"><text:s text:c="9"/>2398 622-3</text:p>
      <text:p text:style-name="P3"><text:s/><text:span text:style-name="T72"><text:s text:c="2"/></text:span></text:p>
      <text:p text:style-name="P61"><text:s text:c="9"/>DIESELS</text:p>
      <text:p text:style-name="P46"><text:span text:style-name="T72"><text:s text:c="11"/>08411 <text:s/></text:span><text:span text:style-name="T65">08536</text:span><text:span text:style-name="T72"> 08568 08593 08632 08652 </text:span><text:span text:style-name="T14">08709 </text:span></text:p>
      <text:p text:style-name="P46"><text:span text:style-name="T14"><text:s text:c="12"/>08921 <text:s/>D9553 37679 </text:span><text:span text:style-name="T6">47484</text:span><text:span text:style-name="T52"> <text:s text:c="2"/></text:span><text:span text:style-name="T5">235513 294V 3870 (4618-6)</text:span></text:p>
      <text:p text:style-name="P68"/>
      <text:p text:style-name="P61"><text:s text:c="18"/>STEAM <text:s text:c="2"/></text:p>
      <text:p text:style-name="P61"><text:s text:c="10"/>5470 <text:s text:c="5"/></text:p>
      <text:p text:style-name="P148"/>
      <text:p text:style-name="P61"><text:s text:c="13"/>DMU</text:p>
      <text:p text:style-name="P61"><text:s text:c="17"/>143603 </text:p>
      <text:p text:style-name="P61"/>
      <text:p text:style-name="P69"><text:s text:c="15"/><text:span text:style-name="T72"><text:s text:c="3"/>EMU</text:span></text:p>
      <text:p text:style-name="P61"><text:s text:c="14"/>483002 (122 225)</text:p>
      <text:p text:style-name="P61"><text:s text:c="9"/></text:p>
      <text:p text:style-name="P61"><text:s text:c="23"/><text:span text:style-name="T66"><text:s text:c="4"/></text:span><text:s text:c="2"/>MINN MOVER</text:p>
      <text:p text:style-name="P61"><text:span text:style-name="T52"><text:s text:c="8"/></text:span><text:s text:c="7"/>B332</text:p>
      <text:p text:style-name="P61"><text:s text:c="9"/>ROAD RAILER</text:p>
      <text:p text:style-name="P61"><text:s text:c="14"/>4166 </text:p>
      <text:p text:style-name="P61"/>
      <text:p text:style-name="P61"><text:s text:c="14"/>CRANE</text:p>
      <text:p text:style-name="P61"><text:s text:c="14"/>8741 <text:s text:c="3"/></text:p>
      <text:p text:style-name="P46"><text:s text:c="11"/><text:span text:style-name="T14"><text:s text:c="5"/></text:span></text:p>
      <text:p text:style-name="P46"><text:s text:c="13"/><text:span text:style-name="T14"><text:s/>NRM SHILDON <text:s text:c="5"/>DL4 2RE</text:span></text:p>
      <text:p text:style-name="P144"><text:s/>COACHES</text:p>
      <text:p text:style-name="P148"><text:s/><text:span text:style-name="T65"><text:s/>21274</text:span> <text:s/><text:span text:style-name="T65">40732* </text:span><text:s/>310 <text:s/><text:span text:style-name="T65">801*</text:span> <text:span text:style-name="T65">3792</text:span> <text:s/><text:span text:style-name="T65">31</text:span> <text:s/><text:span text:style-name="T65">59*</text:span> <text:s/><text:span text:style-name="T65">1032</text:span> <text:s/><text:span text:style-name="T65">76 </text:span><text:s/>109 <text:s/>820</text:p>
      <text:p text:style-name="P49"><text:span text:style-name="T5"><text:s text:c="10"/></text:span><text:span text:style-name="T6">32*</text:span><text:span text:style-name="T5"> <text:s text:c="6"/></text:span></text:p>
      <text:p text:style-name="P49"><text:s text:c="15"/></text:p>
      <text:p text:style-name="P46"><text:span text:style-name="T72"><text:s text:c="11"/></text:span><text:span text:style-name="T14"><text:s text:c="3"/>WAGONS </text:span></text:p>
      <text:p text:style-name="P144"><text:s/><text:span text:style-name="T72"><text:s text:c="2"/></text:span><text:span text:style-name="T65">96369*</text:span><text:span text:style-name="T72"> <text:s/></text:span><text:span text:style-name="T6">161042</text:span><text:span text:style-name="T14"> </text:span>951042 <text:span text:style-name="T6">953602</text:span><text:span text:style-name="T40"> </text:span>470818<text:span text:style-name="T40"> </text:span>902805</text:p>
      <text:p text:style-name="P145"><text:s text:c="3"/>902806 <text:span text:style-name="T65">2775*</text:span> <text:s/><text:span text:style-name="T65">511023*</text:span> 361000 270919 902808 </text:p>
      <text:p text:style-name="P46"><text:s text:c="10"/><text:span text:style-name="T65">126438</text:span> 943139 11813 14974 4324 368459 <text:span text:style-name="T65">873368</text:span> <text:span text:style-name="T65">512*</text:span></text:p>
      <text:p text:style-name="P46"><text:s text:c="12"/>902807 982896 <text:span text:style-name="T65">3171*</text:span> H26 S50 737725 <text:span text:style-name="T65">350000*</text:span> 19154 </text:p>
      <text:p text:style-name="P46"><text:s text:c="11"/>85209 <text:span text:style-name="T65">900566</text:span> <text:span text:style-name="T65">2022*</text:span> 965232 SP 4w flat 942114cr <text:s text:c="4"/></text:p>
      <text:p text:style-name="P46"><text:s text:c="11"/>4w flat s dr chaldon 31 flat gnr1002 4551<text:span text:style-name="T14"> </text:span><text:span text:style-name="T6"><text:s/>730202</text:span></text:p>
      <text:p text:style-name="P46"><text:s text:c="11"/>chaldon 2 po chaldons 1352<text:span text:style-name="T14"> </text:span><text:span text:style-name="T6">900</text:span><text:span text:style-name="T14"> </text:span><text:span text:style-name="T6">805*</text:span><text:span text:style-name="T14"> <text:s/></text:span><text:span text:style-name="T6"><text:s/>295622</text:span></text:p>
      <text:p text:style-name="P49"><text:span text:style-name="T5"><text:s text:c="11"/></text:span><text:span text:style-name="T6">472867</text:span><text:span text:style-name="T5"> <text:s/>900402 <text:s text:c="2"/>110</text:span></text:p>
      <text:p text:style-name="P61"/>
      <text:p text:style-name="P61"><text:s text:c="9"/>DIESELS</text:p>
      <text:p text:style-name="P61"><text:s text:c="11"/><text:span text:style-name="T65">DM1274</text:span> <text:span text:style-name="T65">E5001</text:span> <text:span text:style-name="T65">75S</text:span> <text:span text:style-name="T65">4217*</text:span> 10003 <text:s/><text:span text:style-name="T65">26500</text:span> <text:s/><text:span text:style-name="T65">DELTIC</text:span> <text:s/><text:span text:style-name="T65">D2090*</text:span> </text:p>
      <text:p text:style-name="P46"><text:span text:style-name="T14"><text:s text:c="11"/></text:span><text:span text:style-name="T6">13079</text:span><text:span text:style-name="T14"> <text:s/></text:span><text:span text:style-name="T6">08911*</text:span><text:span text:style-name="T14"> </text:span><text:span text:style-name="T6">41001*</text:span><text:span text:style-name="T14"> </text:span><text:span text:style-name="T6">43102*</text:span> </text:p>
      <text:p text:style-name="P46"><text:s text:c="17"/><text:span text:style-name="T72"><text:s/></text:span></text:p>
      <text:p text:style-name="P35"><text:s text:c="10"/></text:p>
      <text:p text:style-name="P144"><text:s text:c="2"/><text:span text:style-name="T72"><text:s text:c="5"/>STEAMS</text:span></text:p>
      <text:p text:style-name="P61"><text:s text:c="15"/><text:span text:style-name="T65">49395* </text:span><text:s text:c="5"/><text:span text:style-name="T65">SANS PARELL</text:span> <text:span text:style-name="T65">GREEN SANS PARELL2</text:span> </text:p>
      <text:p text:style-name="P49"><text:s text:c="13"/><text:span text:style-name="T5">LOCOMOTION <text:s/>7412 5469 1957 <text:s/></text:span><text:span text:style-name="T6">2373</text:span></text:p>
      <text:p text:style-name="P49"><text:s text:c="12"/><text:span text:style-name="T5"><text:s text:c="3"/>390 </text:span><text:span text:style-name="T6">1621</text:span><text:span text:style-name="T5"> </text:span><text:span text:style-name="T6">251</text:span><text:span text:style-name="T5"> LOCOMNO1 </text:span><text:span text:style-name="T6">BRADYLL </text:span></text:p>
      <text:p text:style-name="P61"><text:s text:c="15"/><text:span text:style-name="T65">790*</text:span> <text:span text:style-name="T65">30587</text:span> <text:span text:style-name="T65">5000</text:span> <text:span text:style-name="T65">4771</text:span> <text:span text:style-name="T65">34051*</text:span></text:p>
      <text:p text:style-name="P61"><text:s text:c="14"/>(LOCOMOTON IN BROWN) </text:p>
      <text:p text:style-name="P49"><text:s text:c="16"/></text:p>
      <text:p text:style-name="P46"><text:span text:style-name="T72"><text:s text:c="10"/></text:span><text:span text:style-name="T14"><text:s text:c="4"/></text:span></text:p>
      <text:p text:style-name="P61"><text:s text:c="10"/>EMUS</text:p>
      <text:p text:style-name="P46"><text:span text:style-name="T72"><text:s text:c="10"/></text:span><text:span text:style-name="T65">75395</text:span><text:span text:style-name="T72"> </text:span><text:span text:style-name="T6">65617</text:span><text:span text:style-name="T65">*</text:span><text:span text:style-name="T72"> <text:s text:c="3"/>P1 P2 </text:span><text:span text:style-name="T65">T1</text:span><text:span text:style-name="T72"> </text:span><text:span text:style-name="T65">T2</text:span><text:span text:style-name="T72"> <text:s/></text:span><text:span text:style-name="T65">10656</text:span><text:span text:style-name="T72"> </text:span><text:span text:style-name="T65">11179</text:span><text:span text:style-name="T72"> </text:span><text:span text:style-name="T65">12123</text:span><text:span text:style-name="T72"> </text:span><text:span text:style-name="T65">61275</text:span><text:span text:style-name="T72"> <text:s text:c="3"/></text:span></text:p>
      <text:p text:style-name="P148"><text:s text:c="2"/><text:span text:style-name="T65">65217*</text:span> <text:span text:style-name="T65">65417* </text:span></text:p>
      <text:p text:style-name="P61"><text:s text:c="10"/></text:p>
      <text:p text:style-name="P155"/>
      <text:p text:style-name="P148">DMU</text:p>
      <text:p text:style-name="P46"><text:span text:style-name="T14"><text:s text:c="11"/></text:span><text:span text:style-name="T6">142001</text:span><text:span text:style-name="T72"> <text:s text:c="3"/></text:span></text:p>
      <text:p text:style-name="P49"><text:s text:c="24"/></text:p>
      <text:p text:style-name="P46"><text:s text:c="12"/><text:span text:style-name="T14"><text:s text:c="4"/>ROAD RAILERS</text:span></text:p>
      <text:p text:style-name="P46"><text:span text:style-name="T14"><text:s text:c="13"/>LMR H <text:s/></text:span><text:span text:style-name="T6">74/007</text:span><text:span text:style-name="T14"> <text:s text:c="2"/>WATER BOWSER ELLERTEY <text:s/></text:span></text:p>
      <text:p text:style-name="P49"><text:s text:c="18"/></text:p>
      <text:p text:style-name="P144"><text:s text:c="2"/><text:span text:style-name="T14"><text:s text:c="3"/>WICKHAM</text:span></text:p>
      <text:p text:style-name="P46"><text:span text:style-name="T14"><text:s text:c="13"/></text:span><text:span text:style-name="T6">(899 )*</text:span><text:span text:style-name="T14"> <text:s/></text:span><text:s text:c="2"/></text:p>
      <text:p text:style-name="P46"><text:s text:c="11"/></text:p>
      <text:p text:style-name="P61"><text:s text:c="10"/><text:span text:style-name="T66"><text:s/></text:span>CRANES <text:s/></text:p>
      <text:p text:style-name="P144"><text:span text:style-name="T14"><text:s text:c="13"/>112 621 12407 <text:s text:c="7"/></text:span><text:s text:c="2"/><text:span text:style-name="T14"><text:s text:c="3"/></text:span></text:p>
      <text:p text:style-name="P61"><text:s text:c="9"/></text:p>
      <text:p text:style-name="P61"><text:s text:c="12"/><text:span text:style-name="T66"><text:s text:c="3"/></text:span><text:s/>NRM YORK</text:p>
      <text:p text:style-name="P144"><text:s text:c="5"/>COACHES</text:p>
      <text:p text:style-name="P144"><text:s text:c="4"/><text:span text:style-name="T65"><text:s/>799</text:span> <text:span text:style-name="T65">5987</text:span> <text:span text:style-name="T65">901*</text:span> <text:span text:style-name="T65">042188</text:span> <text:span text:style-name="T65">81025 </text:span><text:s/>99953 <text:span text:style-name="T65">64</text:span> <text:span text:style-name="T65">395*</text:span></text:p>
      <text:p text:style-name="P144"><text:span text:style-name="T72"><text:s text:c="4"/></text:span><text:span text:style-name="T65"><text:s/>948*</text:span> <text:span text:style-name="T65">282693</text:span> <text:s/><text:span text:style-name="T65">14241*</text:span> <text:s/><text:span text:style-name="T65">902502</text:span> <text:span text:style-name="T65">59</text:span> <text:span text:style-name="T65">BWR 303*</text:span> <text:span text:style-name="T65">186*</text:span></text:p>
      <text:p text:style-name="P144"><text:span text:style-name="T72"><text:s text:c="5"/></text:span><text:span text:style-name="T65">5669*</text:span> <text:span text:style-name="T65">847</text:span> <text:span text:style-name="T65">802*</text:span> <text:span text:style-name="T65">800*</text:span> <text:span text:style-name="T65">24*</text:span> <text:s text:c="2"/><text:span text:style-name="T65">3463*</text:span> BWR 1934 <text:s/>BWR 3</text:p>
      <text:p text:style-name="P144"><text:s text:c="5"/><text:span text:style-name="T65">YELLOW 1</text:span> YELLOW 2 <text:s/><text:span text:style-name="T65">BLUE LIVERY REP</text:span> <text:s/>LNWR LBR</text:p>
      <text:p text:style-name="P61"><text:s text:c="14"/><text:span text:style-name="T65">2 H LBR <text:s/></text:span>TR MBR TRAM LBR 2 9135 </text:p>
      <text:p text:style-name="P61"/>
      <text:p text:style-name="P46"><text:s text:c="13"/><text:span text:style-name="T5"><text:s text:c="2"/></text:span><text:span text:style-name="T14"><text:s text:c="2"/>GROUND <text:s/>WAGON </text:span></text:p>
      <text:p text:style-name="P145"><text:s text:c="6"/>container </text:p>
      <text:p text:style-name="P61"><text:s text:c="11"/></text:p>
      <text:p text:style-name="P46"><text:s text:c="9"/><text:span text:style-name="T14"><text:s text:c="5"/></text:span><text:span text:style-name="T6">200955</text:span><text:span text:style-name="T14"> </text:span><text:span text:style-name="T6">112884*</text:span><text:span text:style-name="T14"> <text:s text:c="2"/></text:span><text:span text:style-name="T6">56297</text:span><text:span text:style-name="T14"> <text:s/></text:span><text:span text:style-name="T6">87905</text:span><text:span text:style-name="T14"> </text:span><text:span text:style-name="T6">11275</text:span></text:p>
      <text:p text:style-name="P144"><text:s text:c="5"/><text:span text:style-name="T65">882583*</text:span> <text:s/><text:span text:style-name="T65">295987</text:span><text:span text:style-name="T72"> 904697 </text:span><text:span text:style-name="T14"><text:s/></text:span><text:span text:style-name="T6">227009</text:span><text:span text:style-name="T14"> <text:s/>499254</text:span></text:p>
      <text:p text:style-name="P46"><text:span text:style-name="T72"><text:s text:c="14"/></text:span><text:span text:style-name="T65">21408*</text:span><text:span text:style-name="T72"> </text:span><text:span text:style-name="T65">44057*</text:span><text:span text:style-name="T72"> <text:s/>743141 62041 </text:span><text:span text:style-name="T65"><text:s/></text:span><text:span text:style-name="T6">475014*</text:span><text:span text:style-name="T14"> <text:s/></text:span><text:span text:style-name="T6">9988*</text:span></text:p>
      <text:p text:style-name="P46"><text:span text:style-name="T72"><text:s text:c="14"/></text:span><text:span text:style-name="T65">601652</text:span><text:span text:style-name="T72"> </text:span><text:span text:style-name="T65">700728</text:span><text:span text:style-name="T72"> 99z04 99 </text:span><text:span text:style-name="T65">601403</text:span><text:span text:style-name="T72"> 505771B 174 </text:span></text:p>
      <text:p text:style-name="P46"><text:s text:c="12"/><text:span text:style-name="T65">320952cr</text:span> <text:s text:c="2"/><text:span text:style-name="T65">RT239</text:span><text:span text:style-name="T72"> <text:s text:c="3"/></text:span><text:span text:style-name="T65">no1dandy car</text:span><text:span text:style-name="T72"> <text:s/>893343</text:span></text:p>
      <text:p text:style-name="P49"><text:span text:style-name="T5"><text:s text:c="13"/></text:span><text:span text:style-name="T6">thomes js*</text:span><text:span text:style-name="T5"> <text:s/>tramway truck t <text:s text:c="3"/></text:span></text:p>
      <text:p text:style-name="P46"><text:s text:c="10"/><text:span text:style-name="T14"><text:s text:c="9"/></text:span><text:span text:style-name="T39"><text:s/></text:span><text:span text:style-name="T14"><text:s text:c="4"/>DIESELS </text:span></text:p>
      <text:p text:style-name="P144"><text:s text:c="4"/><text:span text:style-name="T65">09017</text:span> <text:span text:style-name="T65">D9002</text:span> <text:span text:style-name="T65">D1023*</text:span> <text:span text:style-name="T65">D200</text:span> <text:span text:style-name="T65">31018</text:span><text:span text:style-name="T40"> </text:span><text:span text:style-name="T6">D8000*</text:span><text:span text:style-name="T14"> </text:span></text:p>
      <text:p text:style-name="P144"><text:span text:style-name="T72"><text:s text:c="4"/></text:span><text:span text:style-name="T65">D2860*</text:span><text:span text:style-name="T72"> <text:s text:c="2"/></text:span><text:span text:style-name="T65">(D6700 37350)</text:span><text:span text:style-name="T72"> </text:span><text:s/><text:span text:style-name="T6">26020</text:span><text:span text:style-name="T14"> <text:s text:c="2"/></text:span><text:span text:style-name="T6">BEL2</text:span><text:span text:style-name="T14"> <text:s/></text:span><text:span text:style-name="T6">47798*</text:span></text:p>
      <text:p text:style-name="P50"><text:span text:style-name="T14"><text:s text:c="13"/>43002 </text:span><text:span text:style-name="T5">7050*</text:span></text:p>
      <text:p text:style-name="P51"><text:s text:c="19"/></text:p>
      <text:p text:style-name="P49"><text:s text:c="13"/><text:span text:style-name="T6">87001*</text:span></text:p>
      <text:p text:style-name="P49"><text:s text:c="18"/></text:p>
      <text:p text:style-name="P155"/>
      <text:p text:style-name="P148"><text:s text:c="4"/>EMUS</text:p>
      <text:p text:style-name="P46"><text:span text:style-name="T14"><text:s text:c="19"/></text:span><text:span text:style-name="T6">28249*</text:span><text:span text:style-name="T14"> </text:span><text:span text:style-name="T6">8143</text:span><text:span text:style-name="T14"> </text:span><text:span text:style-name="T6">3308</text:span><text:span text:style-name="T14"> </text:span><text:span text:style-name="T6">22-141</text:span><text:span text:style-name="T14"> <text:s/></text:span><text:s text:c="16"/></text:p>
      <text:p text:style-name="P61"><text:s text:c="13"/></text:p>
      <text:p text:style-name="P46"><text:s text:c="16"/><text:span text:style-name="T72"><text:s text:c="2"/></text:span><text:span text:style-name="T14"><text:s text:c="4"/>DMUS</text:span></text:p>
      <text:p text:style-name="P61"><text:s text:c="21"/><text:span text:style-name="T65">51922</text:span> <text:span text:style-name="T65">51562</text:span> <text:s text:c="8"/></text:p>
      <text:p text:style-name="P152"><text:s text:c="6"/></text:p>
      <text:p text:style-name="P61"><text:s text:c="10"/>STEAMS </text:p>
      <text:p text:style-name="P61"><text:s text:c="11"/><text:span text:style-name="T65"><text:s/>35029</text:span> <text:s/><text:span text:style-name="T65">C1</text:span> <text:s/><text:span text:style-name="T65">737</text:span> <text:span text:style-name="T65">245</text:span> <text:span text:style-name="T65">4003</text:span> <text:span text:style-name="T65">990</text:span> <text:span text:style-name="T65">1275</text:span> 82 <text:span text:style-name="T65">214*</text:span> <text:s/><text:span text:style-name="T65">6229</text:span> <text:span text:style-name="T65">66</text:span> </text:p>
      <text:p text:style-name="P144"><text:s/><text:span text:style-name="T66"><text:s/></text:span><text:span text:style-name="T65">673</text:span><text:span text:style-name="T66"> <text:s text:c="2"/></text:span><text:span text:style-name="T65">2500* </text:span><text:span text:style-name="T66"><text:s/></text:span><text:s/><text:span text:style-name="T65">2700*</text:span> <text:span text:style-name="T65">92220</text:span><text:span text:style-name="T72"> <text:s/>handy man 1 stiring</text:span></text:p>
      <text:p text:style-name="P144"><text:span text:style-name="T14"><text:s text:c="3"/></text:span><text:span text:style-name="T6">1247*</text:span><text:span text:style-name="T40"> </text:span><text:span text:style-name="T65">60163</text:span> <text:span text:style-name="T65">60103</text:span><text:span text:style-name="T42"> </text:span><text:span text:style-name="T6">4468*</text:span> <text:span text:style-name="T65">1008</text:span><text:span text:style-name="T72"> </text:span><text:span text:style-name="T65">3coppeb</text:span> <text:span text:style-name="T65">werrn</text:span> <text:span text:style-name="T65">pet*</text:span></text:p>
      <text:p text:style-name="P49"><text:span text:style-name="T5"><text:s text:c="14"/>rocket r <text:s/>rocket bush m <text:s/></text:span><text:span text:style-name="T6">teddy*</text:span><text:span text:style-name="T5"> <text:s text:c="2"/></text:span><text:span text:style-name="T6">livingston*</text:span><text:span text:style-name="T5"> rocket <text:s/></text:span><text:span text:style-name="T6"><text:s/>305</text:span></text:p>
      <text:p text:style-name="P61"><text:s text:c="11"/></text:p>
      <text:p text:style-name="P61"><text:s text:c="11"/>CRANE </text:p>
      <text:p text:style-name="P148"><text:s text:c="3"/><text:span text:style-name="T65">(331153 BLACK)</text:span> <text:s/></text:p>
      <text:p text:style-name="P148"/>
      <text:p text:style-name="P61"><text:s text:c="18"/>NENE VALLEY RAILWAY <text:s text:c="2"/>PE8 <text:s/>6LR</text:p>
      <text:p text:style-name="P144"><text:s text:c="7"/>COACHES </text:p>
      <text:p text:style-name="P144"><text:span text:style-name="T72"><text:s text:c="6"/></text:span><text:span text:style-name="T65">4466</text:span> 4200 <text:span text:style-name="T65">4919</text:span> <text:span text:style-name="T65">3227</text:span> 1872 <text:span text:style-name="T65">4635</text:span> 4686 26193</text:p>
      <text:p text:style-name="P144"><text:span text:style-name="T72"><text:s text:c="5"/></text:span><text:span text:style-name="T6">94796*</text:span><text:span text:style-name="T14"> </text:span><text:span text:style-name="T6">80456*</text:span><text:span text:style-name="T5"> </text:span>80417 80402 <text:span text:style-name="T65">25639</text:span><text:span text:style-name="T14"> </text:span><text:span text:style-name="T6">10731*</text:span></text:p>
      <text:p text:style-name="P144"><text:s text:c="6"/>4627 <text:span text:style-name="T6">80327*</text:span> <text:span text:style-name="T65">25347</text:span> 24997 <text:span text:style-name="T65">35248</text:span> <text:span text:style-name="T65">35239</text:span> 4794</text:p>
      <text:p text:style-name="P46"><text:span text:style-name="T72"><text:s text:c="15"/></text:span><text:span text:style-name="T6">80337*</text:span><text:span text:style-name="T72"> </text:span><text:span text:style-name="T65">4920</text:span><text:span text:style-name="T72"> </text:span><text:span text:style-name="T6">37096*</text:span><text:span text:style-name="T72"> 476</text:span><text:span text:style-name="T65"> 42170</text:span><text:span text:style-name="T72"> </text:span><text:span text:style-name="T65">23009</text:span></text:p>
      <text:p text:style-name="P46"><text:s text:c="14"/><text:span text:style-name="T14"><text:s/></text:span><text:span text:style-name="T6">31359* </text:span><text:span text:style-name="T14">30272 30976 </text:span><text:span text:style-name="T6">37141</text:span><text:span text:style-name="T14"> </text:span><text:span text:style-name="T6">21033 </text:span><text:span text:style-name="T14"><text:s/></text:span><text:span text:style-name="T6">21013</text:span><text:span text:style-name="T14"> </text:span><text:span text:style-name="T6">1710</text:span></text:p>
      <text:p text:style-name="P144"><text:s text:c="4"/>475 478 477 <text:span text:style-name="T65">2975*</text:span> <text:span text:style-name="T5"><text:s/></text:span><text:span text:style-name="T6">3916*</text:span> <text:span text:style-name="T65">601</text:span><text:span text:style-name="T40"> </text:span><text:span text:style-name="T6">2178*</text:span><text:span text:style-name="T40"> </text:span>61634 <text:span text:style-name="T65">479</text:span> </text:p>
      <text:p text:style-name="P61"><text:s text:c="14"/><text:span text:style-name="T65">37066</text:span> <text:s/><text:span text:style-name="T65">395361</text:span> <text:s text:c="3"/><text:span text:style-name="T65">(37071 231-8- 17)</text:span> <text:s text:c="2"/></text:p>
      <text:p text:style-name="P46"><text:s text:c="15"/></text:p>
      <text:p text:style-name="P61"><text:s text:c="12"/>Ground Wagons</text:p>
      <text:p text:style-name="P144"><text:s text:c="3"/><text:span text:style-name="T72"><text:s text:c="3"/></text:span><text:span text:style-name="T65">855021</text:span> <text:span text:style-name="T65">851850 </text:span>2180<text:span text:style-name="T6"> 65567*</text:span><text:span text:style-name="T5"> </text:span><text:span text:style-name="T65">Axxxxx1</text:span> <text:span text:style-name="T65">Axxxxx2</text:span> </text:p>
      <text:p text:style-name="P61"><text:s text:c="15"/><text:span text:style-name="T65">760049 298132</text:span></text:p>
      <text:p text:style-name="P46"><text:s text:c="13"/></text:p>
      <text:p text:style-name="P61"><text:s text:c="13"/><text:span text:style-name="T65">785122</text:span> <text:span text:style-name="T65">993502</text:span> 881987 786075 9300-4 781768 </text:p>
      <text:p text:style-name="P46"><text:s text:c="14"/>785409<text:span text:style-name="T72"> </text:span><text:span text:style-name="T6">771300</text:span> 781651 <text:span text:style-name="T72">785619 </text:span><text:span text:style-name="T65">3285*</text:span><text:span text:style-name="T72"> <text:s/></text:span><text:span text:style-name="T65">430226</text:span><text:span text:style-name="T72"> <text:s/></text:span></text:p>
      <text:p text:style-name="P49"><text:s text:c="14"/>400053 <text:s/>778109 778810 777654 776607 784874</text:p>
      <text:p text:style-name="P144"><text:s text:c="5"/>781387 780952 768248 <text:s/><text:span text:style-name="T65"><text:s/></text:span><text:span text:style-name="T6">931807*</text:span> 904523 <text:span text:style-name="T65">945991*</text:span></text:p>
      <text:p text:style-name="P144"><text:s text:c="5"/>775176<text:span text:style-name="T5"> </text:span><text:span text:style-name="T6">414130</text:span> <text:span text:style-name="T65">5869</text:span> <text:span text:style-name="T65">1914</text:span> <text:span text:style-name="T14"><text:s/></text:span><text:span text:style-name="T6">721890</text:span><text:span text:style-name="T14"> </text:span><text:span text:style-name="T6">972206*</text:span></text:p>
      <text:p text:style-name="P144"><text:s text:c="5"/><text:span text:style-name="T65">2379</text:span><text:span text:style-name="T5"> <text:s text:c="2"/></text:span><text:span text:style-name="T6">972594*</text:span><text:span text:style-name="T14"> </text:span><text:span text:style-name="T6">984194*</text:span><text:span text:style-name="T14"> 982358 AXXXXB <text:s/></text:span><text:span text:style-name="T6">64172*</text:span><text:span text:style-name="T14"> </text:span></text:p>
      <text:p text:style-name="P3"><text:span text:style-name="T72"><text:s/>954024 </text:span><text:span text:style-name="T65">11023</text:span><text:span text:style-name="T72"> </text:span><text:span text:style-name="T65">143288</text:span><text:span text:style-name="T72"> </text:span><text:span text:style-name="T65">2084 45</text:span><text:span text:style-name="T72"> </text:span><text:span text:style-name="T65">55223</text:span><text:span text:style-name="T72"> </text:span><text:span text:style-name="T65">874076</text:span><text:span text:style-name="T72"> <text:s text:c="5"/></text:span></text:p>
      <text:p text:style-name="P46"><text:s text:c="12"/><text:span text:style-name="T72"><text:s text:c="2"/></text:span><text:span text:style-name="T65">905053*</text:span><text:span text:style-name="T72"> 953944 </text:span><text:span text:style-name="T65">494730</text:span><text:span text:style-name="T72"> 901021 A2180 982725 </text:span><text:span text:style-name="T65">982721*</text:span><text:span text:style-name="T72"> </text:span></text:p>
      <text:p text:style-name="P46"><text:span text:style-name="T72"><text:s text:c="13"/></text:span><text:span text:style-name="T65">431752</text:span><text:span text:style-name="T72"> <text:s/></text:span><text:span text:style-name="T65">427760</text:span><text:span text:style-name="T72"> </text:span><text:span text:style-name="T65">425561</text:span><text:span text:style-name="T72"> <text:s/>9 <text:s/></text:span><text:span text:style-name="T65">7</text:span><text:span text:style-name="T72"> <text:s/></text:span><text:span text:style-name="T65">98503</text:span><text:span text:style-name="T72"> 781542 744647 <text:s/></text:span></text:p>
      <text:p text:style-name="P49"><text:s text:c="13"/><text:span text:style-name="T65">777633</text:span> 781768 <text:span text:style-name="T65">8959</text:span> <text:s text:c="2"/>460411 <text:s/>470944 494726 759852</text:p>
      <text:p text:style-name="P61"><text:s text:c="13"/><text:span text:style-name="T65">775702</text:span> <text:span text:style-name="T65">764034</text:span> <text:s/></text:p>
      <text:p text:style-name="P61"><text:s text:c="13"/></text:p>
      <text:p text:style-name="P148"><text:s text:c="3"/>DIESELS</text:p>
      <text:p text:style-name="P145"><text:s text:c="4"/>D1123 304469 <text:span text:style-name="T65">10271</text:span> <text:span text:style-name="T65">10202</text:span> <text:span text:style-name="T65">2895*</text:span> <text:span text:style-name="T65">77120*</text:span> </text:p>
      <text:p text:style-name="P14"><text:s/><text:span text:style-name="T65">D9529</text:span> <text:span text:style-name="T65">1212 *</text:span> <text:s text:c="2"/><text:span text:style-name="T65">323 674*</text:span></text:p>
      <text:p text:style-name="P17"/>
      <text:p text:style-name="P61"><text:s text:c="15"/>STEAM S</text:p>
      <text:p text:style-name="P145"><text:span text:style-name="T40"><text:s text:c="4"/></text:span><text:span text:style-name="T6">101A*</text:span> <text:s/><text:span text:style-name="T65">5485</text:span> 1626 75008 2855 <text:span text:style-name="T65">1800</text:span> 1539 </text:p>
      <text:p text:style-name="P61"><text:s text:c="13"/>1953 <text:span text:style-name="T65">64305</text:span> 1178 nr656 34081 <text:span text:style-name="T65">73050</text:span> <text:s text:c="2"/></text:p>
      <text:p text:style-name="P61"/>
      <text:p text:style-name="P46"><text:s text:c="11"/><text:span text:style-name="T14"><text:s text:c="4"/>DMU</text:span></text:p>
      <text:p text:style-name="P61"><text:s text:c="13"/>143602 <text:s/></text:p>
      <text:p text:style-name="P61"><text:s text:c="12"/></text:p>
      <text:p text:style-name="P61"><text:s text:c="11"/>ROAD RAILERS</text:p>
      <text:p text:style-name="P185"><text:s text:c="4"/><text:span text:style-name="T65">4W IRON MAN</text:span> <text:span text:style-name="T65">98500</text:span> (10850 68076)<text:span text:style-name="T5"> 098</text:span></text:p>
      <text:p text:style-name="P185"><text:span text:style-name="T5">/00</text:span> 023<text:span text:style-name="T5"> /095 <text:s/></text:span><text:span text:style-name="T6">PL043*</text:span><text:span text:style-name="T5"> <text:s/></text:span></text:p>
      <text:p text:style-name="P145"><text:span text:style-name="T5"><text:s text:c="9"/></text:span><text:span text:style-name="T39"><text:s text:c="3"/></text:span></text:p>
      <text:p text:style-name="P46"><text:s text:c="13"/><text:span text:style-name="T39"><text:s/></text:span><text:span text:style-name="T14"><text:s/>TROLLEYS</text:span></text:p>
      <text:p text:style-name="P148"><text:s text:c="3"/>XXXX <text:s/>WHITE XXXX YELLOW1 19XX M BLACK <text:s/>XXXX <text:s text:c="23"/></text:p>
      <text:p text:style-name="P61"><text:s text:c="13"/>19XX <text:span text:style-name="T40"><text:s/></text:span><text:span text:style-name="T65">PLUMP TROLLEY*</text:span> <text:s/>YELLOW2 <text:s text:c="2"/>001YELLOW <text:s text:c="2"/>TIPPNING 1642 </text:p>
      <text:p text:style-name="P46"><text:s text:c="11"/></text:p>
      <text:p text:style-name="P61"><text:s text:c="11"/>CRANE</text:p>
      <text:p text:style-name="P46"><text:span text:style-name="T14"><text:s text:c="12"/></text:span><text:span text:style-name="T6"><text:s/>95207</text:span><text:span text:style-name="T14"> </text:span><text:s text:c="16"/></text:p>
      <text:p text:style-name="P46"><text:s text:c="9"/><text:span text:style-name="T14"><text:s text:c="3"/></text:span><text:span text:style-name="T72"><text:s text:c="6"/></text:span></text:p>
      <text:p text:style-name="P46"><text:s text:c="13"/><text:span text:style-name="T14">NEMESIS RAIL LTD</text:span></text:p>
      <text:p text:style-name="P148"><text:s text:c="4"/>DIESEILS</text:p>
      <text:p text:style-name="P46"><text:s text:c="14"/><text:span text:style-name="T14"><text:s text:c="2"/>73114 <text:s/></text:span><text:span text:style-name="T6">47744</text:span><text:span text:style-name="T14"> <text:s/>47488 26004 26011</text:span></text:p>
      <text:p text:style-name="P46"><text:span text:style-name="T14"><text:s text:c="13"/>20903 20904 D1233 <text:s/>D5217 <text:s text:c="2"/>08918 </text:span><text:span text:style-name="T6">31270</text:span></text:p>
      <text:p text:style-name="P148"><text:s text:c="3"/>31128 31461 <text:span text:style-name="T65">37255</text:span> <text:span text:style-name="T65">45112</text:span> 09006 <text:span text:style-name="T65">43043</text:span> <text:s/><text:span text:style-name="T65">43064</text:span> </text:p>
      <text:p text:style-name="P148"><text:s text:c="4"/><text:span text:style-name="T65">43079</text:span> <text:span text:style-name="T65">43081</text:span> 08575 237V 5380 7181 25265 </text:p>
      <text:p text:style-name="P148"><text:s text:c="3"/><text:span text:style-name="T65">43082</text:span> <text:span text:style-name="T65">43159</text:span> 08711 09014 D2324 </text:p>
      <text:p text:style-name="P61"><text:s text:c="11"/>10137 <text:s/>8805 5352 7041 <text:s/>3998 <text:span text:style-name="T65">47640*</text:span></text:p>
      <text:p text:style-name="P49"><text:s text:c="14"/>08630 <text:s/><text:span text:style-name="T65">33019*</text:span></text:p>
      <text:p text:style-name="P50"/>
      <text:p text:style-name="P49"><text:s text:c="14"/><text:span text:style-name="T5">COACHES</text:span></text:p>
      <text:p text:style-name="P49"><text:s text:c="13"/><text:span text:style-name="T5"><text:s text:c="3"/>3279 977085 1683 </text:span><text:span text:style-name="T6">1691</text:span><text:span text:style-name="T5"> 6351 <text:s/>3181 <text:s/></text:span></text:p>
      <text:p text:style-name="P148"><text:s text:c="3"/>3314 <text:s/>3331 4362 3424 4799 3141 4796 3379</text:p>
      <text:p text:style-name="P148"><text:s text:c="3"/>3333 3358 3400 3417 5777 11006 649 <text:s/>11021</text:p>
      <text:p text:style-name="P49"><text:span text:style-name="T5"><text:s text:c="15"/>5027 9490 975864 9521 <text:s/>9537</text:span> <text:s text:c="13"/></text:p>
      <text:p text:style-name="P46"><text:s text:c="10"/><text:span text:style-name="T72"><text:s/></text:span><text:span text:style-name="T14">11097 <text:s/>6024 6054 6067 </text:span></text:p>
      <text:p text:style-name="P46"><text:s text:c="13"/>9526 (083439 94752) <text:s text:c="2"/></text:p>
      <text:p text:style-name="P61"><text:s text:c="14"/>5950 975490 94058 977241 <text:s/></text:p>
      <text:p text:style-name="P144"><text:span text:style-name="T14">7931 <text:s text:c="2"/></text:span><text:s/><text:span text:style-name="T72"><text:s/></text:span></text:p>
      <text:p text:style-name="P49"><text:s text:c="9"/></text:p>
      <text:p text:style-name="P68"><text:s text:c="10"/><text:span text:style-name="T72"><text:s/>WAGONS</text:span></text:p>
      <text:p text:style-name="P51"><text:s text:c="17"/><text:span text:style-name="T14"><text:s text:c="5"/></text:span></text:p>
      <text:p text:style-name="P61"><text:s text:c="16"/></text:p>
      <text:p text:style-name="P61"><text:s text:c="15"/>998503 998507 </text:p>
      <text:p text:style-name="P61"><text:s text:c="12"/></text:p>
      <text:p text:style-name="P14"><text:s text:c="2"/>EMUS</text:p>
      <text:p text:style-name="P68"><text:span text:style-name="T72"><text:s text:c="13"/>62043 </text:span><text:span text:style-name="T65">69339</text:span><text:span text:style-name="T72"> 76048 76102</text:span> <text:s text:c="5"/></text:p>
      <text:p text:style-name="P49"><text:s text:c="17"/></text:p>
      <text:p text:style-name="P46"><text:s text:c="13"/><text:span text:style-name="T14"><text:s/>DMU</text:span></text:p>
      <text:p text:style-name="P61"><text:s text:c="18"/><text:span text:style-name="T65">79976</text:span></text:p>
      <text:p text:style-name="P67"/>
      <text:p text:style-name="P148"><text:s text:c="9"/>CRANES</text:p>
      <text:p text:style-name="P61"><text:s text:c="14"/>81335 96708 <text:s text:c="4"/></text:p>
      <text:p text:style-name="P61"><text:s text:c="19"/></text:p>
      <text:p text:style-name="P46"><text:s text:c="11"/><text:span text:style-name="T72"><text:s/></text:span><text:span text:style-name="T14"><text:s/>ROAD RAILER</text:span></text:p>
      <text:p text:style-name="P61"><text:s text:c="14"/>99709 909137-0</text:p>
      <text:p text:style-name="P152"><text:s text:c="19"/></text:p>
      <text:p text:style-name="P49"><text:s text:c="12"/><text:span text:style-name="T5">NORTH <text:s/>NORFOLK <text:s text:c="4"/>NR26 8RA</text:span></text:p>
      <text:p text:style-name="P148"><text:s text:c="6"/>Ground Coaches</text:p>
      <text:p text:style-name="P61"><text:s text:c="17"/><text:span text:style-name="T65">524</text:span> <text:s text:c="4"/>1137 </text:p>
      <text:p text:style-name="P61"/>
      <text:p text:style-name="P148"><text:s/><text:span text:style-name="T65">10525</text:span> 81114 <text:span text:style-name="T65">1969*</text:span> <text:span text:style-name="T65">3116*</text:span> 3868 4236 4372 4521 4641 </text:p>
      <text:p text:style-name="P148"><text:s text:c="2"/>4843 35148 <text:s/>21124 25189 26012 43041 46139 4958</text:p>
      <text:p text:style-name="P169"><text:s/>977054 21103<text:span text:style-name="T65"> 3984</text:span> 48001 48862 48863 1616 29</text:p>
      <text:p text:style-name="P149"><text:s/>80970 6843 70621 81269 <text:span text:style-name="T65">81033*</text:span> 5 52256 92097 94338</text:p>
      <text:p text:style-name="P148"><text:s/>94125 <text:span text:style-name="T65">94464* </text:span>48861 9128 853 7 129 15997 4667</text:p>
      <text:p text:style-name="P148"><text:s/>1651 1866 35457 <text:s/><text:span text:style-name="T65">(12493 3395*)</text:span> <text:s text:c="2"/>SR1216fo <text:s/>SR1359 <text:s/></text:p>
      <text:p text:style-name="P61"><text:s text:c="11"/><text:span text:style-name="T65">43556</text:span> <text:s text:c="2"/>(43357 53168) <text:s/><text:span text:style-name="T65">SR1439*</text:span> <text:s/><text:span text:style-name="T65">SR1476</text:span></text:p>
      <text:p text:style-name="P148"><text:s/></text:p>
      <text:p text:style-name="P155"/>
      <text:p text:style-name="P144"><text:span text:style-name="T14">GROUND</text:span> <text:span text:style-name="T14">WAGON </text:span></text:p>
      <text:p text:style-name="P61"><text:s text:c="13"/>633023</text:p>
      <text:p text:style-name="P61"/>
      <text:p text:style-name="P14"><text:s text:c="3"/>756939 783071 755094 740918 65970 558090 4228 </text:p>
      <text:p text:style-name="P46"><text:span text:style-name="T72"><text:s text:c="14"/></text:span><text:span text:style-name="T14"><text:s text:c="2"/>993707 </text:span><text:span text:style-name="T6">514207*</text:span><text:span text:style-name="T14"> </text:span><text:span text:style-name="T6">5304</text:span><text:span text:style-name="T14"> <text:s/></text:span><text:span text:style-name="T6">(12 740481*)</text:span><text:span text:style-name="T14"> 732930fo </text:span><text:span text:style-name="T6">1982*</text:span></text:p>
      <text:p text:style-name="P61"><text:s text:c="16"/><text:span text:style-name="T65">502824 </text:span><text:s text:c="2"/><text:span text:style-name="T65">4807*</text:span> <text:s/><text:span text:style-name="T65"><text:s/>950133*</text:span> <text:span text:style-name="T65"><text:s/>53083</text:span></text:p>
      <text:p text:style-name="P49"><text:s text:c="11"/></text:p>
      <text:p text:style-name="P46"><text:s text:c="18"/></text:p>
      <text:p text:style-name="P49"><text:s text:c="20"/>DIESELS</text:p>
      <text:p text:style-name="P49"><text:span text:style-name="T5"><text:s text:c="13"/>D2051 </text:span><text:span text:style-name="T6">37032</text:span><text:span text:style-name="T5"> D2063 (D3935 08767) </text:span><text:span text:style-name="T6">(D3940 08772)</text:span></text:p>
      <text:p text:style-name="P46"><text:s text:c="10"/><text:span text:style-name="T14"><text:s text:c="4"/></text:span><text:span text:style-name="T6">12131*</text:span><text:span text:style-name="T14"> <text:s/></text:span><text:span text:style-name="T6">(D5631 31207)</text:span><text:span text:style-name="T14"> </text:span><text:s/></text:p>
      <text:p text:style-name="P61"><text:s text:c="17"/></text:p>
      <text:p text:style-name="P148"><text:s text:c="8"/>STEAMS</text:p>
      <text:p text:style-name="P148"><text:s text:c="15"/>1982 45337 8572 564 76084 90775 92203</text:p>
      <text:p text:style-name="P46"/>
      <text:p text:style-name="P49"><text:s text:c="14"/><text:span text:style-name="T5">DMUS </text:span></text:p>
      <text:p text:style-name="P61"><text:s text:c="17"/>977554 <text:span text:style-name="T65">56062*</text:span> <text:s text:c="2"/>51188 51192 <text:s/><text:span text:style-name="T65">51228*</text:span> 56352 50479</text:p>
      <text:p text:style-name="P61"><text:span text:style-name="T66"><text:s text:c="16"/></text:span><text:s/></text:p>
      <text:p text:style-name="P61"><text:s text:c="18"/></text:p>
      <text:p text:style-name="P61"><text:s text:c="16"/></text:p>
      <text:p text:style-name="P46"><text:s text:c="13"/><text:span text:style-name="T72">CRANE</text:span></text:p>
      <text:p text:style-name="P61"><text:s text:c="11"/>80117 </text:p>
      <text:p text:style-name="P49"><text:s text:c="12"/></text:p>
      <text:p text:style-name="P61"><text:s text:c="12"/>NORTH YORSHIRE MOORS</text:p>
      <text:p text:style-name="P152"><text:s text:c="2"/>COACHES</text:p>
      <text:p text:style-name="P152"><text:s text:c="2"/>5029 16191 16156 15745 14007 175 176 35089 9274</text:p>
      <text:p text:style-name="P152"><text:s text:c="3"/>9225 93545 5001 173 4286 4252 4198 9235 21100</text:p>
      <text:p text:style-name="P153"><text:s/>174 5000 4990 4839 4817 4597 4455 4290 3948 <text:s/>3801</text:p>
      <text:p text:style-name="P68"><text:s text:c="11"/>80509 86604 3860 4921 80974 1322 172 <text:span text:style-name="T65">1308</text:span> 110E</text:p>
      <text:p text:style-name="P61"><text:s text:c="13"/>3798 <text:s text:c="2"/>1823 324 3872 5058 189 40 10689 56856</text:p>
      <text:p text:style-name="P150"><text:s text:c="4"/>1880 1878 328 327 318 23956 88339 43632 <text:s/>23986</text:p>
      <text:p text:style-name="P148"><text:s text:c="2"/>24109 641 945 3669 <text:span text:style-name="T65">1623</text:span> 1299 320427 42969 <text:span text:style-name="T65">3291</text:span> 18477 </text:p>
      <text:p text:style-name="P148"><text:s text:c="2"/>86639 10591 43567 10178 44408 (2 25040) sr2530 <text:s/></text:p>
      <text:p text:style-name="P61"><text:s text:c="11"/>80220 62540 <text:s/>(975455 35087) 99035 <text:span text:style-name="T65">70754</text:span> <text:s text:c="2"/></text:p>
      <text:p text:style-name="P61"><text:s text:c="19"/><text:span text:style-name="T40"><text:s text:c="3"/></text:span></text:p>
      <text:p text:style-name="P46"><text:s text:c="10"/><text:span text:style-name="T14"><text:s text:c="4"/>Ground Wagons</text:span></text:p>
      <text:p text:style-name="P61"><text:s text:c="14"/>1XXXXG 1XXXX GREY NER GROUND GWR</text:p>
      <text:p text:style-name="P49"><text:s text:c="16"/><text:span text:style-name="T5"><text:s/></text:span></text:p>
      <text:p text:style-name="P46"><text:span text:style-name="T72"><text:s text:c="14"/></text:span><text:span text:style-name="T14">990109 950077 952645 994275 </text:span><text:span text:style-name="T6">982667</text:span><text:span text:style-name="T14"> 900935 </text:span></text:p>
      <text:p text:style-name="P61"><text:s text:c="14"/>786655 752523 451885 4025 983014 853042</text:p>
      <text:p text:style-name="P46"><text:s text:c="14"/><text:span text:style-name="T14"><text:s text:c="2"/>4089 753473 731270 452670 781763 <text:s/>445025</text:span></text:p>
      <text:p text:style-name="P61"><text:s text:c="14"/>775340 771448 731242 993894 782274 237495 <text:s text:c="10"/></text:p>
      <text:p text:style-name="P144"><text:span text:style-name="T5"><text:s text:c="3"/></text:span><text:span text:style-name="T14"><text:s/></text:span><text:span text:style-name="T5"><text:s/>14036 783182 75169 <text:s/>3697 988228 901622 </text:span><text:span text:style-name="T6">4503</text:span><text:span text:style-name="T5"> <text:s/>946060</text:span></text:p>
      <text:p text:style-name="P249"><text:s text:c="5"/>230908 3192 307005 725024 479157 577 75101 </text:p>
      <text:p text:style-name="P249"><text:s text:c="4"/>85530 982619 <text:s/><text:span text:style-name="T65">8495 </text:span>904151 904152 900119</text:p>
      <text:p text:style-name="P249"><text:s text:c="4"/>431861 419025 418444 99Z03 <text:s/>58033 <text:span text:style-name="T65">903012</text:span></text:p>
      <text:p text:style-name="P249"><text:s text:c="3"/>44019 901500 905009 90F 900033 982608 <text:s text:c="2"/></text:p>
      <text:p text:style-name="P263"><text:s text:c="2"/><text:span text:style-name="T73"><text:s/>933122 2716 </text:span><text:span text:style-name="T75">246710</text:span><text:span text:style-name="T73"> 187774 301559 300045</text:span></text:p>
      <text:p text:style-name="P263"><text:span text:style-name="T73"><text:s text:c="2"/></text:span><text:span text:style-name="T75">20271</text:span><text:span text:style-name="T73"> 112835 <text:s/>32802 982595 991840 955225 </text:span></text:p>
      <text:p text:style-name="P111"><text:s text:c="11"/>954854 982849 7285 6 940081 47923 278885CR</text:p>
      <text:p text:style-name="P61"><text:s text:c="12"/>98799 894178 934386 934281 934279 288824</text:p>
      <text:p text:style-name="P148"><text:s text:c="4"/>998014 <text:s/>269004 217315 741620 282328 932267 </text:p>
      <text:p text:style-name="P46"><text:s text:c="12"/><text:span text:style-name="T72">296379 <text:s text:c="3"/>282028 <text:s text:c="2"/>632803 934280 30471 <text:s/>941751C R</text:span></text:p>
      <text:p text:style-name="P186"><text:span text:style-name="T72"><text:s text:c="2"/></text:span><text:span text:style-name="T65">415776</text:span> 782625 782670 782523 <text:s/>330152CR</text:p>
      <text:p text:style-name="P186"><text:s text:c="2"/>LP202 13788FO (237495 850238) 885FO <text:s/><text:span text:style-name="T5"><text:s/>103310CR </text:span></text:p>
      <text:p text:style-name="P148"><text:s text:c="10"/>887FO <text:s/>NER18 SP <text:s text:c="2"/></text:p>
      <text:p text:style-name="P49"><text:s text:c="9"/><text:span text:style-name="T5"><text:s text:c="2"/></text:span></text:p>
      <text:p text:style-name="P61"><text:s text:c="12"/></text:p>
      <text:p text:style-name="P14"><text:s text:c="3"/>DIESELS</text:p>
      <text:p text:style-name="P49"><text:span text:style-name="T5"><text:s text:c="13"/></text:span><text:span text:style-name="T6">08495</text:span><text:span text:style-name="T5"> </text:span><text:span text:style-name="T6">D5061</text:span><text:span text:style-name="T5"> </text:span><text:span text:style-name="T6">24032</text:span><text:span text:style-name="T5"> </text:span><text:span text:style-name="T6">12139</text:span><text:span text:style-name="T5"> </text:span><text:span text:style-name="T6">08850</text:span><text:span text:style-name="T5"> <text:s/></text:span></text:p>
      <text:p text:style-name="P49"><text:s text:c="12"/><text:span text:style-name="T5"><text:s text:c="2"/>47077 <text:s/></text:span><text:span text:style-name="T6"><text:s/>08556</text:span><text:span text:style-name="T5"> </text:span><text:span text:style-name="T6">37264</text:span><text:span text:style-name="T5"> </text:span><text:span text:style-name="T6">D2207</text:span><text:span text:style-name="T5"> <text:s/></text:span><text:span text:style-name="T6">1195</text:span><text:span text:style-name="T5"> </text:span><text:span text:style-name="T6">(D7628 25278)</text:span></text:p>
      <text:p text:style-name="P67"/>
      <text:p text:style-name="P14"><text:s/>STEAMS</text:p>
      <text:p text:style-name="P46"><text:span text:style-name="T72"><text:s text:c="12"/></text:span><text:span text:style-name="T65">5428</text:span> <text:span text:style-name="T65">92134</text:span> <text:span text:style-name="T65">76079</text:span> <text:s/><text:span text:style-name="T65">75029</text:span> <text:span text:style-name="T65">3672</text:span> 2392 <text:span text:style-name="T65">2238</text:span> <text:span text:style-name="T65">60007</text:span> <text:span text:style-name="T65">44806</text:span></text:p>
      <text:p text:style-name="P46"><text:s text:c="10"/><text:span text:style-name="T14"><text:s text:c="3"/></text:span><text:span text:style-name="T6">34101</text:span><text:span text:style-name="T14"> </text:span><text:span text:style-name="T6">30926</text:span><text:span text:style-name="T14"> 841 <text:s/></text:span><text:span text:style-name="T6">61264</text:span><text:span text:style-name="T14"> 29 1625 </text:span><text:span text:style-name="T6">3377</text:span><text:span text:style-name="T14"> </text:span><text:span text:style-name="T6">830</text:span><text:span text:style-name="T14"> 80135</text:span></text:p>
      <text:p text:style-name="P61"><text:s text:c="14"/><text:span text:style-name="T65">825</text:span> 80136 <text:s text:c="2"/><text:span text:style-name="T40"><text:s text:c="3"/></text:span><text:s text:c="6"/></text:p>
      <text:p text:style-name="P49"><text:s text:c="15"/></text:p>
      <text:p text:style-name="P49"><text:s text:c="15"/><text:span text:style-name="T5"><text:s/>DMUS </text:span></text:p>
      <text:p text:style-name="P61"><text:s text:c="14"/><text:span text:style-name="T65">50160</text:span> <text:span text:style-name="T65">59539 </text:span><text:s text:c="2"/><text:span text:style-name="T65">51511</text:span> 50164 <text:span text:style-name="T65">50204</text:span></text:p>
      <text:p text:style-name="P61"><text:s text:c="11"/></text:p>
      <text:p text:style-name="P61"><text:s text:c="10"/>ROAD RAILERS </text:p>
      <text:p text:style-name="P111"><text:s text:c="10"/>54053 54641 E6 (Q398 PVL 51040)</text:p>
      <text:p text:style-name="P46"><text:s text:c="13"/></text:p>
      <text:p text:style-name="P148"><text:s text:c="2"/>TRACK MACHINES</text:p>
      <text:p text:style-name="P49"><text:span text:style-name="T5"><text:s text:c="11"/>73250 73214 </text:span><text:span text:style-name="T6">73307</text:span> </text:p>
      <text:p text:style-name="P49"/>
      <text:p text:style-name="P49"><text:s text:c="13"/><text:span text:style-name="T5">TROLLEYS</text:span></text:p>
      <text:p text:style-name="P46"><text:span text:style-name="T14"><text:s text:c="12"/>19XX 19XX 19XX 417</text:span> </text:p>
      <text:p text:style-name="P46"><text:s text:c="10"/></text:p>
      <text:p text:style-name="P46"><text:s text:c="14"/><text:span text:style-name="T14">CRANES </text:span></text:p>
      <text:p text:style-name="P61"><text:s text:c="13"/>2 16 2524 81516 95214<text:span text:style-name="T65"> 330107</text:span> <text:s/></text:p>
      <text:p text:style-name="P35"><text:s text:c="13"/><text:span text:style-name="T67"><text:s text:c="3"/></text:span><text:span text:style-name="T69"><text:s/></text:span><text:span text:style-name="T36"><text:s text:c="4"/>NORTHAMPTON LAMPORT RAILWAY</text:span></text:p>
      <text:p text:style-name="P49"><text:s text:c="12"/><text:span text:style-name="T5"><text:s text:c="8"/>COACHES</text:span></text:p>
      <text:p text:style-name="P262"><text:s text:c="4"/>5132 <text:span text:style-name="T65">3919* </text:span>1647 <text:span text:style-name="T65">37326*</text:span> <text:span text:style-name="T65">889301*</text:span><text:span text:style-name="T72"> </text:span><text:span text:style-name="T65">297</text:span> <text:span text:style-name="T65">82114</text:span> <text:span text:style-name="T65">5174*</text:span></text:p>
      <text:p text:style-name="P186"><text:span text:style-name="T72"><text:s text:c="5"/></text:span><text:span text:style-name="T65">94071</text:span><text:span text:style-name="T72"> </text:span><text:span text:style-name="T65">84031</text:span><text:span text:style-name="T72"> </text:span><text:span text:style-name="T65">21187</text:span><text:span text:style-name="T72"> </text:span><text:span text:style-name="T65">12118*</text:span><text:span text:style-name="T72"> </text:span><text:span text:style-name="T65">12067*</text:span><text:span text:style-name="T72"> </text:span><text:span text:style-name="T65">SR2158*</text:span></text:p>
      <text:p text:style-name="P49"><text:span text:style-name="T5"><text:s text:c="13"/>13324 <text:s text:c="4"/></text:span><text:span text:style-name="T6">10412*</text:span><text:span text:style-name="T5"> </text:span><text:span text:style-name="T6">9102*</text:span><text:span text:style-name="T5"> </text:span><text:span text:style-name="T6">(395492 35062)</text:span><text:span text:style-name="T5"> </text:span><text:span text:style-name="T6">12049*</text:span><text:span text:style-name="T5"> <text:s text:c="10"/></text:span></text:p>
      <text:p text:style-name="P4"><text:span text:style-name="T5"><text:s text:c="9"/></text:span><text:s text:c="2"/></text:p>
      <text:p text:style-name="P46"><text:s text:c="12"/><text:span text:style-name="T72"><text:s text:c="2"/></text:span></text:p>
      <text:p text:style-name="P50"/>
      <text:p text:style-name="P46"><text:span text:style-name="T5"><text:s text:c="11"/></text:span><text:span text:style-name="T14"><text:s text:c="6"/>GROUND WAGON </text:span></text:p>
      <text:p text:style-name="P61"><text:s text:c="16"/>1XXXXX</text:p>
      <text:p text:style-name="P61"/>
      <text:p text:style-name="P4"><text:s text:c="4"/><text:span text:style-name="T5"><text:s/>WAGONS</text:span></text:p>
      <text:p text:style-name="P186"><text:s text:c="5"/>993399 993270 <text:span text:style-name="T65">900914*</text:span> 993748 <text:span text:style-name="T65">200026*</text:span> <text:s/><text:span text:style-name="T65">3777*</text:span> </text:p>
      <text:p text:style-name="P144"><text:span text:style-name="T14"><text:s text:c="4"/>992300 </text:span><text:span text:style-name="T6">48307*</text:span><text:span text:style-name="T14"> </text:span><text:span text:style-name="T6">900419*</text:span><text:span text:style-name="T14"> <text:s/></text:span><text:span text:style-name="T6">951805*</text:span><text:span text:style-name="T14"> <text:s/></text:span><text:span text:style-name="T6">942667*</text:span><text:span text:style-name="T14"> </text:span><text:span text:style-name="T6">996995*</text:span></text:p>
      <text:p text:style-name="P14"><text:s/>935493 <text:s text:c="2"/><text:span text:style-name="T65">94850*</text:span> <text:s/><text:span text:style-name="T65">260861*</text:span> <text:span text:style-name="T65">113008*</text:span> 499227 <text:s text:c="3"/><text:span text:style-name="T65">44551*</text:span></text:p>
      <text:p text:style-name="P14"><text:s/><text:span text:style-name="T65">38862*</text:span> <text:s text:c="5"/><text:span text:style-name="T65"><text:s/>952510*</text:span></text:p>
      <text:p text:style-name="P17"/>
      <text:p text:style-name="P46"><text:s/><text:span text:style-name="T72"><text:s text:c="13"/>DIESELS</text:span></text:p>
      <text:p text:style-name="P64"><text:s text:c="15"/><text:span text:style-name="T65">31289</text:span> <text:span text:style-name="T65">47205*</text:span> <text:span text:style-name="T65">4210094*</text:span> <text:span text:style-name="T65">4210018</text:span> 319294 <text:span text:style-name="T65">319286*</text:span></text:p>
      <text:p text:style-name="P155"/>
      <text:p text:style-name="P46"><text:s text:c="12"/><text:span text:style-name="T5"><text:s/></text:span><text:span text:style-name="T14"><text:s text:c="2"/>STEAMS </text:span></text:p>
      <text:p text:style-name="P146"><text:span text:style-name="T72"><text:s text:c="10"/>776 </text:span>3719<text:span text:style-name="T72"> 2323 </text:span>2104<text:span text:style-name="T72"> </text:span>1378<text:span text:style-name="T72"> 2130 <text:s/></text:span>5967<text:span text:style-name="T72"> <text:s text:c="2"/></text:span>3862</text:p>
      <text:p text:style-name="P146"/>
      <text:p text:style-name="P49"><text:s text:c="16"/><text:span text:style-name="T5">ROAD RAILER</text:span></text:p>
      <text:p text:style-name="P14"><text:s text:c="4"/><text:span text:style-name="T65">99709 901013-1</text:span> <text:s text:c="2"/></text:p>
      <text:p text:style-name="P46"><text:s text:c="10"/></text:p>
      <text:p text:style-name="P49"><text:s text:c="13"/><text:span text:style-name="T5"><text:s text:c="3"/>CRANE</text:span></text:p>
      <text:p text:style-name="P61"><text:s text:c="14"/><text:span text:style-name="T65">13294*</text:span> <text:s/></text:p>
      <text:p text:style-name="P46"><text:s text:c="13"/></text:p>
      <text:p text:style-name="P68"><text:s text:c="14"/><text:span text:style-name="T72"><text:s text:c="2"/>NOTTINGHAM H C</text:span></text:p>
      <text:p text:style-name="P219"><text:s text:c="7"/>COACHES</text:p>
      <text:p text:style-name="P61"><text:s text:c="16"/>5365 799 1811 666 695 664 228 11074 5376 5412</text:p>
      <text:p text:style-name="P61"><text:s text:c="17"/>5497 25693 <text:s/>12092 10206 12087 12134 <text:s/></text:p>
      <text:p text:style-name="P265"><text:s text:c="3"/>35512 16168 16190 94407 86129 (150353 1012)</text:p>
      <text:p text:style-name="P262"><text:s text:c="3"/>9389 <text:s/>10202 44000 93565 12065 373 <text:s/><text:span text:style-name="T65">(31274 1663UF)</text:span></text:p>
      <text:p text:style-name="P46"><text:span text:style-name="T14"><text:s text:c="12"/></text:span><text:span text:style-name="T6">4207 </text:span><text:span text:style-name="T14"><text:s/></text:span><text:span text:style-name="T6">31927</text:span><text:span text:style-name="T14"> </text:span><text:span text:style-name="T6">10602</text:span><text:span text:style-name="T14"> <text:s text:c="9"/></text:span></text:p>
      <text:p text:style-name="P49"><text:s text:c="10"/></text:p>
      <text:p text:style-name="P49"><text:s text:c="12"/><text:span text:style-name="T5"><text:s/>GROUND <text:s text:c="5"/>WAGONS <text:s/></text:span></text:p>
      <text:p text:style-name="P61"><text:s text:c="14"/><text:span text:style-name="T65">764173</text:span> <text:span text:style-name="T65">757277 </text:span></text:p>
      <text:p text:style-name="P61"><text:s text:c="13"/></text:p>
      <text:p text:style-name="P61"><text:s text:c="14"/>992813 4023 993874 4036 411153 778771 4040 </text:p>
      <text:p text:style-name="P219"><text:s/>784455 786902 357771 <text:s/>900937 403020 <text:s/>993230</text:p>
      <text:p text:style-name="P148"><text:s text:c="3"/>900936 983586 992954 993039 952282 43103</text:p>
      <text:p text:style-name="P148"><text:s text:c="3"/>200105 201055 9000032 503566 220964 301597 </text:p>
      <text:p text:style-name="P144"><text:s text:c="2"/><text:span text:style-name="T14"><text:s/>991831 943545 060911 5209 200 68500 994271 </text:span></text:p>
      <text:p text:style-name="P148"><text:s text:c="5"/>991361 4180 726552 2000079 998500cr (46 <text:s/>44) </text:p>
      <text:p text:style-name="P148"><text:s text:c="6"/>721218 994770 </text:p>
      <text:p text:style-name="P61"><text:s text:c="11"/></text:p>
      <text:p text:style-name="P148"><text:s text:c="8"/>DIESELS</text:p>
      <text:p text:style-name="P49"><text:s text:c="14"/>03118 46010 <text:span text:style-name="T65">47292</text:span> <text:span text:style-name="T65">08220</text:span> 37009 <text:s/>H014</text:p>
      <text:p text:style-name="P61"><text:s text:c="11"/>449754 <text:s/><text:span text:style-name="T65">(31162 5580)</text:span> <text:span text:style-name="T65">(D7629 25279)</text:span> <text:span text:style-name="T65">(D8154 20154)</text:span> <text:s text:c="3"/></text:p>
      <text:p text:style-name="P148"><text:s text:c="8"/></text:p>
      <text:p text:style-name="P61"><text:s text:c="14"/>STEAMS</text:p>
      <text:p text:style-name="P49"><text:s text:c="16"/>1682 1782 2009 2015 7667 7761 70610 69521 70284</text:p>
      <text:p text:style-name="P61"><text:s text:c="16"/>(24648 <text:s text:c="2"/>8274) <text:s text:c="5"/></text:p>
      <text:p text:style-name="P49"><text:s text:c="12"/><text:span text:style-name="T5"><text:s text:c="5"/></text:span></text:p>
      <text:p text:style-name="P49"><text:s text:c="11"/><text:span text:style-name="T5"><text:s/>DMUS</text:span></text:p>
      <text:p text:style-name="P61"><text:span text:style-name="T5"><text:s text:c="12"/>51151 59501 59522 51138 </text:span><text:span text:style-name="T65">144003</text:span></text:p>
      <text:p text:style-name="P46"><text:s text:c="16"/></text:p>
      <text:p text:style-name="P46"><text:s text:c="10"/><text:span text:style-name="T14">ROAD RAILERS</text:span></text:p>
      <text:p text:style-name="P67"><text:span text:style-name="T72"><text:s text:c="10"/></text:span>(68807 008)<text:span text:style-name="T66"> <text:s text:c="3"/></text:span><text:span text:style-name="T72">R649 JFE </text:span></text:p>
      <text:p text:style-name="P61"><text:s text:c="17"/></text:p>
      <text:p text:style-name="P49"><text:s text:c="8"/><text:span text:style-name="T5"><text:s/>CRANES </text:span></text:p>
      <text:p text:style-name="P133"><text:s text:c="15"/>2621 941602</text:p>
      <text:p text:style-name="P61"><text:s text:c="5"/></text:p>
      <text:p text:style-name="P49"><text:s text:c="13"/><text:span text:style-name="T5">NOTTINGHAM L S</text:span></text:p>
      <text:p text:style-name="P168"><text:s text:c="5"/>WAGONS</text:p>
      <text:p text:style-name="P68"><text:s text:c="11"/>64965 54 849 624 2317 3224 950061 3046 </text:p>
      <text:p text:style-name="P61"><text:s text:c="11"/>(407942 024176) 5 PLANK</text:p>
      <text:p text:style-name="P61"/>
      <text:p text:style-name="P61"><text:s text:c="13"/>DIESELS</text:p>
      <text:p text:style-name="P111"><text:s text:c="12"/>D607 4220001 321734 3967 2087 4220016</text:p>
      <text:p text:style-name="P46"><text:s text:c="7"/></text:p>
      <text:p text:style-name="P61"><text:s text:c="17"/>EMUS </text:p>
      <text:p text:style-name="P61"><text:s text:c="15"/>70510 70296 70284 <text:span text:style-name="T65">69304</text:span> <text:span text:style-name="T65">15396</text:span> <text:span text:style-name="T65">14352</text:span> <text:s/><text:span text:style-name="T65">13004</text:span></text:p>
      <text:p text:style-name="P61"><text:s text:c="18"/></text:p>
      <text:p text:style-name="P144"><text:s text:c="2"/><text:span text:style-name="T14"><text:s text:c="4"/>STEAMS</text:span></text:p>
      <text:p text:style-name="P49"><text:s text:c="14"/><text:span text:style-name="T65">9369</text:span> <text:span text:style-name="T65">9365</text:span></text:p>
      <text:p text:style-name="P148"/>
      <text:p text:style-name="P61"><text:s text:c="10"/>ROAD RAILER</text:p>
      <text:p text:style-name="P61"><text:s text:c="11"/>(99709 91211019-6</text:p>
      <text:p text:style-name="P46"><text:s text:c="16"/></text:p>
      <text:p text:style-name="P46"><text:span text:style-name="T72"><text:s text:c="11"/></text:span><text:span text:style-name="T14">TROLLEYS </text:span></text:p>
      <text:p text:style-name="P49"><text:s text:c="13"/>19XX 19XX </text:p>
      <text:p text:style-name="P48"><text:s text:c="11"/></text:p>
      <text:p text:style-name="P90"><text:span text:style-name="T73"><text:s text:c="11"/></text:span><text:span text:style-name="T74"><text:s text:c="2"/></text:span><text:span text:style-name="T17"><text:s text:c="4"/>CRANE</text:span></text:p>
      <text:p text:style-name="P61"><text:s text:c="13"/>89 2 <text:s text:c="5"/></text:p>
      <text:p text:style-name="P61"/>
      <text:p text:style-name="P46"><text:s text:c="11"/><text:span text:style-name="T14"><text:s text:c="4"/>PEAK RAIL </text:span></text:p>
      <text:p text:style-name="P262"><text:s text:c="3"/>Ground Coach </text:p>
      <text:p text:style-name="P46"><text:span text:style-name="T14"><text:s text:c="13"/></text:span><text:span text:style-name="T6"><text:s/>348</text:span> <text:s text:c="12"/></text:p>
      <text:p text:style-name="P14"><text:s/></text:p>
      <text:p text:style-name="P61"><text:s text:c="17"/>2080 9394 21216 80905 999501 94589 2924</text:p>
      <text:p text:style-name="P61"><text:s text:c="14"/>5797 <text:s/>94630 86383 395923 3286 1501 1782 5682</text:p>
      <text:p text:style-name="P148"><text:s text:c="4"/>94522 94066 <text:s/>92912 395476 (81554 84554) S51235</text:p>
      <text:p text:style-name="P61"><text:s text:c="12"/>86183 92158 6815 (10825 590) (395845 5864)</text:p>
      <text:p text:style-name="P162"><text:span text:style-name="T73"><text:s text:c="2"/></text:span><text:span text:style-name="T15"><text:s/>7828 80777 9125 1371 </text:span><text:span text:style-name="T16">92061</text:span><text:span text:style-name="T15"> </text:span><text:span text:style-name="T16">9082</text:span><text:span text:style-name="T15"> <text:s text:c="2"/></text:span><text:span text:style-name="T16">21268</text:span></text:p>
      <text:p text:style-name="P61"><text:s text:c="12"/>27109 9229 </text:p>
      <text:p text:style-name="P46"><text:s text:c="14"/><text:span text:style-name="T72"><text:s/></text:span></text:p>
      <text:p text:style-name="P148"><text:s text:c="2"/>Ground Wagons </text:p>
      <text:p text:style-name="P262"><text:s text:c="3"/>230539 230492 <text:span text:style-name="T65">(230280 783422)</text:span> 787164 <text:span text:style-name="T65">783544</text:span> </text:p>
      <text:p text:style-name="P262"><text:s text:c="3"/>783289 230418 <text:span text:style-name="T74"><text:s text:c="2"/>230331 230223 783681 230402</text:span></text:p>
      <text:p text:style-name="P145"><text:span text:style-name="T5"><text:s text:c="5"/>230358 <text:s text:c="4"/>7xxxxx 75xxxxx 10t 4w mr <text:s/>cr green <text:s/>lmsr <text:s/></text:span><text:s/><text:span text:style-name="T5"><text:s text:c="2"/></text:span></text:p>
      <text:p text:style-name="P61"><text:s text:c="12"/></text:p>
      <text:p text:style-name="P46"><text:s text:c="8"/><text:span text:style-name="T14">770697 </text:span><text:span text:style-name="T6">40294*</text:span><text:span text:style-name="T14"> 4179 </text:span><text:span text:style-name="T6">769951*</text:span><text:span text:style-name="T14"> 515627 730949 732376</text:span></text:p>
      <text:p text:style-name="P262"><text:s text:c="6"/><text:span text:style-name="T65">993768</text:span> 993076 229550 999094uf <text:s/>199970 </text:p>
      <text:p text:style-name="P262"><text:s text:c="3"/>983904 <text:s/>97 85374 187825 <text:span text:style-name="T65">460098</text:span> <text:span text:style-name="T65"><text:s/>67024*</text:span> <text:span text:style-name="T65">914905</text:span> 992322 </text:p>
      <text:p text:style-name="P262"><text:s text:c="3"/><text:span text:style-name="T65">2071</text:span> 87 041963 2363 <text:span text:style-name="T65">1861*</text:span> <text:span text:style-name="T65">313014*</text:span> 230943 996366</text:p>
      <text:p text:style-name="P262"><text:s text:c="2"/>4192 1060 187826 <text:span text:style-name="T65">503515</text:span> <text:span text:style-name="T65">506322</text:span> 730851 <text:s text:c="2"/></text:p>
      <text:p text:style-name="P61"><text:s text:c="12"/>994256 <text:s text:c="2"/>988443 5 <text:s/>44047 199990 119 <text:span text:style-name="T65">778331</text:span> </text:p>
      <text:p text:style-name="P49"><text:s text:c="10"/><text:span text:style-name="T65">922648*</text:span> 30452 991773 <text:s/>2181 2142 008 6 <text:s/></text:p>
      <text:p text:style-name="P46"><text:s text:c="11"/>(134747 747) 941753cr 2181 2141 000-3 178xx6c</text:p>
      <text:p text:style-name="P46"><text:span text:style-name="T14"><text:s text:c="14"/>10uf lowmack black flat low trolley 228flat <text:s/>r </text:span><text:span text:style-name="T6">6253</text:span> <text:s text:c="9"/></text:p>
      <text:p text:style-name="P14"><text:s/></text:p>
      <text:p text:style-name="P46"><text:s text:c="15"/><text:span text:style-name="T72"><text:s text:c="3"/></text:span></text:p>
      <text:p text:style-name="P46"><text:span text:style-name="T72"><text:s text:c="13"/></text:span><text:span text:style-name="T14"><text:s/>DIESELS</text:span></text:p>
      <text:p text:style-name="P61"><text:s text:c="12"/>03114 <text:span text:style-name="T65">50029*</text:span> <text:span text:style-name="T65">50030*</text:span> D8 D7659 <text:span text:style-name="T65">08830</text:span> D3023</text:p>
      <text:p text:style-name="P61"><text:s text:c="11"/>03180 <text:s text:c="2"/><text:span text:style-name="T65">03099*</text:span> D9525 <text:s/>03027 <text:s text:c="4"/><text:span text:style-name="T65">D2953</text:span> D2866</text:p>
      <text:p text:style-name="P46"><text:span text:style-name="T72"><text:s text:c="11"/></text:span><text:span text:style-name="T65">D2854*</text:span><text:span text:style-name="T72"> <text:s text:c="2"/></text:span><text:span text:style-name="T65">D2587*</text:span><text:span text:style-name="T72"> D2337 <text:s/>D3420 </text:span><text:span text:style-name="T65">D2272</text:span><text:span text:style-name="T72"> </text:span><text:span text:style-name="T65">4200019</text:span></text:p>
      <text:p text:style-name="P49"><text:s text:c="9"/><text:span text:style-name="T65">37310*</text:span> H4323 <text:s/>319284 431761 400 <text:span text:style-name="T65">D2199</text:span> 2480</text:p>
      <text:p text:style-name="P61"><text:s text:c="10"/>D278 D2205 <text:s/><text:span text:style-name="T65">D2284</text:span> 8122 07001 D1239 D1120</text:p>
      <text:p text:style-name="P148">(312990 97650) <text:s/>09001 <text:s/><text:span text:style-name="T65">(412431 97654*)</text:span> <text:s/></text:p>
      <text:p text:style-name="P49"><text:span text:style-name="T5"><text:s text:c="11"/>D2654 <text:s/></text:span><text:span text:style-name="T6">46035</text:span><text:span text:style-name="T5"> </text:span></text:p>
      <text:p text:style-name="P145"><text:span text:style-name="T5"><text:s text:c="5"/></text:span><text:s text:c="2"/></text:p>
      <text:p text:style-name="P14">STEAMS</text:p>
      <text:p text:style-name="P148"><text:s text:c="3"/>3138 6919 7063 7136 5309 6634 5553 5224 </text:p>
      <text:p text:style-name="P148"/>
      <text:p text:style-name="P61"><text:s text:c="15"/>ROAD RAILERS</text:p>
      <text:p text:style-name="P61"><text:s text:c="12"/>36686 36685 62208 (656161 9688) (26 5304) (35 60130)</text:p>
      <text:p text:style-name="P61"><text:s text:c="12"/>(84139 30002) <text:s/></text:p>
      <text:p text:style-name="P148"/>
      <text:p text:style-name="P49"><text:span text:style-name="T5"><text:s text:c="14"/></text:span><text:s text:c="3"/><text:span text:style-name="T5">TROLLEY</text:span></text:p>
      <text:p text:style-name="P69"><text:s text:c="10"/>XXXX <text:s text:c="10"/></text:p>
      <text:p text:style-name="P145"><text:s text:c="7"/></text:p>
      <text:p text:style-name="P46"><text:s text:c="9"/><text:span text:style-name="T14"><text:s text:c="3"/></text:span><text:span text:style-name="T34">PLASMOR <text:s/>LTD</text:span></text:p>
      <text:p text:style-name="P184"><text:s text:c="4"/>DIESELS</text:p>
      <text:p text:style-name="P61"><text:span text:style-name="T66"><text:s text:c="13"/></text:span><text:span text:style-name="T65">5481*</text:span><text:span text:style-name="T66"> <text:s text:c="2"/></text:span><text:span text:style-name="T65">5482</text:span><text:span text:style-name="T66"> </text:span></text:p>
      <text:p text:style-name="P69"/>
      <text:p text:style-name="P46"><text:s text:c="13"/><text:span text:style-name="T14"><text:s text:c="2"/>PLYM VALLEY </text:span></text:p>
      <text:p text:style-name="P262">Ground coach </text:p>
      <text:p text:style-name="P67"><text:span text:style-name="T72"><text:s text:c="10"/></text:span><text:s/>LBSCR</text:p>
      <text:p text:style-name="P61"><text:s text:c="9"/></text:p>
      <text:p text:style-name="P67"/>
      <text:p text:style-name="P111"><text:s text:c="13"/><text:span text:style-name="T65">86927</text:span> <text:s/><text:span text:style-name="T65">86887</text:span> <text:span text:style-name="T65">17092</text:span> <text:s/><text:span text:style-name="T65">17089</text:span> <text:s/><text:span text:style-name="T65">5199</text:span> <text:s/><text:span text:style-name="T65">5141</text:span></text:p>
      <text:p text:style-name="P221"/>
      <text:p text:style-name="P61"><text:s text:c="14"/>Ground Wagons </text:p>
      <text:p text:style-name="P61"><text:span text:style-name="T117"><text:s text:c="14"/>(12T GREEN) <text:s/>12T GREY 2848 <text:s/></text:span><text:span text:style-name="T118">854105</text:span> <text:s text:c="9"/></text:p>
      <text:p text:style-name="P61"><text:s text:c="10"/></text:p>
      <text:p text:style-name="P155"><text:soft-page-break/><text:span text:style-name="T119"><text:s text:c="7"/></text:span><text:span text:style-name="T117">992730</text:span><text:span text:style-name="T119"> </text:span><text:span text:style-name="T117">49004</text:span><text:span text:style-name="T119"> </text:span><text:span text:style-name="T117">459</text:span><text:span text:style-name="T119"> </text:span><text:span text:style-name="T117">458</text:span><text:span text:style-name="T119"> </text:span><text:span text:style-name="T117">104</text:span><text:span text:style-name="T119"> <text:s/></text:span><text:span text:style-name="T117"><text:s/>900034</text:span><text:span text:style-name="T119"> <text:s/></text:span><text:span text:style-name="T117">705090</text:span><text:span text:style-name="T119"> <text:s/></text:span><text:span text:style-name="T117">16</text:span><text:span text:style-name="T119"> </text:span></text:p>
      <text:p text:style-name="P61"><text:s text:c="15"/><text:span text:style-name="T65">56541</text:span> <text:s/><text:span text:style-name="T65">48318</text:span> <text:span text:style-name="T65">983263</text:span> <text:span text:style-name="T65">993820</text:span> <text:s/><text:span text:style-name="T65">14</text:span> <text:span text:style-name="T65">103584</text:span> <text:s text:c="2"/><text:span text:style-name="T65">SNSO17</text:span></text:p>
      <text:p text:style-name="P46"><text:span text:style-name="T72"><text:s text:c="13"/></text:span><text:span text:style-name="T14"><text:s text:c="8"/>SNSO15 <text:s/>103584 256411 SNSO 336 </text:span><text:span text:style-name="T6">SNSO147</text:span></text:p>
      <text:p text:style-name="P61"><text:s text:c="16"/>SNSO27 <text:s/>SNSO151 <text:s/>SNSO334 <text:s text:c="3"/></text:p>
      <text:p text:style-name="P22"><text:s text:c="5"/></text:p>
      <text:p text:style-name="P49"><text:s text:c="11"/><text:span text:style-name="T5"><text:s/>DIESELS </text:span></text:p>
      <text:p text:style-name="P61"><text:s text:c="12"/>D2046 <text:span text:style-name="T65">10077</text:span> <text:s/>125v 466618 <text:span text:style-name="T65">13002 </text:span><text:s text:c="3"/><text:span text:style-name="T65">31190</text:span></text:p>
      <text:p text:style-name="P49"><text:s text:c="9"/></text:p>
      <text:p text:style-name="P49"><text:s text:c="15"/><text:span text:style-name="T5"><text:s text:c="2"/>STEAMS </text:span></text:p>
      <text:p text:style-name="P61"><text:s text:c="16"/>5374 <text:s text:c="2"/>2655 <text:s/>2248 <text:s text:c="2"/>3122 2047 </text:p>
      <text:p text:style-name="P49"><text:s text:c="12"/><text:span text:style-name="T5"><text:s text:c="2"/></text:span></text:p>
      <text:p text:style-name="P49"><text:span text:style-name="T5"><text:s text:c="12"/></text:span><text:s/><text:span text:style-name="T5"><text:s text:c="2"/>DMUS</text:span></text:p>
      <text:p text:style-name="P67"><text:span text:style-name="T72"><text:s text:c="12"/></text:span>51365<text:span text:style-name="T72"> </text:span>51407<text:span text:style-name="T72"> <text:s/>143618 </text:span>144014<text:span text:style-name="T72"> <text:s text:c="2"/></text:span>142023 </text:p>
      <text:p text:style-name="P67"/>
      <text:p text:style-name="P61"><text:s text:c="13"/>ROAD RAILER</text:p>
      <text:p text:style-name="P61"><text:s text:c="14"/>L810 DHG</text:p>
      <text:p text:style-name="P49"><text:s text:c="12"/><text:span text:style-name="T5"><text:s text:c="2"/>WICKHAM</text:span></text:p>
      <text:p text:style-name="P61"><text:s text:c="10"/>7139</text:p>
      <text:p text:style-name="P46"><text:s text:c="16"/></text:p>
      <text:p text:style-name="P144"><text:s/><text:span text:style-name="T72"><text:s text:c="3"/></text:span></text:p>
      <text:p text:style-name="P61"><text:s text:c="14"/>TROLLEYS</text:p>
      <text:p text:style-name="P61"><text:s text:c="10"/>2860 XXXX XXXX 4154 <text:s/>4992 5002</text:p>
      <text:p text:style-name="P111"><text:s text:c="8"/></text:p>
      <text:p text:style-name="P61"><text:s text:c="11"/>CRANE</text:p>
      <text:p text:style-name="P49"><text:span text:style-name="T5"><text:s text:c="10"/>5193 <text:s text:c="4"/></text:span><text:s text:c="6"/><text:span text:style-name="T5"><text:s text:c="3"/></text:span></text:p>
      <text:p text:style-name="P4"><text:s/></text:p>
      <text:p text:style-name="P61"><text:s text:c="14"/>PONTYPOOL B RAILWAY</text:p>
      <text:p text:style-name="P262"><text:s text:c="6"/>Ground Coaches </text:p>
      <text:p text:style-name="P61"><text:span text:style-name="T117"><text:s text:c="16"/></text:span><text:span text:style-name="T118">SR1583*</text:span><text:span text:style-name="T117"> </text:span><text:span text:style-name="T118">NLR16*</text:span><text:span text:style-name="T117"> <text:s text:c="2"/>LNER 06509</text:span></text:p>
      <text:p text:style-name="P46"><text:s text:c="13"/><text:span text:style-name="T14"><text:s text:c="4"/></text:span></text:p>
      <text:p text:style-name="P46"><text:span text:style-name="T14"><text:s text:c="12"/></text:span><text:span text:style-name="T6">4300</text:span><text:span text:style-name="T14"> </text:span><text:span text:style-name="T6">4256*</text:span><text:span text:style-name="T14"> </text:span><text:span text:style-name="T6">1854</text:span><text:span text:style-name="T14"> <text:s/></text:span><text:span text:style-name="T6">21034</text:span><text:span text:style-name="T14"> </text:span><text:span text:style-name="T6">35494</text:span><text:span text:style-name="T14"> </text:span><text:span text:style-name="T6">81453</text:span><text:span text:style-name="T14"> </text:span><text:span text:style-name="T6">25444</text:span><text:span text:style-name="T14"> </text:span><text:span text:style-name="T6">94300</text:span><text:span text:style-name="T14"> </text:span></text:p>
      <text:p text:style-name="P46"><text:span text:style-name="T72"><text:s text:c="16"/></text:span><text:span text:style-name="T65"><text:s/>4654</text:span> <text:span text:style-name="T65">lswr70</text:span><text:span text:style-name="T72"> </text:span><text:span text:style-name="T65">lswr76*</text:span><text:span text:style-name="T72"> </text:span><text:span text:style-name="T65">94710uf</text:span><text:span text:style-name="T72"> </text:span><text:span text:style-name="T65"><text:s/>lms378</text:span><text:span text:style-name="T72"> </text:span><text:span text:style-name="T65">gwr231*</text:span></text:p>
      <text:p text:style-name="P61"><text:s text:c="15"/><text:span text:style-name="T65">94824</text:span> <text:s/><text:span text:style-name="T65">4677</text:span> <text:span text:style-name="T65">4958</text:span> <text:span text:style-name="T65">gwr6479</text:span> <text:span text:style-name="T65">lswr1357*</text:span> <text:s/><text:span text:style-name="T65">barry97</text:span> <text:s/><text:span text:style-name="T65"><text:s/>ger3*</text:span></text:p>
      <text:p text:style-name="P46"/>
      <text:p text:style-name="P46"><text:s text:c="11"/><text:span text:style-name="T14"><text:s text:c="4"/>Ground Wagons</text:span></text:p>
      <text:p text:style-name="P61"><text:s text:c="11"/><text:span text:style-name="T65">105744*</text:span> <text:span text:style-name="T65">8824X5</text:span> 7XXXXX</text:p>
      <text:p text:style-name="P61"/>
      <text:p text:style-name="P148"><text:s text:c="5"/>279714 279717 568314 165121 <text:span text:style-name="T65">773754*</text:span> 98858 17399 </text:p>
      <text:p text:style-name="P61"><text:s text:c="15"/><text:span text:style-name="T65">900807*</text:span> 4w flat <text:s/>31482 771728 <text:s text:c="4"/>853119 <text:s text:c="2"/><text:span text:style-name="T65">743415</text:span></text:p>
      <text:p text:style-name="P61"><text:s text:c="19"/><text:span text:style-name="T65">992961*</text:span> <text:span text:style-name="T65">253463</text:span> <text:span text:style-name="T65">77322 </text:span><text:s/><text:span text:style-name="T65">776442</text:span> <text:s text:c="2"/><text:span text:style-name="T65">103966</text:span> <text:span text:style-name="T65">755715</text:span></text:p>
      <text:p text:style-name="P54"><text:span text:style-name="T67"><text:s text:c="17"/>2300 <text:s/></text:span><text:span text:style-name="T68">35978</text:span><text:span text:style-name="T67"> <text:s text:c="2"/></text:span><text:span text:style-name="T68">181524</text:span><text:span text:style-name="T67"> </text:span><text:span text:style-name="T68">80892</text:span><text:span text:style-name="T67"> </text:span><text:span text:style-name="T68">304982</text:span><text:span text:style-name="T67"> </text:span><text:span text:style-name="T68">182568</text:span><text:span text:style-name="T67"> </text:span><text:span text:style-name="T68">983607*</text:span></text:p>
      <text:p text:style-name="P61"><text:s text:c="15"/><text:span text:style-name="T65">993415*</text:span> <text:span text:style-name="T65">14353</text:span> <text:span text:style-name="T65">743226</text:span> <text:span text:style-name="T65">18872</text:span> <text:span text:style-name="T65">30450</text:span> <text:span text:style-name="T65">28804</text:span> <text:span text:style-name="T65">14353</text:span> <text:s text:c="2"/></text:p>
      <text:p text:style-name="P46"><text:span text:style-name="T14"><text:s text:c="19"/></text:span><text:span text:style-name="T6">986444</text:span><text:span text:style-name="T14"> <text:s text:c="3"/></text:span><text:span text:style-name="T6">5237</text:span><text:span text:style-name="T14"> 3027 </text:span><text:span text:style-name="T6">3021</text:span><text:span text:style-name="T14"> </text:span><text:span text:style-name="T6">85xxxx</text:span><text:span text:style-name="T14"> </text:span><text:span text:style-name="T6">62863</text:span><text:span text:style-name="T14"> </text:span><text:span text:style-name="T6">278507</text:span></text:p>
      <text:p text:style-name="P49"><text:span text:style-name="T5"><text:s text:c="13"/></text:span><text:span text:style-name="T6">743635</text:span><text:span text:style-name="T5"> <text:s/></text:span><text:span text:style-name="T6">743823</text:span><text:span text:style-name="T5"> <text:s/></text:span><text:span text:style-name="T6">1003*</text:span><text:span text:style-name="T5"> <text:s/></text:span><text:span text:style-name="T6">950114</text:span><text:span text:style-name="T5"> <text:s text:c="2"/></text:span><text:span text:style-name="T6">71888</text:span><text:span text:style-name="T5"> <text:s text:c="3"/></text:span><text:span text:style-name="T6">no1</text:span><text:span text:style-name="T5"> </text:span><text:s text:c="8"/></text:p>
      <text:p text:style-name="P46"><text:s text:c="12"/><text:span text:style-name="T14"><text:s text:c="4"/></text:span><text:span text:style-name="T39"><text:s/></text:span></text:p>
      <text:p text:style-name="P144"><text:span text:style-name="T72"><text:s text:c="3"/></text:span><text:span text:style-name="T14"><text:s text:c="5"/>DIESELS</text:span></text:p>
      <text:p text:style-name="P61"><text:s text:c="15"/><text:span text:style-name="T65">37023*</text:span> <text:s/><text:span text:style-name="T65">22497</text:span> <text:s/><text:span text:style-name="T65">03141</text:span> <text:span text:style-name="T65">7063</text:span> <text:span text:style-name="T65">D1387</text:span> <text:span text:style-name="T65"><text:s/>D1344</text:span> </text:p>
      <text:p text:style-name="P46"><text:span text:style-name="T14"><text:s text:c="14"/></text:span><text:span text:style-name="T6"><text:s text:c="2"/>5511*</text:span><text:span text:style-name="T14"> <text:s text:c="3"/></text:span><text:span text:style-name="T6">(D6916 37216)</text:span><text:span text:style-name="T14"> <text:s text:c="4"/></text:span><text:span text:style-name="T6">(5627 31203)* <text:s/></text:span></text:p>
      <text:p text:style-name="P148"><text:s text:c="8"/></text:p>
      <text:p text:style-name="P61"><text:s text:c="12"/>STEAMS</text:p>
      <text:p text:style-name="P67"><text:span text:style-name="T72"><text:s text:c="16"/></text:span>1680<text:span text:style-name="T72"> </text:span>1873<text:span text:style-name="T72"> </text:span>1823<text:span text:style-name="T72"> </text:span>2015<text:span text:style-name="T72"> 3061 </text:span>(7169 71515)</text:p>
      <text:p text:style-name="P67"><text:span text:style-name="T72"><text:s text:c="15"/></text:span>(1385 9629)<text:span text:style-name="T72"> </text:span>9622<text:span text:style-name="T72"> <text:s text:c="5"/>1219</text:span></text:p>
      <text:p text:style-name="P46"><text:s text:c="9"/><text:span text:style-name="T14"><text:s text:c="8"/></text:span></text:p>
      <text:p text:style-name="P61"><text:s text:c="10"/>DMUS</text:p>
      <text:p text:style-name="P46"><text:span text:style-name="T14"><text:s text:c="13"/></text:span><text:span text:style-name="T6">51351</text:span><text:span text:style-name="T14"> </text:span><text:span text:style-name="T6">51397</text:span><text:span text:style-name="T14"> </text:span></text:p>
      <text:p text:style-name="P46"><text:s text:c="16"/></text:p>
      <text:p text:style-name="P49"><text:s text:c="11"/><text:span text:style-name="T5"><text:s/></text:span><text:span text:style-name="T11">WICKHAM</text:span></text:p>
      <text:p text:style-name="P67"><text:span text:style-name="T72"><text:s text:c="11"/></text:span><text:s/>6947 </text:p>
      <text:p text:style-name="P46"><text:s text:c="11"/><text:span text:style-name="T14"><text:s/></text:span></text:p>
      <text:p text:style-name="P61"><text:s text:c="10"/>GEISMAR</text:p>
      <text:p text:style-name="P61"><text:s text:c="15"/>9717 <text:s text:c="4"/></text:p>
      <text:p text:style-name="P46"><text:s text:c="12"/></text:p>
      <text:p text:style-name="P148"><text:s/>TROLLEYS</text:p>
      <text:p text:style-name="P61"><text:s text:c="12"/>20XX XXXX <text:span text:style-name="T65">BOILER TROLLEY*</text:span> <text:s text:c="4"/></text:p>
      <text:p text:style-name="P61"><text:s text:c="11"/></text:p>
      <text:p text:style-name="P61"><text:s text:c="12"/>RIBBIE RAILWAY</text:p>
      <text:p text:style-name="P262"><text:s text:c="3"/>Ground coach</text:p>
      <text:p text:style-name="P148"><text:s text:c="14"/>75302</text:p>
      <text:p text:style-name="P144"><text:span text:style-name="T14"><text:s text:c="8"/></text:span><text:s/></text:p>
      <text:p text:style-name="P46"><text:s text:c="11"/><text:span text:style-name="T14"><text:s text:c="4"/></text:span><text:span text:style-name="T10">96327 395081 5 4886 </text:span><text:span text:style-name="T9">80377</text:span><text:span text:style-name="T10"> 35128 5036 1812</text:span></text:p>
      <text:p text:style-name="P61"><text:s text:c="10"/>(024611 94237) 34675 1839 sr1432 sr1470</text:p>
      <text:p text:style-name="P61"><text:s text:c="16"/><text:span text:style-name="T117"><text:s/>nlr1496 <text:s/>94226</text:span> <text:s text:c="14"/></text:p>
      <text:p text:style-name="P148"><text:s text:c="2"/></text:p>
      <text:p text:style-name="P148"><text:s text:c="4"/></text:p>
      <text:p text:style-name="P61"><text:s text:c="16"/><text:span text:style-name="T117"><text:s/>GROUND WAGON </text:span></text:p>
      <text:p text:style-name="P61"><text:s text:c="16"/>7XXXXX </text:p>
      <text:p text:style-name="P61"><text:s text:c="6"/></text:p>
      <text:p text:style-name="P148"><text:s text:c="2"/>4106 363 2459 31490 160184 777556 9 8 </text:p>
      <text:p text:style-name="P219"><text:s text:c="10"/>993782 <text:s/>993173 12t 4w liverpool corpo 6flat</text:p>
      <text:p text:style-name="P61"><text:s text:c="12"/>853786 765127 732386 583215 993201 266212 561981</text:p>
      <text:p text:style-name="P90"><text:span text:style-name="T73"><text:s text:c="13"/>531023 983261 </text:span><text:span text:style-name="T75">5999</text:span><text:span text:style-name="T73"> 58093 486055 531005</text:span></text:p>
      <text:p text:style-name="P46"><text:s text:c="14"/>439742 917090 5plank 5 flat (312906 575554) <text:s/>91100</text:p>
      <text:p text:style-name="P49"><text:s text:c="13"/>5576 1954 4XXXX 311891 32 912 B36 5253 904518 12 146</text:p>
      <text:p text:style-name="P61"><text:s text:c="13"/>904662 <text:s/>954861 56299 444 75202uf 2 cegb 4wp oped </text:p>
      <text:p text:style-name="P61"><text:s text:c="11"/>3w 3oped 10flat 4w 4p oped <text:s/>1flat 10t 4w 4w</text:p>
      <text:p text:style-name="P61"><text:s text:c="12"/></text:p>
      <text:p text:style-name="P90"><text:span text:style-name="T74"><text:s text:c="11"/></text:span><text:span text:style-name="T17"><text:s text:c="2"/></text:span><text:span text:style-name="T19">DIESELS IN MUSEUM</text:span></text:p>
      <text:p text:style-name="P61"><text:s text:c="15"/>41600001 965 D628 2000</text:p>
      <text:p text:style-name="P49"><text:s text:c="15"/>10282 788 D629<text:span text:style-name="T65"> 27653</text:span> 160V 21999 2160 2677 10226 </text:p>
      <text:p text:style-name="P46"><text:span text:style-name="T14"><text:s text:c="16"/>D1031 10283 D2148 <text:s text:c="2"/>D9539 D2189 (5644 D2595)</text:span><text:span text:style-name="T39"> <text:s text:c="2"/></text:span></text:p>
      <text:p text:style-name="P69"/>
      <text:p text:style-name="P61"><text:s text:c="19"/>STEAMS IN MUSEUM</text:p>
      <text:p text:style-name="P49"><text:s text:c="13"/><text:span text:style-name="T65">1865B</text:span> <text:span text:style-name="T65">1598N</text:span> <text:span text:style-name="T65">1568</text:span> <text:span text:style-name="T65">1950</text:span> 8024 7485 <text:span text:style-name="T65">1969</text:span> 4446 842</text:p>
      <text:p text:style-name="P46"><text:s text:c="14"/>3732 880 <text:span text:style-name="T65">1636</text:span> 1833 <text:span text:style-name="T65">53</text:span> 2680 1810 <text:span text:style-name="T65">11 47</text:span> <text:span text:style-name="T65">737 </text:span>1925 1925</text:p>
      <text:p text:style-name="P262"><text:s text:c="4"/><text:span text:style-name="T65">3794</text:span> 3793 9373 <text:s/>1999 <text:span text:style-name="T65">1954</text:span> <text:span text:style-name="T65">3931 </text:span>1585 420 <text:span text:style-name="T72">1883 3855</text:span></text:p>
      <text:p text:style-name="P61"><text:s text:c="11"/>1917 1935 3696 3155 1448<text:span text:style-name="T65"> 4979</text:span> <text:s text:c="3"/></text:p>
      <text:p text:style-name="P185"><text:s/></text:p>
      <text:p text:style-name="P46"/>
      <text:p text:style-name="P61"><text:s text:c="14"/>ROAD RAILER</text:p>
      <text:p text:style-name="P14"><text:span text:style-name="T117"><text:s text:c="14"/>BP036 </text:span><text:s text:c="4"/></text:p>
      <text:p text:style-name="P144"><text:s/><text:span text:style-name="T72"><text:s text:c="3"/></text:span></text:p>
      <text:p text:style-name="P46"><text:s text:c="11"/><text:span text:style-name="T72"><text:s/>CRANES</text:span></text:p>
      <text:p text:style-name="P148"><text:s text:c="11"/>92045 81201 <text:s text:c="5"/></text:p>
      <text:p text:style-name="P110"/>
      <text:p text:style-name="P46"><text:span text:style-name="T14"><text:s text:c="9"/></text:span><text:span text:style-name="T10"><text:s/>ROCKS BY RAIL</text:span></text:p>
      <text:p text:style-name="P262"><text:s text:c="4"/>COACHES </text:p>
      <text:p text:style-name="P61"><text:span text:style-name="T117"><text:s text:c="13"/></text:span><text:span text:style-name="T118">18017</text:span><text:span text:style-name="T117"> </text:span><text:span text:style-name="T118">SR1925</text:span><text:span text:style-name="T14"> <text:s/></text:span></text:p>
      <text:p text:style-name="P61"><text:s text:c="16"/></text:p>
      <text:p text:style-name="P49"><text:s text:c="15"/><text:span text:style-name="T5">Ground Wagons </text:span></text:p>
      <text:p text:style-name="P148"><text:s text:c="4"/>762578 853963 VAN (85XXXX 1) (85XXXX 2) <text:s/>7XXXXX</text:p>
      <text:p text:style-name="P111"><text:s text:c="15"/></text:p>
      <text:p text:style-name="P248"><text:s text:c="5"/><text:span text:style-name="T72"><text:s text:c="2"/></text:span><text:span text:style-name="T6">731874</text:span><text:span text:style-name="T42"> </text:span><text:span text:style-name="T6">49006</text:span><text:span text:style-name="T14"> 907 </text:span><text:span text:style-name="T6">56769</text:span><text:span text:style-name="T14"> 286341 278482 993734 </text:span></text:p>
      <text:p text:style-name="P262"><text:s text:c="7"/>3001 690379 <text:s/>853963 691804 691576 148 818</text:p>
      <text:p text:style-name="P262"><text:s text:c="8"/>691193 <text:s text:c="2"/>691404 691535 144 <text:s/>383560 384428</text:p>
      <text:p text:style-name="P46"><text:s text:c="16"/>860 K2 K1 <text:s text:c="2"/>KK2 388309 983604 385005 385601 <text:s text:c="2"/><text:span text:style-name="T72"><text:s/></text:span></text:p>
      <text:p text:style-name="P46"><text:s text:c="18"/>125 D37 97 25197 210000 90100X 267 387643 </text:p>
      <text:p text:style-name="P219"><text:s text:c="5"/>384768 <text:s text:c="2"/>385997 184 141 <text:span text:style-name="T65">436275</text:span> 3176 <text:span text:style-name="T65">101011</text:span></text:p>
      <text:p text:style-name="P61"><text:s text:c="17"/>388141 691793 388334 388815 <text:span text:style-name="T65">992164*</text:span>76 84 546</text:p>
      <text:p text:style-name="P70"><text:s text:c="13"/>764941 387245 8555/491 MBW1 8555/49 4RRM45 </text:p>
      <text:p text:style-name="P148"><text:s text:c="2"/>675? <text:s text:c="2"/>EASTWOODS 85fo 150/4 (k34 k39) <text:span text:style-name="T65">993734*</text:span></text:p>
      <text:p text:style-name="P155"/>
      <text:p text:style-name="P49"><text:s text:c="12"/><text:span text:style-name="T5"><text:s text:c="2"/>DIESELS </text:span></text:p>
      <text:p text:style-name="P262"><text:span text:style-name="T74"><text:s text:c="4"/>2872 </text:span><text:span text:style-name="T75">186V*</text:span><text:span text:style-name="T74"> 10204 2791 178V 10201 10207 306092 </text:span></text:p>
      <text:p text:style-name="P49"><text:s text:c="13"/>421436 544997 4220007</text:p>
      <text:p text:style-name="P61"><text:s text:c="15"/></text:p>
      <text:p text:style-name="P49"/>
      <text:p text:style-name="P46"><text:s text:c="8"/><text:span text:style-name="T14"><text:s text:c="2"/>STEAMS</text:span></text:p>
      <text:p text:style-name="P248"><text:s text:c="4"/>287 1972 1308 1257 1759 1931 2008 2350 3865 </text:p>
      <text:p text:style-name="P61"><text:span text:style-name="T117"><text:s text:c="13"/>2521 <text:s text:c="2"/>2668</text:span><text:span text:style-name="T5"> <text:s text:c="4"/></text:span></text:p>
      <text:p text:style-name="P61"><text:s text:c="6"/></text:p>
      <text:p text:style-name="P46"><text:s text:c="11"/><text:span text:style-name="T14"><text:s text:c="4"/>ROAD RAILERS</text:span></text:p>
      <text:p text:style-name="P61"><text:s text:c="12"/>68038 7445 8713 </text:p>
      <text:p text:style-name="P90"><text:span text:style-name="T73"><text:s text:c="9"/></text:span><text:span text:style-name="T17"><text:s text:c="3"/></text:span></text:p>
      <text:p text:style-name="P46"><text:span text:style-name="T72"><text:s text:c="12"/></text:span><text:span text:style-name="T10">WICKHAMS</text:span></text:p>
      <text:p text:style-name="P70"><text:s text:c="10"/><text:span text:style-name="T65">960236**</text:span> <text:s text:c="2"/><text:span text:style-name="T65"><text:s/>965072**</text:span></text:p>
      <text:p text:style-name="P61"><text:s text:c="13"/></text:p>
      <text:p text:style-name="P49"><text:s text:c="12"/><text:span text:style-name="T11"><text:s text:c="2"/>ROTHER VALLEY RAILWAY</text:span></text:p>
      <text:p text:style-name="P46"><text:s text:c="18"/>COACHES</text:p>
      <text:p text:style-name="P61"><text:span text:style-name="T14"><text:s text:c="11"/></text:span><text:span text:style-name="T65">440</text:span><text:span text:style-name="T14"> 3690 (2339 2330) <text:s/></text:span></text:p>
      <text:p text:style-name="P46"><text:s text:c="16"/><text:span text:style-name="T14"><text:s text:c="12"/></text:span></text:p>
      <text:p text:style-name="P61"><text:s text:c="11"/>Ground Wagons</text:p>
      <text:p text:style-name="P111"><text:s text:c="15"/>781409 785157</text:p>
      <text:p text:style-name="P49"><text:s text:c="14"/></text:p>
      <text:p text:style-name="P46"><text:s text:c="17"/><text:span text:style-name="T14"><text:s/>993210 992780 161278 </text:span><text:span text:style-name="T6">56107</text:span><text:span text:style-name="T14"> </text:span><text:span text:style-name="T6">882536</text:span><text:span text:style-name="T14"> </text:span><text:span text:style-name="T6">882523</text:span></text:p>
      <text:p text:style-name="P61"><text:span text:style-name="T117"><text:s text:c="18"/>758315 </text:span><text:span text:style-name="T118">61048</text:span><text:span text:style-name="T117"> </text:span><text:span text:style-name="T118">882126</text:span><text:span text:style-name="T117"> <text:s text:c="3"/>556 529FO <text:s/></text:span></text:p>
      <text:p text:style-name="P46"><text:s text:c="10"/></text:p>
      <text:p text:style-name="P194"><text:span text:style-name="T72"><text:s/></text:span><text:span text:style-name="T119"><text:s text:c="3"/>DIESELS</text:span></text:p>
      <text:p text:style-name="P217"><text:span text:style-name="T117"><text:s text:c="7"/>D77 D140 </text:span><text:span text:style-name="T118">D2112 </text:span></text:p>
      <text:p text:style-name="P231"/>
      <text:p text:style-name="P225">ROAD RAILERS</text:p>
      <text:p text:style-name="P61"><text:span text:style-name="T117"><text:s text:c="10"/>156 54187 </text:span><text:span text:style-name="T117"><text:s text:c="5"/></text:span></text:p>
      <text:p text:style-name="P164"><text:span text:style-name="T19"><text:s text:c="2"/></text:span><text:span text:style-name="T73"><text:s text:c="3"/></text:span></text:p>
      <text:p text:style-name="P61"><text:s text:c="4"/></text:p>
      <text:p text:style-name="P46"><text:s text:c="10"/><text:span text:style-name="T14"><text:s text:c="5"/>ROYAL D RAILWAY</text:span></text:p>
      <text:p text:style-name="P262"><text:s text:c="4"/>Ground coach</text:p>
      <text:p text:style-name="P61"><text:s text:c="14"/>189 <text:s/></text:p>
      <text:p text:style-name="P61"><text:s text:c="14"/></text:p>
      <text:p text:style-name="P219"><text:s text:c="9"/>5224 5156 9405 17094 37909</text:p>
      <text:p text:style-name="P70"/>
      <text:p text:style-name="P219"><text:s text:c="2"/>Ground Wagon</text:p>
      <text:p text:style-name="P168"><text:s text:c="7"/>881653 </text:p>
      <text:p text:style-name="P168"/>
      <text:p text:style-name="P168">983222 189 4387 950777 904709 730738</text:p>
      <text:p text:style-name="P61"><text:s text:c="8"/></text:p>
      <text:p text:style-name="P148"><text:s text:c="5"/>DIESELS</text:p>
      <text:p text:style-name="P61"><text:s text:c="16"/>D2037 D2094 D2134</text:p>
      <text:p text:style-name="P156"><text:s text:c="17"/></text:p>
      <text:p text:style-name="P250"><text:s text:c="4"/><text:span text:style-name="T5"><text:s/>STEAMS</text:span></text:p>
      <text:p text:style-name="P61"><text:s text:c="13"/>2139 807 2110 <text:s text:c="3"/></text:p>
      <text:p text:style-name="P61"><text:s text:c="10"/></text:p>
      <text:p text:style-name="P70"><text:s text:c="15"/>DMUS</text:p>
      <text:p text:style-name="P61"><text:s text:c="14"/>79998 79999</text:p>
      <text:p text:style-name="P148"><text:s text:c="9"/></text:p>
      <text:p text:style-name="P148"><text:s text:c="8"/>CRANE</text:p>
      <text:p text:style-name="P61"><text:s text:c="14"/>25279 <text:s text:c="2"/></text:p>
      <text:p text:style-name="P61"><text:s text:c="16"/></text:p>
      <text:p text:style-name="P61"><text:s text:c="20"/>WICKHAMS</text:p>
      <text:p text:style-name="P70"><text:s text:c="13"/>8501 5008</text:p>
      <text:p text:style-name="P70"/>
      <text:p text:style-name="P4"><text:s text:c="2"/><text:span text:style-name="T5">RUSHDEN STATION</text:span></text:p>
      <text:p text:style-name="P46"><text:s text:c="14"/>COACHES</text:p>
      <text:p text:style-name="P46"><text:s text:c="15"/>94102 80457 80413 80334 975496 35073 5166</text:p>
      <text:p text:style-name="P14"><text:s text:c="2"/>24279 3918 (92363 <text:s/>84294)</text:p>
      <text:p text:style-name="P144"><text:s text:c="2"/><text:span text:style-name="T14"><text:s text:c="2"/></text:span></text:p>
      <text:p text:style-name="P61"><text:s text:c="11"/></text:p>
      <text:p text:style-name="P61"><text:s text:c="18"/>WAGONS</text:p>
      <text:p text:style-name="P49"><text:s text:c="11"/>993594 731920 517250 516795 460171 <text:span text:style-name="T65">38XXXX </text:span></text:p>
      <text:p text:style-name="P186"><text:s text:c="2"/><text:span text:style-name="T14"><text:s text:c="2"/>991571 </text:span><text:span text:style-name="T6">5A</text:span><text:span text:style-name="T14"> 200090 </text:span><text:span text:style-name="T6">321073</text:span><text:span text:style-name="T14"> 973181 505810 960602 </text:span></text:p>
      <text:p text:style-name="P145"><text:s text:c="4"/>492187 904187 38XXXX <text:s text:c="2"/>rusty grey 851856fo <text:span text:style-name="T65">384074</text:span></text:p>
      <text:p text:style-name="P145"/>
      <text:p text:style-name="P49"><text:s text:c="15"/>DIESELS</text:p>
      <text:p text:style-name="P61"><text:s text:c="13"/><text:span text:style-name="T65">03179</text:span> <text:span text:style-name="T65">31206</text:span> 5258 <text:span text:style-name="T65">10159</text:span> <text:span text:style-name="T65">363</text:span> <text:s text:c="4"/></text:p>
      <text:p text:style-name="P61"><text:s text:c="7"/></text:p>
      <text:p text:style-name="P148"><text:s text:c="2"/>STEAMS</text:p>
      <text:p text:style-name="P70"><text:s text:c="14"/>2168 2654</text:p>
      <text:p text:style-name="P49"><text:s text:c="11"/></text:p>
      <text:p text:style-name="P148"><text:s/>DMUS</text:p>
      <text:p text:style-name="P219"><text:s text:c="11"/><text:span text:style-name="T65">977968</text:span> <text:span text:style-name="T65">142091</text:span> <text:span text:style-name="T65">142084</text:span> <text:s/></text:p>
      <text:p text:style-name="P217"><text:s text:c="3"/></text:p>
      <text:p text:style-name="P14"><text:s text:c="3"/>ROAD RAILERS</text:p>
      <text:p text:style-name="P61"><text:s text:c="11"/><text:span text:style-name="T65">(99709 90106-2)</text:span> <text:span text:style-name="T65">059</text:span> 060 062 RTU 7500 <text:s/></text:p>
      <text:p text:style-name="P61"><text:s text:c="14"/></text:p>
      <text:p text:style-name="P46"><text:s text:c="11"/><text:span text:style-name="T14"><text:s text:c="4"/>CRANE</text:span></text:p>
      <text:p text:style-name="P61"><text:s text:c="14"/>2733 <text:s text:c="16"/></text:p>
      <text:p text:style-name="P14"/>
      <text:p text:style-name="P61"><text:s text:c="10"/>SCOTTISH LNDUSTRAL RAILWAY</text:p>
      <text:p text:style-name="P61"><text:s text:c="14"/>COACHES</text:p>
      <text:p text:style-name="P148"><text:s text:c="13"/><text:span text:style-name="T65"><text:s/>37882*</text:span> <text:span text:style-name="T65">45020</text:span></text:p>
      <text:p text:style-name="P144"><text:s text:c="4"/></text:p>
      <text:p text:style-name="P133"><text:s text:c="13"/>Ground Wagon</text:p>
      <text:p text:style-name="P46"><text:span text:style-name="T14"><text:s text:c="11"/></text:span><text:span text:style-name="T6">7XXXXX*</text:span><text:span text:style-name="T14"> <text:s text:c="4"/></text:span></text:p>
      <text:p text:style-name="P67"/>
      <text:p text:style-name="P248"><text:span text:style-name="T14"><text:s text:c="5"/></text:span><text:span text:style-name="T6">940661</text:span><text:span text:style-name="T14"> <text:s/>471 40 </text:span><text:span text:style-name="T6">7918**</text:span><text:span text:style-name="T14"> </text:span><text:span text:style-name="T6">(3 40288*)</text:span><text:span text:style-name="T42"> </text:span><text:span text:style-name="T14">113 </text:span><text:span text:style-name="T6">1641</text:span><text:span text:style-name="T14"> <text:s text:c="6"/></text:span></text:p>
      <text:p text:style-name="P219"><text:s text:c="5"/>1657<text:span text:style-name="T40"> </text:span><text:span text:style-name="T65">1767*</text:span> <text:span text:style-name="T65">887126</text:span> <text:span text:style-name="T65">778493**</text:span> <text:span text:style-name="T65">769826*</text:span> <text:span text:style-name="T65">770096</text:span></text:p>
      <text:p text:style-name="P133"><text:s text:c="14"/><text:span text:style-name="T65">770099</text:span> <text:s/><text:span text:style-name="T65">773033*</text:span> <text:span text:style-name="T65">296676</text:span><text:span text:style-name="T40"> </text:span>730403 731299 <text:span text:style-name="T65">4604*</text:span>564 7 <text:span text:style-name="T65">8*</text:span></text:p>
      <text:p text:style-name="P65"><text:s text:c="14"/><text:span text:style-name="T65">9*</text:span> <text:span text:style-name="T65">CLV211</text:span> BRAKE VAN shrewsbury co op sj </text:p>
      <text:p text:style-name="P148"><text:s text:c="2"/><text:span text:style-name="T65">766042**</text:span> <text:span text:style-name="T65">77047</text:span> moredand 7p oped ewa58</text:p>
      <text:p text:style-name="P133"><text:s text:c="13"/><text:span text:style-name="T65">4w flat1*</text:span> 4w flat2 4wflat3 <text:s/><text:span text:style-name="T65">gun powder*</text:span> <text:s text:c="2"/>snowplough </text:p>
      <text:p text:style-name="P133"><text:s text:c="13"/><text:span text:style-name="T65">7 plank1*</text:span> 7 plank2 hopper <text:span text:style-name="T65">2370 7792 405-0** </text:span></text:p>
      <text:p text:style-name="P133"><text:s text:c="13"/>4w black <text:span text:style-name="T65">2370</text:span> <text:span text:style-name="T65">7792 401-9*</text:span> <text:s/>lnwr 1xxxxx</text:p>
      <text:p text:style-name="P61"><text:s text:c="14"/><text:span text:style-name="T65">4w flat cr</text:span> 6plank ncb <text:span text:style-name="T65">773048*</text:span> <text:span text:style-name="T65">134543**</text:span> <text:s text:c="12"/></text:p>
      <text:p text:style-name="P61"><text:s text:c="13"/></text:p>
      <text:p text:style-name="P49"><text:s text:c="12"/><text:span text:style-name="T5"><text:s/>DIESELS</text:span></text:p>
      <text:p text:style-name="P132"><text:span text:style-name="T5"><text:s text:c="14"/></text:span><text:span text:style-name="T6">224352*</text:span><text:span text:style-name="T40"> </text:span><text:span text:style-name="T5">347 </text:span><text:span text:style-name="T6">399*</text:span><text:span text:style-name="T5"> </text:span><text:span text:style-name="T6">3132*</text:span><text:span text:style-name="T5"> </text:span><text:span text:style-name="T6">10012</text:span><text:span text:style-name="T5"> </text:span><text:span text:style-name="T6">27644</text:span><text:span text:style-name="T5"> </text:span><text:span text:style-name="T6">284839*</text:span><text:span text:style-name="T5"> 417890</text:span></text:p>
      <text:p text:style-name="P132"><text:span text:style-name="T5"><text:s text:c="13"/>421697 </text:span><text:span text:style-name="T6">22888*</text:span><text:span text:style-name="T5"> </text:span><text:span text:style-name="T6">183749*</text:span><text:span text:style-name="T5"> 307 308 561 701 7329 8816 </text:span></text:p>
      <text:p text:style-name="P61"><text:s text:c="13"/>210959 <text:s/>211861 422569 265617 <text:s text:c="6"/></text:p>
      <text:p text:style-name="P49"><text:s text:c="14"/></text:p>
      <text:p text:style-name="P61"><text:s text:c="16"/>STEAMS</text:p>
      <text:p text:style-name="P217"><text:s text:c="6"/>1116 <text:span text:style-name="T65">1614*</text:span><text:span text:style-name="T40"> </text:span>1952 2244 2260 <text:span text:style-name="T65">2358*</text:span> <text:span text:style-name="T65">2368*</text:span> </text:p>
      <text:p text:style-name="P217"><text:s text:c="7"/></text:p>
      <text:p text:style-name="P225"><text:s/>ROAD RAILERS</text:p>
      <text:p text:style-name="P70"><text:s text:c="10"/>L482 NU SNOW PLOUGH</text:p>
      <text:p text:style-name="P61"><text:s text:c="14"/></text:p>
      <text:p text:style-name="P217"><text:s text:c="5"/>CRANES</text:p>
      <text:p text:style-name="P225"><text:s text:c="14"/><text:span text:style-name="T65">2485*</text:span> <text:s/><text:span text:style-name="T65">10202*</text:span> <text:span text:style-name="T65">Hand <text:s/>Crane*</text:span></text:p>
      <text:p text:style-name="P61"><text:s text:c="10"/></text:p>
      <text:p text:style-name="P62"><text:s text:c="13"/>SEVEN VALLEY RAILWAY </text:p>
      <text:p text:style-name="P262"><text:s text:c="3"/>Ground coach</text:p>
      <text:p text:style-name="P61"><text:s text:c="22"/>542</text:p>
      <text:p text:style-name="P46"><text:s text:c="9"/></text:p>
      <text:p text:style-name="P46"><text:span text:style-name="T14"><text:s text:c="9"/></text:span><text:span text:style-name="T72"><text:s/></text:span><text:span text:style-name="T14"><text:s/></text:span><text:span text:style-name="T6">25686</text:span><text:span text:style-name="T14"> 21254 4509 4545 4550 4593 4690 9220 10696</text:span></text:p>
      <text:p text:style-name="P49"><text:s text:c="9"/><text:span text:style-name="T5"><text:s text:c="5"/>4345 </text:span><text:span text:style-name="T6">25594</text:span><text:span text:style-name="T5"> 3109 16169 16202 10713 4399 1667 1682</text:span></text:p>
      <text:p text:style-name="P46"><text:span text:style-name="T72"><text:s text:c="14"/>25498 <text:s/>25771 35219 25346 34562 <text:s text:c="2"/>80222 </text:span><text:span text:style-name="T65">24839</text:span><text:span text:style-name="T72"> </text:span><text:span text:style-name="T65">1853*</text:span> <text:s text:c="12"/></text:p>
      <text:p text:style-name="P144"><text:s text:c="4"/><text:span text:style-name="T72"><text:s/></text:span><text:span text:style-name="T14">10677 1855 1856 3083 </text:span><text:span text:style-name="T6">3103*</text:span><text:span text:style-name="T14">16267 86105 </text:span><text:span text:style-name="T6">24845</text:span></text:p>
      <text:p text:style-name="P265"><text:s text:c="5"/>80300 80328 80329 <text:s/>95194 94200 94157 92080 </text:p>
      <text:p text:style-name="P148"><text:s text:c="5"/>3467 4786 <text:s/>2424 2426 2886 2986 92090 <text:span text:style-name="T65">80776*</text:span> <text:s text:c="25"/></text:p>
      <text:p text:style-name="P262"><text:s text:c="4"/><text:span text:style-name="T74">3930 9615 2119 233 2303 2926 1257 650 829 1086</text:span></text:p>
      <text:p text:style-name="P162"><text:span text:style-name="T73"><text:s text:c="4"/>5043 5883 6562 6913 </text:span><text:span text:style-name="T75">5804*</text:span><text:span text:style-name="T73">6045 2319 </text:span><text:span text:style-name="T75">1399</text:span><text:span text:style-name="T73"> 9627 261 </text:span></text:p>
      <text:p text:style-name="P61"><text:s text:c="12"/>1087 1116 1145 1146 98 7284 178 2815 9653 9654 314202 </text:p>
      <text:p text:style-name="P189"><text:span text:style-name="T72"><text:s/></text:span><text:span text:style-name="T74"><text:s text:c="3"/>4606 80969 <text:s/>27218 45048 2300 751 9103 238 52255 </text:span></text:p>
      <text:p text:style-name="P265"><text:s text:c="4"/>80972 12992 24617 26880 26986 26921 149 798</text:p>
      <text:p text:style-name="P185"><text:s/>643 14105 43600 43612 27270 9055 9369 9084 9085 </text:p>
      <text:p text:style-name="P148">2701 24068 7960 27220 4069 2242 (975128 34754)</text:p>
      <text:p text:style-name="P61"><text:s text:c="10"/>(975481 34606) (70442 70759) SR1174 (15 BY436) 261</text:p>
      <text:p text:style-name="P14"><text:s text:c="3"/></text:p>
      <text:p text:style-name="P46"><text:s text:c="11"/><text:span text:style-name="T14"><text:s text:c="2"/>Ground Wagons</text:span></text:p>
      <text:p text:style-name="P67"><text:span text:style-name="T72"><text:s text:c="17"/></text:span>125059<text:span text:style-name="T72"> 37150 57976 785130 49405</text:span></text:p>
      <text:p text:style-name="P148"><text:s text:c="8"/></text:p>
      <text:p text:style-name="P62"><text:s text:c="10"/></text:p>
      <text:p text:style-name="P61"><text:s text:c="12"/><text:span text:style-name="T117"><text:s/>983194 993126 95353 989098 993898 </text:span><text:span text:style-name="T118">730866*</text:span><text:span text:style-name="T117"> <text:s text:c="3"/></text:span></text:p>
      <text:p text:style-name="P52"><text:span text:style-name="T5"><text:s text:c="15"/></text:span><text:span text:style-name="T6">271726*</text:span><text:span text:style-name="T5"> </text:span><text:span text:style-name="T6"><text:s/>93016*</text:span><text:span text:style-name="T5"> </text:span><text:span text:style-name="T6">58725*</text:span><text:span text:style-name="T5"> <text:s text:c="2"/>972724 972677 </text:span><text:span text:style-name="T6">12522*</text:span></text:p>
      <text:p text:style-name="P219"><text:s text:c="5"/>14428 980142 <text:s/>983115 82554 <text:span text:style-name="T65">93045*</text:span> <text:span text:style-name="T65">101961*</text:span>103592</text:p>
      <text:p text:style-name="P90"><text:span text:style-name="T73"><text:s text:c="12"/></text:span><text:span text:style-name="T17"><text:s text:c="2"/></text:span><text:span text:style-name="T16">104621*</text:span><text:span text:style-name="T17">118443 </text:span><text:span text:style-name="T16">134290*</text:span><text:span text:style-name="T17"> 257698 992124 80892</text:span></text:p>
      <text:p text:style-name="P61"><text:s text:c="14"/>972513 972548 972688 431 <text:span text:style-name="T65">314153</text:span> 55577 118 476401</text:p>
      <text:p text:style-name="P262"><text:s text:c="5"/>345 <text:span text:style-name="T65">2504*</text:span>55730 <text:span text:style-name="T65">105873*9 55* 66 89 <text:s/>112 2686 43989 </text:span></text:p>
      <text:p text:style-name="P262"><text:span text:style-name="T72"><text:s text:c="5"/>980083 980098 980015 39860 </text:span><text:span text:style-name="T65">40841*</text:span><text:span text:style-name="T72">141 070847 </text:span><text:span text:style-name="T65">83831*</text:span></text:p>
      <text:p text:style-name="P265"><text:s text:c="5"/><text:span text:style-name="T65">94059*</text:span> <text:span text:style-name="T65">97398*</text:span> <text:span text:style-name="T65">98480*</text:span> <text:s/><text:span text:style-name="T65">102691*</text:span> <text:s text:c="2"/><text:span text:style-name="T65">108085*</text:span> <text:span text:style-name="T65">40554*</text:span> 906830</text:p>
      <text:p text:style-name="P265"><text:s text:c="4"/>19052 19129 162 980220 <text:s/>980239 967526 967577 200642</text:p>
      <text:p text:style-name="P265"><text:s text:c="4"/>136 972407 4607 37 <text:span text:style-name="T65">143*</text:span> 60841 41736 <text:span text:style-name="T65">40362</text:span> 531004 </text:p>
      <text:p text:style-name="P61"><text:s text:c="13"/>431469 972469 891054 901010 49908 972416 906811</text:p>
      <text:p text:style-name="P148"><text:s text:c="4"/>906825 993876 <text:span text:style-name="T65">65801*</text:span> <text:span text:style-name="T65">41277* <text:s/></text:span><text:s/><text:span text:style-name="T65">25190*</text:span> 60906 30903 </text:p>
      <text:p text:style-name="P90"><text:span text:style-name="T73"><text:s text:c="13"/></text:span><text:span text:style-name="T74">200176 107291 41990 997623 </text:span><text:span text:style-name="T75">99965*</text:span><text:span text:style-name="T74"> </text:span><text:span text:style-name="T75">13154*</text:span><text:span text:style-name="T74"> </text:span><text:span text:style-name="T75">197*</text:span></text:p>
      <text:p text:style-name="P61"><text:s text:c="14"/>80990 972655 972467 996730 17410 80225 80603</text:p>
      <text:p text:style-name="P61"><text:s text:c="10"/>80684 hw436 112889 6 201056 <text:s/>42138 <text:span text:style-name="T65">42272*</text:span> 900760</text:p>
      <text:p text:style-name="P95"><text:s text:c="10"/><text:span text:style-name="T14"><text:s/></text:span><text:span text:style-name="T6">346*</text:span><text:span text:style-name="T14"> 953153 </text:span><text:span text:style-name="T6">65620*</text:span><text:span text:style-name="T14">42343 56291 97299 972345</text:span></text:p>
      <text:p text:style-name="P219"><text:s/>972349 972359 972378 lner 10t <text:s text:c="2"/>hw411 998520cr 998524cr</text:p>
      <text:p text:style-name="P49"><text:s text:c="15"/>hw410 gwr162 dw75cr 955243uf<text:span text:style-name="T11"> <text:s text:c="2"/>225641uf <text:s/>707621cr </text:span></text:p>
      <text:p text:style-name="P61"><text:span text:style-name="T117"><text:s text:c="12"/>(46053 16053) </text:span><text:span text:style-name="T118">68501* </text:span><text:span text:style-name="T117">43 </text:span><text:span text:style-name="T118">3429*</text:span><text:span text:style-name="T65"> </text:span><text:s text:c="8"/></text:p>
      <text:p text:style-name="P61"><text:s text:c="15"/></text:p>
      <text:p text:style-name="P49"><text:s text:c="6"/><text:span text:style-name="T5"><text:s text:c="2"/>DIESELS</text:span></text:p>
      <text:p text:style-name="P49"><text:s text:c="12"/><text:span text:style-name="T65">50031</text:span> <text:span text:style-name="T65">50033</text:span> <text:span text:style-name="T65">50035</text:span> <text:span text:style-name="T65">50044</text:span> <text:span text:style-name="T65">50049</text:span> <text:span text:style-name="T65">20059*</text:span> <text:span text:style-name="T65">50007</text:span> </text:p>
      <text:p text:style-name="Standard"><text:span text:style-name="T83"><text:s text:c="2"/>D2960 319290 </text:span><text:span text:style-name="T84">D2961</text:span><text:span text:style-name="T83"> <text:s/>D7029 D9551 08635 08896</text:span></text:p>
      <text:p text:style-name="P46"><text:s text:c="11"/><text:span text:style-name="T72"><text:s/>D1062 </text:span><text:span text:style-name="T65">D821</text:span><text:span text:style-name="T72"> </text:span><text:span text:style-name="T65">D1015</text:span><text:span text:style-name="T72"> </text:span><text:span text:style-name="T65">12099</text:span><text:span text:style-name="T72"> </text:span><text:span text:style-name="T65">D1013</text:span><text:span text:style-name="T72"> </text:span><text:span text:style-name="T65">33108</text:span><text:span text:style-name="T72"> D13201</text:span> </text:p>
      <text:p text:style-name="P61"><text:s text:c="13"/>(09107 D4103) <text:s/>D3022 <text:s/>D3586</text:p>
      <text:p text:style-name="P49"/>
      <text:p text:style-name="P61"><text:s text:c="16"/>STEAMS IN MUSEUM</text:p>
      <text:p text:style-name="P61"><text:s text:c="16"/>22073 600 686 4930 7325</text:p>
      <text:p text:style-name="P61"/>
      <text:p text:style-name="P14"><text:s text:c="11"/>STEAMS</text:p>
      <text:p text:style-name="P3"><text:span text:style-name="T72"><text:s text:c="3"/>7170 </text:span><text:span text:style-name="T65">82045</text:span><text:span text:style-name="T72"> 25637 75069 7819 7235 </text:span><text:span text:style-name="T65">813</text:span><text:span text:style-name="T72"> 1450 </text:span><text:span text:style-name="T65">1501</text:span><text:span text:style-name="T72"> </text:span><text:span text:style-name="T65">2857*</text:span><text:span text:style-name="T72"> <text:s text:c="5"/>48773 </text:span><text:span text:style-name="T65">4566</text:span><text:span text:style-name="T72"> (catch me who can </text:span><text:span text:style-name="T14">80079 6960 </text:span><text:span text:style-name="T6">34027</text:span><text:span text:style-name="T14"> 42968 </text:span><text:span text:style-name="T6">43106</text:span><text:span text:style-name="T14"> 45110 </text:span><text:span text:style-name="T6">7802*</text:span><text:span text:style-name="T14"> <text:s text:c="3"/>46443 47383</text:span></text:p>
      <text:p text:style-name="P20"><text:s text:c="2"/>4085 <text:s/>2047 L95 4150 7714</text:p>
      <text:p text:style-name="P61"><text:s text:c="15"/></text:p>
      <text:p text:style-name="P111"/>
      <text:p text:style-name="P115"><text:s text:c="18"/>DMUS </text:p>
      <text:p text:style-name="P61"><text:s text:c="16"/><text:span text:style-name="T65"><text:s/>51941 <text:s/>59250 <text:s/>52064</text:span> <text:s/><text:span text:style-name="T65"><text:s/>50933*</text:span> <text:span text:style-name="T65">56208*</text:span></text:p>
      <text:p text:style-name="P61"><text:s text:c="9"/></text:p>
      <text:p text:style-name="P14"><text:s/>ROAD RAILERS</text:p>
      <text:p text:style-name="P61"><text:s text:c="13"/>(99709 901007-3) lms017 k890 olv </text:p>
      <text:p text:style-name="P61"><text:s text:c="11"/>(99709 013001-1) <text:s text:c="2"/>cgg0118574 (990709 940193-4</text:p>
      <text:p text:style-name="P188"><text:span text:style-name="T73"><text:s/></text:span><text:span text:style-name="T17"><text:s text:c="3"/></text:span></text:p>
      <text:p text:style-name="P61"><text:s text:c="15"/><text:span text:style-name="T117">WICKHAMS</text:span></text:p>
      <text:p text:style-name="P14"><text:s text:c="15"/>5019 7690 1580 8085 <text:s/></text:p>
      <text:p text:style-name="P46"><text:s text:c="12"/></text:p>
      <text:p text:style-name="P61"><text:s text:c="13"/>TROLLEY IN MUSEUM</text:p>
      <text:p text:style-name="P61"><text:s text:c="15"/>PLUMP TROLLEY</text:p>
      <text:p text:style-name="P148"/>
      <text:p text:style-name="P52"><text:s text:c="11"/><text:span text:style-name="T5"><text:s text:c="2"/>CRANES </text:span></text:p>
      <text:p text:style-name="P61"><text:s text:c="9"/>35 446 602 1087 601</text:p>
      <text:p text:style-name="P61"><text:s text:c="16"/></text:p>
      <text:p text:style-name="P46"><text:s text:c="9"/><text:span text:style-name="T14"><text:s text:c="4"/></text:span></text:p>
      <text:p text:style-name="P46"><text:s text:c="12"/><text:span text:style-name="T14"><text:s/>TRACK MACHINES</text:span></text:p>
      <text:p text:style-name="P14"><text:span text:style-name="T14"><text:s text:c="12"/></text:span><text:span text:style-name="T65">RU411*</text:span><text:span text:style-name="T14"> </text:span><text:span text:style-name="T65">73202*</text:span></text:p>
      <text:p text:style-name="P61"><text:s text:c="12"/></text:p>
      <text:p text:style-name="P46"><text:s text:c="11"/><text:span text:style-name="T14"><text:s text:c="7"/></text:span><text:span text:style-name="T34"><text:s text:c="2"/>SHAPFELL LIMESTONE</text:span></text:p>
      <text:p text:style-name="P219"><text:s text:c="4"/>DIESELS</text:p>
      <text:p text:style-name="P115"><text:s text:c="11"/><text:span text:style-name="T65">5470</text:span> <text:span text:style-name="T65">7543*</text:span></text:p>
      <text:p text:style-name="P156"/>
      <text:p text:style-name="P14"><text:s text:c="6"/>SOUTH DEVON RAILWAY</text:p>
      <text:p text:style-name="P262"><text:s text:c="6"/>Ground Coaches</text:p>
      <text:p text:style-name="P14"><text:s/><text:span text:style-name="T65">SR2106*</text:span> <text:s/><text:span text:style-name="T65"><text:s/>484M </text:span></text:p>
      <text:p text:style-name="P17"/>
      <text:p text:style-name="P61"><text:s text:c="13"/>15644 35326 99538 <text:span text:style-name="T65">34945</text:span> <text:span text:style-name="T65">4962*</text:span> 4805 <text:span text:style-name="T65">94556</text:span> <text:span text:style-name="T65">7377</text:span> <text:span text:style-name="T65">6515</text:span> </text:p>
      <text:p text:style-name="P46"><text:span text:style-name="T72"><text:s text:c="11"/></text:span><text:span text:style-name="T65">594</text:span><text:span text:style-name="T72"> 2180 1316</text:span><text:span text:style-name="T65"> 276</text:span><text:span text:style-name="T72"> </text:span><text:span text:style-name="T65">1285</text:span><text:span text:style-name="T72"> </text:span><text:span text:style-name="T65">1295*</text:span><text:span text:style-name="T72"> 4872 </text:span><text:span text:style-name="T65">1645*</text:span><text:span text:style-name="T72"> 9004 </text:span><text:span text:style-name="T65">889015</text:span><text:span text:style-name="T72"> </text:span></text:p>
      <text:p text:style-name="P67"><text:span text:style-name="T72"><text:s text:c="13"/>889009 </text:span>9111*<text:span text:style-name="T72"> 9346 9116 790 249 240 </text:span>233*<text:span text:style-name="T72"> 228 225 </text:span></text:p>
      <text:p text:style-name="P67"><text:span text:style-name="T72"><text:s text:c="15"/></text:span>1917*<text:span text:style-name="T72"> <text:s text:c="3"/></text:span>10680<text:span text:style-name="T72"> <text:s text:c="2"/></text:span>2540* <text:span text:style-name="T72"><text:s text:c="3"/></text:span>80225<text:span text:style-name="T72"> <text:s text:c="2"/></text:span>4785*<text:span text:style-name="T72"> </text:span>4802<text:span text:style-name="T72"> 305</text:span></text:p>
      <text:p text:style-name="P67"><text:span text:style-name="T72"><text:s text:c="14"/></text:span>92035<text:span text:style-name="T72"> <text:s text:c="5"/></text:span>94852<text:span text:style-name="T72"> </text:span>4496*<text:span text:style-name="T72"> </text:span>(92096 92067)*<text:span text:style-name="T72"> <text:s/></text:span></text:p>
      <text:p text:style-name="P61"><text:s text:c="5"/></text:p>
      <text:p text:style-name="P148"><text:s text:c="3"/>WAGONS</text:p>
      <text:p text:style-name="P262"><text:s text:c="3"/>993710 95979 993471 993247 <text:span text:style-name="T65">854895*</text:span> <text:span text:style-name="T65">786393</text:span> <text:span text:style-name="T65">778436</text:span></text:p>
      <text:p text:style-name="P168"><text:s text:c="3"/>550179 47528 <text:s/>108207 102776 114 16295 96835</text:p>
      <text:p text:style-name="P217"><text:s/>506327 126359 <text:span text:style-name="T65">753100*</text:span> <text:span text:style-name="T65">104700*</text:span> <text:span text:style-name="T65">766153</text:span> <text:span text:style-name="T65">2016</text:span> <text:span text:style-name="T65">3037</text:span> </text:p>
      <text:p text:style-name="P148"><text:s/>592433 743010 41873 230935 7303 105916 460370 </text:p>
      <text:p text:style-name="P262"><text:span text:style-name="T65"><text:s/>146*</text:span> <text:span text:style-name="T65">37*</text:span> 944769 44 <text:span text:style-name="T65">1140</text:span> 984832 984176 953640 <text:span text:style-name="T65">68777*</text:span> </text:p>
      <text:p text:style-name="P248"><text:s/>17295 <text:span text:style-name="T65">35420</text:span><text:span text:style-name="T72"> 42223 </text:span><text:span text:style-name="T65">68786*</text:span><text:span text:style-name="T72"> 263278 </text:span><text:span text:style-name="T65">513212</text:span><text:span text:style-name="T72"> 68479</text:span></text:p>
      <text:p text:style-name="P155"><text:span text:style-name="T72"><text:s/></text:span>741574<text:span text:style-name="T72"> 909069 8flat (061081 909054) <text:s/></text:span>91</text:p>
      <text:p text:style-name="P156"><text:s text:c="8"/>100715 </text:p>
      <text:p text:style-name="P61"><text:s text:c="7"/><text:span text:style-name="T66"><text:s/></text:span><text:s text:c="2"/><text:span text:style-name="T40"><text:s text:c="3"/></text:span><text:s/></text:p>
      <text:p text:style-name="P14">DIESELS</text:p>
      <text:p text:style-name="P132"><text:s text:c="13"/><text:span text:style-name="T65">50002</text:span> <text:span text:style-name="T65"><text:s/>D2246*</text:span> <text:span text:style-name="T65">D7612*</text:span> <text:span text:style-name="T65">D7541</text:span> <text:span text:style-name="T65">D7535*</text:span> <text:span text:style-name="T65">D2271</text:span> 4210141</text:p>
      <text:p text:style-name="P49"><text:span text:style-name="T5"><text:s text:c="14"/>2345 <text:s/></text:span><text:span text:style-name="T6">D6737*</text:span><text:span text:style-name="T5"> <text:s text:c="3"/></text:span><text:span text:style-name="T6">(D3721</text:span><text:span text:style-name="T5"> </text:span><text:span text:style-name="T6">09010)*</text:span></text:p>
      <text:p text:style-name="P67"/>
      <text:p text:style-name="P61"><text:s text:c="13"/>STEAMS</text:p>
      <text:p text:style-name="P262"><text:span text:style-name="T65">1690*</text:span> <text:span text:style-name="T65">2779</text:span> 1420 <text:span text:style-name="T65">1369*</text:span> 784 5474 <text:span text:style-name="T65">3810</text:span> <text:span text:style-name="T65">2745</text:span> <text:span text:style-name="T65">2031</text:span> 4160 <text:span text:style-name="T65">3205*</text:span></text:p>
      <text:p text:style-name="P61"><text:span text:style-name="T66"><text:s text:c="11"/></text:span><text:span text:style-name="T65">6412</text:span><text:span text:style-name="T66"> <text:s/></text:span><text:span text:style-name="T65">5542</text:span> <text:s text:c="2"/><text:span text:style-name="T65">5526</text:span> <text:span text:style-name="T65">3803</text:span> <text:s text:c="2"/><text:span text:style-name="T65">tiny2180m</text:span> <text:s/><text:span text:style-name="T65">5786</text:span> <text:s/><text:span text:style-name="T65">2873</text:span></text:p>
      <text:p text:style-name="P61"><text:s text:c="14"/></text:p>
      <text:p text:style-name="P61"><text:s text:c="13"/><text:span text:style-name="T40"><text:s text:c="4"/></text:span>DMUS</text:p>
      <text:p text:style-name="P61"><text:s text:c="13"/>59493 59740 55000 59004 51376</text:p>
      <text:p text:style-name="P14"/>
      <text:p text:style-name="P61"><text:s text:c="24"/>WICKHAMS</text:p>
      <text:p text:style-name="P61"><text:s text:c="13"/>6646 6652 9038 11717</text:p>
      <text:p text:style-name="P61"><text:s text:c="10"/></text:p>
      <text:p text:style-name="P61"><text:s text:c="16"/>ROAD RAILER</text:p>
      <text:p text:style-name="P61"><text:s text:c="14"/>(99709 940599-2) <text:s text:c="3"/></text:p>
      <text:p text:style-name="P217"/>
      <text:p text:style-name="P266"><text:s text:c="5"/><text:span text:style-name="T73"><text:s/></text:span><text:span text:style-name="T15">TRACK MCHINES</text:span></text:p>
      <text:p text:style-name="P33"><text:s text:c="4"/>4885 73274 98210</text:p>
      <text:p text:style-name="P46"><text:s text:c="10"/><text:span text:style-name="T14"><text:s/></text:span></text:p>
      <text:p text:style-name="P248"><text:s text:c="4"/><text:span text:style-name="T14"><text:s text:c="3"/>TROLLEYS</text:span></text:p>
      <text:p text:style-name="P61"><text:s text:c="15"/>PLUMP TROLLEY 19XX <text:s/>11718</text:p>
      <text:p text:style-name="P61"><text:s text:c="14"/></text:p>
      <text:p text:style-name="P61"><text:s text:c="16"/>CRANE</text:p>
      <text:p text:style-name="P61"><text:span text:style-name="T117"><text:s text:c="15"/>610 <text:s text:c="8"/></text:span><text:s text:c="19"/></text:p>
      <text:p text:style-name="P46"><text:s text:c="12"/><text:span text:style-name="T10"><text:s/></text:span></text:p>
      <text:p text:style-name="P61"><text:s text:c="12"/></text:p>
      <text:p text:style-name="P61"><text:s text:c="12"/>SOMERSET D R H </text:p>
      <text:p text:style-name="P262"><text:s text:c="3"/>COACHES</text:p>
      <text:p text:style-name="P49"><text:s text:c="11"/><text:span text:style-name="T6">26049*</text:span> <text:s/><text:span text:style-name="T65">9267*</text:span> <text:span text:style-name="T65">1885*</text:span> <text:s/><text:span text:style-name="T65">S1162* </text:span><text:span text:style-name="T103"><text:s text:c="2"/></text:span><text:s/><text:span text:style-name="T65">34527* </text:span><text:s/><text:span text:style-name="T65">94438*</text:span></text:p>
      <text:p text:style-name="P50"/>
      <text:p text:style-name="P217"><text:s text:c="9"/>Ground Wagon</text:p>
      <text:p text:style-name="P61"><text:s text:c="15"/><text:span text:style-name="T65">200239* </text:span></text:p>
      <text:p text:style-name="P61"><text:span text:style-name="T103"><text:s text:c="11"/></text:span><text:span text:style-name="T65">4169*</text:span> <text:span text:style-name="T65">992897*</text:span> <text:s/><text:span text:style-name="T65">4069</text:span> <text:span text:style-name="T65">983233</text:span> <text:span text:style-name="T65">294176</text:span> <text:span text:style-name="T65">321*</text:span> <text:span text:style-name="T65">270*</text:span></text:p>
      <text:p text:style-name="P61"><text:s text:c="13"/><text:span text:style-name="T65">17639*</text:span> <text:s/><text:span text:style-name="T65">994445*</text:span> <text:s/><text:span text:style-name="T65">56286</text:span> <text:span text:style-name="T65">30419</text:span> <text:span text:style-name="T65">726399*</text:span> <text:span text:style-name="T65">44000*</text:span> </text:p>
      <text:p text:style-name="P111"><text:s text:c="14"/><text:span text:style-name="T65">9128*</text:span> <text:span text:style-name="T65"><text:s/>577004*</text:span> <text:s/><text:span text:style-name="T65">62070*</text:span> <text:span text:style-name="T65">779696*</text:span> <text:span text:style-name="T65">160073*</text:span><text:span text:style-name="T40"> <text:s/></text:span><text:span text:style-name="T65">192437*</text:span></text:p>
      <text:p text:style-name="P217"><text:s text:c="5"/></text:p>
      <text:p text:style-name="P14">DIESELS </text:p>
      <text:p text:style-name="P67"><text:span text:style-name="T72"><text:s text:c="12"/></text:span>D4095*<text:span text:style-name="T72"> <text:s/></text:span>03901*</text:p>
      <text:p text:style-name="P145"><text:s text:c="2"/></text:p>
      <text:p text:style-name="P144"><text:s text:c="10"/><text:span text:style-name="T72"><text:s/></text:span><text:s text:c="8"/></text:p>
      <text:p text:style-name="P250"><text:s text:c="2"/><text:span text:style-name="T5"><text:s/>STEAM</text:span></text:p>
      <text:p text:style-name="P67"><text:span text:style-name="T72"><text:s text:c="11"/></text:span>7109*</text:p>
      <text:p text:style-name="P217"/>
      <text:p text:style-name="P49"><text:s text:c="11"/><text:span text:style-name="T5"><text:s text:c="4"/>ROAD RAILER</text:span></text:p>
      <text:p text:style-name="P221"><text:span text:style-name="T72"><text:s text:c="9"/></text:span><text:s/>H867 YCD*<text:span text:style-name="T72"> <text:s/></text:span></text:p>
      <text:p text:style-name="P217"/>
      <text:p text:style-name="P46"><text:s text:c="13"/><text:span text:style-name="T14"><text:s text:c="5"/>WICKHAM</text:span></text:p>
      <text:p text:style-name="P67"><text:span text:style-name="T119"><text:s text:c="12"/></text:span><text:span text:style-name="T117">(68055 7504)</text:span></text:p>
      <text:p text:style-name="P49"><text:s text:c="18"/></text:p>
      <text:p text:style-name="P70"><text:s text:c="15"/></text:p>
      <text:p text:style-name="P46"><text:s text:c="11"/><text:span text:style-name="T72"><text:s/></text:span><text:span text:style-name="T14">TROLLEYS</text:span></text:p>
      <text:p text:style-name="P221"><text:span text:style-name="T72"><text:s text:c="5"/>XXXX XXXX </text:span>XXXX*</text:p>
      <text:p text:style-name="P221"/>
      <text:p text:style-name="P61"><text:s text:c="13"/>SPA VALLEY RAILWAY</text:p>
      <text:p text:style-name="P61"><text:s text:c="14"/>COACHES</text:p>
      <text:p text:style-name="P217"><text:s text:c="6"/>1864 <text:s/><text:span text:style-name="T65">4999</text:span> <text:span text:style-name="T65">4828</text:span> <text:span text:style-name="T65">5037</text:span> <text:span text:style-name="T65">25843</text:span> <text:span text:style-name="T65">25845</text:span> <text:s/><text:span text:style-name="T65">9414</text:span> <text:span text:style-name="T65">21214</text:span> <text:span text:style-name="T65">92111</text:span></text:p>
      <text:p text:style-name="P217"><text:s/><text:span text:style-name="T65">(35289 977168)</text:span> <text:span text:style-name="T65">sr1249 sr201</text:span> <text:span text:style-name="T65">sr2239</text:span> <text:span text:style-name="T65">sr1240</text:span> <text:s/><text:span text:style-name="T65">3131</text:span> </text:p>
      <text:p text:style-name="P14"/>
      <text:p text:style-name="P148"><text:s/>GROUND <text:s/>WAGON</text:p>
      <text:p text:style-name="P148">18210</text:p>
      <text:p text:style-name="P148"/>
      <text:p text:style-name="P61"><text:s text:c="9"/>4273 41237 730767 781265 786977 854998 900927 </text:p>
      <text:p text:style-name="P61"><text:s text:c="11"/>993182 <text:s/>993224 560 556 488 397 67955 <text:s/>70277cr</text:p>
      <text:p text:style-name="P61"><text:s text:c="9"/>741291 994449 <text:s/>901018 2023 972208 301594 998018</text:p>
      <text:p text:style-name="P46"><text:s text:c="12"/><text:span text:style-name="T14"><text:s/>996406 56296 900115 904142 7xxxxx 3p oned 105fo</text:span></text:p>
      <text:p text:style-name="P61"><text:s text:c="12"/>uf <text:s text:c="2"/>689cr 972206 12t</text:p>
      <text:p text:style-name="P49"><text:s text:c="19"/></text:p>
      <text:p text:style-name="P148"><text:s text:c="4"/>DIESELS</text:p>
      <text:p text:style-name="P61"><text:s text:c="10"/><text:span text:style-name="T65"><text:s/>33063*</text:span> 33065 D3489 <text:s/>73140 <text:s/><text:span text:style-name="T65">31430</text:span> <text:s/>09026 <text:s/>15224</text:p>
      <text:p text:style-name="P61"><text:s text:c="18"/></text:p>
      <text:p text:style-name="P46"><text:span text:style-name="T72"><text:s text:c="10"/></text:span><text:span text:style-name="T14">STEAMS</text:span></text:p>
      <text:p text:style-name="P145"><text:span text:style-name="T9">2193</text:span><text:span text:style-name="T11"> </text:span><text:span text:style-name="T9">2215</text:span><text:span text:style-name="T11"> </text:span><text:span text:style-name="T9">2315</text:span><text:span text:style-name="T11"> 7668 7673 1589 80078 </text:span><text:span text:style-name="T9">32650</text:span><text:span text:style-name="T11"> </text:span><text:span text:style-name="T9">47493</text:span></text:p>
      <text:p text:style-name="P219"><text:s text:c="5"/></text:p>
      <text:p text:style-name="P145"><text:span text:style-name="T5"><text:s/></text:span><text:s text:c="3"/><text:span text:style-name="T5">DEMUS</text:span></text:p>
      <text:p text:style-name="P61"><text:s text:c="11"/><text:span text:style-name="T65">60142</text:span> <text:span text:style-name="T65">60616</text:span> <text:span text:style-name="T65">60909</text:span> </text:p>
      <text:p text:style-name="P61"><text:s text:c="13"/></text:p>
      <text:p text:style-name="P61"><text:s text:c="14"/>EMUS</text:p>
      <text:p text:style-name="P61"><text:s text:c="11"/>68503 62402 76764 <text:span text:style-name="T65">69306</text:span> 76835</text:p>
      <text:p text:style-name="P61"><text:s text:c="13"/></text:p>
      <text:p text:style-name="P148"/>
      <text:p text:style-name="P148"><text:s/>ROAD RAILERS</text:p>
      <text:p text:style-name="P61"><text:s text:c="11"/>(99709 01199-5) <text:s text:c="5"/>(99709 011575-6)</text:p>
      <text:p text:style-name="P148">(99709 011576-4) <text:s text:c="2"/>(99709 901125-3) </text:p>
      <text:p text:style-name="P250"><text:s/><text:span text:style-name="T5"><text:s/>(99709 901126-1) <text:s text:c="2"/>(99709 901020-6) </text:span></text:p>
      <text:p text:style-name="P168"><text:s text:c="2"/>(99709 901012-3) <text:s/>Q923 BCH </text:p>
      <text:p text:style-name="P148"><text:s text:c="4"/></text:p>
      <text:p text:style-name="P46"><text:s text:c="9"/><text:span text:style-name="T72"><text:s/></text:span><text:span text:style-name="T14"><text:s text:c="2"/>TROLLEYS </text:span></text:p>
      <text:p text:style-name="P262">XXXX XXXX XXXX XXXX XXXX XXXX</text:p>
      <text:p text:style-name="P218"><text:s text:c="9"/>PLUMP TROLLEY </text:p>
      <text:p text:style-name="P218"/>
      <text:p text:style-name="P218"><text:s text:c="8"/><text:span text:style-name="T117"><text:s text:c="2"/>CRANES </text:span></text:p>
      <text:p text:style-name="P148"><text:s text:c="11"/><text:span text:style-name="T65">622</text:span> 81339 <text:s/></text:p>
      <text:p text:style-name="P111"/>
      <text:p text:style-name="P61"><text:s text:c="17"/>STAINMORE RAILWAY </text:p>
      <text:p text:style-name="P262"><text:s text:c="11"/>Ground coach </text:p>
      <text:p text:style-name="P155"><text:span text:style-name="T72"><text:s text:c="12"/></text:span>2051*</text:p>
      <text:p text:style-name="P148"/>
      <text:p text:style-name="P61"><text:s text:c="13"/>31148 60505 4249 1852 24287 131 1111 4163 3857</text:p>
      <text:p text:style-name="P61"><text:s text:c="15"/>35200 <text:s text:c="2"/><text:span text:style-name="T65">41798</text:span> 3669 SR207</text:p>
      <text:p text:style-name="P61"/>
      <text:p text:style-name="P156"><text:s text:c="12"/>WAGONS</text:p>
      <text:p text:style-name="P46"><text:s text:c="9"/><text:span text:style-name="T72"><text:s text:c="5"/></text:span><text:span text:style-name="T14"><text:s/></text:span><text:span text:style-name="T6">241245*</text:span><text:span text:style-name="T14"> </text:span><text:span text:style-name="T6">983122*</text:span><text:span text:style-name="T14"> 993346 509950 741251 260848</text:span></text:p>
      <text:p text:style-name="P61"><text:s text:c="10"/>903001 <text:s text:c="3"/>87249fo<text:span text:style-name="T40"> </text:span><text:span text:style-name="T65">5xxxxx*</text:span></text:p>
      <text:p text:style-name="P145"><text:s text:c="2"/><text:span text:style-name="T5"><text:s text:c="2"/></text:span></text:p>
      <text:p text:style-name="P67"/>
      <text:p text:style-name="P148"><text:s text:c="6"/>STEAMS</text:p>
      <text:p text:style-name="P61"><text:s text:c="15"/>910 2084 3825 <text:s text:c="15"/></text:p>
      <text:p text:style-name="P61"><text:s text:c="8"/></text:p>
      <text:p text:style-name="P61"><text:s text:c="10"/>DIESELS</text:p>
      <text:p text:style-name="P70"><text:s text:c="11"/>3958 2952 2670</text:p>
      <text:p text:style-name="P49"><text:s text:c="10"/></text:p>
      <text:p text:style-name="P49"><text:s text:c="10"/><text:span text:style-name="T5"><text:s text:c="4"/>WICKHAM</text:span></text:p>
      <text:p text:style-name="P61"><text:s text:c="11"/>4139 <text:s text:c="3"/></text:p>
      <text:p text:style-name="P61"><text:s text:c="10"/></text:p>
      <text:p text:style-name="P148"><text:s text:c="2"/>ROAD RAILER</text:p>
      <text:p text:style-name="P148"><text:s text:c="11"/>7510</text:p>
      <text:p text:style-name="P148"/>
      <text:p text:style-name="P61"><text:s text:c="13"/>TROLLEYS</text:p>
      <text:p text:style-name="P61"><text:s text:c="13"/>XXXX XXXX <text:s/></text:p>
      <text:p text:style-name="P61"><text:s text:c="12"/></text:p>
      <text:p text:style-name="P61"><text:s text:c="14"/>CRANES</text:p>
      <text:p text:style-name="P70"><text:s text:c="14"/>53 15436 <text:s text:c="5"/></text:p>
      <text:p text:style-name="P219"><text:s/></text:p>
      <text:p text:style-name="P49"><text:s text:c="14"/><text:span text:style-name="T5"><text:s text:c="2"/>STEPHENSON R M</text:span></text:p>
      <text:p text:style-name="P46"><text:s text:c="11"/>COACHES <text:s text:c="3"/></text:p>
      <text:p text:style-name="P61"><text:s text:c="19"/><text:span text:style-name="T65">43172 </text:span><text:s text:c="2"/><text:span text:style-name="T65">43010</text:span> <text:s text:c="2"/><text:span text:style-name="T65">48015</text:span></text:p>
      <text:p text:style-name="P46"><text:s text:c="10"/><text:span text:style-name="T72"><text:s text:c="2"/></text:span></text:p>
      <text:p text:style-name="P35"><text:s text:c="12"/><text:span text:style-name="T67"><text:s text:c="3"/></text:span><text:span text:style-name="T36"><text:s/>Ground Wagons</text:span></text:p>
      <text:p text:style-name="P61"><text:s text:c="12"/><text:span text:style-name="T65"><text:s/>85XXXX</text:span> <text:s/><text:span text:style-name="T65"><text:s/>CONTAINER</text:span></text:p>
      <text:p text:style-name="P46"><text:span text:style-name="T72"><text:s text:c="11"/></text:span><text:span text:style-name="T14"><text:s text:c="4"/></text:span><text:span text:style-name="T6">774658</text:span><text:span text:style-name="T14"> </text:span><text:span text:style-name="T6">996297</text:span><text:span text:style-name="T14"> </text:span><text:span text:style-name="T6">992993</text:span><text:span text:style-name="T14"> </text:span><text:span text:style-name="T6">103</text:span><text:span text:style-name="T14"> 6555 415776 </text:span><text:span text:style-name="T6">951920</text:span><text:span text:style-name="T14"> 722</text:span></text:p>
      <text:p text:style-name="P148"><text:s text:c="6"/><text:span text:style-name="T65">321051CR</text:span> <text:span text:style-name="T65">4WFLAT</text:span> trolley <text:span text:style-name="T65">bogie well </text:span></text:p>
      <text:p text:style-name="P155"/>
      <text:p text:style-name="P148">DIESELS IN <text:s/>MUSEUM</text:p>
      <text:p text:style-name="P61"><text:s text:c="14"/><text:span text:style-name="T65">10</text:span> <text:span text:style-name="T65">E4</text:span></text:p>
      <text:p text:style-name="P155"/>
      <text:p text:style-name="P46"><text:s text:c="9"/><text:span text:style-name="T14"><text:s text:c="11"/></text:span><text:span text:style-name="T6">09015</text:span><text:span text:style-name="T14"> <text:s text:c="2"/></text:span><text:span text:style-name="T6">03078</text:span></text:p>
      <text:p text:style-name="P262"><text:s text:c="3"/></text:p>
      <text:p text:style-name="P148">STEAMS <text:s/>IN MUSEUM</text:p>
      <text:p text:style-name="P61"><text:s text:c="11"/><text:span text:style-name="T65">7683</text:span> <text:span text:style-name="T65">BILLY </text:span></text:p>
      <text:p text:style-name="P61"><text:s text:c="8"/><text:span text:style-name="T65"><text:s/>401 </text:span><text:s/><text:span text:style-name="T65">(5 OR 2509 )</text:span> <text:span text:style-name="T65">1970</text:span></text:p>
      <text:p text:style-name="P49"><text:s text:c="11"/><text:span text:style-name="T5"><text:s/></text:span></text:p>
      <text:p text:style-name="P49"><text:s text:c="11"/></text:p>
      <text:p text:style-name="P217">ROAD RAILERS</text:p>
      <text:p text:style-name="P61"><text:s text:c="14"/>XXXX4 XXXX4</text:p>
      <text:p text:style-name="P46"><text:span text:style-name="T14"><text:s text:c="14"/></text:span><text:span text:style-name="T72"><text:s text:c="7"/></text:span></text:p>
      <text:p text:style-name="P46"><text:span text:style-name="T14"><text:s text:c="11"/>TROLLEYS</text:span><text:span text:style-name="T72"> <text:s text:c="2"/></text:span></text:p>
      <text:p text:style-name="P70"><text:s text:c="10"/>XXXX XXXX</text:p>
      <text:p text:style-name="P73"/>
      <text:p text:style-name="P156"><text:s/>EMU</text:p>
      <text:p text:style-name="P67"><text:span text:style-name="T72"><text:s text:c="19"/></text:span><text:s/>3267</text:p>
      <text:p text:style-name="P61"><text:s text:c="13"/></text:p>
      <text:p text:style-name="P14">CRANE</text:p>
      <text:p text:style-name="P46"><text:span text:style-name="T14"><text:s text:c="11"/></text:span><text:span text:style-name="T6">81140</text:span><text:span text:style-name="T14"> <text:s text:c="5"/></text:span></text:p>
      <text:p text:style-name="P46"><text:span text:style-name="T14"><text:s text:c="8"/></text:span><text:span text:style-name="T10"><text:s/></text:span></text:p>
      <text:p text:style-name="P46"><text:span text:style-name="T39"><text:s text:c="15"/></text:span><text:span text:style-name="T14"><text:s/></text:span></text:p>
      <text:p text:style-name="P61"><text:s text:c="12"/>STRATHSPEY RAILWAY</text:p>
      <text:p text:style-name="P49"><text:s text:c="14"/>Ground Coaches</text:p>
      <text:p text:style-name="P61"><text:s text:c="14"/><text:span text:style-name="T65">HR*</text:span> <text:span text:style-name="T65">GNSR*</text:span> <text:span text:style-name="T65">GNSR*</text:span></text:p>
      <text:p text:style-name="P221"/>
      <text:p text:style-name="P61"><text:span text:style-name="T72"><text:s text:c="13"/>4477 15401 </text:span><text:span text:style-name="T65">1928</text:span><text:span text:style-name="T72"> 1936 5149 35201 35069 99202</text:span></text:p>
      <text:p text:style-name="P61"><text:s text:c="11"/>34676 <text:s text:c="2"/>4079 4331 <text:span text:style-name="T65">5060</text:span> <text:span text:style-name="T65">5057 </text:span>5052 4777 <text:span text:style-name="T65">5228 </text:span>5204 </text:p>
      <text:p text:style-name="P46"><text:span text:style-name="T14"><text:s text:c="12"/>5055 </text:span><text:span text:style-name="T6">17101</text:span><text:span text:style-name="T14"> 37234 </text:span><text:span text:style-name="T6">45021</text:span><text:span text:style-name="T14"> </text:span><text:span text:style-name="T6">1748*</text:span><text:span text:style-name="T14"> </text:span><text:span text:style-name="T6">3177*</text:span><text:span text:style-name="T14"> 43024 92404</text:span></text:p>
      <text:p text:style-name="P49"><text:span text:style-name="T5"><text:s text:c="12"/>(7201 16201) (25150 80433) 27043 33003 <text:s/></text:span><text:span text:style-name="T6">SR1834</text:span></text:p>
      <text:p text:style-name="P61"><text:s text:c="11"/><text:span text:style-name="T65"><text:s/>92940*</text:span> <text:s/><text:span text:style-name="T65">13470</text:span> <text:s text:c="2"/><text:span text:style-name="T65">13479</text:span></text:p>
      <text:p text:style-name="P61"><text:s text:c="7"/></text:p>
      <text:p text:style-name="P61"><text:s text:c="11"/>Ground Wagons</text:p>
      <text:p text:style-name="P111"><text:s text:c="13"/><text:span text:style-name="T65">7XXXXX*</text:span> BTY </text:p>
      <text:p text:style-name="P61"><text:s text:c="11"/></text:p>
      <text:p text:style-name="P106"><text:s text:c="10"/><text:span text:style-name="T5"><text:s text:c="2"/></text:span><text:span text:style-name="T6">756128*</text:span><text:span text:style-name="T5"> 47623 47950 </text:span><text:span text:style-name="T6">983718*</text:span><text:span text:style-name="T5"> 787395 </text:span><text:span text:style-name="T6">993904*</text:span><text:span text:style-name="T5"> </text:span></text:p>
      <text:p text:style-name="P61"><text:s text:c="9"/>47801 <text:span text:style-name="T65">209044*</text:span> <text:span text:style-name="T65">989188</text:span> <text:span text:style-name="T65">983712*</text:span> <text:span text:style-name="T65">983074*</text:span> 787115</text:p>
      <text:p text:style-name="P262"><text:s/>784936 992914 944445 730214 785256 2429 <text:span text:style-name="T65">742057*</text:span> <text:span text:style-name="T65">742058*</text:span> <text:span text:style-name="T65">998015*</text:span> 731 <text:span text:style-name="T65">998020*</text:span> 205005 <text:span text:style-name="T65">900023*</text:span> <text:s text:c="3"/><text:span text:style-name="T65">991654*</text:span> 954549 4323 200715 7472 <text:span text:style-name="T65">991755*</text:span> <text:s/><text:span text:style-name="T65">996969</text:span> <text:span text:style-name="T65">994425*</text:span> 998026 97822 7264 <text:s/>5XXXXX 50XXXX<text:span text:style-name="T74"> </text:span><text:span text:style-name="T75">2370 7932 400.1*</text:span><text:span text:style-name="T74"> <text:s/></text:span><text:span text:style-name="T75">150747*</text:span></text:p>
      <text:p text:style-name="P49"><text:s text:c="12"/>416187FO 72flat gnsr grey gnsr2 gnsr3 lmsr50xxxx 72cr <text:s text:c="12"/></text:p>
      <text:p text:style-name="P148"><text:span text:style-name="T117"><text:s text:c="11"/>gnsr1 </text:span><text:span text:style-name="T118">182004*</text:span><text:span text:style-name="T117"> <text:s text:c="2"/></text:span></text:p>
      <text:p text:style-name="P49"><text:s text:c="10"/><text:span text:style-name="T5"><text:s text:c="3"/></text:span></text:p>
      <text:p text:style-name="P219"><text:s text:c="3"/>DIESELS</text:p>
      <text:p text:style-name="P46"><text:s text:c="9"/>(D5394 27106 27050) (5862 31327) ( D3605 08490) </text:p>
      <text:p text:style-name="P148"><text:s text:c="3"/>26025 <text:s/>277V (D5302 26002) (28027 D2774) <text:s/>265618 </text:p>
      <text:p text:style-name="P168"><text:s text:c="12"/>517 5763 <text:span text:style-name="T65">27549</text:span> 260756 <text:span text:style-name="T65">37674</text:span></text:p>
      <text:p text:style-name="P172"/>
      <text:p text:style-name="P61"><text:s text:c="15"/>STEAMS</text:p>
      <text:p text:style-name="P61"><text:s text:c="12"/>2017 2020 7097 5025 46512 <text:span text:style-name="T65">828</text:span></text:p>
      <text:p text:style-name="P217"><text:s text:c="2"/></text:p>
      <text:p text:style-name="P46"><text:span text:style-name="T72"><text:s text:c="12"/></text:span><text:span text:style-name="T14"><text:s text:c="5"/>ROAD RAILERS</text:span></text:p>
      <text:p text:style-name="P49"><text:span text:style-name="T5"><text:s text:c="11"/>BP001 BP002 62211 PL081 <text:s/></text:span><text:span text:style-name="T6"><text:s/>J594 OKK</text:span> <text:s text:c="7"/></text:p>
      <text:p text:style-name="P61"><text:s text:c="8"/></text:p>
      <text:p text:style-name="P61"><text:s text:c="9"/>WICKHAM</text:p>
      <text:p text:style-name="P70"><text:s text:c="11"/>940099</text:p>
      <text:p text:style-name="P61"><text:s text:c="15"/></text:p>
      <text:p text:style-name="P61"><text:s text:c="9"/>GEISMARS</text:p>
      <text:p text:style-name="P46"><text:s text:c="12"/>( 99709 901047-9) <text:s/>(99709 909153-7) <text:s text:c="2"/>(99709 909005-9) </text:p>
      <text:p text:style-name="P61"><text:s text:c="11"/>(99709 909157-8) <text:s/>(99709 909158-6) <text:s/>(99709 909162-8)</text:p>
      <text:p text:style-name="P61"><text:s text:c="12"/>(99709 909265-9) (99709 909103-2)</text:p>
      <text:p text:style-name="P61"><text:s text:c="5"/></text:p>
      <text:p text:style-name="P61"><text:s text:c="11"/>DMUS</text:p>
      <text:p text:style-name="P61"><text:s text:c="11"/>59511 <text:span text:style-name="T65">51990</text:span> 56047 51367 <text:span text:style-name="T65">52008</text:span> 52030 51402 </text:p>
      <text:p text:style-name="P172"/>
      <text:p text:style-name="P46"><text:s text:c="10"/>CRANES</text:p>
      <text:p text:style-name="P168"><text:s text:c="12"/><text:span text:style-name="T65">203*</text:span> <text:s/>25280 81514</text:p>
      <text:p text:style-name="P144"><text:span text:style-name="T72"><text:s text:c="8"/></text:span><text:span text:style-name="T14"><text:s/></text:span></text:p>
      <text:p text:style-name="P133"><text:s text:c="10"/>SOUTH YORKSHIRE </text:p>
      <text:p text:style-name="P262">WAGON</text:p>
      <text:p text:style-name="P135"><text:s text:c="9"/>5404 <text:s text:c="4"/></text:p>
      <text:p text:style-name="P94"><text:s text:c="11"/></text:p>
      <text:p text:style-name="P46"><text:s text:c="9"/><text:span text:style-name="T72"><text:s/></text:span><text:span text:style-name="T14"><text:s/>ST GERMANS</text:span></text:p>
      <text:p text:style-name="P262">Ground Coaches</text:p>
      <text:p text:style-name="P217"><text:span text:style-name="T65">210 179 </text:span><text:s/><text:span text:style-name="T65">599 </text:span><text:s text:c="2"/>BARE WOOD </text:p>
      <text:p text:style-name="P49"><text:span text:style-name="T5"><text:s text:c="9"/></text:span><text:span text:style-name="T6">1353</text:span><text:span text:style-name="T5"> <text:s/></text:span><text:span text:style-name="T6">234</text:span><text:span text:style-name="T5"> <text:s/></text:span><text:span text:style-name="T6">1091</text:span><text:span text:style-name="T5"> <text:s/>2639 <text:s/></text:span><text:span text:style-name="T6">250 <text:s text:c="2"/></text:span><text:span text:style-name="T5"><text:s text:c="7"/></text:span></text:p>
      <text:p text:style-name="P265"/>
      <text:p text:style-name="P61"><text:s text:c="17"/>SWANAGE RAILWAY</text:p>
      <text:p text:style-name="P262">Ground Coaches </text:p>
      <text:p text:style-name="P61"><text:s text:c="11"/>911 1512 2296 695 733</text:p>
      <text:p text:style-name="P61"/>
      <text:p text:style-name="P61"><text:s text:c="13"/>4055 1947 <text:span text:style-name="T65">1865</text:span> 4803 3090 1937 4416 35059 35464</text:p>
      <text:p text:style-name="P61"><text:s text:c="15"/>24127 4349 9015 4983 4981 4961 4945 4897 4842 </text:p>
      <text:p text:style-name="P61"><text:s text:c="10"/>21205 10619 4365 5761 1381 1248 256 13 385 232 </text:p>
      <text:p text:style-name="P61"><text:s text:c="10"/>1346 4594 6699 114 4366 <text:s/>(81410 92607) (74 70011) <text:s text:c="2"/></text:p>
      <text:p text:style-name="P217"><text:s/>1449 <text:s/>1234 1628 2212 9229 2768UF (70262 1457)</text:p>
      <text:p text:style-name="P217"/>
      <text:p text:style-name="P148"><text:s text:c="3"/>Ground Wagons </text:p>
      <text:p text:style-name="P61"><text:s text:c="11"/>774172 88XXXX <text:s/>container 55867</text:p>
      <text:p text:style-name="P61"><text:s text:c="18"/></text:p>
      <text:p text:style-name="P133"><text:s text:c="11"/></text:p>
      <text:p text:style-name="P148"/>
      <text:p text:style-name="P148"><text:s text:c="4"/>87894 87675 2661 49208 775832 992784 872042 </text:p>
      <text:p text:style-name="P248">854906 784757 160073 49445 360329 48367 </text:p>
      <text:p text:style-name="P262"><text:s text:c="2"/>782021 781861 <text:s/>774977 <text:s/>187085 780331 5291 3150</text:p>
      <text:p text:style-name="P262"><text:s text:c="2"/>59342 738836 738749 738507 48442 998006 <text:s/>61989 57883 </text:p>
      <text:p text:style-name="P262"><text:s text:c="3"/>39613 37064 39634 2780 <text:span text:style-name="T65">17861</text:span> 56289 56284 60001 </text:p>
      <text:p text:style-name="P262"><text:s text:c="3"/>978683 61155 <text:span text:style-name="T72">274569 47266 889000 61983 996437</text:span></text:p>
      <text:p text:style-name="P217"><text:s text:c="2"/>740044 56400 63002 274571 502824c pba128cr</text:p>
      <text:p text:style-name="P46"><text:s text:c="11"/>732234 732180 732027 732018 955132 pba121cr pba131 r</text:p>
      <text:p text:style-name="P61"><text:s text:c="12"/>978059 61095 60286 935708 3095cr hv402 </text:p>
      <text:p text:style-name="P61"/>
      <text:p text:style-name="P61"><text:s text:c="16"/>DIESELS</text:p>
      <text:p text:style-name="P217"><text:s text:c="6"/><text:span text:style-name="T65">08436</text:span> 33111 2054 421032 <text:span text:style-name="T65">(D6515 33012)</text:span></text:p>
      <text:p text:style-name="P61"><text:s text:c="14"/>(D3591 08476) <text:s text:c="2"/></text:p>
      <text:p text:style-name="P168"><text:s text:c="4"/></text:p>
      <text:p text:style-name="P46"><text:span text:style-name="T72"><text:s text:c="11"/></text:span><text:s/><text:span text:style-name="T39"><text:s/></text:span><text:span text:style-name="T14"><text:s text:c="2"/></text:span></text:p>
      <text:p text:style-name="P61"><text:s text:c="10"/><text:span text:style-name="T117">STEAM IN MUSEUM</text:span></text:p>
      <text:p text:style-name="P133"><text:s text:c="14"/>1874 </text:p>
      <text:p text:style-name="P217"><text:s text:c="6"/></text:p>
      <text:p text:style-name="P14"><text:s text:c="2"/>STEAMS</text:p>
      <text:p text:style-name="P46"><text:span text:style-name="T14"><text:s text:c="13"/>80146 31806 30053 34072 34053 </text:span><text:span text:style-name="T6">34028</text:span><text:span text:style-name="T14"> 34010 5 31625</text:span> <text:span text:style-name="T14"><text:s text:c="4"/></text:span></text:p>
      <text:p text:style-name="P46"><text:s text:c="9"/><text:span text:style-name="T72"><text:s/></text:span><text:span text:style-name="T14"><text:s/></text:span></text:p>
      <text:p text:style-name="P46"><text:s text:c="11"/><text:span text:style-name="T14"><text:s text:c="3"/>ROAD RAILERS</text:span></text:p>
      <text:p text:style-name="P61"><text:s text:c="12"/>(99709 011203-5) (99709 940260-1)</text:p>
      <text:p text:style-name="P61"><text:s text:c="12"/>(99709 911225-9) <text:s/>st/04/09</text:p>
      <text:p text:style-name="P111"><text:s text:c="13"/></text:p>
      <text:p text:style-name="P250"><text:s/><text:span text:style-name="T5"><text:s/>WICKHAM</text:span></text:p>
      <text:p text:style-name="P117"><text:s text:c="11"/>7505 <text:s text:c="12"/></text:p>
      <text:p text:style-name="P111"><text:s text:c="15"/></text:p>
      <text:p text:style-name="P168"><text:s text:c="6"/><text:span text:style-name="T117">TROLLEYS</text:span> </text:p>
      <text:p text:style-name="P148"><text:s text:c="12"/>TR 229 XXXX XXXX XXXX XXXX </text:p>
      <text:p text:style-name="P49"><text:s text:c="8"/><text:span text:style-name="T5"><text:s text:c="6"/>CRANES</text:span></text:p>
      <text:p text:style-name="P14"><text:s text:c="12"/>1 <text:s text:c="2"/>2 <text:s/>2008 3151 95210 <text:s text:c="12"/></text:p>
      <text:p text:style-name="P46"><text:s text:c="8"/><text:span text:style-name="T14"><text:s text:c="2"/></text:span></text:p>
      <text:p text:style-name="P225">DMUS</text:p>
      <text:p text:style-name="P61"><text:s text:c="9"/>55028 59486 51388 51356</text:p>
      <text:p text:style-name="P61"><text:s text:c="8"/></text:p>
      <text:p text:style-name="P168"><text:s text:c="5"/>EMUS</text:p>
      <text:p text:style-name="P168"><text:span text:style-name="T117"><text:s text:c="15"/>76275 </text:span><text:span text:style-name="T118">76298</text:span><text:span text:style-name="T117"> </text:span><text:span text:style-name="T118">76322</text:span><text:span text:style-name="T117"> </text:span><text:span text:style-name="T118">70824</text:span><text:span text:style-name="T117"> </text:span><text:span text:style-name="T118">70855</text:span></text:p>
      <text:p text:style-name="P250"><text:span text:style-name="T5"><text:s text:c="2"/></text:span><text:s text:c="3"/></text:p>
      <text:p text:style-name="P250"><text:s/><text:span text:style-name="T5"><text:s text:c="3"/></text:span></text:p>
      <text:p text:style-name="P49"><text:span text:style-name="T5"><text:s text:c="11"/></text:span><text:span text:style-name="T11">SWINDON CRICKLADE RAILWAY</text:span></text:p>
      <text:p text:style-name="P262"><text:s text:c="9"/>Ground Coaches</text:p>
      <text:p text:style-name="P61"><text:s text:c="10"/>110 111 COMBRIM</text:p>
      <text:p text:style-name="P148"/>
      <text:p text:style-name="P46"><text:span text:style-name="T14"><text:s text:c="15"/>80580 </text:span><text:span text:style-name="T6">1569</text:span><text:span text:style-name="T14"> 1805 </text:span><text:span text:style-name="T6">4766</text:span><text:span text:style-name="T14"> 34941 25869 35043 13303 </text:span></text:p>
      <text:p text:style-name="P49"><text:span text:style-name="T5"><text:s text:c="12"/>34540 13233 <text:s/>1047 </text:span><text:span text:style-name="T6">1199</text:span><text:span text:style-name="T5"> 3898 94817 7545 34634 73</text:span></text:p>
      <text:p text:style-name="P217"><text:s text:c="12"/><text:span text:style-name="T65">412</text:span> <text:s text:c="2"/><text:span text:style-name="T65">645</text:span> 3462fo <text:s text:c="2"/>(4598 975403)</text:p>
      <text:p text:style-name="P61"><text:s text:c="11"/></text:p>
      <text:p text:style-name="P148"/>
      <text:p text:style-name="P168"><text:s text:c="3"/>Ground Wagons</text:p>
      <text:p text:style-name="P61"><text:s text:c="15"/><text:span text:style-name="T65">882260</text:span> 85257 <text:span text:style-name="T65">756295</text:span> 770299 269612 769651</text:p>
      <text:p text:style-name="P61"><text:s text:c="12"/><text:span text:style-name="T65"><text:s/>8283</text:span> 7XXXX gwr <text:s/></text:p>
      <text:p text:style-name="P155"/>
      <text:p text:style-name="P61"><text:s text:c="13"/>993597 <text:span text:style-name="T65">777332</text:span> 989353 992867 57009 123587</text:p>
      <text:p text:style-name="P49"><text:span text:style-name="T5"><text:s text:c="12"/>759215 </text:span><text:span text:style-name="T6">30 </text:span><text:span text:style-name="T5"><text:s/>68845 954937 <text:s/>59567 72599</text:span></text:p>
      <text:p text:style-name="P61"><text:s text:c="11"/>27387 200810 900028 92953 740664 200241</text:p>
      <text:p text:style-name="P262"><text:s text:c="3"/><text:span text:style-name="T17"><text:s/></text:span><text:span text:style-name="T16">94123</text:span><text:span text:style-name="T17"> </text:span><text:span text:style-name="T16">161049</text:span><text:span text:style-name="T17"> </text:span><text:span text:style-name="T16">35266</text:span><text:span text:style-name="T17"> 904539 <text:s/></text:span><text:span text:style-name="T16">2015</text:span><text:span text:style-name="T17"> 3 55221 </text:span><text:span text:style-name="T16">2851</text:span></text:p>
      <text:p text:style-name="P262"><text:s/><text:span text:style-name="T65"><text:s/>905111</text:span> <text:span text:style-name="T65">5876</text:span> <text:span text:style-name="T65">932620</text:span> 42231<text:span text:style-name="T72">(17980 17907) 12t lmsr</text:span></text:p>
      <text:p text:style-name="P61"><text:s text:c="11"/>200663 (773940 060804) <text:s text:c="2"/><text:span text:style-name="T65">2PO FLAT</text:span> <text:span text:style-name="T65"><text:s text:c="2"/>12t</text:span> <text:span text:style-name="T65">27802</text:span> </text:p>
      <text:p text:style-name="P111"><text:s text:c="8"/></text:p>
      <text:p text:style-name="P148"><text:s text:c="4"/>DIESELS <text:s text:c="9"/></text:p>
      <text:p text:style-name="P217"><text:s text:c="4"/>21442 4210137 4220031 431758 (D2022 <text:s/>03022) <text:s text:c="2"/>D3261</text:p>
      <text:p text:style-name="P217"><text:s text:c="12"/><text:span text:style-name="T65">(E6003 73003)</text:span> <text:span text:style-name="T65">(D2152 03152) </text:span><text:s text:c="2"/><text:span text:style-name="T65">(D3668 09004)</text:span> <text:s/></text:p>
      <text:p text:style-name="P217"/>
      <text:p text:style-name="P217"><text:s text:c="4"/>STEAMS</text:p>
      <text:p text:style-name="P111"><text:s text:c="14"/>2138 2354 1464 <text:span text:style-name="T65">3135</text:span> 5619 5637 <text:span text:style-name="T65">6695 </text:span>35011 <text:span text:style-name="T65">6984</text:span></text:p>
      <text:p text:style-name="P110"/>
      <text:p text:style-name="P46"><text:s text:c="11"/><text:span text:style-name="T72"><text:s text:c="2"/>DEMUS</text:span></text:p>
      <text:p text:style-name="P70"><text:s text:c="11"/>60669 60127 60822</text:p>
      <text:p text:style-name="P144"><text:s/><text:span text:style-name="T72"><text:s text:c="2"/></text:span></text:p>
      <text:p text:style-name="P49"><text:s text:c="14"/><text:span text:style-name="T5"><text:s/></text:span></text:p>
      <text:p text:style-name="P111"><text:s/><text:span text:style-name="T117"><text:s text:c="10"/>DMUS</text:span></text:p>
      <text:p text:style-name="P74"><text:span text:style-name="T72"><text:s text:c="10"/></text:span><text:span text:style-name="T65">51074</text:span><text:span text:style-name="T72"> </text:span><text:span text:style-name="T65">51104</text:span><text:span text:style-name="T72"> 79978</text:span></text:p>
      <text:p text:style-name="P49"><text:s text:c="13"/></text:p>
      <text:p text:style-name="P61"><text:s text:c="11"/>WICKHAMS </text:p>
      <text:p text:style-name="P180"><text:span text:style-name="T72"><text:s text:c="2"/>7508 </text:span><text:span text:style-name="T65">8089</text:span><text:span text:style-name="T72"> 68009 9031</text:span></text:p>
      <text:p text:style-name="P61"><text:s text:c="15"/></text:p>
      <text:p text:style-name="P46"><text:s text:c="12"/><text:span text:style-name="T14"><text:s/></text:span></text:p>
      <text:p text:style-name="P233"><text:s text:c="2"/>TAMPERS</text:p>
      <text:p text:style-name="P148"><text:span text:style-name="T117"><text:s text:c="17"/></text:span><text:span text:style-name="T118">48555</text:span><text:span text:style-name="T117"> <text:s/>1085 </text:span></text:p>
      <text:p text:style-name="P49"><text:s text:c="11"/></text:p>
      <text:p text:style-name="P61"><text:s text:c="12"/>TRACK MACHINES</text:p>
      <text:p text:style-name="P111"><text:span text:style-name="T117"><text:s text:c="13"/>73216 </text:span><text:span text:style-name="T118"><text:s/>98504 MOD</text:span></text:p>
      <text:p text:style-name="P111"><text:s text:c="4"/></text:p>
      <text:p text:style-name="P49"><text:s text:c="11"/><text:span text:style-name="T5">TROLLEYS</text:span></text:p>
      <text:p text:style-name="P61"><text:s text:c="11"/>(4 SIT CAR) <text:s/>(GRAY) <text:s/>(YELLOW1) <text:s/>(YELLOW2) <text:s text:c="10"/></text:p>
      <text:p text:style-name="P148"/>
      <text:p text:style-name="P20"><text:s text:c="3"/>ROADRAILER</text:p>
      <text:p text:style-name="P61"><text:s text:c="12"/>99709 901140 <text:s text:c="9"/></text:p>
      <text:p text:style-name="P61"><text:s text:c="10"/></text:p>
      <text:p text:style-name="P144"><text:s/><text:span text:style-name="T5"><text:s text:c="4"/></text:span><text:span text:style-name="T14"><text:s text:c="3"/>CRANES</text:span></text:p>
      <text:p text:style-name="P61"><text:s text:c="11"/>(16641 1) 81522 <text:s text:c="3"/></text:p>
      <text:p text:style-name="P46"><text:span text:style-name="T14"><text:s text:c="11"/></text:span><text:s text:c="3"/><text:span text:style-name="T14"><text:s text:c="2"/>SWINDON S IN MUSEUM</text:span></text:p>
      <text:p text:style-name="P265">COACHES </text:p>
      <text:p text:style-name="P46"><text:span text:style-name="T14"><text:s text:c="10"/></text:span><text:span text:style-name="T6"><text:s/>233</text:span><text:span text:style-name="T14"> </text:span><text:span text:style-name="T6">9631</text:span> <text:s text:c="7"/></text:p>
      <text:p text:style-name="P61"/>
      <text:p text:style-name="P155"/>
      <text:p text:style-name="P67"><text:s text:c="2"/>WA<text:span text:style-name="T72">GONS</text:span></text:p>
      <text:p text:style-name="P156"><text:s text:c="3"/><text:span text:style-name="T65">35290</text:span> <text:span text:style-name="T65">94988</text:span> <text:span text:style-name="T65">18364</text:span> <text:s text:c="2"/><text:span text:style-name="T65">114202</text:span> </text:p>
      <text:p text:style-name="P61"><text:s text:c="10"/></text:p>
      <text:p text:style-name="P265">STEAMS</text:p>
      <text:p text:style-name="P61"><text:s text:c="13"/><text:span text:style-name="T65">NORTH STAR</text:span> <text:span text:style-name="T65">9400</text:span> <text:span text:style-name="T65">2516</text:span> <text:span text:style-name="T65">3717</text:span> <text:span text:style-name="T65">4073</text:span> <text:s/><text:span text:style-name="T65">6000</text:span> <text:span text:style-name="T65">4248</text:span> <text:span text:style-name="T65">2818</text:span></text:p>
      <text:p text:style-name="P61"><text:s text:c="9"/></text:p>
      <text:p text:style-name="P61"><text:s text:c="12"/>ROAD RAILER</text:p>
      <text:p text:style-name="P61"><text:s text:c="13"/>CYCLE <text:s text:c="9"/></text:p>
      <text:p text:style-name="P49"><text:s text:c="10"/></text:p>
      <text:p text:style-name="P225">WICKHAM</text:p>
      <text:p text:style-name="P61"><text:s text:c="11"/>5181 <text:s text:c="8"/></text:p>
      <text:p text:style-name="P61"><text:s text:c="11"/></text:p>
      <text:p text:style-name="P94"><text:s/><text:span text:style-name="T5"><text:s text:c="10"/></text:span><text:span text:style-name="T11"><text:s/></text:span><text:span text:style-name="T12">SWINDON PLATFORM YOUTH CENTRE</text:span></text:p>
      <text:p text:style-name="P265"><text:s text:c="3"/>COACH</text:p>
      <text:p text:style-name="P155"><text:span text:style-name="T72"><text:s text:c="12"/></text:span><text:s/>5627<text:span text:style-name="T72"> <text:s/></text:span></text:p>
      <text:p text:style-name="P61"><text:s text:c="15"/></text:p>
      <text:p text:style-name="P148"><text:s text:c="15"/></text:p>
      <text:p text:style-name="P70"><text:s text:c="12"/>TANFIELD RAILWAY</text:p>
      <text:p text:style-name="P262">Ground Wagons</text:p>
      <text:p text:style-name="P70"><text:s text:c="11"/>783823 272865 49102 7XXXXX 213067 48973 </text:p>
      <text:p text:style-name="P61"><text:s text:c="12"/></text:p>
      <text:p text:style-name="P61"><text:s text:c="14"/><text:span text:style-name="T117">(505165 45398) 222418 955184 264 932068</text:span></text:p>
      <text:p text:style-name="P248"><text:s text:c="3"/>932093 761022 <text:s/>501978 399 L1317 <text:s/>751</text:p>
      <text:p text:style-name="P248"><text:s text:c="2"/>993142 514541 45476 4W TANK 794 359</text:p>
      <text:p text:style-name="P248">419721 129 740407 755543 125135 229868 7XXXXX </text:p>
      <text:p text:style-name="P111"><text:s text:c="10"/>6418 348 <text:s/>112 41 187851 4W FLAT 336817 338017 </text:p>
      <text:p text:style-name="P61"><text:s text:c="12"/></text:p>
      <text:p text:style-name="P262"><text:s text:c="2"/>6801 L77 L89 013 383 111 <text:s/>8PL HOPPER) 225M</text:p>
      <text:p text:style-name="P262"><text:s/>494 (6PLHOPPER) (10PL OPED) ((21 HOPPER1)</text:p>
      <text:p text:style-name="P262"><text:s text:c="2"/>(21 HOPPER2) (4W P VAN1)<text:span text:style-name="T72"> 1146 506 665 787 <text:s/>817 1955</text:span></text:p>
      <text:p text:style-name="P265"><text:s/>(4W P VAN2) (10T HOPPER) (6T HOPPER) (8T HOPPER)</text:p>
      <text:p text:style-name="P265"><text:s/>(21T HOPPER) 13717 608 1392 (1PL OPED1) <text:s/>(1 PL OPED2)</text:p>
      <text:p text:style-name="P265"><text:s/>(1PL OPED3) (R A Y GROUP) BOWES <text:s/>BARE WOOD </text:p>
      <text:p text:style-name="P217"><text:s text:c="2"/>(7PL OPED) (THPA90) <text:s/>1 2 3 4 5 6 7 8 (9300 /24)</text:p>
      <text:p text:style-name="P265"><text:s/>(10T RED BOX VAN) (LHJC 7)(9300/1167) (9300 /1210)<text:span text:style-name="T73"> </text:span></text:p>
      <text:p text:style-name="P61"><text:s text:c="11"/>(9300/46) (9212/1181) (9212/569) (9212/874)</text:p>
      <text:p text:style-name="P70"><text:s/></text:p>
      <text:p text:style-name="P46"><text:s text:c="11"/><text:span text:style-name="T14"><text:s/>Ground Coaches </text:span></text:p>
      <text:p text:style-name="P61"><text:s text:c="11"/>92060 37308 37306 S1314 836 2740</text:p>
      <text:p text:style-name="P94"><text:span text:style-name="T66"><text:s text:c="9"/></text:span><text:span text:style-name="T39"><text:s text:c="3"/></text:span></text:p>
      <text:p text:style-name="P49"><text:s text:c="8"/><text:span text:style-name="T5"><text:s text:c="2"/>4W BRAKE 1462 35527 3826 TR2 37224 975960 NBR</text:span></text:p>
      <text:p text:style-name="P69"><text:s text:c="7"/><text:span text:style-name="T72"><text:s text:c="5"/>TR3 2853 TR8 TR6100 172 TR7 1056 1173 1593 456</text:span></text:p>
      <text:p text:style-name="P61"><text:s text:c="10"/>VERANDAH SALOON 1509 818 256 1644 <text:s/>WILSON</text:p>
      <text:p text:style-name="P156"><text:s text:c="3"/></text:p>
      <text:p text:style-name="P61"><text:s text:c="7"/>STEAMS</text:p>
      <text:p text:style-name="P217">3056 266 1015 7098 1366 7409 7760 7763 7796 1193 3513</text:p>
      <text:p text:style-name="P61"><text:s text:c="9"/>1672 1823 2009 2711 2730 2859 7944 3575 3746 2779</text:p>
      <text:p text:style-name="P111"><text:s text:c="10"/><text:span text:style-name="T40"><text:s/></text:span>7800 <text:s text:c="3"/>7430 748 9559 <text:s/></text:p>
      <text:p text:style-name="P111"/>
      <text:p text:style-name="P70"><text:s text:c="10"/>DIESELS</text:p>
      <text:p text:style-name="P111"><text:s text:c="15"/>7901 D22 7697 7746 D21 3716 6612 6980 DM1119 </text:p>
      <text:p text:style-name="P111"><text:s text:c="10"/>2607 <text:s text:c="5"/>7332 DM1067 DM1170 53162 54781</text:p>
      <text:p text:style-name="P111"><text:s text:c="9"/>244487 <text:s text:c="2"/>323587 418600 4240010 2577</text:p>
      <text:p text:style-name="P61"><text:s text:c="8"/></text:p>
      <text:p text:style-name="P61"><text:s text:c="9"/>ELECTRICS</text:p>
      <text:p text:style-name="P61"><text:s text:c="10"/>1565 862 7078 2509 3872</text:p>
      <text:p text:style-name="P61"><text:s text:c="14"/></text:p>
      <text:p text:style-name="P46"><text:s text:c="14"/><text:span text:style-name="T72"><text:s/></text:span><text:span text:style-name="T14">ROAD RAILERS</text:span></text:p>
      <text:p text:style-name="P61"><text:s text:c="12"/>BP025 <text:s text:c="2"/>PC034 <text:s text:c="2"/>DX60131</text:p>
      <text:p text:style-name="P217"/>
      <text:p text:style-name="P168"><text:s text:c="8"/>WICKHAM </text:p>
      <text:p text:style-name="P70"><text:s text:c="11"/>7612</text:p>
      <text:p text:style-name="P217"/>
      <text:p text:style-name="P49"><text:s text:c="10"/><text:span text:style-name="T11"><text:s text:c="3"/>TELFORD S T</text:span></text:p>
      <text:p text:style-name="P217"><text:s text:c="2"/>COACHES </text:p>
      <text:p text:style-name="P49"><text:s text:c="12"/><text:span text:style-name="T65">5148</text:span> <text:span text:style-name="T65">5193*</text:span> <text:span text:style-name="T65">5657</text:span> <text:span text:style-name="T65">10676</text:span> 14901 <text:span text:style-name="T65">9406</text:span> <text:span text:style-name="T65">5221</text:span> <text:span text:style-name="T65">5220</text:span></text:p>
      <text:p text:style-name="P219"><text:s text:c="3"/><text:span text:style-name="T65"><text:s/>10543</text:span> <text:s text:c="2"/><text:span text:style-name="T65">W38W</text:span> <text:s/>LNWR</text:p>
      <text:p text:style-name="P219"/>
      <text:p text:style-name="P217"><text:s text:c="7"/>Ground Wagons </text:p>
      <text:p text:style-name="P219"><text:s text:c="6"/><text:span text:style-name="T65">96493*</text:span> <text:s/><text:span text:style-name="T65">16311*</text:span> <text:s/><text:span text:style-name="T65">87XXX</text:span> <text:s text:c="2"/><text:span text:style-name="T65">LMSR* </text:span></text:p>
      <text:p text:style-name="P222"/>
      <text:p text:style-name="P222"><text:span text:style-name="T72"><text:s text:c="2"/></text:span>993353<text:span text:style-name="T72"> 989584 989097 79240 </text:span>758542<text:span text:style-name="T72"> 996957</text:span></text:p>
      <text:p text:style-name="P70"><text:s text:c="14"/>904500 <text:s/>168064 <text:span text:style-name="T65">17453</text:span> <text:span text:style-name="T65">767478*</text:span> LNER FLAT</text:p>
      <text:p text:style-name="P61"><text:s text:c="9"/>LMS FLAT LMS FLAT PO FLAT1 MR CR CRC2 P O </text:p>
      <text:p text:style-name="P70"><text:s text:c="14"/>982584 FLAT2 LBSCR</text:p>
      <text:p text:style-name="P70"/>
      <text:p text:style-name="P61"><text:s text:c="17"/>DIESELS</text:p>
      <text:p text:style-name="P242"><text:span text:style-name="T67"><text:s text:c="6"/></text:span><text:span text:style-name="T68"><text:s/>37263*</text:span><text:span text:style-name="T67"> </text:span><text:span text:style-name="T68">525947*</text:span><text:span text:style-name="T67"> <text:s/></text:span><text:span text:style-name="T68">382824*</text:span><text:span text:style-name="T67"> 183062 </text:span><text:span text:style-name="T68">27414</text:span><text:span text:style-name="T67"> </text:span><text:span text:style-name="T68">08757</text:span></text:p>
      <text:p text:style-name="P56"><text:span text:style-name="T67"><text:s text:c="15"/></text:span><text:span text:style-name="T68"><text:s/>(313394 D297</text:span><text:span text:style-name="T65">1)*</text:span></text:p>
      <text:p text:style-name="P49"><text:span text:style-name="T5"><text:s text:c="7"/></text:span><text:s text:c="3"/><text:span text:style-name="T5"><text:s text:c="4"/></text:span></text:p>
      <text:p text:style-name="P61"><text:s text:c="12"/>CAUGE</text:p>
      <text:p text:style-name="P61"><text:s text:c="13"/>2 0 <text:s text:c="3"/><text:span text:style-name="T65">TRAM</text:span></text:p>
      <text:p text:style-name="P61"><text:s text:c="3"/></text:p>
      <text:p text:style-name="P265"><text:s text:c="2"/><text:span text:style-name="T15"><text:s text:c="5"/>STEAMS</text:span></text:p>
      <text:p text:style-name="P61"><text:s text:c="16"/>272 3240 <text:span text:style-name="T65">1990</text:span> <text:s text:c="2"/><text:span text:style-name="T65">1944*</text:span> <text:span text:style-name="T65">1722*</text:span></text:p>
      <text:p text:style-name="P145"><text:s text:c="4"/></text:p>
      <text:p text:style-name="P61"><text:s text:c="12"/>DMUS</text:p>
      <text:p text:style-name="P61"><text:s text:c="10"/><text:span text:style-name="T65">52062</text:span> 50531 <text:s text:c="2"/><text:span text:style-name="T65">51950</text:span> <text:span text:style-name="T65">142058*</text:span> <text:span text:style-name="T65">142004</text:span> <text:span text:style-name="T65">144013</text:span> <text:s text:c="6"/></text:p>
      <text:p text:style-name="P49"><text:s text:c="14"/><text:span text:style-name="T5"><text:s/>CRANES</text:span></text:p>
      <text:p text:style-name="P61"><text:s text:c="9"/>792 12210</text:p>
      <text:p text:style-name="P49"><text:s/><text:span text:style-name="T40"><text:s text:c="9"/></text:span></text:p>
      <text:p text:style-name="P265"><text:s/><text:span text:style-name="T15"><text:s text:c="3"/></text:span></text:p>
      <text:p text:style-name="P217"><text:s text:c="3"/>NG </text:p>
      <text:p text:style-name="P67"><text:span text:style-name="T72"><text:s text:c="11"/></text:span>3974*</text:p>
      <text:p text:style-name="P61"><text:s text:c="13"/></text:p>
      <text:p text:style-name="P61"><text:s text:c="10"/>TITLEY J ST</text:p>
      <text:p text:style-name="P262"><text:s text:c="5"/>COACH</text:p>
      <text:p text:style-name="P221"><text:span text:style-name="T72"><text:s text:c="6"/></text:span>26169</text:p>
      <text:p text:style-name="P55"/>
      <text:p text:style-name="P262"><text:s/><text:span text:style-name="T17">GROUND <text:s/>WAGON </text:span></text:p>
      <text:p text:style-name="P217"><text:s text:c="4"/><text:span text:style-name="T65">85XXXX</text:span></text:p>
      <text:p text:style-name="P221"/>
      <text:p text:style-name="P206"><text:s/><text:span text:style-name="T67"><text:s text:c="3"/>500348 2336 4336 993045 993816 91395 17305</text:span></text:p>
      <text:p text:style-name="P217"><text:s text:c="11"/>900038 731622 73XXXX 904638 505997 <text:s/>741098</text:p>
      <text:p text:style-name="P61"><text:s text:c="18"/>731695 <text:s text:c="2"/>733063</text:p>
      <text:p text:style-name="P49"><text:s text:c="9"/></text:p>
      <text:p text:style-name="P61"><text:s text:c="12"/></text:p>
      <text:p text:style-name="P61"><text:s text:c="10"/><text:span text:style-name="T117"><text:s/>DIESELS</text:span></text:p>
      <text:p text:style-name="P61"><text:s text:c="15"/><text:span text:style-name="T65">D2158</text:span> 163V 3906 <text:s/><text:span text:style-name="T40"><text:s text:c="3"/></text:span><text:s text:c="4"/></text:p>
      <text:p text:style-name="P61"><text:s text:c="9"/></text:p>
      <text:p text:style-name="P61"/>
      <text:p text:style-name="P148"><text:s text:c="4"/>STEAM</text:p>
      <text:p text:style-name="P61"><text:span text:style-name="T117"><text:s text:c="12"/></text:span><text:span text:style-name="T118">1738</text:span><text:span text:style-name="T40"> <text:s text:c="4"/></text:span></text:p>
      <text:p text:style-name="P217"><text:s text:c="3"/></text:p>
      <text:p text:style-name="P133"><text:s text:c="12"/>ROAD RAILERS</text:p>
      <text:p text:style-name="P148"><text:s text:c="10"/><text:span text:style-name="T65">74006</text:span> (<text:span text:style-name="T65">TQ128 56061) </text:span></text:p>
      <text:p text:style-name="P46"><text:s text:c="10"/></text:p>
      <text:p text:style-name="P250"><text:span text:style-name="T14"><text:s/></text:span><text:span text:style-name="T5"><text:s/>CRANE</text:span></text:p>
      <text:p text:style-name="P61"><text:span text:style-name="T117"><text:s text:c="14"/></text:span><text:span text:style-name="T118">15192</text:span></text:p>
      <text:p text:style-name="P73"/>
      <text:p text:style-name="P61"><text:s text:c="12"/>WEARDALE RAILWAY</text:p>
      <text:p text:style-name="P46"><text:s text:c="12"/>COACHES </text:p>
      <text:p text:style-name="P61"><text:s text:c="14"/><text:span text:style-name="T65">3402*</text:span> <text:span text:style-name="T65">9500*</text:span> <text:span text:style-name="T65">1254</text:span> <text:span text:style-name="T40"><text:s/></text:span><text:span text:style-name="T65">3354*</text:span> <text:span text:style-name="T65">3385*</text:span> <text:span text:style-name="T65">3425*</text:span> <text:span text:style-name="T65">5226*</text:span> </text:p>
      <text:p text:style-name="P217"><text:s text:c="2"/><text:span text:style-name="T65">6703</text:span> 10229 <text:s/>3507 <text:span text:style-name="T65">5989*</text:span> <text:span text:style-name="T65">9513*</text:span> <text:span text:style-name="T65">92901*</text:span> <text:s/><text:span text:style-name="T65">1210*</text:span></text:p>
      <text:p text:style-name="P250"><text:s text:c="4"/>9800<text:span text:style-name="T40"> </text:span><text:span text:style-name="T6">9497</text:span><text:span text:style-name="T5"> </text:span><text:span text:style-name="T6">6168*</text:span> <text:span text:style-name="T6">6059*</text:span><text:span text:style-name="T5"> </text:span><text:span text:style-name="T6">5906*</text:span> 3188 LNER <text:span text:style-name="T6">3374*</text:span><text:span text:style-name="T5"> </text:span><text:span text:style-name="T6">9711*</text:span><text:span text:style-name="T5"> </text:span></text:p>
      <text:p text:style-name="P217"><text:s text:c="6"/>40701 10417 12015 12034 12084 12108 12126 9531</text:p>
      <text:p text:style-name="P61"><text:s text:c="13"/>1220 <text:s text:c="2"/>9538 </text:p>
      <text:p text:style-name="P61"><text:s text:c="8"/></text:p>
      <text:p text:style-name="P49"><text:s text:c="10"/></text:p>
      <text:p text:style-name="P61"><text:s text:c="16"/>WAGONS</text:p>
      <text:p text:style-name="P168"><text:s text:c="11"/>87247 993633 9195 993123 991584 905086 954676</text:p>
      <text:p text:style-name="P168"/>
      <text:p text:style-name="P46"><text:s text:c="13"/><text:span text:style-name="T14">DIESELS</text:span></text:p>
      <text:p text:style-name="P262"><text:span text:style-name="T14"><text:s text:c="6"/></text:span><text:span text:style-name="T6">08936</text:span><text:span text:style-name="T14"> </text:span><text:span text:style-name="T6">08885</text:span><text:span text:style-name="T14"> </text:span><text:span text:style-name="T6">31285</text:span> 6294 10187 10232<text:span text:style-name="T40"> </text:span><text:span text:style-name="T14"><text:s/></text:span><text:span text:style-name="T6">08308</text:span> 08523 </text:p>
      <text:p text:style-name="P148"><text:s text:c="4"/>08573 08613 31465 (281290 21048) (2150 HO050)</text:p>
      <text:p text:style-name="P61"><text:s text:c="12"/>(10070 H003) <text:s/>08631 08756 <text:s/><text:span text:style-name="T65">08874</text:span> <text:s/></text:p>
      <text:p text:style-name="P61"><text:s text:c="13"/>(10177 H057) LM370 <text:s text:c="2"/>LM363 31459 <text:s/>(7541 H032)</text:p>
      <text:p text:style-name="P111"><text:s text:c="16"/></text:p>
      <text:p text:style-name="P68"><text:span text:style-name="T72"><text:s text:c="3"/></text:span><text:s/><text:span text:style-name="T72"><text:s text:c="2"/></text:span><text:span text:style-name="T119">STEAM </text:span></text:p>
      <text:p text:style-name="P175"><text:s text:c="15"/>7765</text:p>
      <text:p text:style-name="P70"/>
      <text:p text:style-name="P49"><text:s text:c="5"/><text:span text:style-name="T40"><text:s text:c="2"/></text:span><text:span text:style-name="T11">DMUS</text:span></text:p>
      <text:p text:style-name="P61"><text:s text:c="14"/><text:span text:style-name="T65">55012*</text:span> 50980 52054 <text:s text:c="2"/><text:span text:style-name="T65">144010</text:span></text:p>
      <text:p text:style-name="P67"/>
      <text:p text:style-name="P14"><text:s text:c="8"/>ROAD RAILERS</text:p>
      <text:p text:style-name="P148"><text:s text:c="6"/>M672 BCV TQ123 <text:s/>BP027 BP029 <text:s/>(17517 326) 00101/96</text:p>
      <text:p text:style-name="P61"><text:s text:c="11"/></text:p>
      <text:p text:style-name="P49"><text:s text:c="17"/><text:span text:style-name="T5"><text:s/>WICKHAMS</text:span></text:p>
      <text:p text:style-name="P61"><text:s text:c="19"/><text:span text:style-name="T65">(10843 68090)</text:span> 10646 10706 <text:s/>68006</text:p>
      <text:p text:style-name="P61"/>
      <text:p text:style-name="P46"><text:s text:c="10"/><text:span text:style-name="T42"><text:s text:c="3"/></text:span><text:span text:style-name="T14"><text:s text:c="2"/>TRACK MACHINE</text:span></text:p>
      <text:p text:style-name="P61"><text:s text:c="14"/>6295 </text:p>
      <text:p text:style-name="P61"/>
      <text:p text:style-name="P61"><text:s text:c="13"/>TROLLEYS</text:p>
      <text:p text:style-name="P70"><text:s text:c="12"/>FLAT BED FLAT BED FLAT BED 19XX 19XX 8394 10650 </text:p>
      <text:p text:style-name="P61"><text:s text:c="11"/></text:p>
      <text:p text:style-name="P217"/>
      <text:p text:style-name="P111"><text:s text:c="9"/>WENSLEYDALE RAILWAY</text:p>
      <text:p text:style-name="P262"><text:s text:c="7"/>COACHES </text:p>
      <text:p text:style-name="P61"><text:s text:c="11"/>1879 <text:span text:style-name="T65">5279*</text:span> 4728 5276 5304 <text:span text:style-name="T65">5307*</text:span> <text:s/>5378 5381 <text:span text:style-name="T65">9417*</text:span></text:p>
      <text:p text:style-name="P169"><text:s/>1689 5316 <text:span text:style-name="T65">5337*</text:span> <text:span text:style-name="T65">5345</text:span> 5364 7167 25508 3461</text:p>
      <text:p text:style-name="P61"><text:span text:style-name="T72"><text:s text:c="11"/>25837 </text:span><text:span text:style-name="T65">977989</text:span><text:span text:style-name="T40"> </text:span><text:span text:style-name="T65">10531</text:span><text:span text:style-name="T72"> 35304 17077 </text:span><text:span text:style-name="T65">14073*</text:span><text:span text:style-name="T72"> <text:s/></text:span>5241 </text:p>
      <text:p text:style-name="P217"><text:s text:c="3"/>40701 99718 <text:span text:style-name="T65">5318</text:span> <text:s text:c="2"/><text:span text:style-name="T65">5373*</text:span> <text:span text:style-name="T65">5384* <text:s/></text:span><text:s text:c="2"/></text:p>
      <text:p text:style-name="P217"/>
      <text:p text:style-name="P61"><text:s text:c="15"/></text:p>
      <text:p text:style-name="P217"><text:s text:c="2"/>WAGONS <text:s text:c="3"/></text:p>
      <text:p text:style-name="P202"><text:s text:c="4"/><text:span text:style-name="T5"><text:s text:c="2"/>(WR1116) 983098 992721 993252 993315 993881 </text:span></text:p>
      <text:p text:style-name="P139"><text:s text:c="11"/>200462 110791 <text:s/>110353 200388 460138 460073</text:p>
      <text:p text:style-name="P132"><text:s text:c="13"/><text:span text:style-name="T5">110269 100077 110661 110714 <text:s/>903663 922640</text:span></text:p>
      <text:p text:style-name="P61"><text:s text:c="16"/>980085 110591 WR1114 996503 955133 732964 </text:p>
      <text:p text:style-name="P46"><text:span text:style-name="T72"><text:s text:c="18"/>973221 460744 470820</text:span><text:span text:style-name="T14"> 100006 <text:s/>17 <text:s/>110374</text:span></text:p>
      <text:p text:style-name="P61"><text:span text:style-name="T40"><text:s text:c="13"/></text:span><text:s text:c="3"/><text:span text:style-name="T65">201008*</text:span> <text:s text:c="2"/><text:span text:style-name="T65">UN KNOWLOWMAC* <text:s/></text:span><text:s text:c="2"/></text:p>
      <text:p text:style-name="P217"/>
      <text:p text:style-name="P168"><text:s text:c="3"/></text:p>
      <text:p text:style-name="P61"><text:s text:c="13"/>DIESELS</text:p>
      <text:p text:style-name="P265"><text:s text:c="2"/><text:span text:style-name="T5"><text:s/></text:span><text:span text:style-name="T6">37250</text:span> 476141 3870 271V 307V D9523<text:span text:style-name="T5"> </text:span><text:span text:style-name="T6">03144*</text:span><text:span text:style-name="T5"> </text:span></text:p>
      <text:p text:style-name="P61"><text:s text:c="13"/>20166 <text:s text:c="3"/>47785 </text:p>
      <text:p text:style-name="P111"><text:span text:style-name="T117"><text:s text:c="4"/></text:span><text:span text:style-name="T117"><text:s/></text:span></text:p>
      <text:p text:style-name="P61"><text:s text:c="14"/>DMUS</text:p>
      <text:p text:style-name="P46"><text:s text:c="19"/>54274 <text:span text:style-name="T65">51572</text:span> <text:span text:style-name="T65">51210</text:span> 55032 56343 50256<text:span text:style-name="T6"> 51400*</text:span> </text:p>
      <text:p text:style-name="P46"><text:s text:c="16"/><text:span text:style-name="T14"><text:s text:c="3"/></text:span><text:span text:style-name="T6">142028</text:span><text:span text:style-name="T14"> <text:s text:c="2"/></text:span><text:span text:style-name="T6">142060</text:span><text:span text:style-name="T14"> <text:s/>975874</text:span> <text:s/>59500 <text:span text:style-name="T65">50746 </text:span><text:s text:c="51"/><text:span text:style-name="T65"><text:s/></text:span><text:s text:c="17"/></text:p>
      <text:p text:style-name="P67"><text:span text:style-name="T72"><text:s text:c="19"/>143623 </text:span>142078<text:span text:style-name="T72"> <text:s text:c="4"/></text:span><text:s text:c="2"/>59509*<text:span text:style-name="T72"> <text:s/></text:span><text:s/>51353*</text:p>
      <text:p text:style-name="P61"><text:s text:c="11"/></text:p>
      <text:p text:style-name="P217"><text:s text:c="4"/>ROAD RAILERS</text:p>
      <text:p text:style-name="P73"><text:span text:style-name="T72"><text:s text:c="15"/></text:span>UET85Y*<text:span text:style-name="T72"> (</text:span>99709 901038-8)</text:p>
      <text:p text:style-name="P168"><text:s text:c="6"/></text:p>
      <text:p text:style-name="P61"><text:s text:c="11"/></text:p>
      <text:p text:style-name="P148"><text:s text:c="10"/>TRACK MACHINE</text:p>
      <text:p text:style-name="P61"><text:s text:c="11"/>73435</text:p>
      <text:p text:style-name="P61"><text:s text:c="16"/></text:p>
      <text:p text:style-name="P46"><text:s text:c="12"/><text:span text:style-name="T14">TROLLEYS </text:span></text:p>
      <text:p text:style-name="P70"><text:s text:c="16"/>XXXX XXXX <text:s text:c="7"/></text:p>
      <text:p text:style-name="P61"><text:s text:c="8"/></text:p>
      <text:p text:style-name="P49"><text:s text:c="9"/><text:span text:style-name="T5"><text:s/>STEAMS</text:span></text:p>
      <text:p text:style-name="P217"><text:s text:c="14"/>7537<text:span text:style-name="T65"> 92219</text:span></text:p>
      <text:p text:style-name="P217"><text:s/></text:p>
      <text:p text:style-name="P49"><text:s text:c="10"/><text:span text:style-name="T5">WICKHAM</text:span></text:p>
      <text:p text:style-name="P156"><text:s text:c="13"/><text:span text:style-name="T65">3012*</text:span> <text:s/></text:p>
      <text:p text:style-name="P217"><text:s text:c="2"/></text:p>
      <text:p text:style-name="P49"><text:s text:c="7"/><text:span text:style-name="T5"><text:s/>WEST COAST RAILWAY</text:span></text:p>
      <text:p text:style-name="P217"><text:s text:c="8"/>DIESELS</text:p>
      <text:p text:style-name="P61"><text:s text:c="16"/><text:span text:style-name="T65">37518</text:span> <text:span text:style-name="T65">D2381</text:span> <text:span text:style-name="T65">08678</text:span> <text:span text:style-name="T65">33025</text:span> <text:span text:style-name="T65">33029</text:span> <text:span text:style-name="T65">33030</text:span> 33207 37165 <text:s text:c="4"/></text:p>
      <text:p text:style-name="P217"><text:s text:c="5"/><text:span text:style-name="T65">37668</text:span> <text:s text:c="2"/><text:span text:style-name="T65">37676</text:span> <text:span text:style-name="T65">37685</text:span> <text:span text:style-name="T65">37706</text:span> <text:span text:style-name="T65">37710</text:span> 37712 <text:s text:c="2"/>57601 </text:p>
      <text:p text:style-name="P49"><text:span text:style-name="T5"><text:s text:c="16"/>08405 <text:s text:c="2"/></text:span><text:span text:style-name="T5"><text:s text:c="5"/></text:span><text:span text:style-name="T6">47526</text:span><text:span text:style-name="T5"> </text:span><text:span text:style-name="T6">47580</text:span><text:span text:style-name="T5"> <text:s text:c="3"/>47851 </text:span><text:span text:style-name="T6">47854 </text:span></text:p>
      <text:p text:style-name="P168"><text:s text:c="11"/>86401 401 2718 47746 <text:s/>D2084 47555 <text:s text:c="3"/><text:span text:style-name="T65">D2196 </text:span></text:p>
      <text:p text:style-name="P61"><text:s text:c="9"/><text:span text:style-name="T65">47194</text:span> <text:span text:style-name="T65">47786</text:span> 47237 <text:span text:style-name="T65">47245</text:span> <text:span text:style-name="T65">47270</text:span> <text:span text:style-name="T65">47355</text:span> <text:span text:style-name="T65">47368</text:span> <text:s/></text:p>
      <text:p text:style-name="P61"><text:s text:c="16"/><text:span text:style-name="T65">37516</text:span> <text:s text:c="2"/><text:span text:style-name="T65">47776</text:span> <text:s/><text:span text:style-name="T65">47772</text:span> 47787 47804 <text:span text:style-name="T65">47826</text:span> <text:s/>57315 </text:p>
      <text:p text:style-name="P61"><text:s text:c="13"/>57314 <text:s/>57313 <text:s text:c="2"/><text:span text:style-name="T65">37517</text:span> 57316 37669</text:p>
      <text:p text:style-name="P61"><text:s text:c="16"/>57006 57001 <text:span text:style-name="T65">47802</text:span> <text:span text:style-name="T65">47832</text:span> 57005</text:p>
      <text:p text:style-name="P61"><text:s text:c="13"/></text:p>
      <text:p text:style-name="P133"><text:s text:c="16"/>STEAMS</text:p>
      <text:p text:style-name="P61"><text:s text:c="15"/>1572 <text:span text:style-name="T65">2134</text:span> 2230 <text:span text:style-name="T65">2268</text:span> 34067 44932 <text:span text:style-name="T65">5690</text:span> </text:p>
      <text:p text:style-name="P61"><text:s text:c="12"/>44767 48151 1306 <text:s text:c="3"/><text:span text:style-name="T65">46115</text:span> 34016 34073 <text:span text:style-name="T65">35018</text:span> <text:s/><text:span text:style-name="T65">4920</text:span></text:p>
      <text:p text:style-name="P67"/>
      <text:p text:style-name="P61"><text:s text:c="15"/>Ground Coach</text:p>
      <text:p text:style-name="P133"><text:s text:c="16"/>94137</text:p>
      <text:p text:style-name="P69"><text:s text:c="16"/></text:p>
      <text:p text:style-name="P14"><text:span text:style-name="T14"><text:s text:c="3"/></text:span><text:span text:style-name="T117"><text:s text:c="2"/>3359 <text:s/>3136 3143 3188 3232 3312 3313 3326 </text:span><text:span text:style-name="T14"><text:s text:c="10"/></text:span></text:p>
      <text:p text:style-name="P49"><text:s text:c="15"/><text:span text:style-name="T5"><text:s text:c="2"/>3352 99127 </text:span><text:span text:style-name="T6">1670</text:span><text:span text:style-name="T5"> 1800 3058 3093 5900 </text:span></text:p>
      <text:p text:style-name="P238"><text:s text:c="5"/>3360 3362 3392 3395 3408 3431 5200 5216 3350 </text:p>
      <text:p text:style-name="P238"><text:s text:c="4"/>1840 1861 1860 99311 99128 <text:s/>975639 <text:s/><text:span text:style-name="T65">2131</text:span> 2500 </text:p>
      <text:p text:style-name="P238"><text:s text:c="4"/>99121 99122 5333 5222 <text:span text:style-name="T65">5419*</text:span> 5254 <text:span text:style-name="T65">5278*</text:span> <text:span text:style-name="T65">5239*</text:span> 5249 5237</text:p>
      <text:p text:style-name="P238"><text:s text:c="4"/>5238 4951 <text:s/>4767 4849 4984 4994 5236 5396 <text:s/>1961</text:p>
      <text:p text:style-name="P238"><text:s text:c="4"/>99125 <text:span text:style-name="T65">5453*</text:span> <text:s/>5569 6528 6723 5542 <text:s/>99326 4960 4973</text:p>
      <text:p text:style-name="P61"><text:s text:c="13"/>5035 5478 5487 99329 5171 4940 99327 31129 975401</text:p>
      <text:p text:style-name="P168"><text:s text:c="7"/>99672 4854 4905 <text:span text:style-name="T65">99318*</text:span> <text:s text:c="2"/>4997 4860 <text:span text:style-name="T65">5032*</text:span> 99328 5229</text:p>
      <text:p text:style-name="P61"><text:s text:c="14"/><text:span text:style-name="T65">4932</text:span> 1666 <text:span text:style-name="T65">150192</text:span> <text:s/>99671 99962 99347 99348 </text:p>
      <text:p text:style-name="P61"><text:s text:c="13"/>99350 <text:s text:c="2"/>99351 <text:s/><text:span text:style-name="T65">99337</text:span> <text:s text:c="3"/><text:span text:style-name="T65">99312</text:span> <text:span text:style-name="T65">(35407 99886)</text:span></text:p>
      <text:p text:style-name="P169"><text:s text:c="3"/>99352 99354 99678 99679 <text:s/>99676 99677 <text:s text:c="3"/>5917 </text:p>
      <text:p text:style-name="P217"><text:s text:c="4"/>99673 99674 99675 <text:s text:c="2"/>321 99961 326 3438 5888 99670 <text:s/></text:p>
      <text:p text:style-name="P238"><text:s text:c="6"/>99131 <text:s text:c="2"/>99963 99964 975608 99965 99967 <text:s text:c="9"/></text:p>
      <text:p text:style-name="P61"><text:s text:c="14"/>6175 6724 <text:s/>10614 <text:s text:c="3"/>278 247 <text:span text:style-name="T65">1998</text:span> 5991 <text:s/>10245 </text:p>
      <text:p text:style-name="P61"><text:s text:c="15"/>9489 41 159 <text:s/>1211 <text:s/>5943 5978 94147</text:p>
      <text:p text:style-name="P265"><text:s text:c="2"/><text:span text:style-name="T5"><text:s/></text:span><text:span text:style-name="T15"><text:s text:c="3"/>94401 10598 10610 10703 395 6012 94225</text:span></text:p>
      <text:p text:style-name="P218"><text:s text:c="7"/>99019 <text:s text:c="2"/>94332 <text:s/>94420 </text:p>
      <text:p text:style-name="P217"><text:s text:c="4"/>6073 1221 <text:s/><text:span text:style-name="T65">6179</text:span> 9006 9007 <text:span text:style-name="T65">807</text:span> 45026 45030 6021 <text:s text:c="5"/>94308 <text:s/>94547 94431 <text:s/>95754 94548 94482 94222 </text:p>
      <text:p text:style-name="P238"><text:s text:c="5"/>5903 <text:s/>94196 <text:s text:c="2"/>94530 13320 99316</text:p>
      <text:p text:style-name="P33"><text:s text:c="3"/>94539 10714 94214 95410 <text:s/>99969 35508 99968</text:p>
      <text:p text:style-name="P238"><text:s text:c="2"/>10718 13440 17025 17080 35518 17169 <text:s/></text:p>
      <text:p text:style-name="P238"><text:s text:c="4"/>99302 999506 6312 80403 80404 94101 <text:s/>96175</text:p>
      <text:p text:style-name="P238"><text:s text:c="4"/>35479 <text:span text:style-name="T73"><text:s text:c="2"/>96178 <text:s/>975484 <text:s text:c="3"/>80217</text:span></text:p>
      <text:p text:style-name="P217"><text:s text:c="6"/>96191 <text:s/>96132 <text:s/>80212 10719 99723 6000 6022 6041</text:p>
      <text:p text:style-name="P238"><text:s text:c="6"/>86 9392 99966 96164 96170 <text:s/>9431 <text:s/>9493 80204</text:p>
      <text:p text:style-name="P238"><text:s text:c="3"/>99035 <text:span text:style-name="T73"><text:s/>21266 2833 </text:span><text:span text:style-name="T75">99710</text:span><text:span text:style-name="T73"> </text:span><text:span text:style-name="T75">99716</text:span><text:span text:style-name="T73"> 99712 99680 35276 </text:span></text:p>
      <text:p text:style-name="P61"><text:s text:c="13"/>99304 6115 6148 9011 <text:span text:style-name="T65">9391*</text:span> <text:span text:style-name="T65">13306</text:span> 9104 35447 9440</text:p>
      <text:p text:style-name="P61"><text:s text:c="12"/>6103 </text:p>
      <text:p text:style-name="P111"><text:s text:c="12"/></text:p>
      <text:p text:style-name="P111"><text:s text:c="15"/><text:span text:style-name="T117">WAGONS</text:span></text:p>
      <text:p text:style-name="P262"><text:s text:c="4"/><text:span text:style-name="T14"><text:s/>904129 998530CR 5056 3052 150442CR 167869 </text:span></text:p>
      <text:p text:style-name="P70"><text:s text:c="14"/>965183 <text:s/>200456 200499 <text:s/>A90 <text:s/>56 <text:s/>A350 <text:s/>123821</text:p>
      <text:p text:style-name="P46"><text:s text:c="12"/></text:p>
      <text:p text:style-name="P168"><text:s/><text:span text:style-name="T117"><text:s/></text:span><text:s text:c="4"/>EMU</text:p>
      <text:p text:style-name="P61"><text:span text:style-name="T117"><text:s text:c="11"/></text:span><text:span text:style-name="T118">71758</text:span><text:span text:style-name="T117"> <text:s text:c="3"/></text:span></text:p>
      <text:p text:style-name="P61"><text:s text:c="12"/></text:p>
      <text:p text:style-name="P46"><text:s text:c="12"/><text:span text:style-name="T10">WEST SOMERSET RAILWAY</text:span></text:p>
      <text:p text:style-name="P238"><text:s text:c="13"/>Ground Coaches</text:p>
      <text:p text:style-name="P217"><text:s text:c="14"/>8188 SR1587 <text:s text:c="2"/></text:p>
      <text:p text:style-name="P46"><text:s text:c="11"/></text:p>
      <text:p text:style-name="P61"><text:s text:c="14"/>3108 1909 1804 <text:span text:style-name="T65">4911</text:span> <text:span text:style-name="T65">3665 </text:span>4875 <text:span text:style-name="T65">9380</text:span> 9278 9227</text:p>
      <text:p text:style-name="P238"><text:span text:style-name="T73"><text:s text:c="4"/>5030 5025 80736 975076 </text:span><text:span text:style-name="T75">2823*</text:span><text:span text:style-name="T73"> 21174 6912 <text:s text:c="2"/></text:span><text:span text:style-name="T75">5856 </text:span></text:p>
      <text:p text:style-name="P61"><text:s text:c="12"/>5002 4419 4346 4260 25323 25308 4660 4814 4435 <text:s/>4599</text:p>
      <text:p text:style-name="P61"><text:s text:c="15"/><text:span text:style-name="T65">4987</text:span> <text:s/>4449 <text:s/>80976 <text:span text:style-name="T65">6705</text:span> 7538 <text:span text:style-name="T65">3885</text:span> 7740 5131 <text:s/>4546 2578</text:p>
      <text:p text:style-name="P61"><text:s text:c="13"/>4876 4909 169 80932 35408 <text:span text:style-name="T65">94502*</text:span> 35257 <text:s/><text:span text:style-name="T65">94917</text:span></text:p>
      <text:p text:style-name="P61"><text:s text:c="14"/><text:span text:style-name="T65">80972</text:span> 3063 <text:s/>3980 <text:s/>98 11 4 <text:span text:style-name="T65">4956</text:span> <text:s text:c="3"/><text:span text:style-name="T65">2980</text:span> <text:s text:c="2"/><text:span text:style-name="T65">2573</text:span> <text:s/></text:p>
      <text:p text:style-name="P217"><text:s text:c="4"/><text:span text:style-name="T65">4884</text:span> <text:s/>3668 <text:span text:style-name="T65"><text:s/>2910*</text:span> 24985 <text:span text:style-name="T65">5024</text:span> SR1464 <text:span text:style-name="T65">3885 </text:span>9038 2885 </text:p>
      <text:p text:style-name="P49"><text:span text:style-name="T5"><text:s text:c="13"/>3639 3631</text:span> <text:s/></text:p>
      <text:p text:style-name="P217"/>
      <text:p text:style-name="P225"><text:s text:c="3"/>GROUND <text:s text:c="3"/>WAGONS</text:p>
      <text:p text:style-name="P61"><text:s text:c="14"/><text:span text:style-name="T65">78XXXX green</text:span> <text:span text:style-name="T65">78XXXX</text:span> <text:span text:style-name="T65">75822X green</text:span> lner </text:p>
      <text:p text:style-name="P61"><text:s text:c="14"/>house box <text:s/>106557 785714</text:p>
      <text:p text:style-name="P61"><text:s text:c="14"/></text:p>
      <text:p text:style-name="P168"><text:span text:style-name="T117"><text:s/></text:span><text:span text:style-name="T118">47983*</text:span><text:span text:style-name="T117"> </text:span><text:span text:style-name="T118">787158</text:span><text:span text:style-name="T117"> 784676 752355 </text:span><text:span text:style-name="T118">732525* 404103</text:span><text:span text:style-name="T117"> </text:span><text:span text:style-name="T118">16307*</text:span></text:p>
      <text:p text:style-name="P61"><text:s text:c="14"/>200793 <text:s/>139760 22 <text:span text:style-name="T65">98997*</text:span> <text:s/>59378 12085 713 541</text:p>
      <text:p text:style-name="P111"><text:s text:c="11"/><text:span text:style-name="T65">126779</text:span> <text:span text:style-name="T65">983652</text:span> <text:span text:style-name="T65">983909</text:span> <text:span text:style-name="T65">983290</text:span> <text:span text:style-name="T65">993529</text:span> <text:span text:style-name="T65">63058</text:span> <text:span text:style-name="T65">137696</text:span> <text:s/></text:p>
      <text:p text:style-name="P111"><text:s text:c="11"/><text:span text:style-name="T65">46253*</text:span> <text:s/>12015 3146 13269 78032 <text:span text:style-name="T65">49017 </text:span>68765 56631</text:p>
      <text:p text:style-name="P49"><text:s text:c="9"/>4 <text:span text:style-name="T65">483</text:span> <text:span text:style-name="T65">477</text:span> <text:span text:style-name="T65">3018 </text:span><text:s/><text:span text:style-name="T65">41945</text:span> <text:span text:style-name="T65">102</text:span> <text:s/>9261 100678 105493 <text:s/>46017</text:p>
      <text:p text:style-name="P262"><text:s text:c="4"/>135fo hurst nelson 63015 80669 <text:span text:style-name="T65">46242* </text:span><text:s text:c="2"/><text:span text:style-name="T65">1822</text:span> <text:span text:style-name="T65">955227 </text:span><text:span text:style-name="T72"><text:s/></text:span><text:span text:style-name="T65">8080 </text:span></text:p>
      <text:p text:style-name="P265"><text:s text:c="3"/><text:span text:style-name="T65">1326 *</text:span> <text:s/>2276 <text:s/>84685 <text:span text:style-name="T65">32822</text:span> <text:span text:style-name="T65">114751</text:span> <text:span text:style-name="T65">904146</text:span> <text:s/><text:span text:style-name="T65">900118 </text:span><text:s/><text:span text:style-name="T65">978622</text:span></text:p>
      <text:p text:style-name="P238"><text:s text:c="5"/><text:span text:style-name="T65">978348</text:span> <text:span text:style-name="T65">978105</text:span> <text:span text:style-name="T65">978037</text:span> lner 12t 97862 21xxxxx 064809uf</text:p>
      <text:p text:style-name="P49"><text:span text:style-name="T40"><text:s text:c="12"/></text:span><text:span text:style-name="T5"><text:s/></text:span><text:span text:style-name="T6">32742*</text:span><text:span text:style-name="T5"> 601998 84006 1287uf </text:span><text:span text:style-name="T6">(5xxxxx grey*)</text:span><text:span text:style-name="T5">71fo <text:s/>117flat </text:span></text:p>
      <text:p text:style-name="P265"><text:s text:c="2"/><text:span text:style-name="T65">84003</text:span> <text:s text:c="4"/><text:span text:style-name="T65">(132 lms)</text:span> <text:s/><text:span text:style-name="T65">(54885 12424)</text:span> <text:span text:style-name="T65">48949</text:span> <text:s text:c="2"/><text:span text:style-name="T65">108</text:span> <text:span text:style-name="T65">117 </text:span><text:s/>12058</text:p>
      <text:p text:style-name="P70"><text:s text:c="10"/><text:span text:style-name="T65">3450</text:span> <text:span text:style-name="T65">145741</text:span> <text:s/><text:span text:style-name="T65">424123</text:span> <text:span text:style-name="T65">747</text:span> <text:span text:style-name="T65">37103</text:span> <text:span text:style-name="T65">401</text:span> <text:s text:c="2"/><text:span text:style-name="T65">46*</text:span> </text:p>
      <text:p text:style-name="P168"/>
      <text:p text:style-name="P145"><text:s/><text:span text:style-name="T5"><text:s/></text:span><text:span text:style-name="T11">DIESELS</text:span></text:p>
      <text:p text:style-name="P49"><text:span text:style-name="T5"><text:s text:c="12"/></text:span><text:span text:style-name="T6">D7017*</text:span><text:span text:style-name="T39"> </text:span><text:span text:style-name="T6">D6575</text:span><text:span text:style-name="T5"> </text:span><text:span text:style-name="T6">D6566*</text:span><text:span text:style-name="T5"> D9526 </text:span><text:span text:style-name="T6">D7018*</text:span><text:span text:style-name="T5"> D2133 </text:span><text:span text:style-name="T6">D1010</text:span><text:span text:style-name="T5"> </text:span></text:p>
      <text:p text:style-name="P168"><text:s text:c="11"/>D9518 200793 (D4107 09019) <text:s/>578 <text:s text:c="17"/></text:p>
      <text:p text:style-name="P148"><text:s text:c="10"/></text:p>
      <text:p text:style-name="P61"><text:s text:c="10"/><text:span text:style-name="T117"><text:s text:c="2"/>STEAMS </text:span></text:p>
      <text:p text:style-name="P61"><text:span text:style-name="T117"><text:s text:c="12"/>4561 9351 <text:s/>6024 1219 <text:s/>7822 <text:s/>1857 1260 1984 4936</text:span> <text:s/><text:span text:style-name="T65">5199* </text:span></text:p>
      <text:p text:style-name="P61"><text:s text:c="7"/></text:p>
      <text:p text:style-name="P111"><text:s text:c="11"/><text:span text:style-name="T117"><text:s/>DMUS</text:span></text:p>
      <text:p text:style-name="P225"><text:s text:c="14"/>59678 51354 51887 51880 51859 51663FO</text:p>
      <text:p text:style-name="P225"/>
      <text:p text:style-name="P175"><text:s text:c="7"/>ROAD RAILERS</text:p>
      <text:p text:style-name="P156"><text:s text:c="11"/>M23 COB <text:s text:c="2"/><text:span text:style-name="T65">(99709 940219-7)*</text:span> <text:s text:c="4"/>ST/02/28 ST02/27</text:p>
      <text:p text:style-name="P61"><text:s text:c="11"/></text:p>
      <text:p text:style-name="P4"><text:s text:c="20"/></text:p>
      <text:p text:style-name="P61"><text:s text:c="14"/>TROLLEYS</text:p>
      <text:p text:style-name="P148"><text:s text:c="23"/><text:span text:style-name="T117">11 </text:span></text:p>
      <text:p text:style-name="P70"><text:s text:c="9"/></text:p>
      <text:p text:style-name="P217"><text:s text:c="6"/>WAVERLEY RAILWAY</text:p>
      <text:p text:style-name="P217"><text:s text:c="9"/>DIESELS</text:p>
      <text:p text:style-name="P217"><text:s text:c="11"/><text:span text:style-name="T65">3777*</text:span> <text:s/><text:span text:style-name="T65">26040*</text:span> <text:s/><text:span text:style-name="T65">411319*</text:span></text:p>
      <text:p text:style-name="P221"/>
      <text:p text:style-name="P225"><text:s text:c="6"/>COACHES</text:p>
      <text:p text:style-name="P61"><text:s text:c="13"/><text:span text:style-name="T65">10544</text:span> <text:s text:c="5"/><text:span text:style-name="T65">9400*</text:span> <text:s/><text:span text:style-name="T65">34042*</text:span> <text:s text:c="2"/></text:p>
      <text:p text:style-name="P61"/>
      <text:p text:style-name="P217"><text:s text:c="2"/>EMUS</text:p>
      <text:p text:style-name="P70"><text:s text:c="12"/><text:span text:style-name="T65">69316*</text:span> <text:s text:c="3"/><text:span text:style-name="T65">RB 004</text:span></text:p>
      <text:p text:style-name="P46"><text:s text:c="13"/><text:span text:style-name="T14"><text:s/></text:span></text:p>
      <text:p text:style-name="P225"><text:s text:c="2"/>GROUND <text:s text:c="4"/>WAGON </text:p>
      <text:p text:style-name="P111"><text:s text:c="10"/>(10T 4 W) <text:s/></text:p>
      <text:p text:style-name="P61"><text:s text:c="12"/></text:p>
      <text:p text:style-name="P217"><text:s text:c="6"/><text:span text:style-name="T65">592561</text:span> <text:span text:style-name="T65">419057*</text:span> <text:span text:style-name="T65">953868*</text:span></text:p>
      <text:p text:style-name="P221"/>
      <text:p text:style-name="P68"><text:s text:c="10"/><text:span text:style-name="T72">GEISMAR</text:span></text:p>
      <text:p text:style-name="P111"><text:s text:c="12"/><text:span text:style-name="T65"><text:s/>4163</text:span> <text:s/></text:p>
      <text:p text:style-name="P169"><text:s/></text:p>
      <text:p text:style-name="P225"><text:s text:c="5"/>DMUS</text:p>
      <text:p text:style-name="P61"><text:span text:style-name="T117"><text:s text:c="13"/></text:span><text:span text:style-name="T118">142019*</text:span><text:span text:style-name="T117"> <text:s/></text:span><text:span text:style-name="T118">142020</text:span> <text:s/></text:p>
      <text:p text:style-name="P49"><text:s text:c="2"/></text:p>
      <text:p text:style-name="P49"><text:s text:c="12"/><text:span text:style-name="T11">TROLLEYS </text:span></text:p>
      <text:p text:style-name="P217"><text:s text:c="15"/><text:span text:style-name="T65">XXXX*</text:span> <text:s/><text:span text:style-name="T65">37674* <text:s/></text:span><text:s text:c="2"/></text:p>
      <text:p text:style-name="P217"/>
      <text:p text:style-name="P217"><text:s text:c="6"/>ROAD RAILER </text:p>
      <text:p text:style-name="P217"><text:s text:c="16"/><text:span text:style-name="T65"><text:s/>ET141</text:span><text:span text:style-name="T66"> </text:span></text:p>
      <text:p text:style-name="P233"/>
      <text:p text:style-name="P217"><text:s text:c="6"/><text:span text:style-name="T117"><text:s text:c="8"/></text:span><text:span text:style-name="T120">WENDRON </text:span></text:p>
      <text:p text:style-name="P262"><text:s text:c="3"/>STEAMS</text:p>
      <text:p text:style-name="P218"><text:s text:c="11"/><text:span text:style-name="T65">1530</text:span> <text:s/><text:span text:style-name="T65">5102</text:span></text:p>
      <text:p text:style-name="P70"><text:s text:c="12"/></text:p>
      <text:p text:style-name="P217"><text:s text:c="7"/>WITWELL RAILWAY </text:p>
      <text:p text:style-name="P46"><text:s text:c="13"/>Ground coach </text:p>
      <text:p text:style-name="P61"><text:s text:c="9"/><text:span text:style-name="T65"><text:s/>1833</text:span></text:p>
      <text:p text:style-name="P61"><text:s text:c="11"/></text:p>
      <text:p text:style-name="P49"><text:s text:c="7"/><text:span text:style-name="T5"><text:s/></text:span><text:span text:style-name="T11"><text:s text:c="4"/></text:span><text:span text:style-name="T9">SR272</text:span><text:span text:style-name="T11"> <text:s/></text:span><text:span text:style-name="T9">34712</text:span><text:span text:style-name="T11"> <text:s/></text:span><text:span text:style-name="T9">70527</text:span></text:p>
      <text:p text:style-name="P73"/>
      <text:p text:style-name="P217"><text:span text:style-name="T117">GROUND</text:span> <text:s/><text:span text:style-name="T117"><text:s/>WAGONS </text:span></text:p>
      <text:p text:style-name="P217"><text:span text:style-name="T117"><text:s text:c="12"/></text:span><text:span text:style-name="T118">767X7X</text:span><text:span text:style-name="T117"> </text:span><text:span text:style-name="T118">1XXXXX <text:s/></text:span><text:span text:style-name="T117"><text:s/></text:span></text:p>
      <text:p text:style-name="P225"/>
      <text:p text:style-name="P46"><text:s text:c="10"/><text:span text:style-name="T10"><text:s/></text:span><text:span text:style-name="T9">772630</text:span><text:span text:style-name="T10"> </text:span><text:span text:style-name="T9">7XXXXX</text:span><text:span text:style-name="T10"> </text:span><text:span text:style-name="T9">989344</text:span><text:span text:style-name="T10"> 732012 </text:span><text:span text:style-name="T9">11902</text:span><text:span text:style-name="T10"> </text:span><text:span text:style-name="T9">954420*</text:span></text:p>
      <text:p text:style-name="P70"><text:s text:c="11"/><text:span text:style-name="T65">43929</text:span> <text:s/>7124fo</text:p>
      <text:p text:style-name="P225"><text:s text:c="2"/></text:p>
      <text:p text:style-name="P46"><text:span text:style-name="T14"><text:s text:c="7"/></text:span><text:span text:style-name="T10"><text:s text:c="2"/>DIESELS</text:span></text:p>
      <text:p text:style-name="P217"><text:s text:c="12"/>3733 <text:span text:style-name="T65">27426* </text:span><text:s text:c="2"/>D1171 466629 518494</text:p>
      <text:p text:style-name="P90"><text:span text:style-name="T15"><text:s text:c="11"/></text:span><text:span text:style-name="T17"><text:s text:c="5"/></text:span></text:p>
      <text:p text:style-name="P225"><text:s text:c="3"/>STEAMS </text:p>
      <text:p text:style-name="P70"><text:s text:c="16"/><text:span text:style-name="T65">945</text:span> <text:s/>2199 </text:p>
      <text:p text:style-name="P225"/>
      <text:p text:style-name="P20"><text:s text:c="2"/>ROAD RAILERS</text:p>
      <text:p text:style-name="P20"><text:s text:c="12"/><text:span text:style-name="T65">Q454JTT*</text:span> <text:span text:style-name="T65"><text:s/>8087*</text:span> <text:s text:c="2"/><text:span text:style-name="T65">6901*</text:span> <text:s text:c="2"/></text:p>
      <text:p text:style-name="P61"><text:s text:c="9"/></text:p>
      <text:p text:style-name="P61"><text:s text:c="13"/></text:p>
      <text:p text:style-name="P217"><text:s text:c="4"/><text:span text:style-name="T117"><text:s text:c="4"/>TROLLEYS</text:span></text:p>
      <text:p text:style-name="P14"><text:s/>XXXX XXXX</text:p>
      <text:p text:style-name="P46"><text:s text:c="10"/></text:p>
      <text:p text:style-name="P262"><text:s/><text:span text:style-name="T17"><text:s text:c="2"/></text:span><text:span text:style-name="T19"><text:s text:c="2"/>CRANE</text:span></text:p>
      <text:p text:style-name="P225"><text:s text:c="13"/>12 </text:p>
      <text:p text:style-name="P165"/>
      <text:p text:style-name="P217"><text:s/><text:span text:style-name="T117">YEOVIL RAILWAY</text:span></text:p>
      <text:p text:style-name="P111"><text:s text:c="17"/>GROUND <text:s text:c="4"/>WAGON</text:p>
      <text:p text:style-name="P61"><text:s text:c="20"/>14151</text:p>
      <text:p text:style-name="P168"/>
      <text:p text:style-name="P217">40354 785606 <text:s/>59423 993706 <text:span text:style-name="T65">49015</text:span> 733576 1904</text:p>
      <text:p text:style-name="P217">14 738720 59300 950603 <text:s text:c="2"/>59561 35923 <text:s/>783176</text:p>
      <text:p text:style-name="P61"><text:s text:c="10"/>58132 60562 63064 58211 <text:s text:c="3"/>7XXXXX</text:p>
      <text:p text:style-name="P70"><text:s text:c="11"/></text:p>
      <text:p text:style-name="P217"><text:s/>DIESELS</text:p>
      <text:p text:style-name="P70"><text:s text:c="16"/>22898 22900 458959 4000007</text:p>
      <text:p text:style-name="P111"><text:s text:c="10"/></text:p>
      <text:p text:style-name="P62"><text:s text:c="17"/>STEAMS</text:p>
      <text:p text:style-name="P168"><text:s text:c="12"/>579 1398 <text:s text:c="5"/></text:p>
      <text:p text:style-name="P231"/>
      <text:p text:style-name="P217"><text:s text:c="2"/>DMU</text:p>
      <text:p text:style-name="P14"><text:span text:style-name="T117"><text:s text:c="12"/></text:span><text:span text:style-name="T118">59515</text:span><text:span text:style-name="T117"> </text:span></text:p>
      <text:p text:style-name="P21"/>
      <text:p text:style-name="P34"><text:s text:c="4"/>TROLLEYS</text:p>
      <text:p text:style-name="P70"><text:s text:c="12"/>XXXX XXXX</text:p>
      <text:p text:style-name="P46"><text:s text:c="9"/></text:p>
      <text:p text:style-name="P168"><text:s text:c="3"/>YORKSHIRE W RAILWAY</text:p>
      <text:p text:style-name="P68"><text:s text:c="12"/>COACHES</text:p>
      <text:p text:style-name="P61"><text:span text:style-name="T117"><text:s text:c="20"/>6027 <text:s/></text:span><text:span text:style-name="T118">92990</text:span></text:p>
      <text:p text:style-name="P4"/>
      <text:p text:style-name="P217">GROUND WAGONS </text:p>
      <text:p text:style-name="P67"><text:span text:style-name="T72"><text:s text:c="10"/></text:span>754635<text:span text:style-name="T66"> <text:s/></text:span><text:span text:style-name="T72">508270 </text:span>GWR<text:span text:style-name="T72"> <text:s text:c="2"/>85172</text:span></text:p>
      <text:p text:style-name="P61"><text:s text:c="8"/></text:p>
      <text:p text:style-name="P61"><text:s text:c="14"/><text:span text:style-name="T117"><text:s text:c="2"/></text:span><text:span text:style-name="T118">955043</text:span> </text:p>
      <text:p text:style-name="P61"/>
      <text:p text:style-name="P61"><text:s text:c="5"/><text:span text:style-name="T117"><text:s/>DIESEL</text:span></text:p>
      <text:p text:style-name="P61"><text:span text:style-name="T117"><text:s text:c="9"/></text:span><text:span text:style-name="T118">5576</text:span><text:span text:style-name="T117"> </text:span></text:p>
      <text:p text:style-name="P61"><text:s text:c="12"/></text:p>
      <text:p text:style-name="P61"><text:span text:style-name="T117"><text:s text:c="13"/></text:span><text:span text:style-name="T120">ABBEY VIEW</text:span></text:p>
      <text:p text:style-name="P262"><text:s text:c="5"/>COACH</text:p>
      <text:p text:style-name="P61"><text:span text:style-name="T117"><text:s text:c="14"/></text:span><text:span text:style-name="T118"><text:s/>69302</text:span><text:span text:style-name="T117"> <text:s text:c="13"/></text:span></text:p>
      <text:p text:style-name="P145"><text:s/><text:span text:style-name="T5"><text:s text:c="4"/></text:span><text:span text:style-name="T11"><text:s/></text:span><text:span text:style-name="T5"><text:s/></text:span><text:span text:style-name="T12"><text:s/>AKELD STATION</text:span></text:p>
      <text:p text:style-name="P262"><text:s text:c="2"/>WAGON</text:p>
      <text:p text:style-name="P61"><text:span text:style-name="T117"><text:s text:c="11"/></text:span><text:span text:style-name="T118"><text:s/>954297*</text:span><text:span text:style-name="T117"> <text:s text:c="2"/></text:span><text:s text:c="2"/></text:p>
      <text:p text:style-name="P61"><text:s text:c="17"/></text:p>
      <text:p text:style-name="P61"><text:span text:style-name="T40"><text:s text:c="13"/></text:span><text:s text:c="4"/><text:span text:style-name="T117">ALMOND VALLEY </text:span></text:p>
      <text:p text:style-name="P262"><text:s text:c="2"/>WAGON</text:p>
      <text:p text:style-name="P145"><text:span text:style-name="T11"><text:s text:c="10"/></text:span><text:span text:style-name="T9">50*</text:span><text:span text:style-name="T5"> <text:s/></text:span></text:p>
      <text:p text:style-name="P61"><text:s text:c="8"/></text:p>
      <text:p text:style-name="P111"><text:s text:c="9"/><text:span text:style-name="T117"><text:s/>DIESELS</text:span></text:p>
      <text:p text:style-name="P250"><text:span text:style-name="T5"><text:s text:c="3"/></text:span><text:span text:style-name="T6">7330*</text:span><text:span text:style-name="T5"> </text:span><text:span text:style-name="T6">3752*</text:span><text:span text:style-name="T5"> </text:span><text:span text:style-name="T6">698*</text:span><text:span text:style-name="T5"> </text:span><text:span text:style-name="T6">1143*</text:span><text:span text:style-name="T5"> </text:span><text:span text:style-name="T6">1698*</text:span><text:span text:style-name="T5"> </text:span><text:span text:style-name="T6">557</text:span><text:span text:style-name="T5"> </text:span><text:span text:style-name="T6">2270*</text:span><text:span text:style-name="T5"> <text:s/>(612 20 ) <text:s text:c="4"/></text:span></text:p>
      <text:p text:style-name="P115"><text:s text:c="11"/>(700 <text:s text:c="3"/>42) 20587 <text:s text:c="2"/>40SPF522</text:p>
      <text:p text:style-name="P61"><text:s text:c="9"/></text:p>
      <text:p text:style-name="P61"><text:s text:c="12"/><text:span text:style-name="T120">ASHDON</text:span></text:p>
      <text:p text:style-name="P148"><text:s text:c="2"/>COACH</text:p>
      <text:p text:style-name="P61"><text:span text:style-name="T49"><text:s text:c="11"/></text:span><text:span text:style-name="T118">349*</text:span><text:span text:style-name="T49"> <text:s text:c="2"/></text:span></text:p>
      <text:p text:style-name="P14"/>
      <text:p text:style-name="P217"><text:s text:c="2"/></text:p>
      <text:p text:style-name="P61"><text:s text:c="7"/><text:span text:style-name="T117"><text:s/>AMERTON RAILWAY</text:span></text:p>
      <text:p text:style-name="P250"><text:s text:c="4"/>DIESELS</text:p>
      <text:p text:style-name="P250"><text:s text:c="6"/>2025 19531 5869 <text:span text:style-name="T65">3782*</text:span> 3235 <text:s/>3905 2085 <text:span text:style-name="T65">7471*</text:span> 8561 </text:p>
      <text:p text:style-name="P70"><text:s text:c="12"/><text:span text:style-name="T65">221623*</text:span> <text:span text:style-name="T65">506491*</text:span> 40SD501 3024</text:p>
      <text:p text:style-name="P70"/>
      <text:p text:style-name="P46"><text:s text:c="8"/><text:span text:style-name="T14"><text:s text:c="6"/></text:span><text:span text:style-name="T10"><text:s/>STEAMS</text:span></text:p>
      <text:p text:style-name="P61"><text:s text:c="10"/>1889 <text:span text:style-name="T65">4250*</text:span> 1158 14019 <text:s text:c="2"/>3905 <text:span text:style-name="T65">1491*</text:span></text:p>
      <text:p text:style-name="P217"><text:s/></text:p>
      <text:p text:style-name="P148"><text:s text:c="3"/>AMMAN VALLEY RAILWAY</text:p>
      <text:p text:style-name="P168"><text:s text:c="2"/>WAGONS</text:p>
      <text:p text:style-name="P168"><text:s text:c="8"/>1275 40353 48306 </text:p>
      <text:p text:style-name="P49"><text:s text:c="18"/></text:p>
      <text:p text:style-name="P61"><text:s text:c="10"/>ANGLESEY CENTRAL RAILWAY <text:s/>LL71 8EU</text:p>
      <text:p text:style-name="P262"><text:span text:style-name="T17"><text:s text:c="11"/>WAGONS</text:span><text:span text:style-name="T14"> <text:s text:c="14"/></text:span></text:p>
      <text:p text:style-name="P217"><text:s text:c="2"/><text:span text:style-name="T65">LMS brake van </text:span>23 85 7492 200-7 </text:p>
      <text:p text:style-name="P61"><text:s text:c="11"/>23 85 7492 201 -5 730003</text:p>
      <text:p text:style-name="P217"><text:s text:c="3"/></text:p>
      <text:p text:style-name="P46"><text:s text:c="10"/><text:span text:style-name="T14"><text:s text:c="2"/></text:span><text:span text:style-name="T10">DIESELS</text:span></text:p>
      <text:p text:style-name="P61"><text:span text:style-name="T117"><text:s text:c="13"/>321727 7460 </text:span><text:span text:style-name="T118">22753</text:span><text:span text:style-name="T117"> <text:s text:c="5"/></text:span></text:p>
      <text:p text:style-name="P70"><text:s text:c="11"/></text:p>
      <text:p text:style-name="P225"><text:s text:c="3"/>ROAD RAILER</text:p>
      <text:p text:style-name="P179"><text:s text:c="3"/>4816</text:p>
      <text:p text:style-name="P46"><text:s text:c="3"/><text:span text:style-name="T72"><text:s/></text:span><text:s text:c="9"/></text:p>
      <text:p text:style-name="P46"><text:span text:style-name="T14"><text:s text:c="12"/></text:span><text:span text:style-name="T10"><text:s/></text:span><text:span text:style-name="T12">ASSENTA RAIL</text:span></text:p>
      <text:p text:style-name="P46"><text:s text:c="18"/>COACH</text:p>
      <text:p text:style-name="P225"><text:s text:c="9"/><text:span text:style-name="T65">94199</text:span><text:span text:style-name="T103"> <text:s/></text:span></text:p>
      <text:p text:style-name="P272"/>
      <text:p text:style-name="P225"><text:s/>DIESEL</text:p>
      <text:p text:style-name="P77"><text:span text:style-name="T72"><text:s text:c="19"/></text:span><text:span text:style-name="T65">184V</text:span></text:p>
      <text:p text:style-name="P251"><text:s/><text:span text:style-name="T5"><text:s/></text:span></text:p>
      <text:p text:style-name="P80"><text:span text:style-name="T73"><text:s text:c="13"/></text:span><text:span text:style-name="T77"><text:s/></text:span><text:span text:style-name="T76"><text:s/>AYSGARTH STATION</text:span></text:p>
      <text:p text:style-name="P262"><text:s text:c="3"/>WAGON</text:p>
      <text:p text:style-name="P70"><text:s text:c="15"/>FRAME ONLY</text:p>
      <text:p text:style-name="P70"/>
      <text:p text:style-name="P217"><text:s text:c="4"/><text:span text:style-name="T117"><text:s text:c="3"/>BALLATER </text:span></text:p>
      <text:p text:style-name="P262"><text:s text:c="2"/>COACH</text:p>
      <text:p text:style-name="P225"><text:s text:c="12"/>94241</text:p>
      <text:p text:style-name="P49"><text:s text:c="4"/></text:p>
      <text:p text:style-name="P46"><text:s text:c="14"/><text:span text:style-name="T14"><text:s text:c="2"/></text:span><text:span text:style-name="T34">BARDNEY HERITAGE CENTRE</text:span></text:p>
      <text:p text:style-name="P265"><text:s text:c="3"/>WAGONS</text:p>
      <text:p text:style-name="P61"><text:span text:style-name="T117"><text:s text:c="13"/></text:span><text:span text:style-name="T118">5008</text:span><text:span text:style-name="T117"> <text:s text:c="3"/></text:span><text:span text:style-name="T118">901622*</text:span><text:span text:style-name="T117"> <text:s/></text:span><text:span text:style-name="T118"><text:s/>993827*</text:span><text:span text:style-name="T117"> <text:s text:c="9"/></text:span></text:p>
      <text:p text:style-name="P225"/>
      <text:p text:style-name="P70"><text:s text:c="13"/><text:span text:style-name="T116"><text:s/>BARWELL</text:span></text:p>
      <text:p text:style-name="P217"><text:s text:c="4"/>COACH</text:p>
      <text:p text:style-name="P133"><text:span text:style-name="T66"><text:s text:c="14"/></text:span><text:span text:style-name="T65"><text:s/>977996*</text:span><text:span text:style-name="T66"> <text:s text:c="2"/></text:span></text:p>
      <text:p text:style-name="P168"><text:s text:c="7"/></text:p>
      <text:p text:style-name="P61"><text:s text:c="8"/><text:span text:style-name="T117"><text:s text:c="6"/>BASINGSTOKE MILESTONES</text:span></text:p>
      <text:p text:style-name="P262"><text:s text:c="3"/>WAGON <text:s text:c="3"/></text:p>
      <text:p text:style-name="P70"><text:s text:c="12"/>7329</text:p>
      <text:p text:style-name="P70"/>
      <text:p text:style-name="P46"><text:s text:c="14"/><text:span text:style-name="T10"><text:s text:c="2"/>STEAM</text:span></text:p>
      <text:p text:style-name="P70"><text:s text:c="12"/>1572 <text:s text:c="2"/></text:p>
      <text:p text:style-name="P46"><text:s text:c="10"/><text:span text:style-name="T10"><text:s text:c="5"/></text:span></text:p>
      <text:p text:style-name="P225"><text:s text:c="6"/><text:span text:style-name="T116">BATTLESBRIDGE</text:span></text:p>
      <text:p text:style-name="P262"><text:s text:c="6"/>COACH</text:p>
      <text:p text:style-name="P70"><text:s text:c="11"/><text:span text:style-name="T65">1227**</text:span> <text:s/></text:p>
      <text:p text:style-name="P133"><text:s text:c="13"/></text:p>
      <text:p text:style-name="P61"><text:s text:c="13"/><text:span text:style-name="T117"><text:s/>BEACONFLELD</text:span></text:p>
      <text:p text:style-name="P262"><text:s text:c="3"/>COACH</text:p>
      <text:p text:style-name="P70"><text:s text:c="13"/>25911 <text:s/></text:p>
      <text:p text:style-name="P70"><text:s text:c="13"/></text:p>
      <text:p text:style-name="P217"><text:s text:c="3"/><text:span text:style-name="T117"><text:s text:c="3"/></text:span></text:p>
      <text:p text:style-name="P70"><text:s text:c="10"/>BEACON FARM</text:p>
      <text:p text:style-name="P61"><text:s text:c="9"/>GROUND <text:s text:c="5"/>WAGON </text:p>
      <text:p text:style-name="P111"><text:s text:c="14"/>1353</text:p>
      <text:p text:style-name="P177"/>
      <text:p text:style-name="P70"><text:s text:c="14"/>48 (UNLKNOWN TANK) 4WFLAT 49XXXX 955135</text:p>
      <text:p text:style-name="P113"><text:s text:c="15"/>9423 517572 <text:span text:style-name="T117"><text:s text:c="2"/></text:span></text:p>
      <text:p text:style-name="P49"><text:s text:c="9"/><text:span text:style-name="T5"><text:s text:c="9"/></text:span></text:p>
      <text:p text:style-name="P225"><text:s/>DIESEL</text:p>
      <text:p text:style-name="P70"><text:s text:c="15"/>3892 <text:s text:c="5"/></text:p>
      <text:p text:style-name="P262"><text:s text:c="5"/></text:p>
      <text:p text:style-name="P156">ROAD RAILER</text:p>
      <text:p text:style-name="P74"><text:s text:c="14"/>9124</text:p>
      <text:p text:style-name="P70"><text:s text:c="12"/></text:p>
      <text:p text:style-name="P65"><text:s text:c="12"/>BEER HEIGHTS</text:p>
      <text:p text:style-name="P262"><text:s text:c="6"/>COACH</text:p>
      <text:p text:style-name="P70"><text:s text:c="15"/>306 <text:s text:c="6"/></text:p>
      <text:p text:style-name="P61"><text:s text:c="15"/></text:p>
      <text:p text:style-name="P61"><text:s text:c="15"/><text:span text:style-name="T121"><text:s text:c="2"/></text:span><text:span text:style-name="T117"><text:s text:c="2"/></text:span><text:span text:style-name="T120"><text:s/>BELLINGHAM CENTRE</text:span></text:p>
      <text:p text:style-name="P61"><text:s text:c="20"/>EMUS</text:p>
      <text:p text:style-name="P156"><text:s text:c="11"/><text:span text:style-name="T65"><text:s/>76301*</text:span> <text:s text:c="3"/><text:span text:style-name="T65">76302*</text:span></text:p>
      <text:p text:style-name="P159"/>
      <text:p text:style-name="P111"><text:s text:c="8"/><text:span text:style-name="T117"><text:s text:c="3"/>BLACK COUNTRY MUSEUM</text:span></text:p>
      <text:p text:style-name="P217"><text:s text:c="2"/>WAGON</text:p>
      <text:p text:style-name="P156"><text:s text:c="17"/>85XXXX <text:s/></text:p>
      <text:p text:style-name="P156"/>
      <text:p text:style-name="P61"><text:s text:c="14"/><text:span text:style-name="T117">STEAM</text:span></text:p>
      <text:p text:style-name="P61"><text:span text:style-name="T117"><text:s text:c="13"/></text:span><text:span text:style-name="T118">2025*</text:span></text:p>
      <text:p text:style-name="P61"><text:s text:c="11"/></text:p>
      <text:p text:style-name="P61"><text:s text:c="14"/><text:span text:style-name="T40"><text:s/></text:span><text:span text:style-name="T117">BLACKNELL</text:span></text:p>
      <text:p text:style-name="P61"><text:s text:c="15"/>COACH</text:p>
      <text:p text:style-name="P70"><text:s text:c="14"/>10204 <text:s text:c="2"/></text:p>
      <text:p text:style-name="P225"/>
      <text:p text:style-name="P90"><text:span text:style-name="T17"><text:s text:c="8"/></text:span><text:span text:style-name="T19"><text:s text:c="4"/>BLAKEMORE</text:span></text:p>
      <text:p text:style-name="P262"><text:s text:c="2"/>GROUND COACHES </text:p>
      <text:p text:style-name="P61"><text:s text:c="13"/>1544 2505 1409 6126 12 95 109 30</text:p>
      <text:p text:style-name="P61"><text:s text:c="9"/></text:p>
      <text:p text:style-name="P217"><text:s text:c="2"/>94223UF (64 71) 683 <text:s text:c="6"/></text:p>
      <text:p text:style-name="P50"/>
      <text:p text:style-name="P49"><text:s text:c="9"/><text:span text:style-name="T5"><text:s text:c="3"/>GROUND <text:s text:c="6"/>WAGONS </text:span></text:p>
      <text:p text:style-name="P217"><text:s text:c="16"/>144796 16444 43956</text:p>
      <text:p text:style-name="P217"/>
      <text:p text:style-name="P70"><text:s text:c="11"/>771217 889019</text:p>
      <text:p text:style-name="P111"><text:s text:c="5"/></text:p>
      <text:p text:style-name="P65"><text:span text:style-name="T117"><text:s text:c="14"/></text:span><text:span text:style-name="T120">BLAMLEY LINE</text:span></text:p>
      <text:p text:style-name="P61"><text:s text:c="11"/>GROUND <text:s text:c="3"/>COACH </text:p>
      <text:p text:style-name="P221"><text:span text:style-name="T72"><text:s text:c="16"/></text:span>GER*</text:p>
      <text:p text:style-name="P217"><text:s text:c="4"/></text:p>
      <text:p text:style-name="P20">GROUND WAGON </text:p>
      <text:p text:style-name="P14"><text:span text:style-name="T117"><text:s text:c="13"/></text:span><text:span text:style-name="T118">7XXXXX*</text:span> <text:span text:style-name="T117"><text:s text:c="2"/></text:span></text:p>
      <text:p text:style-name="P70"/>
      <text:p text:style-name="P111"><text:s text:c="11"/><text:span text:style-name="T117"><text:s text:c="2"/></text:span><text:span text:style-name="T118">29984</text:span><text:span text:style-name="T117"> </text:span><text:span text:style-name="T118">2324</text:span></text:p>
      <text:p text:style-name="P156"><text:s text:c="3"/></text:p>
      <text:p text:style-name="P49"><text:s text:c="15"/><text:span text:style-name="T11"><text:s text:c="7"/>BLENNERHASSET WATERMILL CA7 3QQ </text:span></text:p>
      <text:p text:style-name="P262"><text:s text:c="3"/>COACHES </text:p>
      <text:p text:style-name="P61"><text:s text:c="13"/>514 362 </text:p>
      <text:p text:style-name="P70"/>
      <text:p text:style-name="P238"><text:s/><text:span text:style-name="T73"><text:s text:c="3"/>DIESELS</text:span></text:p>
      <text:p text:style-name="P61"><text:s text:c="14"/>4149 3756</text:p>
      <text:p text:style-name="P217"><text:s text:c="10"/></text:p>
      <text:p text:style-name="P217"><text:s/>BLIST HILL</text:p>
      <text:p text:style-name="P61"><text:s text:c="13"/>WAGONS</text:p>
      <text:p text:style-name="P61"><text:s text:c="13"/>106 (4W GOODS OPED) (4 5PL OPED)</text:p>
      <text:p text:style-name="P73"><text:span text:style-name="T42"><text:s text:c="8"/></text:span><text:span text:style-name="T72"><text:s text:c="5"/>(4W <text:s/>4PL OPED)</text:span></text:p>
      <text:p text:style-name="P231"/>
      <text:p text:style-name="P168"><text:s text:c="8"/><text:span text:style-name="T117"><text:s/>CRANE</text:span></text:p>
      <text:p text:style-name="P225"><text:span text:style-name="T40"><text:s text:c="13"/></text:span><text:s/>2446 </text:p>
      <text:p text:style-name="P217"/>
      <text:p text:style-name="P46"><text:span text:style-name="T14"><text:s text:c="14"/></text:span><text:span text:style-name="T10"><text:s text:c="2"/>STEAMS</text:span></text:p>
      <text:p text:style-name="P175"><text:s text:c="11"/>(437/6155) <text:s/>6185 <text:s/>5 <text:s/>782 (BLACK NG)</text:p>
      <text:p text:style-name="P49"><text:s text:c="11"/></text:p>
      <text:p text:style-name="P148"><text:s text:c="16"/>DIESEL</text:p>
      <text:p text:style-name="P70"><text:s text:c="14"/>84 <text:s text:c="7"/></text:p>
      <text:p text:style-name="P217"><text:s/></text:p>
      <text:p text:style-name="P175">BISLEY OLD STATION </text:p>
      <text:p text:style-name="P61"><text:s text:c="22"/>10516 <text:s text:c="7"/></text:p>
      <text:p text:style-name="P46"><text:span text:style-name="T5"><text:s text:c="10"/></text:span><text:span text:style-name="T14"><text:s text:c="6"/></text:span><text:span text:style-name="T34">BIDEFORD RAILWAY</text:span></text:p>
      <text:p text:style-name="P262"><text:s text:c="3"/>COACHES</text:p>
      <text:p text:style-name="P67"><text:span text:style-name="T119"><text:s text:c="12"/></text:span><text:span text:style-name="T117">4489*</text:span><text:span text:style-name="T119"> <text:s text:c="2"/></text:span><text:span text:style-name="T117">SR2142*</text:span></text:p>
      <text:p text:style-name="P49"><text:s text:c="9"/></text:p>
      <text:p text:style-name="P61"><text:s text:c="8"/>WAGON</text:p>
      <text:p text:style-name="P155"><text:span text:style-name="T72"><text:s text:c="11"/></text:span>954757*</text:p>
      <text:p text:style-name="P49"><text:s text:c="11"/></text:p>
      <text:p text:style-name="P250"><text:s text:c="2"/><text:span text:style-name="T5"><text:s text:c="2"/>DIESEL</text:span></text:p>
      <text:p text:style-name="P148"><text:span text:style-name="T117"><text:s text:c="8"/></text:span><text:span text:style-name="T118">3832*</text:span></text:p>
      <text:p text:style-name="P168"><text:s text:c="4"/></text:p>
      <text:p text:style-name="P20"><text:s/>BIRTLEY</text:p>
      <text:p text:style-name="P265"><text:s text:c="3"/>WAGON </text:p>
      <text:p text:style-name="P49"><text:span text:style-name="T11"><text:s text:c="21"/>202 </text:span><text:s text:c="2"/><text:span text:style-name="T5"><text:s text:c="2"/></text:span></text:p>
      <text:p text:style-name="P145"><text:s text:c="2"/><text:span text:style-name="T5"><text:s text:c="2"/></text:span></text:p>
      <text:p text:style-name="P175"><text:s text:c="3"/><text:span text:style-name="T116"><text:s/>BOVEY TRACEY </text:span></text:p>
      <text:p text:style-name="P217"><text:s text:c="2"/>WAGON</text:p>
      <text:p text:style-name="P217"><text:span text:style-name="T85"><text:s text:c="9"/></text:span><text:s text:c="2"/><text:span text:style-name="T65"><text:s/>114906*</text:span> <text:s/></text:p>
      <text:p text:style-name="P217"/>
      <text:p text:style-name="P70"><text:s text:c="12"/>BOVINGTON TANK MUSEUM</text:p>
      <text:p text:style-name="P70"><text:s text:c="16"/>310259 <text:s text:c="3"/></text:p>
      <text:p text:style-name="P61"><text:s text:c="13"/><text:span text:style-name="T117"><text:s/></text:span></text:p>
      <text:p text:style-name="P61"><text:s text:c="9"/>BRAUGHING</text:p>
      <text:p text:style-name="P111"><text:s text:c="16"/>COACH</text:p>
      <text:p text:style-name="P217"><text:span text:style-name="T117"><text:s text:c="16"/>5275</text:span> </text:p>
      <text:p text:style-name="P217"><text:s/></text:p>
      <text:p text:style-name="P262"><text:s text:c="2"/><text:span text:style-name="T17"><text:s/>BREAM FLOUR</text:span></text:p>
      <text:p text:style-name="P262"><text:s text:c="3"/>COACHES </text:p>
      <text:p text:style-name="P61"><text:span text:style-name="T92"><text:s text:c="12"/></text:span><text:span text:style-name="T117"><text:s text:c="3"/></text:span><text:span text:style-name="T118">94501</text:span><text:span text:style-name="T117"> </text:span><text:span text:style-name="T118">889007 </text:span><text:span text:style-name="T117"><text:s/></text:span></text:p>
      <text:p text:style-name="P49"><text:s text:c="7"/></text:p>
      <text:p text:style-name="P225"/>
      <text:p text:style-name="P217"><text:s text:c="2"/><text:span text:style-name="T117">WAGONS</text:span></text:p>
      <text:p text:style-name="P70"><text:s text:c="11"/>56835 700370 7XXXX (21917FLAT)</text:p>
      <text:p text:style-name="P148"><text:s text:c="4"/></text:p>
      <text:p text:style-name="P176"><text:s text:c="7"/>STEAMS</text:p>
      <text:p text:style-name="P70"><text:soft-page-break/><text:s text:c="10"/>5538 563 229 37 2153 48 3183 1498</text:p>
      <text:p text:style-name="P145"><text:s text:c="4"/></text:p>
      <text:p text:style-name="P217"><text:s/><text:span text:style-name="T40"><text:s text:c="2"/></text:span><text:span text:style-name="T117">CRANE</text:span></text:p>
      <text:p text:style-name="P70"><text:s text:c="12"/>95213 <text:s/></text:p>
      <text:p text:style-name="P20"><text:s text:c="3"/></text:p>
      <text:p text:style-name="P168"><text:s text:c="2"/>BRECON <text:s/>Railway </text:p>
      <text:p text:style-name="P262"><text:s text:c="6"/>GROUND <text:s text:c="3"/>COACHES </text:p>
      <text:p text:style-name="P61"><text:s text:c="13"/><text:span text:style-name="T65">1418</text:span> <text:span text:style-name="T65">2504</text:span> <text:span text:style-name="T65">2524</text:span></text:p>
      <text:p text:style-name="P67"/>
      <text:p text:style-name="P217"><text:s text:c="9"/>DIESELS NG</text:p>
      <text:p text:style-name="P169"><text:s text:c="5"/>6298 1698 <text:span text:style-name="T65">001</text:span></text:p>
      <text:p text:style-name="P268"><text:s/></text:p>
      <text:p text:style-name="P168">STEAM NG</text:p>
      <text:p text:style-name="P168"><text:s text:c="2"/>RENDYFFY 44231 40773 <text:s text:c="2"/><text:span text:style-name="T65">REDSTONE</text:span> <text:s text:c="3"/><text:span text:style-name="T65">15511</text:span></text:p>
      <text:p text:style-name="P61"><text:span text:style-name="T92"><text:s text:c="9"/></text:span><text:span text:style-name="T117"><text:s/>61269 <text:s text:c="6"/>SYBIL</text:span> </text:p>
      <text:p text:style-name="P168"><text:s text:c="11"/></text:p>
      <text:p text:style-name="P168"><text:s text:c="4"/><text:span text:style-name="T116">BRENTNOR</text:span></text:p>
      <text:p text:style-name="P250"><text:s text:c="2"/>COACH</text:p>
      <text:p text:style-name="P176"><text:s text:c="12"/><text:span text:style-name="T65">31361</text:span></text:p>
      <text:p text:style-name="P69"><text:s text:c="8"/><text:span text:style-name="T72"><text:s text:c="3"/></text:span></text:p>
      <text:p text:style-name="P148"><text:s text:c="5"/><text:span text:style-name="T117"><text:s text:c="2"/>BRESSINGHM RAILWAY</text:span></text:p>
      <text:p text:style-name="P61"><text:s text:c="11"/>GROUND <text:s text:c="4"/>COACH <text:s/></text:p>
      <text:p text:style-name="P217"><text:s text:c="14"/><text:span text:style-name="T65">379*</text:span></text:p>
      <text:p text:style-name="P61"><text:s text:c="15"/></text:p>
      <text:p text:style-name="P61"><text:s text:c="9"/><text:span text:style-name="T65">9520* </text:span><text:s text:c="3"/><text:span text:style-name="T65">12220** </text:span><text:s text:c="2"/><text:span text:style-name="T65">396</text:span> <text:s/><text:span text:style-name="T65">2901</text:span></text:p>
      <text:p text:style-name="P67"/>
      <text:p text:style-name="P61"><text:s text:c="9"/>GROUND <text:s text:c="4"/>WAGON </text:p>
      <text:p text:style-name="P70"><text:s text:c="14"/>509145 </text:p>
      <text:p text:style-name="P61"><text:s text:c="12"/></text:p>
      <text:p text:style-name="P225"><text:s text:c="9"/>732294</text:p>
      <text:p text:style-name="P225"><text:s text:c="2"/>DIESELS </text:p>
      <text:p text:style-name="P70"><text:s text:c="13"/><text:span text:style-name="T65">TOBY*</text:span> <text:s/><text:span text:style-name="T65">497753*</text:span> <text:s/><text:span text:style-name="T65">11104</text:span> <text:s/>IVOR <text:s/>9155 <text:s/>D6353 <text:span text:style-name="T65">8911*</text:span> <text:s text:c="3"/></text:p>
      <text:p text:style-name="P46"><text:s text:c="9"/><text:span text:style-name="T56"><text:s/></text:span><text:span text:style-name="T14"><text:s text:c="4"/></text:span></text:p>
      <text:p text:style-name="P61"><text:s/></text:p>
      <text:p text:style-name="P217"><text:s text:c="6"/>STEAMS IN MUSEUM</text:p>
      <text:p text:style-name="P250"><text:s text:c="3"/>1249 <text:s/>87 <text:s/>6841</text:p>
      <text:p text:style-name="P111"><text:s text:c="14"/><text:span text:style-name="T65">1662*</text:span> <text:s/><text:span text:style-name="T65"><text:s/>1144*</text:span> <text:s text:c="2"/><text:span text:style-name="T65">316</text:span> <text:s text:c="2"/>1164 <text:s/>4216 <text:s/>406 <text:s/>662 <text:s/>3367 <text:s/>836 </text:p>
      <text:p text:style-name="P111"><text:s text:c="12"/><text:span text:style-name="T65">2*</text:span> <text:s text:c="2"/>3193 <text:s/>1472 <text:s/>571 <text:span text:style-name="T65">994</text:span> 1662 1663 311 (FEMILEE)</text:p>
      <text:p text:style-name="P148"><text:span text:style-name="T117"><text:s text:c="12"/>(ALAN BLOOM) <text:s text:c="2"/></text:span><text:s text:c="6"/></text:p>
      <text:p text:style-name="P221"/>
      <text:p text:style-name="P175"><text:s text:c="4"/><text:span text:style-name="T116">BRIDGE OF DEE</text:span></text:p>
      <text:p text:style-name="P238"><text:s text:c="5"/>COACH</text:p>
      <text:p text:style-name="P221"><text:span text:style-name="T72"><text:s text:c="6"/></text:span>35109*</text:p>
      <text:p text:style-name="P172"/>
      <text:p text:style-name="P168"><text:s text:c="3"/>BRIDPORT</text:p>
      <text:p text:style-name="P262"><text:s text:c="3"/>COACHES </text:p>
      <text:p text:style-name="P61"><text:s text:c="13"/>(2370 <text:s/>DW309) 25646 <text:s text:c="2"/></text:p>
      <text:p text:style-name="P49"><text:s text:c="10"/></text:p>
      <text:p text:style-name="P61"><text:s text:c="13"/>BRIGHTINGSEA BOAT YARD <text:s text:c="2"/></text:p>
      <text:p text:style-name="P111"><text:s text:c="13"/>GROUND <text:s text:c="5"/>WAGONS </text:p>
      <text:p text:style-name="P70"><text:s text:c="13"/>786011 19XX 37221 <text:s text:c="2"/></text:p>
      <text:p text:style-name="P61"><text:s text:c="11"/></text:p>
      <text:p text:style-name="P220"><text:s text:c="6"/><text:span text:style-name="T120">BROADWAY</text:span></text:p>
      <text:p text:style-name="P262"><text:s text:c="3"/>WAGON </text:p>
      <text:p text:style-name="P70"><text:span text:style-name="T54"><text:s text:c="11"/></text:span><text:s/><text:span text:style-name="T65">15269</text:span></text:p>
      <text:p text:style-name="P46"><text:span text:style-name="T5"><text:s text:c="15"/></text:span><text:span text:style-name="T14"><text:s/></text:span></text:p>
      <text:p text:style-name="P145"><text:s text:c="3"/><text:span text:style-name="T5"><text:s text:c="5"/></text:span><text:span text:style-name="T11"><text:s/>BROMYARD </text:span></text:p>
      <text:p text:style-name="P262"><text:s text:c="4"/>WAGON </text:p>
      <text:p text:style-name="P61"><text:span text:style-name="T49"><text:s text:c="14"/></text:span><text:span text:style-name="T117">785528</text:span></text:p>
      <text:p text:style-name="P61"><text:s text:c="13"/></text:p>
      <text:p text:style-name="P91"><text:span text:style-name="T20"><text:s text:c="11"/></text:span><text:span text:style-name="T45"><text:s text:c="2"/></text:span><text:span text:style-name="T20"><text:s text:c="5"/>DIESELS </text:span></text:p>
      <text:p text:style-name="P106"><text:s text:c="15"/>437367 <text:s/>444200 229655 229648 198241 195849 </text:p>
      <text:p text:style-name="P106"><text:s text:c="15"/>187101 20082 <text:span text:style-name="T5">3406 102GO38 9382 6031 9676</text:span></text:p>
      <text:p text:style-name="P70"><text:s text:c="17"/>9677 </text:p>
      <text:p text:style-name="P217"/>
      <text:p text:style-name="P61"><text:s text:c="14"/><text:span text:style-name="T117"><text:s/>STEAM</text:span></text:p>
      <text:p text:style-name="P156"><text:s text:c="17"/>1327</text:p>
      <text:p text:style-name="P49"><text:s text:c="6"/></text:p>
      <text:p text:style-name="P61"><text:s text:c="11"/><text:span text:style-name="T117">WICKHAM</text:span></text:p>
      <text:p text:style-name="P70"><text:s text:c="14"/>3034 </text:p>
      <text:p text:style-name="P61"><text:s text:c="7"/></text:p>
      <text:p text:style-name="P70"><text:s text:c="15"/>BRYMBO</text:p>
      <text:p text:style-name="P68"><text:s text:c="12"/>WAGONS</text:p>
      <text:p text:style-name="P217"><text:span text:style-name="T117"><text:s text:c="12"/>18 <text:s text:c="2"/>X09 <text:s text:c="2"/>13 <text:s text:c="2"/>2 </text:span><text:s/></text:p>
      <text:p text:style-name="P217"><text:s text:c="3"/></text:p>
      <text:p text:style-name="P217"><text:s/>STEAM <text:s/>NG</text:p>
      <text:p text:style-name="P70"><text:s text:c="10"/>IORWERTH</text:p>
      <text:p text:style-name="P61"><text:s text:c="10"/></text:p>
      <text:p text:style-name="P145"><text:span text:style-name="T5"><text:s text:c="3"/></text:span><text:s text:c="2"/><text:span text:style-name="T5"><text:s/>DIESELS <text:s/>NG</text:span></text:p>
      <text:p text:style-name="P74"><text:s text:c="15"/>7190 2022 8937 476106 ( 8 1926)</text:p>
      <text:p text:style-name="P70"><text:s text:c="17"/></text:p>
      <text:p text:style-name="P46"><text:s text:c="11"/><text:span text:style-name="T10">BRYN </text:span></text:p>
      <text:p text:style-name="P156"><text:s text:c="4"/>WAGON </text:p>
      <text:p text:style-name="P61"><text:s text:c="13"/>88XXXX </text:p>
      <text:p text:style-name="P232"/>
      <text:p text:style-name="P220"><text:s text:c="4"/><text:span text:style-name="T117"><text:s text:c="2"/>BUCKLEY </text:span></text:p>
      <text:p text:style-name="P46"><text:s text:c="15"/>WAGON</text:p>
      <text:p text:style-name="P228"><text:s text:c="9"/>88XXXX</text:p>
      <text:p text:style-name="P61"><text:s text:c="9"/></text:p>
      <text:p text:style-name="P70"><text:s text:c="13"/>BURBAGE 214 HIGT SH SN8 3AR</text:p>
      <text:p text:style-name="P111"><text:s text:c="13"/>COACH</text:p>
      <text:p text:style-name="P61"><text:s text:c="15"/>13088</text:p>
      <text:p text:style-name="P61"/>
      <text:p text:style-name="P61"><text:s text:c="10"/>GROUND COACH</text:p>
      <text:p text:style-name="P61"><text:s text:c="11"/>92008 </text:p>
      <text:p text:style-name="P61"><text:s text:c="4"/></text:p>
      <text:p text:style-name="P217"><text:s text:c="4"/>BURNHAM M</text:p>
      <text:p text:style-name="P61"><text:s text:c="15"/>COACH</text:p>
      <text:p text:style-name="P61"><text:s text:c="15"/>1600</text:p>
      <text:p text:style-name="P61"/>
      <text:p text:style-name="P94"><text:s text:c="12"/><text:span text:style-name="T34">BURTON ON TR</text:span></text:p>
      <text:p text:style-name="P111"><text:s text:c="12"/>COACH</text:p>
      <text:p text:style-name="P61"><text:span text:style-name="T117"><text:s text:c="13"/></text:span><text:span text:style-name="T118">GER <text:s/></text:span></text:p>
      <text:p text:style-name="P110"/>
      <text:p text:style-name="P111"><text:s text:c="7"/>DIESELS</text:p>
      <text:p text:style-name="P234"><text:span text:style-name="T63"><text:s text:c="12"/></text:span><text:span text:style-name="T119"><text:s text:c="2"/></text:span><text:span text:style-name="T118">5907</text:span><text:span text:style-name="T119"> <text:s/></text:span><text:span text:style-name="T118">20</text:span><text:span text:style-name="T119"> </text:span></text:p>
      <text:p text:style-name="P67"/>
      <text:p text:style-name="P156"><text:s text:c="4"/>BURE RAILWAY</text:p>
      <text:p text:style-name="P225"><text:s text:c="11"/>DIESELS</text:p>
      <text:p text:style-name="P119"><text:span text:style-name="T72"><text:s text:c="15"/></text:span>(1989 3)<text:span text:style-name="T72"> </text:span>(4556* 4)<text:span text:style-name="T72"> </text:span>(51989 5)<text:span text:style-name="T72"> <text:s/>PW1 PW7 </text:span>3</text:p>
      <text:p text:style-name="P217"><text:s text:c="11"/><text:span text:style-name="T117"><text:s/>STEAMS</text:span></text:p>
      <text:p text:style-name="P217"><text:s text:c="14"/>1 <text:s/>6 <text:s/><text:span text:style-name="T65">7*</text:span> <text:s/><text:span text:style-name="T65">8*</text:span> <text:s/>9 <text:s text:c="2"/></text:p>
      <text:p text:style-name="P61"><text:s text:c="5"/></text:p>
      <text:p text:style-name="P201"><text:s text:c="5"/><text:span text:style-name="T5">CASTLE ASHBY</text:span></text:p>
      <text:p text:style-name="P61"><text:s text:c="14"/>COACHES</text:p>
      <text:p text:style-name="P70"><text:s text:c="14"/>18358 31926 <text:s text:c="4"/></text:p>
      <text:p text:style-name="P61"><text:s text:c="10"/><text:span text:style-name="T117"><text:s text:c="2"/></text:span></text:p>
      <text:p text:style-name="P168"/>
      <text:p text:style-name="P168"><text:s text:c="8"/><text:span text:style-name="T117">CREAGAN OLD STATION</text:span></text:p>
      <text:p text:style-name="P156"><text:span text:style-name="T85"><text:s text:c="14"/></text:span>1009 </text:p>
      <text:p text:style-name="P94"><text:s text:c="8"/></text:p>
      <text:p text:style-name="P61"><text:s text:c="16"/><text:span text:style-name="T117">CHATHAM</text:span></text:p>
      <text:p text:style-name="P61"><text:s text:c="14"/>COACH</text:p>
      <text:p text:style-name="P70"><text:s text:c="15"/>003020 <text:s/></text:p>
      <text:p text:style-name="P217"><text:s/></text:p>
      <text:p text:style-name="P168"><text:s text:c="2"/>GROUND <text:s text:c="4"/>WAGON</text:p>
      <text:p text:style-name="P175"><text:s text:c="12"/>GREY <text:s text:c="11"/></text:p>
      <text:p text:style-name="P217"/>
      <text:p text:style-name="P175">655 22081 8324 (GN SNS0173) (4PL OPED)</text:p>
      <text:p text:style-name="P49"><text:s text:c="14"/>(10T VAN) (SNSO510) 611 NS01 NSO2</text:p>
      <text:p text:style-name="P61"><text:s text:c="13"/>SNSO611 607 608 566 140</text:p>
      <text:p text:style-name="P70"><text:s text:c="15"/></text:p>
      <text:p text:style-name="P217"><text:s/><text:span text:style-name="T117"><text:s text:c="5"/>DIESELS</text:span></text:p>
      <text:p text:style-name="P128"><text:s text:c="14"/><text:span text:style-name="T5">WD42 <text:s/>7816 3738</text:span></text:p>
      <text:p text:style-name="P217"><text:s text:c="10"/></text:p>
      <text:p text:style-name="P168"><text:s text:c="2"/>STEAMS</text:p>
      <text:p text:style-name="P225"><text:s text:c="11"/>7042 2220 1903</text:p>
      <text:p text:style-name="P148"><text:s text:c="2"/><text:span text:style-name="T85"><text:s text:c="2"/></text:span><text:s text:c="2"/></text:p>
      <text:p text:style-name="P217"><text:s/><text:span text:style-name="T117"><text:s text:c="2"/>CRANES</text:span></text:p>
      <text:p text:style-name="P175"><text:s text:c="13"/>(2528 <text:s/>482) <text:s/>(2641 558) (2547 17) (2675 582</text:p>
      <text:p text:style-name="P175"/>
      <text:p text:style-name="P61"><text:s text:c="15"/><text:span text:style-name="T116"><text:s/>CHEDDAR </text:span></text:p>
      <text:p text:style-name="P217"><text:s text:c="4"/>COACH <text:s/></text:p>
      <text:p text:style-name="P70"><text:span text:style-name="T85"><text:s text:c="12"/></text:span><text:span text:style-name="T65"><text:s/>15961</text:span></text:p>
      <text:p text:style-name="P168"><text:s/></text:p>
      <text:p text:style-name="P175">Ground Wagons </text:p>
      <text:p text:style-name="P70"><text:s text:c="17"/>29XXXX <text:s/>- <text:s/>852506</text:p>
      <text:p text:style-name="P267"><text:s text:c="2"/><text:span text:style-name="T73"><text:s text:c="2"/></text:span><text:span text:style-name="T15"><text:s text:c="4"/></text:span><text:span text:style-name="T20">CHERTON</text:span></text:p>
      <text:p text:style-name="P225"><text:s/>COACH</text:p>
      <text:p text:style-name="P267"><text:span text:style-name="T20"><text:s text:c="11"/>5541</text:span><text:span text:style-name="T15"> <text:s text:c="4"/></text:span></text:p>
      <text:p text:style-name="P225"/>
      <text:p text:style-name="P225"><text:s/><text:span text:style-name="T116">CHINA CLAY </text:span></text:p>
      <text:p text:style-name="P61"><text:s text:c="16"/>WAGONS</text:p>
      <text:p text:style-name="P148"><text:span text:style-name="T117"><text:s text:c="14"/></text:span><text:span text:style-name="T118"><text:s/>123266</text:span><text:span text:style-name="T117"> <text:s text:c="3"/></text:span><text:span text:style-name="T118">143645 </text:span><text:span text:style-name="T117"><text:s text:c="2"/></text:span><text:span text:style-name="T118"><text:s/>743000</text:span> <text:s text:c="2"/></text:p>
      <text:p text:style-name="P168"><text:s text:c="4"/></text:p>
      <text:p text:style-name="P217"><text:s/><text:span text:style-name="T117"><text:s text:c="3"/>STEAM</text:span></text:p>
      <text:p text:style-name="P111"><text:s text:c="13"/><text:span text:style-name="T65">783</text:span></text:p>
      <text:p text:style-name="P221"/>
      <text:p text:style-name="P265"><text:s/><text:span text:style-name="T15">DIESEL</text:span></text:p>
      <text:p text:style-name="P217"><text:span text:style-name="T92"><text:s text:c="8"/></text:span><text:span text:style-name="T117"><text:s text:c="3"/></text:span><text:span text:style-name="T118">244558</text:span></text:p>
      <text:p text:style-name="P111"><text:span text:style-name="T85"><text:s text:c="10"/></text:span><text:s text:c="2"/></text:p>
      <text:p text:style-name="P217"><text:s text:c="3"/>CRANES </text:p>
      <text:p text:style-name="P61"><text:s text:c="11"/><text:span text:style-name="T65">GWR <text:s/>PO</text:span> <text:s/><text:span text:style-name="T65">( RED BLACK)</text:span></text:p>
      <text:p text:style-name="P133"><text:s text:c="8"/></text:p>
      <text:p text:style-name="P70"><text:s text:c="11"/>CHOPWELL WOOD</text:p>
      <text:p text:style-name="P262"><text:s text:c="4"/>WAGONS </text:p>
      <text:p text:style-name="P225"><text:s text:c="8"/>274006 428991</text:p>
      <text:p text:style-name="P217"><text:s text:c="3"/></text:p>
      <text:p text:style-name="P61"><text:s text:c="11"/>CLACTON</text:p>
      <text:p text:style-name="P49"><text:s text:c="13"/>GROUND <text:s text:c="2"/>COACH </text:p>
      <text:p text:style-name="P62"><text:span text:style-name="T85"><text:s text:c="12"/></text:span><text:s text:c="2"/>GER</text:p>
      <text:p text:style-name="P168"/>
      <text:p text:style-name="P217"><text:s text:c="6"/>CLAYMILLS </text:p>
      <text:p text:style-name="P250"><text:s text:c="8"/>WAGON </text:p>
      <text:p text:style-name="P226"><text:s text:c="13"/>(52 <text:s/>SPALDING)</text:p>
      <text:p text:style-name="P217"><text:s text:c="5"/>CLEARWELL MINING MUSEUM</text:p>
      <text:p text:style-name="P262"><text:s text:c="4"/>WAGON </text:p>
      <text:p text:style-name="P89"><text:span text:style-name="T40"><text:s text:c="14"/></text:span><text:span text:style-name="T5">7XXXX GREEN</text:span></text:p>
      <text:p text:style-name="P46"><text:s text:c="11"/><text:span text:style-name="T10"><text:s/></text:span></text:p>
      <text:p text:style-name="P70"/>
      <text:p text:style-name="P61"><text:s text:c="7"/><text:span text:style-name="T117"><text:s text:c="2"/>DIESELS</text:span></text:p>
      <text:p text:style-name="P61"><text:s text:c="12"/>DM739 7964 DM801 DM841 DM924 7446 DM1435 8985 <text:s text:c="2"/></text:p>
      <text:p text:style-name="P70"><text:s text:c="11"/>DM1442 </text:p>
      <text:p text:style-name="P61"><text:s text:c="13"/></text:p>
      <text:p text:style-name="P61"><text:s text:c="11"/></text:p>
      <text:p text:style-name="P61"><text:s text:c="10"/><text:span text:style-name="T116">CLOUGHTON</text:span></text:p>
      <text:p text:style-name="P61"><text:s text:c="13"/><text:span text:style-name="T65">99315</text:span></text:p>
      <text:p text:style-name="P67"/>
      <text:p text:style-name="P70"><text:s text:c="14"/><text:span text:style-name="T116">COALPORT</text:span></text:p>
      <text:p text:style-name="P219"><text:s text:c="7"/>COACHES</text:p>
      <text:p text:style-name="P61"><text:span text:style-name="T117"><text:s text:c="12"/></text:span><text:span text:style-name="T118">25778</text:span><text:span text:style-name="T117"> <text:s text:c="4"/></text:span><text:span text:style-name="T118">26014</text:span><text:span text:style-name="T117"> <text:s text:c="5"/></text:span></text:p>
      <text:p text:style-name="P61"/>
      <text:p text:style-name="P217"><text:s/><text:span text:style-name="T117"><text:s text:c="3"/>Ground Wagons</text:span></text:p>
      <text:p text:style-name="P61"><text:span text:style-name="T117"><text:s text:c="17"/></text:span><text:span text:style-name="T118">779420</text:span><text:span text:style-name="T117"> <text:s text:c="2"/></text:span><text:span text:style-name="T118">85XXXX </text:span></text:p>
      <text:p text:style-name="P217"><text:s text:c="5"/></text:p>
      <text:p text:style-name="P223">CONSETT</text:p>
      <text:p text:style-name="P262"><text:s text:c="4"/>WAGON </text:p>
      <text:p text:style-name="P61"><text:s text:c="11"/><text:span text:style-name="T65"><text:s text:c="2"/>400**</text:span> </text:p>
      <text:p text:style-name="P217"><text:span text:style-name="T40"><text:s/></text:span><text:s/><text:span text:style-name="T117"><text:s text:c="2"/></text:span></text:p>
      <text:p text:style-name="P115"><text:s text:c="11"/>COLEFORD</text:p>
      <text:p text:style-name="P217"><text:s text:c="17"/>COACH</text:p>
      <text:p text:style-name="P61"><text:s text:c="7"/><text:span text:style-name="T117"><text:s text:c="3"/>Chocoalte Cream</text:span></text:p>
      <text:p text:style-name="P61"><text:s text:c="9"/></text:p>
      <text:p text:style-name="P61"><text:s text:c="7"/>WAGON GROUND</text:p>
      <text:p text:style-name="P61"><text:s text:c="16"/><text:span text:style-name="T65">7XXXXX</text:span></text:p>
      <text:p text:style-name="P61"><text:s text:c="13"/></text:p>
      <text:p text:style-name="P262"><text:s text:c="3"/><text:span text:style-name="T17"><text:s text:c="4"/>35959 2487</text:span></text:p>
      <text:p text:style-name="P61"><text:s text:c="2"/></text:p>
      <text:p text:style-name="P61"><text:s text:c="10"/>STEAM</text:p>
      <text:p text:style-name="P61"><text:span text:style-name="T117"><text:s text:c="9"/>1893 <text:s text:c="9"/></text:span><text:s text:c="4"/><text:span text:style-name="T117"><text:s/></text:span></text:p>
      <text:p text:style-name="P61"/>
      <text:p text:style-name="P61"><text:s text:c="11"/>STEAMS</text:p>
      <text:p text:style-name="P219"><text:s/>4850 45110 <text:s/>(MAUD NG) <text:s/>(VICTOR NG) <text:s text:c="7"/></text:p>
      <text:p text:style-name="P46"><text:s text:c="9"/></text:p>
      <text:p text:style-name="P217"><text:s text:c="4"/><text:span text:style-name="T117"><text:s text:c="4"/>COLNEY HEATH</text:span></text:p>
      <text:p text:style-name="P168"><text:s text:c="8"/>COACH</text:p>
      <text:p text:style-name="P225"><text:s text:c="14"/>70719 <text:s text:c="2"/></text:p>
      <text:p text:style-name="P225"/>
      <text:p text:style-name="P217"><text:s text:c="5"/>CONWAY VALLEY RAILWAY</text:p>
      <text:p text:style-name="P262"><text:s text:c="4"/>COACHES </text:p>
      <text:p text:style-name="P225"><text:s text:c="5"/><text:span text:style-name="T65">1070</text:span> <text:span text:style-name="T65">1370</text:span> <text:span text:style-name="T65">33016</text:span> <text:span text:style-name="T65">3925</text:span> <text:span text:style-name="T65">32</text:span> <text:span text:style-name="T65">407</text:span> </text:p>
      <text:p text:style-name="P61"><text:s text:c="8"/></text:p>
      <text:p text:style-name="P70"><text:s text:c="15"/>WAGON</text:p>
      <text:p text:style-name="P225"><text:s text:c="9"/><text:span text:style-name="T65">56096</text:span> <text:s text:c="6"/></text:p>
      <text:p text:style-name="P148"/>
      <text:p text:style-name="P225"><text:s text:c="2"/>DIESELS NG</text:p>
      <text:p text:style-name="P61"><text:s text:c="11"/>GWYDIR CASTLE 6641 <text:s text:c="8"/></text:p>
      <text:p text:style-name="P252"><text:span text:style-name="T72"><text:s/></text:span><text:span text:style-name="T14"><text:s text:c="4"/></text:span></text:p>
      <text:p text:style-name="P188"><text:span text:style-name="T17"><text:s text:c="5"/></text:span><text:span text:style-name="T19"><text:s/>STEAM M NG</text:span></text:p>
      <text:p text:style-name="P231"><text:span text:style-name="T72"><text:s text:c="4"/></text:span><text:s/>70000<text:span text:style-name="T72"> <text:s text:c="4"/>GEIRONYDD </text:span></text:p>
      <text:p text:style-name="P61"><text:s text:c="11"/></text:p>
      <text:p text:style-name="P217"><text:s text:c="2"/><text:span text:style-name="T117"><text:s/>CRICH</text:span></text:p>
      <text:p text:style-name="P70"><text:s text:c="10"/>TROILLEY</text:p>
      <text:p text:style-name="P70"><text:s text:c="11"/><text:span text:style-name="T65">061</text:span> </text:p>
      <text:p text:style-name="P70"/>
      <text:p text:style-name="P225"><text:s text:c="3"/>DIESELS</text:p>
      <text:p text:style-name="P217"><text:s text:c="12"/>5 <text:s/>717 <text:s/>223741 326058 3492 373363 </text:p>
      <text:p text:style-name="P217"><text:s/></text:p>
      <text:p text:style-name="P175"><text:s text:c="6"/>STEAMS</text:p>
      <text:p text:style-name="P70"><text:s text:c="11"/>46 47 <text:s text:c="4"/></text:p>
      <text:p text:style-name="P115"><text:s text:c="10"/></text:p>
      <text:p text:style-name="P61"><text:s text:c="15"/>ROAD RAILER</text:p>
      <text:p text:style-name="P70"><text:s text:c="17"/><text:span text:style-name="T65">058 </text:span></text:p>
      <text:p text:style-name="P73"/>
      <text:p text:style-name="P49"><text:s text:c="7"/><text:span text:style-name="T11"><text:s text:c="3"/>CROFTON</text:span></text:p>
      <text:p text:style-name="P262"><text:s text:c="3"/>WAGONS</text:p>
      <text:p text:style-name="P61"><text:s text:c="12"/><text:span text:style-name="T65">89XXXX</text:span> <text:s text:c="2"/><text:span text:style-name="T65">16838</text:span></text:p>
      <text:p text:style-name="P70"><text:s text:c="5"/></text:p>
      <text:p text:style-name="P175"/>
      <text:p text:style-name="P46"><text:s text:c="7"/><text:span text:style-name="T14"><text:s text:c="2"/>CROMDALE</text:span></text:p>
      <text:p text:style-name="P250"><text:s text:c="3"/>Ground Coaches</text:p>
      <text:p text:style-name="P135"><text:s text:c="11"/>GNSR 27 <text:s/>(6W FRIST) </text:p>
      <text:p text:style-name="P135"/>
      <text:p text:style-name="P61"><text:s text:c="12"/><text:span text:style-name="T117">DALTON</text:span></text:p>
      <text:p text:style-name="P262"><text:s text:c="4"/><text:span text:style-name="T17"><text:s/>WAGON GROUND</text:span></text:p>
      <text:p text:style-name="P70"><text:s text:c="12"/>2T 4W </text:p>
      <text:p text:style-name="P217"><text:s text:c="3"/></text:p>
      <text:p text:style-name="P158">DAWLLSH WARREN</text:p>
      <text:p text:style-name="P217"><text:s text:c="8"/>COACHES</text:p>
      <text:p text:style-name="P168"><text:s text:c="9"/><text:span text:style-name="T65">1015</text:span> <text:span text:style-name="T65">1927</text:span> <text:span text:style-name="T65">1930</text:span> <text:span text:style-name="T65">1931</text:span> <text:span text:style-name="T65">1934</text:span> <text:span text:style-name="T65">1951 1991</text:span> <text:span text:style-name="T65">45046</text:span> <text:s/></text:p>
      <text:p text:style-name="P217"><text:s text:c="4"/></text:p>
      <text:p text:style-name="P225"><text:s text:c="3"/>DC ENGINERINGS</text:p>
      <text:p text:style-name="P61"><text:s text:c="16"/>COACHES</text:p>
      <text:p text:style-name="P70"><text:s text:c="20"/>21240 <text:s text:c="8"/></text:p>
      <text:p text:style-name="P168"><text:s text:c="3"/></text:p>
      <text:p text:style-name="P175">WICKHAM</text:p>
      <text:p text:style-name="P70"><text:s text:c="15"/>68003</text:p>
      <text:p text:style-name="P73"/>
      <text:p text:style-name="P225"><text:s text:c="5"/>DEVON RAILWAY C</text:p>
      <text:p text:style-name="P111"><text:s text:c="10"/>COACHES</text:p>
      <text:p text:style-name="P46"><text:s text:c="9"/><text:span text:style-name="T14">(92194 81606) (92948 81218) (92935 81150) 80742 </text:span></text:p>
      <text:p text:style-name="P70"><text:s text:c="9"/>4602 <text:s text:c="2"/>4493</text:p>
      <text:p text:style-name="P61"><text:s text:c="8"/></text:p>
      <text:p text:style-name="P70"><text:s text:c="11"/>DIESELS</text:p>
      <text:p text:style-name="P61"><text:s text:c="11"/>7357 418770 405273 20058 217967 34025 8877 2201 1300</text:p>
      <text:p text:style-name="P61"/>
      <text:p text:style-name="P70"><text:s text:c="9"/>STEAM</text:p>
      <text:p text:style-name="P61"><text:s text:c="11"/>5744</text:p>
      <text:p text:style-name="P61"><text:s text:c="10"/></text:p>
      <text:p text:style-name="P217"><text:s text:c="5"/>DOLDOWLOD </text:p>
      <text:p text:style-name="P217"><text:s text:c="6"/>COACHES</text:p>
      <text:p text:style-name="P70"><text:s text:c="16"/>2447 4268</text:p>
      <text:p text:style-name="P70"><text:s/></text:p>
      <text:p text:style-name="P70"><text:s text:c="12"/>GROUND WAGON </text:p>
      <text:p text:style-name="P70"><text:s text:c="10"/>7XXXXX </text:p>
      <text:p text:style-name="P61"><text:s text:c="3"/></text:p>
      <text:p text:style-name="P225"><text:s text:c="3"/>732418</text:p>
      <text:p text:style-name="P133"><text:s text:c="8"/></text:p>
      <text:p text:style-name="P61"><text:s text:c="12"/><text:span text:style-name="T117"><text:s text:c="3"/>DOLGARROG RAILWAY</text:span></text:p>
      <text:p text:style-name="P217"><text:s text:c="7"/>WAGONS</text:p>
      <text:p text:style-name="P225"><text:s text:c="13"/>740928 953411 770804</text:p>
      <text:p text:style-name="P61"/>
      <text:p text:style-name="P61"><text:s text:c="9"/><text:span text:style-name="T117"><text:s text:c="4"/>DIESEL</text:span></text:p>
      <text:p text:style-name="P70"><text:s text:c="15"/>D139 </text:p>
      <text:p text:style-name="P70"/>
      <text:p text:style-name="P66"><text:s text:c="11"/>TROLLEYS</text:p>
      <text:p text:style-name="P70"><text:s text:c="14"/>XXXX XXXX</text:p>
      <text:p text:style-name="P70"/>
      <text:p text:style-name="P46"><text:s text:c="10"/><text:span text:style-name="T14"><text:s text:c="9"/></text:span><text:span text:style-name="T34"><text:s/>DUNDEE</text:span></text:p>
      <text:p text:style-name="P262"><text:s text:c="5"/>COACH</text:p>
      <text:p text:style-name="P61"><text:span text:style-name="T117"><text:s text:c="17"/></text:span><text:span text:style-name="T118">97*</text:span></text:p>
      <text:p text:style-name="P66"><text:s text:c="11"/></text:p>
      <text:p text:style-name="P217"><text:s text:c="2"/><text:span text:style-name="T117"><text:s text:c="2"/>EASTBOURNE M </text:span></text:p>
      <text:p text:style-name="P265"><text:s text:c="4"/>WAGON GROUND</text:p>
      <text:p text:style-name="P70"><text:s text:c="12"/>7XXXXX</text:p>
      <text:p text:style-name="P46"><text:s text:c="5"/></text:p>
      <text:p text:style-name="P217"><text:s text:c="4"/><text:span text:style-name="T116">EASTSIDE</text:span></text:p>
      <text:p text:style-name="P262"><text:s text:c="4"/>WAGON</text:p>
      <text:p text:style-name="P67"><text:span text:style-name="T72"><text:s text:c="12"/></text:span>102999</text:p>
      <text:p text:style-name="P217"><text:s text:c="2"/></text:p>
      <text:p text:style-name="P111"><text:s text:c="11"/>DIESEL</text:p>
      <text:p text:style-name="P61"><text:s text:c="15"/><text:span text:style-name="T65">70044</text:span></text:p>
      <text:p text:style-name="P67"/>
      <text:p text:style-name="P70"><text:s text:c="15"/>EAST TISTED</text:p>
      <text:p text:style-name="P115"><text:s text:c="19"/>16187</text:p>
      <text:p text:style-name="P70"><text:s text:c="15"/></text:p>
      <text:p text:style-name="P49"><text:s text:c="5"/></text:p>
      <text:p text:style-name="P217"><text:s/><text:span text:style-name="T117"><text:s text:c="3"/></text:span><text:span text:style-name="T62"><text:s/></text:span><text:span text:style-name="T117"><text:s text:c="3"/>EAST WRESSLE </text:span></text:p>
      <text:p text:style-name="P217"><text:s text:c="15"/>WAGON</text:p>
      <text:p text:style-name="P111"><text:s text:c="17"/>539249</text:p>
      <text:p text:style-name="P111"/>
      <text:p text:style-name="P111"><text:s text:c="11"/>BARE WOOD</text:p>
      <text:p text:style-name="P111"><text:s text:c="13"/>DIESEL</text:p>
      <text:p text:style-name="P61"><text:s text:c="12"/>371971 <text:s/></text:p>
      <text:p text:style-name="P225"><text:s text:c="11"/></text:p>
      <text:p text:style-name="P70"><text:s text:c="16"/>WICKHAM</text:p>
      <text:p text:style-name="P70"><text:s text:c="13"/>7516 <text:s/></text:p>
      <text:p text:style-name="P217"/>
      <text:p text:style-name="P61"><text:s text:c="11"/>TROLLEY</text:p>
      <text:p text:style-name="P70"><text:s text:c="12"/>XXXX</text:p>
      <text:p text:style-name="P217"/>
      <text:p text:style-name="P90"><text:span text:style-name="T17"><text:s text:c="10"/></text:span><text:span text:style-name="T19"><text:s text:c="2"/></text:span><text:span text:style-name="T21">EBBERSTON </text:span></text:p>
      <text:p text:style-name="P104"><text:s text:c="12"/>COACHES</text:p>
      <text:p text:style-name="P61"><text:s text:c="14"/><text:span text:style-name="T65">13462</text:span> <text:span text:style-name="T65">13467</text:span> <text:span text:style-name="T65">13482</text:span> <text:span text:style-name="T65">SR1156</text:span> <text:s text:c="2"/></text:p>
      <text:p text:style-name="P221"/>
      <text:p text:style-name="P61"><text:s text:c="13"/>WAGON</text:p>
      <text:p text:style-name="P217"><text:span text:style-name="T62"><text:s text:c="5"/></text:span><text:span text:style-name="T118">951175</text:span></text:p>
      <text:p text:style-name="P70"><text:s text:c="13"/></text:p>
      <text:p text:style-name="P221"><text:span text:style-name="T72"><text:s text:c="2"/></text:span><text:span text:style-name="T116">EGLOSHERRY</text:span></text:p>
      <text:p text:style-name="P49"><text:s text:c="14"/>COACH</text:p>
      <text:p text:style-name="P111"><text:s text:c="13"/><text:span text:style-name="T65">(975568 1626)</text:span></text:p>
      <text:p text:style-name="P111"><text:s text:c="9"/></text:p>
      <text:p text:style-name="P217"><text:s/>ELEMORE</text:p>
      <text:p text:style-name="P104"><text:s text:c="14"/>WAGON </text:p>
      <text:p text:style-name="P61"><text:s text:c="13"/>233 </text:p>
      <text:p text:style-name="P164"><text:span text:style-name="T17"><text:s text:c="4"/></text:span><text:span text:style-name="T19"><text:s/></text:span></text:p>
      <text:p text:style-name="P61"><text:s text:c="11"/>ELHAM VALLEY LINE</text:p>
      <text:p text:style-name="P49"><text:s text:c="15"/>WAGONS</text:p>
      <text:p text:style-name="P61"><text:s text:c="14"/>4 PLANK OPED <text:s/>FLAT WOOD FRAME</text:p>
      <text:p text:style-name="P61"><text:s text:c="8"/></text:p>
      <text:p text:style-name="P46"><text:s text:c="6"/><text:span text:style-name="T14"><text:s text:c="3"/>STEAM</text:span></text:p>
      <text:p text:style-name="P61"><text:span text:style-name="T117"><text:s text:c="16"/></text:span><text:span text:style-name="T118"><text:s/>REPLIC</text:span><text:span text:style-name="T117"> <text:s/></text:span></text:p>
      <text:p text:style-name="P221"><text:span text:style-name="T119"><text:s/></text:span><text:span text:style-name="T72"><text:s text:c="4"/></text:span></text:p>
      <text:p text:style-name="P46"><text:s text:c="21"/><text:span text:style-name="T14">NG</text:span></text:p>
      <text:p text:style-name="P49"><text:span text:style-name="T5"><text:s text:c="19"/>RR10 <text:s text:c="2"/></text:span><text:span text:style-name="T6">(T 20 56404)</text:span></text:p>
      <text:p text:style-name="P156"/>
      <text:p text:style-name="P156"><text:s text:c="7"/>COACH</text:p>
      <text:p text:style-name="P111"><text:s text:c="10"/>6W THRID </text:p>
      <text:p text:style-name="P61"><text:s text:c="8"/></text:p>
      <text:p text:style-name="P225"><text:s text:c="9"/><text:span text:style-name="T116">EMNETH</text:span></text:p>
      <text:p text:style-name="P104"><text:s text:c="17"/>COACH <text:s text:c="11"/></text:p>
      <text:p text:style-name="P70"><text:span text:style-name="T10"><text:s text:c="16"/></text:span><text:span text:style-name="T65">3748*</text:span></text:p>
      <text:p text:style-name="P217"><text:s text:c="2"/></text:p>
      <text:p text:style-name="P61"><text:s text:c="8"/><text:span text:style-name="T85"><text:s/></text:span><text:s/>WHITEWEBBES</text:p>
      <text:p text:style-name="P262"><text:s text:c="3"/>COACH</text:p>
      <text:p text:style-name="P61"><text:s text:c="12"/>9475 <text:s text:c="5"/></text:p>
      <text:p text:style-name="P61"><text:s text:c="17"/></text:p>
      <text:p text:style-name="P225"><text:s text:c="2"/>ERWOOD ST</text:p>
      <text:p text:style-name="P248"><text:s text:c="3"/>Ground Coaches</text:p>
      <text:p text:style-name="P70"><text:s text:c="14"/>587 GWR MR <text:s text:c="2"/></text:p>
      <text:p text:style-name="P61"><text:s text:c="9"/></text:p>
      <text:p text:style-name="P217"><text:s text:c="6"/><text:span text:style-name="T117">WAGON</text:span></text:p>
      <text:p text:style-name="P217"><text:s text:c="13"/>852345 <text:s text:c="4"/></text:p>
      <text:p text:style-name="P61"><text:s text:c="12"/></text:p>
      <text:p text:style-name="P133"><text:s text:c="14"/>EVESHAM VALLEY NURSERIES</text:p>
      <text:p text:style-name="P217"><text:s text:c="8"/>WAGON</text:p>
      <text:p text:style-name="P135"><text:s text:c="15"/>194459</text:p>
      <text:p text:style-name="P168"><text:s/></text:p>
      <text:p text:style-name="P156"/>
      <text:p text:style-name="P217"><text:s text:c="5"/>EXETER <text:s/>TEIGN VALLEY RAILWAY </text:p>
      <text:p text:style-name="P61"><text:s text:c="15"/>COACHES</text:p>
      <text:p text:style-name="P217"><text:s text:c="16"/><text:span text:style-name="T65">889027*</text:span> <text:span text:style-name="T65">94374*</text:span></text:p>
      <text:p text:style-name="P49"><text:s text:c="11"/></text:p>
      <text:p text:style-name="P61"><text:s text:c="18"/>Ground Wagons</text:p>
      <text:p text:style-name="P70"><text:s text:c="12"/><text:span text:style-name="T65"><text:s/>785259*</text:span> 58018</text:p>
      <text:p text:style-name="P221"/>
      <text:p text:style-name="P111"><text:s text:c="15"/><text:span text:style-name="T65"><text:s/>35410*</text:span> 17952 <text:span text:style-name="T65">786510*</text:span> <text:span text:style-name="T65">78642X*</text:span></text:p>
      <text:p text:style-name="P67"/>
      <text:p text:style-name="P217"><text:s text:c="4"/>DIESEL</text:p>
      <text:p text:style-name="P61"><text:s text:c="12"/><text:span text:style-name="T65">PERSUNS*</text:span> <text:s text:c="7"/></text:p>
      <text:p text:style-name="P168"><text:s/></text:p>
      <text:p text:style-name="P70"><text:s text:c="13"/>ROAD RAILER</text:p>
      <text:p text:style-name="P217"><text:s text:c="5"/><text:span text:style-name="T65">DX 90011*</text:span></text:p>
      <text:p text:style-name="P217"/>
      <text:p text:style-name="P225"><text:s text:c="7"/>WICKHAM</text:p>
      <text:p text:style-name="P61"><text:span text:style-name="T117"><text:s text:c="14"/></text:span><text:span text:style-name="T118">(5009 <text:s/>68004)*</text:span> <text:s/></text:p>
      <text:p text:style-name="P76"/>
      <text:p text:style-name="P217"><text:s text:c="7"/>FAWLEY HILL</text:p>
      <text:p text:style-name="P49"><text:s text:c="16"/>COACHES</text:p>
      <text:p text:style-name="P70"><text:s text:c="13"/>2900 (962450 <text:s/>99050)</text:p>
      <text:p text:style-name="P70"><text:s text:c="5"/></text:p>
      <text:p text:style-name="P217"><text:s text:c="5"/><text:span text:style-name="T117"><text:s/>Ground Wagons </text:span></text:p>
      <text:p text:style-name="P111"><text:s text:c="11"/>58223 <text:s/>(BDXXXXB1 (BDXXXXB2) </text:p>
      <text:p text:style-name="P61"><text:s text:c="15"/>(BDXXXXB3) <text:s/>(BMXXXXB4) <text:s/></text:p>
      <text:p text:style-name="P61"/>
      <text:p text:style-name="P61"><text:s text:c="14"/><text:span text:style-name="T117">96845 993762 710134 502855 105045 96283</text:span></text:p>
      <text:p text:style-name="P61"><text:s text:c="13"/>983897 993896 8389 127565 2279 1276</text:p>
      <text:p text:style-name="P61"><text:s text:c="16"/>1276 <text:s/>59645 58137 2490 (92636 35)</text:p>
      <text:p text:style-name="P70"><text:s text:c="13"/></text:p>
      <text:p text:style-name="P61"><text:s text:c="11"/></text:p>
      <text:p text:style-name="P61"><text:s text:c="14"/>DIESELS</text:p>
      <text:p text:style-name="P225"><text:s text:c="5"/>D2120 3894 3817</text:p>
      <text:p text:style-name="P221"/>
      <text:p text:style-name="P176"><text:s text:c="6"/>STEAM</text:p>
      <text:p text:style-name="P115"><text:s text:c="15"/>1026 </text:p>
      <text:p text:style-name="P70"><text:s text:c="13"/></text:p>
      <text:p text:style-name="P250"><text:s text:c="4"/><text:span text:style-name="T5"><text:s text:c="2"/></text:span><text:span text:style-name="T11">CRANE</text:span></text:p>
      <text:p text:style-name="P61"><text:s text:c="18"/>33</text:p>
      <text:p text:style-name="P217"><text:s text:c="5"/></text:p>
      <text:p text:style-name="P168"><text:s text:c="4"/>FEN DRAYTON</text:p>
      <text:p text:style-name="P262"><text:s text:c="5"/>Ground Coaches</text:p>
      <text:p text:style-name="P217"><text:s text:c="5"/>(GER 425S) <text:s text:c="4"/><text:span text:style-name="T65">(GER 138C)</text:span></text:p>
      <text:p text:style-name="P221"/>
      <text:p text:style-name="P221"><text:span text:style-name="T72"><text:s text:c="7"/></text:span>24458<text:span text:style-name="T72"> </text:span>15626<text:span text:style-name="T72"> </text:span>3065 </text:p>
      <text:p text:style-name="P225"/>
      <text:p text:style-name="P61"><text:s text:c="13"/>Ground Wagons</text:p>
      <text:p text:style-name="P61"><text:span text:style-name="T117"><text:s text:c="12"/>7XXXXX </text:span><text:span text:style-name="T118">7XXXXX</text:span> <text:s text:c="7"/></text:p>
      <text:p text:style-name="P61"><text:s text:c="15"/></text:p>
      <text:p text:style-name="P135"><text:s text:c="15"/>FERRYHILL</text:p>
      <text:p text:style-name="P61"><text:s text:c="7"/></text:p>
      <text:p text:style-name="P61"><text:s text:c="14"/>GROUND <text:s text:c="6"/>COACHES </text:p>
      <text:p text:style-name="P175"><text:s text:c="4"/>(7801 43) (7791 33) <text:s/>(7148 148) (7283 283) (7122 31 )</text:p>
      <text:p text:style-name="P175"/>
      <text:p text:style-name="P70"><text:s text:c="12"/>(7686 50) (734 53) ( 749 68) 6450UF</text:p>
      <text:p text:style-name="P70"><text:s text:c="10"/></text:p>
      <text:p text:style-name="P217"><text:s text:c="3"/>Ground Wagons</text:p>
      <text:p text:style-name="P49"><text:span text:style-name="T5"><text:s text:c="16"/>503583 881653</text:span> <text:s text:c="2"/></text:p>
      <text:p text:style-name="P61"><text:s text:c="11"/></text:p>
      <text:p text:style-name="P217"><text:s text:c="2"/><text:span text:style-name="T40"><text:s text:c="2"/></text:span><text:s/>(UF CR) <text:s/>302080 304543 (single b cr)</text:p>
      <text:p text:style-name="P61"><text:s/></text:p>
      <text:p text:style-name="P217"><text:s text:c="3"/>STEAM</text:p>
      <text:p text:style-name="P111"><text:s text:c="14"/>7846</text:p>
      <text:p text:style-name="P111"><text:s/></text:p>
      <text:p text:style-name="P61"><text:s text:c="13"/>CRANES</text:p>
      <text:p text:style-name="P175"><text:s text:c="6"/>1599 25631</text:p>
      <text:p text:style-name="P61"><text:s text:c="14"/></text:p>
      <text:p text:style-name="P61"><text:s text:c="14"/>WICKHAMS</text:p>
      <text:p text:style-name="P225"><text:s text:c="15"/>RTT767162 <text:s text:c="2"/>1583 <text:s/>8502 <text:s/>(68002 10180)</text:p>
      <text:p text:style-name="P172"/>
      <text:p text:style-name="P61"><text:s text:c="13"/>DIESEL</text:p>
      <text:p text:style-name="P61"><text:s text:c="13"/>421700 </text:p>
      <text:p text:style-name="P61"><text:s text:c="11"/></text:p>
      <text:p text:style-name="P250"><text:span text:style-name="T5"><text:s text:c="3"/></text:span><text:span text:style-name="T85"><text:s/></text:span><text:span text:style-name="T5"><text:s text:c="6"/>FFESTINIOG RAILWAY NG</text:span></text:p>
      <text:p text:style-name="P168"><text:s/>Ground Wagons</text:p>
      <text:p text:style-name="P61"><text:s text:c="15"/>85331 85338 <text:s text:c="5"/></text:p>
      <text:p text:style-name="P217"/>
      <text:p text:style-name="P148"><text:s text:c="8"/>DIESELS</text:p>
      <text:p text:style-name="P217"><text:s text:c="9"/><text:span text:style-name="T65">6659</text:span> 7195 3687 4113 3767 21579 <text:span text:style-name="T65">LR1055</text:span> 2219 2207</text:p>
      <text:p text:style-name="P61"><text:s text:c="16"/>CRICCETH CASTLE CASTLE HUDSON </text:p>
      <text:p text:style-name="P61"><text:s text:c="14"/>VALE OF FFESTINIOG CONWAY 8565</text:p>
      <text:p text:style-name="P70"/>
      <text:p text:style-name="P61"><text:s text:c="12"/>STEAMS</text:p>
      <text:p text:style-name="P217"><text:s text:c="7"/>707 <text:span text:style-name="T65">4 </text:span>7 10 190 <text:span text:style-name="T65">EARL OF MEIRIONETH</text:span> 200 30190</text:p>
      <text:p text:style-name="P49"><text:s text:c="10"/><text:span text:style-name="T5"><text:s/>234 49604 590 4 57156 <text:s/>2 <text:s/>492 10 DAVID <text:s text:c="2"/></text:span><text:span text:style-name="T6">409</text:span></text:p>
      <text:p text:style-name="P221"/>
      <text:p text:style-name="P168"><text:s text:c="4"/>WICKHAM</text:p>
      <text:p text:style-name="P70"><text:s text:c="14"/>900492 <text:s/></text:p>
      <text:p text:style-name="P70"><text:s text:c="13"/></text:p>
      <text:p text:style-name="P156"><text:s text:c="6"/>FIFIELD</text:p>
      <text:p text:style-name="P46"><text:s text:c="16"/><text:span text:style-name="T14"><text:s/>Ground Wagons </text:span></text:p>
      <text:p text:style-name="P70"><text:s text:c="13"/>77XX04 768453</text:p>
      <text:p text:style-name="P111"><text:s text:c="11"/></text:p>
      <text:p text:style-name="P70"><text:s text:c="12"/>58083 96895 954171 <text:s/>421220 17478</text:p>
      <text:p text:style-name="P70"/>
      <text:p text:style-name="P250"><text:s text:c="2"/><text:span text:style-name="T5"><text:s text:c="5"/>DIESEL</text:span></text:p>
      <text:p text:style-name="P135"><text:s text:c="23"/>352 </text:p>
      <text:p text:style-name="P70"/>
      <text:p text:style-name="P217"><text:s text:c="6"/>STEAMS</text:p>
      <text:p text:style-name="P195"><text:s text:c="12"/>1756 8800 946 </text:p>
      <text:p text:style-name="P195"/>
      <text:p text:style-name="P217"><text:s text:c="2"/><text:span text:style-name="T85"><text:s text:c="2"/></text:span><text:s text:c="6"/>ROAD RAILERS</text:p>
      <text:p text:style-name="P217"><text:s text:c="14"/>( RAT 2001) <text:s text:c="2"/>9112 <text:s text:c="2"/>(062/98) </text:p>
      <text:p text:style-name="P217"><text:s text:c="4"/></text:p>
      <text:p text:style-name="P61"><text:s text:c="11"/>TROLLEYS </text:p>
      <text:p text:style-name="P148"><text:s text:c="14"/>19XX 19XX</text:p>
      <text:p text:style-name="P61"><text:s text:c="12"/></text:p>
      <text:p text:style-name="P111"><text:s text:c="15"/>FOLKESTONE H</text:p>
      <text:p text:style-name="P217"><text:s/>COACHES</text:p>
      <text:p text:style-name="P156"><text:s text:c="15"/><text:span text:style-name="T65">43</text:span> <text:span text:style-name="T65">99</text:span> <text:span text:style-name="T65">102</text:span> </text:p>
      <text:p text:style-name="P156"/>
      <text:p text:style-name="P61"><text:s text:c="15"/>WAGONS</text:p>
      <text:p text:style-name="P70"><text:s text:c="14"/>28918 <text:s/>777578 854239 <text:s/>7XXXXX 7XXXXX</text:p>
      <text:p text:style-name="P61"><text:s text:c="14"/></text:p>
      <text:p text:style-name="P70"><text:s text:c="6"/></text:p>
      <text:p text:style-name="P148"><text:s text:c="2"/><text:span text:style-name="T117"><text:s text:c="3"/>FRANSHAM</text:span></text:p>
      <text:p text:style-name="P265"><text:s text:c="2"/>Ground Coaches</text:p>
      <text:p text:style-name="P168"><text:s text:c="14"/><text:span text:style-name="T65">1235</text:span> <text:span text:style-name="T65">42551</text:span></text:p>
      <text:p text:style-name="P172"/>
      <text:p text:style-name="P168"><text:s text:c="3"/>DIESELS</text:p>
      <text:p text:style-name="P168"><text:s text:c="11"/>422573 <text:s text:c="2"/>398611 <text:s text:c="4"/></text:p>
      <text:p text:style-name="P61"><text:s text:c="16"/><text:span text:style-name="T85"><text:s/></text:span><text:s text:c="2"/></text:p>
      <text:p text:style-name="P111"><text:s text:c="4"/></text:p>
      <text:p text:style-name="P61"><text:s text:c="11"/><text:span text:style-name="T120"><text:s/>FULSTOW S C</text:span></text:p>
      <text:p text:style-name="P262"><text:s text:c="3"/>COACH</text:p>
      <text:p text:style-name="P61"><text:s text:c="13"/><text:span text:style-name="T65">355</text:span></text:p>
      <text:p text:style-name="P61"><text:s text:c="17"/></text:p>
      <text:p text:style-name="P61"><text:s text:c="17"/>WAGONS</text:p>
      <text:p text:style-name="P61"><text:span text:style-name="T85"><text:s text:c="15"/></text:span><text:span text:style-name="T65">933413</text:span> <text:span text:style-name="T65">952012</text:span> <text:s text:c="6"/><text:span text:style-name="T117"><text:s/></text:span></text:p>
      <text:p text:style-name="P70"><text:s text:c="13"/></text:p>
      <text:p text:style-name="P175"><text:s text:c="9"/>STEAM</text:p>
      <text:p text:style-name="P70"><text:s text:c="11"/>7680 <text:s/></text:p>
      <text:p text:style-name="P70"/>
      <text:p text:style-name="P35"><text:span text:style-name="T72"><text:s text:c="3"/></text:span><text:span text:style-name="T69"><text:s text:c="2"/></text:span><text:span text:style-name="T36"><text:s text:c="9"/>ROAD RAILER</text:span></text:p>
      <text:p text:style-name="P61"><text:span text:style-name="T85"><text:s text:c="10"/></text:span><text:s text:c="3"/>8201 </text:p>
      <text:p text:style-name="P111"><text:s text:c="12"/></text:p>
      <text:p text:style-name="P61"><text:s text:c="13"/>FORT WILLIAM</text:p>
      <text:p text:style-name="P49"><text:s text:c="14"/>STEAM</text:p>
      <text:p text:style-name="P61"><text:s text:c="16"/><text:span text:style-name="T65">62005</text:span> <text:s text:c="5"/></text:p>
      <text:p text:style-name="P217"/>
      <text:p text:style-name="P85"><text:s text:c="8"/><text:span text:style-name="T5"><text:s text:c="6"/></text:span><text:span text:style-name="T11"><text:s text:c="2"/></text:span><text:span text:style-name="T12">GEDNEY HILL</text:span></text:p>
      <text:p text:style-name="P115"><text:s text:c="11"/>Ground coach</text:p>
      <text:p text:style-name="P70"><text:s text:c="13"/><text:span text:style-name="T65">GER*</text:span></text:p>
      <text:p text:style-name="P49"><text:s text:c="6"/></text:p>
      <text:p text:style-name="P227">Ground Wagons</text:p>
      <text:p text:style-name="P61"><text:span text:style-name="T112"><text:s text:c="11"/></text:span><text:span text:style-name="T118">GWR*</text:span><text:span text:style-name="T117"> <text:s text:c="2"/></text:span><text:span text:style-name="T118">GWR*</text:span><text:span text:style-name="T117"> <text:s text:c="2"/></text:span><text:span text:style-name="T118">BR* </text:span></text:p>
      <text:p text:style-name="P46"><text:s text:c="8"/></text:p>
      <text:p text:style-name="P49"><text:s text:c="10"/><text:span text:style-name="T5"><text:s text:c="6"/>GLENFINNAN S</text:span></text:p>
      <text:p text:style-name="P262"><text:s text:c="2"/><text:span text:style-name="T14"><text:s/>COACHES</text:span></text:p>
      <text:p text:style-name="P61"><text:span text:style-name="T103"><text:s text:c="4"/></text:span><text:s text:c="8"/>3767 35215 </text:p>
      <text:p text:style-name="P61"><text:s text:c="3"/></text:p>
      <text:p text:style-name="P70"><text:s text:c="4"/>GROUND WAGON </text:p>
      <text:p text:style-name="P217"><text:s text:c="13"/>786002</text:p>
      <text:p text:style-name="P217"/>
      <text:p text:style-name="P148">965220</text:p>
      <text:p text:style-name="P61"><text:s text:c="11"/></text:p>
      <text:p text:style-name="P61"><text:s text:c="11"/><text:span text:style-name="T116">GRANTOWN ON SPEY</text:span></text:p>
      <text:p text:style-name="P265"><text:s/><text:span text:style-name="T15"><text:s text:c="3"/>COACHES</text:span></text:p>
      <text:p text:style-name="P119"><text:span text:style-name="T72"><text:s text:c="14"/></text:span>70292 *<text:span text:style-name="T72"> <text:s text:c="4"/></text:span><text:s/>70531*<text:span text:style-name="T72"> <text:s text:c="10"/></text:span></text:p>
      <text:p text:style-name="P225"/>
      <text:p text:style-name="P61"><text:s text:c="8"/><text:span text:style-name="T117"><text:s text:c="2"/>GREAT M S </text:span></text:p>
      <text:p text:style-name="P238"><text:s text:c="3"/>COACH</text:p>
      <text:p text:style-name="P61"><text:s text:c="10"/>13089</text:p>
      <text:p text:style-name="P231"/>
      <text:p text:style-name="P61"><text:s text:c="15"/><text:span text:style-name="T116">HALFAX</text:span></text:p>
      <text:p text:style-name="P46"><text:s text:c="15"/>COACH</text:p>
      <text:p text:style-name="P111"><text:s text:c="14"/><text:span text:style-name="T65">5524 </text:span><text:s text:c="3"/></text:p>
      <text:p text:style-name="P46"><text:s text:c="13"/><text:span text:style-name="T14"><text:s/></text:span></text:p>
      <text:p text:style-name="P217"><text:s/>DIESEL</text:p>
      <text:p text:style-name="P73"><text:span text:style-name="T72"><text:s text:c="11"/></text:span><text:s/>02641</text:p>
      <text:p text:style-name="P49"><text:s text:c="19"/></text:p>
      <text:p text:style-name="P225"><text:s/>HALATROW</text:p>
      <text:p text:style-name="P262"><text:s text:c="3"/>COACH</text:p>
      <text:p text:style-name="P70"><text:s text:c="16"/>25752</text:p>
      <text:p text:style-name="P225"/>
      <text:p text:style-name="P49"><text:s text:c="13"/><text:span text:style-name="T5"><text:s text:c="9"/>HARRINGTON AVIATION</text:span></text:p>
      <text:p text:style-name="P61"><text:s text:c="16"/>WAGONS</text:p>
      <text:p text:style-name="P70"><text:s text:c="16"/>(12 T 4W) <text:s/>BARE WOOD <text:s/>7XXXXX </text:p>
      <text:p text:style-name="P61"><text:s text:c="10"/></text:p>
      <text:p text:style-name="P61"><text:s text:c="11"/><text:span text:style-name="T116">HARTLEPOOLS MARITIME </text:span></text:p>
      <text:p text:style-name="P61"><text:s text:c="14"/>WAGON</text:p>
      <text:p text:style-name="P67"><text:span text:style-name="T119"><text:s text:c="10"/></text:span><text:span text:style-name="T117"><text:s/>5</text:span></text:p>
      <text:p text:style-name="P73"/>
      <text:p text:style-name="P46"><text:s text:c="6"/><text:span text:style-name="T10"><text:s text:c="3"/>HARVINGTON</text:span></text:p>
      <text:p text:style-name="P262"><text:s/>COACH </text:p>
      <text:p text:style-name="P217"><text:s text:c="10"/>10557 <text:s text:c="2"/></text:p>
      <text:p text:style-name="P70"><text:s text:c="2"/></text:p>
      <text:p text:style-name="P61"><text:s text:c="8"/><text:span text:style-name="T116"><text:s/>HAWSKER OS</text:span></text:p>
      <text:p text:style-name="P104"><text:s text:c="14"/>COACHES</text:p>
      <text:p text:style-name="P61"><text:s text:c="11"/><text:span text:style-name="T65">10218</text:span> <text:s text:c="2"/><text:span text:style-name="T65">34557</text:span> <text:s text:c="2"/><text:span text:style-name="T65">81477</text:span></text:p>
      <text:p text:style-name="P67"/>
      <text:p text:style-name="P168"><text:s/><text:span text:style-name="T116">HAVES OLD S</text:span></text:p>
      <text:p text:style-name="P262"><text:s text:c="3"/>COACHES</text:p>
      <text:p text:style-name="P61"><text:s text:c="12"/><text:span text:style-name="T65"><text:s/>4930</text:span> <text:s/><text:span text:style-name="T65">4966</text:span> <text:s/><text:span text:style-name="T65">4979</text:span></text:p>
      <text:p text:style-name="P46"><text:s/></text:p>
      <text:p text:style-name="P61"><text:s text:c="13"/>STEAM</text:p>
      <text:p text:style-name="P61"><text:span text:style-name="T117"><text:s text:c="15"/></text:span><text:span text:style-name="T118">67345* </text:span></text:p>
      <text:p text:style-name="P70"><text:s text:c="13"/></text:p>
      <text:p text:style-name="P217"><text:s/><text:span text:style-name="T117"><text:s text:c="9"/></text:span><text:span text:style-name="T120">HAYLE OLD ST</text:span></text:p>
      <text:p text:style-name="P262"><text:s text:c="2"/>COACH</text:p>
      <text:p text:style-name="P67"><text:span text:style-name="T119"><text:s text:c="12"/></text:span><text:span text:style-name="T117">25355</text:span></text:p>
      <text:p text:style-name="P217"/>
      <text:p text:style-name="P217"><text:s text:c="2"/><text:span text:style-name="T117"><text:s/>HEACHAM</text:span></text:p>
      <text:p text:style-name="P250"><text:s text:c="2"/>COACH</text:p>
      <text:p text:style-name="P175"><text:s text:c="11"/>13318 <text:s/></text:p>
      <text:p text:style-name="P61"><text:span text:style-name="T117"><text:s text:c="4"/></text:span><text:s text:c="4"/></text:p>
      <text:p text:style-name="P225">HEPSCOTT OLD STATION</text:p>
      <text:p text:style-name="P262"><text:s text:c="3"/>Ground Wagons</text:p>
      <text:p text:style-name="P225"><text:s text:c="14"/>1325B NER </text:p>
      <text:p text:style-name="P61"><text:s text:c="13"/><text:span text:style-name="T117"><text:s/></text:span></text:p>
      <text:p text:style-name="P61"><text:s text:c="11"/>WICKHAMS</text:p>
      <text:p text:style-name="P61"><text:s text:c="15"/>965053 900382</text:p>
      <text:p text:style-name="P228"><text:s text:c="4"/></text:p>
      <text:p text:style-name="P61"><text:s text:c="10"/><text:span text:style-name="T85"><text:s text:c="3"/></text:span><text:span text:style-name="T116">HEREFORD BROOMY HILL RAILWAY</text:span></text:p>
      <text:p text:style-name="P248"><text:s text:c="3"/>Ground Wagons</text:p>
      <text:p text:style-name="P61"><text:s text:c="15"/><text:span text:style-name="T65">52XXXX</text:span> <text:span text:style-name="T65">2XXXXX</text:span> <text:s text:c="4"/></text:p>
      <text:p text:style-name="P61"><text:s text:c="2"/></text:p>
      <text:p text:style-name="P217"><text:s text:c="8"/>HIDERSTONE</text:p>
      <text:p text:style-name="P262"><text:s text:c="2"/>COACHES</text:p>
      <text:p text:style-name="P217"><text:s text:c="12"/>228 242</text:p>
      <text:p text:style-name="P231"/>
      <text:h text:style-name="P287" text:outline-level="5"><text:s text:c="4"/></text:h>
      <text:p text:style-name="P46"><text:s text:c="9"/><text:span text:style-name="T14"><text:s/>HINDOLVESTON</text:span></text:p>
      <text:p text:style-name="P46"><text:s text:c="14"/>COACH</text:p>
      <text:p text:style-name="P61"><text:s text:c="14"/>986 </text:p>
      <text:p text:style-name="P61"><text:s text:c="11"/></text:p>
      <text:p text:style-name="P217"><text:s/><text:span text:style-name="T117"><text:s text:c="2"/>HIGHLAND LIGHT RAILWAY</text:span></text:p>
      <text:p text:style-name="P217"><text:s/>WAGON GROUND </text:p>
      <text:p text:style-name="P61"><text:span text:style-name="T117"><text:s text:c="13"/>781699</text:span> </text:p>
      <text:p text:style-name="P175"/>
      <text:p text:style-name="P46"><text:s text:c="7"/><text:span text:style-name="T14"><text:s text:c="4"/></text:span><text:span text:style-name="T51"><text:s/></text:span><text:span text:style-name="T10"><text:s/>DIESELS</text:span></text:p>
      <text:p text:style-name="P225"><text:s text:c="13"/>5 <text:s text:c="2"/>283513</text:p>
      <text:p text:style-name="P61"><text:s text:c="5"/><text:span text:style-name="T54"><text:s text:c="6"/></text:span></text:p>
      <text:p text:style-name="P61"><text:s text:c="10"/><text:span text:style-name="T117"><text:s/>COACH</text:span></text:p>
      <text:p text:style-name="P61"><text:s text:c="12"/><text:span text:style-name="T65">3094*</text:span> <text:s text:c="3"/><text:span text:style-name="T92"><text:s/></text:span></text:p>
      <text:p text:style-name="P61"><text:s text:c="10"/></text:p>
      <text:p text:style-name="P61"><text:s text:c="14"/><text:span text:style-name="T120">HIGH PEAK JUNCTION</text:span></text:p>
      <text:p text:style-name="P168"><text:s text:c="4"/>WAGONS</text:p>
      <text:p text:style-name="P61"><text:s text:c="15"/><text:span text:style-name="T65">730799</text:span> <text:s text:c="2"/><text:span text:style-name="T65">731900</text:span></text:p>
      <text:p text:style-name="P67"/>
      <text:p text:style-name="P217"><text:s text:c="3"/>HOLLYCOMBE STEAM</text:p>
      <text:p text:style-name="P250"><text:s text:c="3"/>WAGONS</text:p>
      <text:p text:style-name="P70"><text:s text:c="13"/>278619 505804</text:p>
      <text:p text:style-name="P46"><text:s text:c="11"/><text:span text:style-name="T56"><text:s/></text:span></text:p>
      <text:p text:style-name="P188"><text:s/><text:span text:style-name="T17"><text:s text:c="4"/>COACH</text:span></text:p>
      <text:p text:style-name="P217"><text:s text:c="4"/>528</text:p>
      <text:p text:style-name="P61"/>
      <text:p text:style-name="P46"><text:s text:c="14"/><text:span text:style-name="T14">CRANE</text:span></text:p>
      <text:p text:style-name="P148"><text:s text:c="15"/>2953 <text:s text:c="2"/></text:p>
      <text:p text:style-name="P148"><text:s/></text:p>
      <text:p text:style-name="P217">STEAMS</text:p>
      <text:p text:style-name="P111"><text:s text:c="9"/>2450 1995 1607 638 3136</text:p>
      <text:p text:style-name="P111"/>
      <text:p text:style-name="P217">DIESELS</text:p>
      <text:p text:style-name="P61"><text:span text:style-name="T117"><text:s text:c="11"/>4848 (1968 DOUGAL) 60S318 60S316 3909</text:span><text:span text:style-name="T11"> </text:span></text:p>
      <text:p text:style-name="P225"/>
      <text:p text:style-name="P70"><text:s text:c="15"/><text:span text:style-name="T116"><text:s/>HOLT</text:span></text:p>
      <text:p text:style-name="P106"><text:s text:c="16"/>COACH</text:p>
      <text:p text:style-name="P70"><text:span text:style-name="T40"><text:s text:c="15"/></text:span><text:s/><text:span text:style-name="T65">769</text:span></text:p>
      <text:p text:style-name="P231"/>
      <text:p text:style-name="P217"><text:s text:c="4"/><text:span text:style-name="T116">HORNCELIFF</text:span></text:p>
      <text:p text:style-name="P262"><text:span text:style-name="T54"><text:s text:c="5"/></text:span>COACH</text:p>
      <text:p text:style-name="P110"><text:span text:style-name="T72"><text:s text:c="14"/></text:span>45010*</text:p>
      <text:p text:style-name="P61"><text:s text:c="10"/></text:p>
      <text:p text:style-name="P111"><text:s text:c="11"/><text:span text:style-name="T66">HORSEBRIDGE ST</text:span></text:p>
      <text:p text:style-name="P61"><text:s text:c="13"/>COACH</text:p>
      <text:p text:style-name="P168"><text:s text:c="12"/>773 <text:s text:c="3"/></text:p>
      <text:p text:style-name="P14"><text:s/><text:span text:style-name="T85"><text:s text:c="2"/></text:span></text:p>
      <text:p text:style-name="P70"><text:s text:c="12"/>AD9119 <text:s text:c="13"/></text:p>
      <text:p text:style-name="P61"><text:s/></text:p>
      <text:p text:style-name="P217"><text:s text:c="5"/><text:span text:style-name="T117"><text:s text:c="4"/></text:span><text:span text:style-name="T120">HUDDERSFIELD</text:span></text:p>
      <text:p text:style-name="P262"><text:s text:c="4"/>COACH</text:p>
      <text:p text:style-name="P217"><text:span text:style-name="T117"><text:s text:c="12"/></text:span><text:span text:style-name="T118"><text:s text:c="2"/>4325</text:span><text:span text:style-name="T117"> </text:span><text:span text:style-name="T66"><text:s text:c="4"/></text:span></text:p>
      <text:p text:style-name="P61"><text:s text:c="7"/></text:p>
      <text:p text:style-name="P61"><text:s text:c="9"/><text:span text:style-name="T117"><text:s text:c="3"/></text:span><text:span text:style-name="T120">HULL CJ</text:span></text:p>
      <text:p text:style-name="P250"><text:s text:c="2"/>COACH</text:p>
      <text:p text:style-name="P168"><text:span text:style-name="T117"><text:s text:c="12"/></text:span><text:span text:style-name="T118">4936</text:span><text:span text:style-name="T117"> <text:s/></text:span></text:p>
      <text:p text:style-name="P61"><text:s text:c="7"/></text:p>
      <text:p text:style-name="P61"><text:s text:c="15"/>HULL FORT P</text:p>
      <text:p text:style-name="P217"><text:s text:c="5"/>COACH</text:p>
      <text:p text:style-name="P61"><text:s text:c="15"/>518008 40 001-3</text:p>
      <text:p text:style-name="P61"/>
      <text:p text:style-name="P217"><text:s text:c="4"/>HULL STREETLIFE</text:p>
      <text:p text:style-name="P111"><text:s text:c="16"/>WAGONS</text:p>
      <text:p text:style-name="P61"><text:s text:c="10"/><text:span text:style-name="T100"><text:s text:c="4"/>4W WOODEN 16625</text:span></text:p>
      <text:p text:style-name="P221"/>
      <text:p text:style-name="P217"><text:s text:c="5"/>STEAM</text:p>
      <text:p text:style-name="P115"><text:s text:c="14"/>9629</text:p>
      <text:p text:style-name="P67"/>
      <text:p text:style-name="P61"><text:s text:c="11"/><text:span text:style-name="T117">HURN OLD ST</text:span></text:p>
      <text:p text:style-name="P217"><text:s text:c="4"/>COACH</text:p>
      <text:p text:style-name="P61"><text:s text:c="13"/>340</text:p>
      <text:p text:style-name="P111"><text:s text:c="7"/></text:p>
      <text:p text:style-name="P112"><text:s text:c="8"/><text:span text:style-name="T116">IRONVILLE</text:span> <text:s text:c="3"/></text:p>
      <text:p text:style-name="P111"><text:s text:c="15"/>COACH</text:p>
      <text:p text:style-name="P217"><text:s text:c="14"/><text:span text:style-name="T65">SILVER</text:span> <text:s text:c="4"/><text:span text:style-name="T66"><text:s/></text:span></text:p>
      <text:p text:style-name="P35"><text:s text:c="16"/></text:p>
      <text:p text:style-name="P111"><text:s text:c="15"/><text:span text:style-name="T117">INVERGARRY STATION</text:span></text:p>
      <text:p text:style-name="P250"><text:s text:c="3"/>WAGONS</text:p>
      <text:p text:style-name="P225"><text:s text:c="14"/>45055 45073</text:p>
      <text:p text:style-name="P70"><text:s text:c="14"/></text:p>
      <text:p text:style-name="P217"><text:s text:c="3"/><text:span text:style-name="T117"><text:s text:c="2"/>LESMAC</text:span></text:p>
      <text:p text:style-name="P70"><text:s text:c="18"/>99709 901002-4</text:p>
      <text:p text:style-name="P70"/>
      <text:p text:style-name="P61"><text:s text:c="14"/>TROLLEY</text:p>
      <text:p text:style-name="P168"><text:s text:c="14"/>18295 <text:s/></text:p>
      <text:p text:style-name="P175"/>
      <text:p text:style-name="P133"><text:span text:style-name="T40"><text:s text:c="8"/></text:span><text:s text:c="6"/>DIESEL</text:p>
      <text:p text:style-name="P59"><text:s text:c="11"/>236364</text:p>
      <text:p text:style-name="P61"><text:s text:c="11"/></text:p>
      <text:p text:style-name="P225">LINC0LNSHIRE LIGHT RAILWAY NG</text:p>
      <text:p text:style-name="P61"><text:s text:c="18"/>DIESELS</text:p>
      <text:p text:style-name="P70"><text:s text:c="11"/>(7 1935) <text:s/>(5.1 3995) (4 7481) (5 8622) (6 8874)</text:p>
      <text:p text:style-name="P118"><text:s text:c="11"/>(8 9264) <text:s/>(1140 8905) (9 8825) (T3 8738) </text:p>
      <text:p text:style-name="P168"><text:s text:c="3"/>STEAM</text:p>
      <text:p text:style-name="P225"><text:s text:c="14"/>(2 1008)</text:p>
      <text:p text:style-name="P175"/>
      <text:p text:style-name="P225"><text:s text:c="2"/><text:span text:style-name="T116">JESMOND OLD STATION</text:span></text:p>
      <text:p text:style-name="P217"><text:s/>COACH</text:p>
      <text:p text:style-name="P217"><text:span text:style-name="T92"><text:s text:c="8"/></text:span><text:span text:style-name="T117"><text:s text:c="2"/></text:span><text:span text:style-name="T118"><text:s/>397</text:span> <text:s text:c="5"/></text:p>
      <text:p text:style-name="P70"><text:s text:c="15"/></text:p>
      <text:p text:style-name="P278"><text:s text:c="3"/>KELHAM LSLAND </text:p>
      <text:p text:style-name="P217"><text:s text:c="5"/>WAGON </text:p>
      <text:p text:style-name="P61"><text:s text:c="11"/>10 <text:s text:c="13"/></text:p>
      <text:p text:style-name="P61"/>
      <text:p text:style-name="P46"><text:s text:c="6"/><text:span text:style-name="T14"><text:s/></text:span><text:span text:style-name="T10">KIRKBY GREEN</text:span></text:p>
      <text:p text:style-name="P225"><text:s text:c="4"/>COACH</text:p>
      <text:p text:style-name="P61"><text:s text:c="19"/>352 </text:p>
      <text:p text:style-name="P70"><text:s text:c="14"/></text:p>
      <text:p text:style-name="P111"><text:s text:c="12"/>KIRKLEATHAM OLD HALL</text:p>
      <text:p text:style-name="P262"><text:s text:c="3"/>WAGON</text:p>
      <text:p text:style-name="P276"><text:span text:style-name="T62"><text:s text:c="16"/></text:span><text:span text:style-name="T117">7 <text:s text:c="11"/></text:span></text:p>
      <text:p text:style-name="P61"><text:s text:c="6"/><text:span text:style-name="T117"><text:s/></text:span></text:p>
      <text:p text:style-name="P225"><text:s/>K&amp;J BOWNES SONS</text:p>
      <text:p text:style-name="P262"><text:s text:c="3"/>WAGONS</text:p>
      <text:p text:style-name="P46"><text:span text:style-name="T10"><text:s text:c="14"/>1565 </text:span><text:span text:style-name="T9">993836</text:span><text:span text:style-name="T10"> </text:span><text:s/></text:p>
      <text:p text:style-name="P49"><text:s text:c="3"/></text:p>
      <text:p text:style-name="P115"><text:s text:c="17"/>STEAM</text:p>
      <text:p text:style-name="P70"><text:s text:c="18"/>3019</text:p>
      <text:p text:style-name="P115"><text:s text:c="11"/></text:p>
      <text:p text:style-name="P70"><text:s text:c="14"/>LANGRICK OLD STATION</text:p>
      <text:p text:style-name="P111"><text:s text:c="13"/>WAGON</text:p>
      <text:p text:style-name="P115"><text:span text:style-name="T40"><text:s text:c="14"/></text:span><text:s text:c="4"/>954768</text:p>
      <text:p text:style-name="P70"><text:s text:c="14"/></text:p>
      <text:p text:style-name="P225"><text:s text:c="2"/></text:p>
      <text:p text:style-name="P225"><text:s/>LLKESTON </text:p>
      <text:p text:style-name="P262"><text:s text:c="4"/>WAGON</text:p>
      <text:p text:style-name="P175"><text:s text:c="16"/>2</text:p>
      <text:p text:style-name="P217"/>
      <text:p text:style-name="P217"><text:s text:c="6"/><text:span text:style-name="T117"><text:s text:c="3"/>LAPPA V RAILWAY</text:span></text:p>
      <text:p text:style-name="P217"><text:s/>COACH</text:p>
      <text:p text:style-name="P61"><text:span text:style-name="T117"><text:s text:c="14"/></text:span><text:span text:style-name="T118">4039</text:span></text:p>
      <text:p text:style-name="P73"/>
      <text:p text:style-name="P135"><text:s text:c="11"/>STEAMS</text:p>
      <text:p text:style-name="P67"><text:span text:style-name="T72"><text:s text:c="10"/>(RUBY 302) <text:s/>(ZEBEDEE 7434) <text:s text:c="2"/></text:span>(ELLIE 4) <text:span text:style-name="T72"><text:s/></text:span>( MUFFIN 2)</text:p>
      <text:p text:style-name="P67"/>
      <text:p text:style-name="P61"><text:s text:c="13"/>DIESELS</text:p>
      <text:p text:style-name="P135"><text:s text:c="12"/>(GLADATER 3) <text:s/><text:span text:style-name="T65">(CITY OF DERBY D5905)</text:span> (ARTTER 4) <text:s text:c="3"/></text:p>
      <text:p text:style-name="P68"><text:s text:c="12"/><text:span text:style-name="T119"><text:s text:c="2"/></text:span></text:p>
      <text:p text:style-name="P61"><text:s text:c="7"/></text:p>
      <text:p text:style-name="P115"><text:s text:c="15"/><text:span text:style-name="T116">LEADHILLS</text:span> </text:p>
      <text:p text:style-name="P61"><text:s text:c="17"/>WAGONS </text:p>
      <text:p text:style-name="P61"><text:s text:c="14"/><text:span text:style-name="T65">78XXXX*</text:span> <text:s/><text:span text:style-name="T65">78XXXX*</text:span></text:p>
      <text:p text:style-name="P67"/>
      <text:p text:style-name="P61"><text:s text:c="15"/><text:span text:style-name="T117"><text:s/>LEISTON</text:span></text:p>
      <text:p text:style-name="P250"><text:s text:c="5"/>COACH</text:p>
      <text:p text:style-name="P61"><text:s text:c="15"/>514</text:p>
      <text:p text:style-name="P225"><text:s text:c="3"/></text:p>
      <text:p text:style-name="P148"/>
      <text:p text:style-name="P61"><text:s text:c="15"/>WAGON </text:p>
      <text:p text:style-name="P115"><text:s text:c="13"/>730093 </text:p>
      <text:p text:style-name="P111"><text:s text:c="8"/></text:p>
      <text:p text:style-name="P217"><text:s text:c="4"/>STEAM </text:p>
      <text:p text:style-name="P70"><text:span text:style-name="T60"><text:s text:c="21"/></text:span>6158</text:p>
      <text:p text:style-name="P61"><text:s text:c="10"/></text:p>
      <text:p text:style-name="P217">LEIGHTON BUZZARD RAILWAY</text:p>
      <text:p text:style-name="P46"><text:s text:c="7"/><text:span text:style-name="T72"><text:s text:c="3"/>Ground Wagons</text:span></text:p>
      <text:p text:style-name="P217"><text:s text:c="6"/>781289 12T 12T</text:p>
      <text:p text:style-name="P225"/>
      <text:p text:style-name="P225"><text:s/>STEAMS NG</text:p>
      <text:p text:style-name="P262"><text:s text:c="2"/>4260 5834 2007 2071 1877 73 1738 2544 <text:span text:style-name="T65">4256</text:span> 1641 44656 </text:p>
      <text:p text:style-name="P68"><text:span text:style-name="T72"><text:s text:c="9"/>7455 </text:span><text:s text:c="3"/></text:p>
      <text:p text:style-name="P217"><text:s text:c="2"/><text:span text:style-name="T117"><text:s/></text:span></text:p>
      <text:p text:style-name="P156">DIESELS NG</text:p>
      <text:p text:style-name="P262"><text:s text:c="3"/>7036 5608 5612 5613 5875 6008 6619 4570 7105 7108 </text:p>
      <text:p text:style-name="P168"><text:s text:c="4"/>7129 7600 7933 (FINGOLFIN) 2631 4228 4351 2514 <text:s/></text:p>
      <text:p text:style-name="P139"><text:s text:c="12"/>7956 6012 461 1568 5603 4805 375315 283507 <text:s text:c="2"/>10808</text:p>
      <text:p text:style-name="P61"><text:s text:c="13"/>8731 <text:s/>200516 60S317 187105 229656 223692 <text:s/>203026</text:p>
      <text:p text:style-name="P61"><text:s text:c="13"/>8641 209430 217999 218016 <text:s/>8745 8986 9347 10409</text:p>
      <text:p text:style-name="P104"><text:span text:style-name="T14"><text:s text:c="13"/></text:span><text:s text:c="3"/>8720 3702 194784 3698 408430 11297 <text:s/>172892 11003</text:p>
      <text:p text:style-name="P61"><text:s text:c="14"/>3646 7214 <text:s/>164346 BP013 BP030 <text:s/>101T018</text:p>
      <text:p text:style-name="P61"><text:s text:c="14"/>11221 8695 11298 21615 37170</text:p>
      <text:p text:style-name="P46"><text:s text:c="12"/><text:span text:style-name="T14"><text:s text:c="3"/></text:span></text:p>
      <text:p text:style-name="P49"><text:s text:c="11"/><text:span text:style-name="T5"><text:s/></text:span><text:span text:style-name="T34">LION SALT WORKS</text:span></text:p>
      <text:p text:style-name="P262"><text:s text:c="5"/>WAGON</text:p>
      <text:p text:style-name="P225"><text:span text:style-name="T40"><text:s text:c="11"/></text:span><text:s/><text:span text:style-name="T65">44*</text:span> <text:span text:style-name="T40"><text:s text:c="2"/></text:span></text:p>
      <text:p text:style-name="P217"><text:s text:c="4"/></text:p>
      <text:p text:style-name="P217"><text:s text:c="8"/><text:span text:style-name="T117">LLANBERIS RAILWAY NG</text:span></text:p>
      <text:p text:style-name="P248"><text:s text:c="4"/>DIESELS</text:p>
      <text:p text:style-name="P49"><text:span text:style-name="T5"><text:s text:c="14"/></text:span><text:span text:style-name="T6">441427*</text:span><text:span text:style-name="T5"> 7927 425796 <text:s/>198286 <text:s text:c="2"/>268878 </text:span></text:p>
      <text:p text:style-name="P225"/>
      <text:p text:style-name="P111"><text:s text:c="9"/>STEAMS</text:p>
      <text:p text:style-name="P111"><text:span text:style-name="T117"><text:s text:c="15"/></text:span><text:span text:style-name="T118">493*</text:span><text:span text:style-name="T117"> <text:s/></text:span><text:span text:style-name="T118">1430*</text:span><text:span text:style-name="T117"> <text:s text:c="2"/>849 <text:s/></text:span></text:p>
      <text:p text:style-name="P61"><text:s text:c="15"/></text:p>
      <text:p text:style-name="P61"><text:s text:c="11"/>LITTEDEAN JAM MUSEUM</text:p>
      <text:p text:style-name="P49"><text:s text:c="15"/>WAGON</text:p>
      <text:p text:style-name="P70"><text:s text:c="14"/>85XXXX <text:s text:c="2"/></text:p>
      <text:p text:style-name="P61"><text:s text:c="6"/></text:p>
      <text:p text:style-name="P70"><text:s text:c="15"/>LITTLE D</text:p>
      <text:p text:style-name="P111"><text:s text:c="13"/>COACH</text:p>
      <text:p text:style-name="P61"><text:s text:c="13"/>116</text:p>
      <text:p text:style-name="P231"/>
      <text:p text:style-name="P175"><text:s text:c="6"/>LONDON <text:s/>TRANSPORT MUSEUM</text:p>
      <text:p text:style-name="P168"><text:s text:c="7"/>EMUS</text:p>
      <text:p text:style-name="P217"><text:s text:c="5"/>L35 ESL107 L134 L131 61 3530 10012 22679 16 11012</text:p>
      <text:p text:style-name="P262"><text:s text:c="2"/>(L126 4416) 3227 4417 12048 5279 3052 3734 5034 VB5721</text:p>
      <text:p text:style-name="P61"><text:span text:style-name="T40"><text:s text:c="8"/></text:span><text:s text:c="3"/>08063 (7296 846) 012256 </text:p>
      <text:p text:style-name="P61"/>
      <text:p text:style-name="P217">DIESEL</text:p>
      <text:p text:style-name="P61"><text:s text:c="11"/>12</text:p>
      <text:p text:style-name="P115"><text:s/></text:p>
      <text:p text:style-name="P46"><text:s text:c="9"/><text:span text:style-name="T14"><text:s text:c="2"/>ON TRACK PLANT</text:span></text:p>
      <text:p text:style-name="P61"><text:s text:c="15"/>C622 EWT <text:s text:c="14"/></text:p>
      <text:p text:style-name="P61"><text:s text:c="11"/></text:p>
      <text:p text:style-name="P201"><text:span text:style-name="T117"><text:s/></text:span><text:span text:style-name="T11"><text:s text:c="4"/>WAGONS</text:span></text:p>
      <text:p text:style-name="P70"><text:s text:c="13"/>LT558 <text:s/>LT583 <text:s/>LT584 <text:s/>BW214 <text:s/>63 <text:s text:c="9"/></text:p>
      <text:p text:style-name="P217"><text:s/></text:p>
      <text:p text:style-name="P217"><text:s/><text:span text:style-name="T117">LONDON COVENT GARDEN</text:span></text:p>
      <text:p text:style-name="P217"><text:s text:c="6"/>COACH </text:p>
      <text:p text:style-name="P225"><text:s text:c="15"/>400</text:p>
      <text:p text:style-name="P217"><text:s text:c="4"/></text:p>
      <text:p text:style-name="P61"><text:s text:c="12"/><text:span text:style-name="T117">DIESELS</text:span></text:p>
      <text:p text:style-name="P133"><text:s text:c="17"/>5 <text:s/>13</text:p>
      <text:p text:style-name="P133"/>
      <text:p text:style-name="P61"><text:s text:c="14"/>STEAM</text:p>
      <text:p text:style-name="P156"><text:s text:c="12"/>(23 710) </text:p>
      <text:p text:style-name="P156"><text:s text:c="15"/></text:p>
      <text:p text:style-name="P61"><text:s text:c="11"/><text:span text:style-name="T117"><text:s text:c="4"/>TUBE</text:span></text:p>
      <text:p text:style-name="P175"><text:s text:c="12"/>11182 644 30</text:p>
      <text:p text:style-name="P217"><text:s text:c="5"/></text:p>
      <text:p text:style-name="P111"><text:s text:c="11"/><text:span text:style-name="T117"><text:s text:c="7"/>LOPEN</text:span></text:p>
      <text:p text:style-name="P262">COACH</text:p>
      <text:p text:style-name="P148"><text:s text:c="10"/>1085</text:p>
      <text:p text:style-name="P148"/>
      <text:p text:style-name="P61"><text:s text:c="7"/>LOWESTOFT</text:p>
      <text:p text:style-name="P262"><text:s text:c="4"/>COACHES</text:p>
      <text:p text:style-name="P61"><text:s text:c="11"/>4424 35414</text:p>
      <text:p text:style-name="P61"><text:s text:c="10"/></text:p>
      <text:p text:style-name="P217">DIESEL</text:p>
      <text:p text:style-name="P61"><text:s text:c="12"/>305315 <text:s text:c="2"/></text:p>
      <text:p text:style-name="P217"><text:s text:c="7"/></text:p>
      <text:p text:style-name="P217"><text:s text:c="2"/><text:span text:style-name="T116">LRCHESTER NARROW GAUGE <text:s/></text:span></text:p>
      <text:p text:style-name="P217"><text:s text:c="2"/>STEAMS</text:p>
      <text:p text:style-name="P217"><text:s text:c="6"/><text:span text:style-name="T65">493</text:span> <text:span text:style-name="T65">1870</text:span> <text:span text:style-name="T65">1871</text:span> <text:span text:style-name="T65">2029</text:span></text:p>
      <text:p text:style-name="P221"/>
      <text:p text:style-name="P61"><text:s text:c="14"/>DIESELS</text:p>
      <text:p text:style-name="P70"><text:s text:c="12"/><text:span text:style-name="T65">1363</text:span> <text:span text:style-name="T65">2419</text:span> <text:span text:style-name="T65">211679</text:span> <text:span text:style-name="T65">338439</text:span> <text:span text:style-name="T65">411322</text:span> </text:p>
      <text:p text:style-name="P225"/>
      <text:p text:style-name="P225"><text:s/></text:p>
      <text:p text:style-name="P217"><text:s text:c="4"/>GROUND WAGON </text:p>
      <text:p text:style-name="P111"><text:s text:c="13"/><text:span text:style-name="T65">12T </text:span></text:p>
      <text:p text:style-name="P111"><text:span text:style-name="T117"><text:s text:c="16"/></text:span><text:span text:style-name="T120">LYTHAN ST</text:span></text:p>
      <text:p text:style-name="P49"><text:s text:c="15"/>COACHES</text:p>
      <text:p text:style-name="P111"><text:span text:style-name="T117"><text:s text:c="17"/></text:span><text:span text:style-name="T118">5452</text:span><text:span text:style-name="T117"> </text:span><text:span text:style-name="T118">13453</text:span><text:span text:style-name="T117"> <text:s text:c="4"/></text:span></text:p>
      <text:p text:style-name="P70"><text:s text:c="14"/></text:p>
      <text:p text:style-name="P225"/>
      <text:p text:style-name="P168"><text:span text:style-name="T117"><text:s text:c="2"/></text:span><text:span text:style-name="T117"><text:s text:c="3"/>MAENOFFERN SLATE</text:span></text:p>
      <text:p text:style-name="P265"><text:s text:c="4"/>WAGON</text:p>
      <text:p text:style-name="P225"><text:s text:c="12"/>428224</text:p>
      <text:p text:style-name="P62"><text:s/></text:p>
      <text:p text:style-name="P61"><text:s text:c="7"/><text:span text:style-name="T117">MARGATE LOCOMOTIVE </text:span></text:p>
      <text:p text:style-name="P111"><text:s text:c="12"/>DIESELS</text:p>
      <text:p text:style-name="P61"><text:span text:style-name="T49"><text:s text:c="12"/></text:span><text:span text:style-name="T117">47841 </text:span><text:span text:style-name="T118">37190</text:span></text:p>
      <text:p text:style-name="P73"/>
      <text:p text:style-name="P70"><text:s text:c="14"/>STEAMS</text:p>
      <text:p text:style-name="P70"><text:s text:c="14"/>45379 4464</text:p>
      <text:p text:style-name="P91"><text:span text:style-name="T87"><text:s text:c="9"/></text:span><text:span text:style-name="T15"><text:s text:c="3"/></text:span></text:p>
      <text:p text:style-name="P61"/>
      <text:p text:style-name="P169"><text:s text:c="4"/>EMUS</text:p>
      <text:p text:style-name="P61"><text:s text:c="13"/>12795 12796 28690 29720 29289 10239 12354 13354</text:p>
      <text:p text:style-name="P61"><text:s text:c="14"/>3304</text:p>
      <text:p text:style-name="P225"/>
      <text:p text:style-name="P70"><text:s text:c="18"/>COACHES</text:p>
      <text:p text:style-name="P61"><text:span text:style-name="T117"><text:s text:c="13"/>9005 305 21096 (4356S)</text:span> <text:s/></text:p>
      <text:p text:style-name="P185"/>
      <text:p text:style-name="P168"><text:s text:c="4"/>ROAD RAILER</text:p>
      <text:p text:style-name="P217"><text:s text:c="5"/>B30W <text:s text:c="15"/></text:p>
      <text:p text:style-name="P217"/>
      <text:p text:style-name="P217"><text:s text:c="2"/>CRANE</text:p>
      <text:p text:style-name="P217"><text:s text:c="12"/>96719</text:p>
      <text:p text:style-name="P217"/>
      <text:p text:style-name="P70"><text:s text:c="7"/>MARLESFORD</text:p>
      <text:p text:style-name="P262"><text:s text:c="2"/>Ground coach</text:p>
      <text:p text:style-name="P70"><text:s text:c="12"/>297 <text:s text:c="3"/></text:p>
      <text:p text:style-name="P61"><text:s text:c="11"/></text:p>
      <text:p text:style-name="P61"><text:s text:c="9"/><text:span text:style-name="T117">MAUD OLD STATION</text:span></text:p>
      <text:p text:style-name="P265"><text:s text:c="4"/>WAGONS <text:s/></text:p>
      <text:p text:style-name="P70"><text:s text:c="15"/>18 173596 </text:p>
      <text:p text:style-name="P70"><text:s/></text:p>
      <text:p text:style-name="P70"><text:s text:c="13"/><text:span text:style-name="T116">MIDDLESBOROUGH </text:span></text:p>
      <text:p text:style-name="P262"><text:s text:c="4"/>WAGON</text:p>
      <text:p text:style-name="P61"><text:span text:style-name="T117"><text:s text:c="16"/></text:span><text:span text:style-name="T118">6</text:span><text:span text:style-name="T117"> <text:s text:c="2"/></text:span></text:p>
      <text:p text:style-name="P61"><text:s text:c="7"/></text:p>
      <text:p text:style-name="P61"><text:s text:c="10"/><text:span text:style-name="T117"><text:s/></text:span><text:span text:style-name="T120">MIDDLETON TOP </text:span></text:p>
      <text:p text:style-name="P61"><text:s text:c="11"/>WAGON</text:p>
      <text:p text:style-name="P73"><text:span text:style-name="T72"><text:s text:c="10"/></text:span><text:s/>5PLANK*</text:p>
      <text:p text:style-name="P168"><text:s text:c="8"/></text:p>
      <text:p text:style-name="P61"><text:s text:c="14"/><text:span text:style-name="T116">MILCOTE</text:span></text:p>
      <text:p text:style-name="P61"><text:s text:c="13"/>COACH</text:p>
      <text:p text:style-name="P104"><text:span text:style-name="T14"><text:s text:c="8"/></text:span><text:span text:style-name="T10"><text:s text:c="2"/></text:span><text:span text:style-name="T9"><text:s/>5344</text:span></text:p>
      <text:p text:style-name="P115"><text:s text:c="9"/></text:p>
      <text:p text:style-name="P217"><text:s text:c="4"/>MILTON KEYNES MUSEUM</text:p>
      <text:p text:style-name="P61"><text:s text:c="18"/>COACH</text:p>
      <text:p text:style-name="P217"><text:s text:c="15"/>LNWR</text:p>
      <text:p text:style-name="P61"><text:s text:c="12"/></text:p>
      <text:p text:style-name="P217"><text:s text:c="3"/><text:span text:style-name="T117"><text:s/>STEAM</text:span></text:p>
      <text:p text:style-name="P217"><text:s text:c="14"/>1009</text:p>
      <text:p text:style-name="P168"><text:s text:c="2"/></text:p>
      <text:p text:style-name="P168"><text:s text:c="3"/>MIZENS</text:p>
      <text:p text:style-name="P217"><text:s text:c="5"/>WAGON GROUND</text:p>
      <text:p text:style-name="P217"><text:s text:c="16"/>126984</text:p>
      <text:p text:style-name="P225"><text:s text:c="3"/>STEAM</text:p>
      <text:p text:style-name="P115"><text:s text:c="14"/>3819 <text:s text:c="2"/></text:p>
      <text:p text:style-name="P34"><text:s/></text:p>
      <text:p text:style-name="P175"><text:s/>EMU</text:p>
      <text:p text:style-name="P70"><text:s text:c="14"/>76887 <text:s/></text:p>
      <text:p text:style-name="P217"><text:s text:c="2"/></text:p>
      <text:p text:style-name="P111"><text:s text:c="9"/><text:span text:style-name="T85"><text:s/></text:span><text:s text:c="3"/>MORETON ON LUGG</text:p>
      <text:p text:style-name="P217"><text:s text:c="13"/>WAGONS</text:p>
      <text:p text:style-name="P61"><text:s text:c="16"/>738718 150473CR 991804 783708 993891 <text:s text:c="3"/></text:p>
      <text:p text:style-name="P61"><text:s text:c="7"/></text:p>
      <text:p text:style-name="P61"><text:s text:c="15"/><text:span text:style-name="T117"><text:s text:c="3"/>CRANE</text:span></text:p>
      <text:p text:style-name="P217"><text:s text:c="12"/>DW603</text:p>
      <text:p text:style-name="P169"><text:s/>DIESELS</text:p>
      <text:p text:style-name="P169"><text:s text:c="15"/>03145 D2578 D2302</text:p>
      <text:p text:style-name="P217"><text:s text:c="4"/></text:p>
      <text:p text:style-name="P217"><text:s text:c="8"/><text:span text:style-name="T116">MONKWEARMOUTH STATION</text:span></text:p>
      <text:p text:style-name="P217"><text:s text:c="6"/>COACH</text:p>
      <text:p text:style-name="P61"><text:span text:style-name="T117"><text:s text:c="14"/></text:span><text:span text:style-name="T118">1298</text:span><text:span text:style-name="T117"> <text:s text:c="6"/></text:span></text:p>
      <text:p text:style-name="P217"/>
      <text:p text:style-name="P217"><text:s text:c="2"/><text:span text:style-name="T117"><text:s text:c="2"/>WAGON</text:span></text:p>
      <text:p text:style-name="P217"><text:span text:style-name="T117"><text:s text:c="12"/></text:span><text:span text:style-name="T118">20800</text:span> <text:s text:c="4"/></text:p>
      <text:p text:style-name="P217"><text:s text:c="3"/></text:p>
      <text:p text:style-name="P225"><text:s text:c="3"/>NATIONAL COAL MINING MUSEUM WF4 4RH</text:p>
      <text:p text:style-name="P46"><text:s text:c="15"/>WAGONS</text:p>
      <text:p text:style-name="P225"><text:s text:c="13"/>322 NCB14 NCB15 21M 9 1986 1822 8PL HOPPER <text:s text:c="3"/></text:p>
      <text:p text:style-name="P168"><text:s text:c="4"/></text:p>
      <text:p text:style-name="P70"><text:s text:c="13"/>DIESELS NG </text:p>
      <text:p text:style-name="P49"><text:s text:c="11"/>7 8832 DM655 DM746 KIRSTIN T1102 20 COMPO 1356 </text:p>
      <text:p text:style-name="P49"><text:s text:c="12"/>379659 2463 <text:span text:style-name="T5">480679 (8581 DM1433)</text:span></text:p>
      <text:p text:style-name="P70"><text:s text:c="11"/>(2001 831) (1997 857) 249V <text:s/>6684</text:p>
      <text:p text:style-name="P111"><text:s text:c="9"/></text:p>
      <text:p text:style-name="P61"><text:s text:c="16"/>STEAM </text:p>
      <text:p text:style-name="P217"><text:s text:c="11"/>7298 </text:p>
      <text:p text:style-name="P61"><text:s text:c="10"/></text:p>
      <text:p text:style-name="P70"><text:s text:c="12"/>CRANE</text:p>
      <text:p text:style-name="P70"><text:s text:c="12"/>1766</text:p>
      <text:p text:style-name="P70"/>
      <text:p text:style-name="P217"><text:span text:style-name="T117"><text:s text:c="7"/></text:span><text:s text:c="4"/><text:span text:style-name="T117">NATIONAL M WALES <text:s text:c="2"/>CF15 <text:s/>7QT</text:span></text:p>
      <text:p text:style-name="P250"><text:s text:c="3"/>Ground Coaches</text:p>
      <text:p text:style-name="P61"><text:s text:c="9"/>801 64 (BARE WOOD) (4W HORSE D) (4W BRAKE T ) </text:p>
      <text:p text:style-name="P61"><text:s text:c="12"/>CHOCOALATE CREAM</text:p>
      <text:p text:style-name="P217">(51 6413) (1776 203) (6277 238) 706XXUF </text:p>
      <text:p text:style-name="P217"><text:s text:c="6"/></text:p>
      <text:p text:style-name="P148"><text:s text:c="2"/>WAGONS</text:p>
      <text:p text:style-name="P111"><text:s text:c="13"/>7328 <text:s/>GREY 835 (CRANE R ADW230)</text:p>
      <text:p text:style-name="P49"><text:span text:style-name="T5"><text:s/></text:span><text:span text:style-name="T30"><text:s/></text:span></text:p>
      <text:p text:style-name="P217"><text:s/>DIESEL</text:p>
      <text:p text:style-name="P61"><text:s text:c="16"/>187100</text:p>
      <text:p text:style-name="P217"><text:s text:c="3"/></text:p>
      <text:p text:style-name="P217"><text:s text:c="3"/>STEAMS</text:p>
      <text:p text:style-name="P61"><text:s text:c="13"/>1966 2238 </text:p>
      <text:p text:style-name="P61"/>
      <text:p text:style-name="P70"><text:s text:c="12"/>CRANES</text:p>
      <text:p text:style-name="P61"><text:s text:c="13"/>230 10373</text:p>
      <text:p text:style-name="P61"><text:s text:c="9"/></text:p>
      <text:p text:style-name="P217"><text:s text:c="6"/>NATIONAL WATERFRONT SR1 3RD</text:p>
      <text:p text:style-name="P217"><text:s text:c="3"/>WAGON</text:p>
      <text:p text:style-name="P70"><text:s text:c="12"/>2292 <text:s/></text:p>
      <text:p text:style-name="P61"><text:s text:c="13"/><text:span text:style-name="T117"><text:s text:c="2"/></text:span></text:p>
      <text:p text:style-name="P225"><text:s text:c="2"/>STEAM </text:p>
      <text:p text:style-name="P70"><text:s text:c="13"/>PENYDARREN</text:p>
      <text:p text:style-name="P144"><text:span text:style-name="T72"><text:s text:c="3"/></text:span><text:span text:style-name="T14"><text:s text:c="3"/></text:span><text:span text:style-name="T10"><text:s/></text:span></text:p>
      <text:p text:style-name="P225"><text:s/>NATIONAL WATERWAYS MUSEUM GL1 2EH</text:p>
      <text:p text:style-name="P111"><text:s text:c="19"/>WAGONS</text:p>
      <text:p text:style-name="P46"><text:s text:c="14"/>4W FLAT) <text:span text:style-name="T65">35342</text:span></text:p>
      <text:p text:style-name="P225"><text:s text:c="7"/><text:span text:style-name="T65">(4W FLAT IN MUSEUM)</text:span></text:p>
      <text:p text:style-name="P217"><text:s text:c="3"/></text:p>
      <text:p text:style-name="P46"><text:s text:c="10"/><text:span text:style-name="T14"><text:s text:c="4"/>CRANES</text:span></text:p>
      <text:p text:style-name="P61"><text:s text:c="14"/>GRAY <text:s/>1624 1800 </text:p>
      <text:p text:style-name="P61"/>
      <text:p text:style-name="P217">NATIONAL INDUSTRAL MUSEUM <text:s/>SA1 2JT</text:p>
      <text:p text:style-name="P46"><text:s text:c="16"/>WAGON</text:p>
      <text:p text:style-name="P135"><text:s text:c="16"/>315754</text:p>
      <text:p text:style-name="P225"/>
      <text:p text:style-name="P148"/>
      <text:p text:style-name="P217"><text:s text:c="11"/>COACH</text:p>
      <text:p text:style-name="P217"><text:span text:style-name="T117"><text:s text:c="11"/>SALOON</text:span> <text:s text:c="2"/></text:p>
      <text:p text:style-name="P222"/>
      <text:p text:style-name="P225"><text:s text:c="4"/>DIESEL</text:p>
      <text:p text:style-name="P225"><text:s text:c="12"/>7910</text:p>
      <text:p text:style-name="P225"/>
      <text:p text:style-name="P225">STEAMS</text:p>
      <text:p text:style-name="P217"><text:s text:c="12"/>1473 1426</text:p>
      <text:p text:style-name="P217"/>
      <text:p text:style-name="P225"><text:s text:c="2"/>NATIONAL MINING MUSEUM <text:s/>EH22 4QN </text:p>
      <text:p text:style-name="P46"><text:s text:c="17"/>WAGONS</text:p>
      <text:p text:style-name="P61"><text:span text:style-name="T117"><text:s text:c="16"/></text:span><text:span text:style-name="T118">41*</text:span><text:span text:style-name="T117"> L22 (7PL MINERAL OPED) 515 117</text:span></text:p>
      <text:p text:style-name="P70"/>
      <text:p text:style-name="P70"><text:s text:c="11"/>DIESELS</text:p>
      <text:p text:style-name="P70"><text:s text:c="10"/>4074 (B3325A) (B5871A)</text:p>
      <text:p text:style-name="P225"><text:s text:c="5"/></text:p>
      <text:p text:style-name="P217"><text:s text:c="2"/>STEAMS</text:p>
      <text:p text:style-name="P70"><text:s text:c="16"/><text:span text:style-name="T65">2284</text:span> 1458 <text:s text:c="12"/></text:p>
      <text:p text:style-name="P70"><text:s text:c="6"/></text:p>
      <text:p text:style-name="P262"><text:s text:c="2"/><text:span text:style-name="T17">NORTH EAST ESSEX</text:span></text:p>
      <text:p text:style-name="P217"><text:s text:c="8"/>WAGONS</text:p>
      <text:p text:style-name="P217"><text:s text:c="12"/>476325 (4W 3PL) </text:p>
      <text:p text:style-name="P217"><text:s text:c="18"/></text:p>
      <text:p text:style-name="P111"><text:s text:c="7"/><text:span text:style-name="T117"><text:s/></text:span><text:span text:style-name="T49"><text:s text:c="2"/></text:span><text:span text:style-name="T117">NORTH EAST PRESEVATION</text:span></text:p>
      <text:p text:style-name="P262"><text:s text:c="3"/>WAGON</text:p>
      <text:p text:style-name="P217"><text:span text:style-name="T49"><text:s text:c="12"/></text:span><text:span text:style-name="T117"><text:s text:c="2"/>998022 </text:span><text:span text:style-name="T49"><text:s/></text:span></text:p>
      <text:p text:style-name="P217"><text:s text:c="5"/></text:p>
      <text:p text:style-name="P217"><text:s text:c="3"/>STEAM</text:p>
      <text:p text:style-name="P70"><text:s text:c="13"/>69023</text:p>
      <text:p text:style-name="P238"><text:s text:c="3"/><text:span text:style-name="T73"><text:s text:c="2"/></text:span></text:p>
      <text:p text:style-name="P70"><text:s text:c="9"/>COACH</text:p>
      <text:p text:style-name="P70"><text:s text:c="14"/><text:span text:style-name="T65">21249</text:span></text:p>
      <text:p text:style-name="P61"><text:s text:c="15"/></text:p>
      <text:p text:style-name="P61"><text:s text:c="6"/><text:span text:style-name="T117"><text:s text:c="5"/>NOTTINGHAM WOLLATTON HALL</text:span></text:p>
      <text:p text:style-name="P49"><text:s text:c="15"/>WAGON</text:p>
      <text:p text:style-name="P61"><text:s text:c="15"/>171</text:p>
      <text:p text:style-name="P61"><text:s text:c="6"/></text:p>
      <text:p text:style-name="P175"><text:s text:c="3"/>OLD HALL WORKING FARM</text:p>
      <text:p text:style-name="P46"><text:s text:c="13"/>Ground Wagons</text:p>
      <text:p text:style-name="P217"><text:span text:style-name="T49"><text:s text:c="13"/></text:span><text:span text:style-name="T117">757XXX 772528 </text:span></text:p>
      <text:p text:style-name="P164"><text:span text:style-name="T17"><text:s/></text:span><text:span text:style-name="T88"><text:s/></text:span><text:span text:style-name="T17"><text:s/></text:span></text:p>
      <text:p text:style-name="P61"><text:s text:c="15"/><text:span text:style-name="T117"><text:s text:c="3"/>STEAM </text:span></text:p>
      <text:p text:style-name="P70"><text:s text:c="14"/>3024</text:p>
      <text:p text:style-name="P225"><text:s/>CRANE</text:p>
      <text:p text:style-name="P140"><text:s text:c="13"/>796</text:p>
      <text:p text:style-name="P140"/>
      <text:p text:style-name="P217"><text:s text:c="11"/>OLD RADNOR </text:p>
      <text:p text:style-name="P217"><text:s text:c="7"/>WAGONS</text:p>
      <text:p text:style-name="P217"><text:s text:c="13"/>123329 65243 774917 <text:s/>(12T 4W) <text:s/>(10T 4W)</text:p>
      <text:p text:style-name="P61"><text:s text:c="10"/></text:p>
      <text:p text:style-name="P217"><text:s/><text:span text:style-name="T117"><text:s/>COACH</text:span></text:p>
      <text:p text:style-name="P217"><text:span text:style-name="T117"><text:s text:c="18"/>45</text:span> <text:s text:c="9"/></text:p>
      <text:p text:style-name="P217"><text:s text:c="3"/></text:p>
      <text:p text:style-name="P61"><text:span text:style-name="T117"><text:s text:c="14"/></text:span><text:span text:style-name="T120">PETWORTH OLD ST</text:span></text:p>
      <text:p text:style-name="P217"><text:s text:c="7"/>COACHES</text:p>
      <text:p text:style-name="P217"><text:s text:c="14"/><text:span text:style-name="T65">47</text:span> <text:s/><text:span text:style-name="T65"><text:s/>50 </text:span><text:s text:c="3"/><text:span text:style-name="T65">154</text:span> <text:s text:c="2"/><text:span text:style-name="T65">156</text:span> <text:s text:c="5"/></text:p>
      <text:p text:style-name="P217"><text:s text:c="4"/></text:p>
      <text:p text:style-name="P168"><text:s/><text:span text:style-name="T117"><text:s/></text:span><text:span text:style-name="T112"><text:s/></text:span><text:span text:style-name="T120">PINCHINTHORPE</text:span></text:p>
      <text:p text:style-name="P217"><text:s text:c="4"/>COACH </text:p>
      <text:p text:style-name="P148"><text:s text:c="13"/><text:span text:style-name="T65">5447*</text:span> </text:p>
      <text:p text:style-name="P70"><text:s text:c="3"/></text:p>
      <text:p text:style-name="P217"><text:s text:c="6"/>PIDDINGTON</text:p>
      <text:p text:style-name="P262"><text:s text:c="4"/>COACH</text:p>
      <text:p text:style-name="P217"><text:span text:style-name="T49"><text:s text:c="14"/></text:span><text:span text:style-name="T117">395279 <text:s/></text:span></text:p>
      <text:p text:style-name="P217"><text:s text:c="4"/></text:p>
      <text:p text:style-name="P133"><text:s text:c="8"/>POHILL</text:p>
      <text:p text:style-name="P248"><text:s text:c="4"/>COACH</text:p>
      <text:p text:style-name="P70"><text:s text:c="11"/>(5074 10506 806 74)</text:p>
      <text:p text:style-name="P148"><text:s text:c="5"/></text:p>
      <text:p text:style-name="P111"><text:s text:c="7"/></text:p>
      <text:p text:style-name="P61"><text:s text:c="12"/><text:span text:style-name="T117"><text:s/>POPPLETON</text:span></text:p>
      <text:p text:style-name="P61"><text:s text:c="14"/>Ground Wagons </text:p>
      <text:p text:style-name="P217"><text:s text:c="13"/>761037 783329</text:p>
      <text:p text:style-name="P175"><text:s text:c="4"/></text:p>
      <text:p text:style-name="P111"><text:s text:c="14"/>DIESEL <text:s/>NG</text:p>
      <text:p text:style-name="P151"><text:s/>20449 </text:p>
      <text:p text:style-name="P61"><text:s text:c="8"/></text:p>
      <text:p text:style-name="P61"><text:s text:c="13"/><text:span text:style-name="T116"><text:s/>UPPER POPPLETON</text:span></text:p>
      <text:p text:style-name="P46"><text:s text:c="16"/>WAGON GROUND</text:p>
      <text:p text:style-name="P61"><text:span text:style-name="T117"><text:s text:c="16"/></text:span><text:span text:style-name="T118">309982</text:span><text:span text:style-name="T117"> <text:s text:c="7"/></text:span></text:p>
      <text:p text:style-name="P225"/>
      <text:p text:style-name="P225"/>
      <text:p text:style-name="P14"><text:s text:c="8"/><text:span text:style-name="T116">PORTSMOUTH ARMS STATION</text:span></text:p>
      <text:p text:style-name="P262"><text:s text:c="4"/>COACH</text:p>
      <text:p text:style-name="P172"><text:span text:style-name="T119"><text:s text:c="15"/></text:span><text:span text:style-name="T117">136*</text:span></text:p>
      <text:p text:style-name="P61"><text:s text:c="7"/></text:p>
      <text:p text:style-name="P262"><text:s/><text:span text:style-name="T19"><text:s text:c="3"/></text:span><text:span text:style-name="T21">PORTSMOUTH HISTORIC DOCKYARD</text:span></text:p>
      <text:p text:style-name="P111"><text:s text:c="18"/>WAGONS</text:p>
      <text:p text:style-name="P175"><text:s text:c="14"/><text:span text:style-name="T65">217</text:span> <text:span text:style-name="T65">76145</text:span> <text:s text:c="2"/><text:span text:style-name="T65">630569</text:span> <text:s text:c="3"/></text:p>
      <text:p text:style-name="P217"><text:s/></text:p>
      <text:p text:style-name="P217"><text:s text:c="5"/><text:span text:style-name="T117">POULTON WYRE RAILWAY</text:span></text:p>
      <text:p text:style-name="P262"><text:s text:c="2"/><text:span text:style-name="T73"><text:s/></text:span><text:span text:style-name="T74"><text:s/>Ground coach </text:span></text:p>
      <text:p text:style-name="P61"><text:s text:c="14"/>LYR</text:p>
      <text:p text:style-name="P61"/>
      <text:p text:style-name="P70"><text:s text:c="13"/>4237 </text:p>
      <text:p text:style-name="P61"><text:s text:c="11"/></text:p>
      <text:p text:style-name="P61"><text:s text:c="11"/>DIESEL</text:p>
      <text:p text:style-name="P61"><text:s text:c="13"/>4210108 </text:p>
      <text:p text:style-name="P61"/>
      <text:p text:style-name="P111"><text:s text:c="14"/>DMUS</text:p>
      <text:p text:style-name="P61"><text:span text:style-name="T54"><text:s text:c="8"/></text:span><text:s text:c="5"/>54484 51937 <text:s text:c="12"/></text:p>
      <text:p text:style-name="P217"><text:span text:style-name="T117"><text:s/></text:span><text:span text:style-name="T62"><text:s text:c="2"/></text:span><text:span text:style-name="T117">ROAD RAILER</text:span></text:p>
      <text:p text:style-name="P14"><text:s text:c="12"/>(99709 909196 ) </text:p>
      <text:p text:style-name="P70"><text:s text:c="11"/></text:p>
      <text:p text:style-name="P70"><text:s text:c="12"/>PRESTONGRANGE MINING MUSEUM EH32 9RX</text:p>
      <text:p text:style-name="P262"><text:s text:c="3"/><text:span text:style-name="T17">WAGONS</text:span></text:p>
      <text:p text:style-name="P111"><text:s text:c="10"/>161417 <text:span text:style-name="T65">171428*</text:span> <text:s/><text:span text:style-name="T65">207*</text:span> <text:span text:style-name="T65">310*</text:span> <text:span text:style-name="T65">515*</text:span> <text:span text:style-name="T65">11938*</text:span> 187 57</text:p>
      <text:p text:style-name="P61"><text:s text:c="8"/></text:p>
      <text:p text:style-name="P61"><text:s text:c="11"/><text:span text:style-name="T117"><text:s/>STEAMS</text:span></text:p>
      <text:p text:style-name="P115"><text:s text:c="14"/>(1142 OR 23) (2219 OR 17) 536</text:p>
      <text:p text:style-name="P115"/>
      <text:p text:style-name="P111"><text:s text:c="9"/><text:span text:style-name="T117"><text:s text:c="6"/>DIESELS</text:span></text:p>
      <text:p text:style-name="P70"><text:s text:c="12"/>9925 221647 398613 458960</text:p>
      <text:p text:style-name="P262"><text:s/></text:p>
      <text:p text:style-name="P46"><text:s text:c="4"/><text:span text:style-name="T14"><text:s/></text:span><text:span text:style-name="T10"><text:s text:c="7"/>CRANES</text:span></text:p>
      <text:p text:style-name="P217"><text:span text:style-name="T117"><text:s text:c="2"/></text:span><text:span text:style-name="T118">130</text:span><text:span text:style-name="T117"> <text:s/></text:span><text:span text:style-name="T118">3516</text:span><text:span text:style-name="T117"> <text:s text:c="6"/></text:span></text:p>
      <text:p text:style-name="P219"><text:s text:c="5"/></text:p>
      <text:p text:style-name="P61"><text:s text:c="14"/><text:span text:style-name="T117">PUGNEYS LIGHT RAILWAY</text:span></text:p>
      <text:p text:style-name="P61"><text:s text:c="21"/>DIESELS</text:p>
      <text:p text:style-name="P111"><text:s text:c="14"/>1671 XXXX 20XX <text:s text:c="5"/></text:p>
      <text:p text:style-name="P61"><text:s text:c="9"/></text:p>
      <text:p text:style-name="P111"><text:s text:c="11"/>RANNOCH</text:p>
      <text:p text:style-name="P217"><text:s text:c="6"/>COACH</text:p>
      <text:p text:style-name="P225"><text:s text:c="9"/>2703 <text:s/></text:p>
      <text:p text:style-name="P227"/>
      <text:p text:style-name="P217"><text:s text:c="8"/>RAVENGLASS <text:s text:c="2"/>RAILWAY</text:p>
      <text:p text:style-name="P250"><text:s text:c="2"/>COACHES</text:p>
      <text:p text:style-name="P225"><text:span text:style-name="T54"><text:s text:c="12"/></text:span><text:s/><text:span text:style-name="T65">135</text:span> <text:span text:style-name="T65">137</text:span></text:p>
      <text:p text:style-name="P169"/>
      <text:p text:style-name="P217"><text:s text:c="4"/><text:span text:style-name="T117">STEAMS NG</text:span></text:p>
      <text:p text:style-name="P111"><text:s text:c="12"/>(1664 OR 11) <text:s/>(21104 OR 6) <text:s/>3 KATIE 10 <text:s text:c="2"/>9 <text:s/>32 <text:s text:c="2"/>14 <text:s/>ELLA <text:s text:c="2"/></text:p>
      <text:p text:style-name="P49"><text:s text:c="9"/><text:span text:style-name="T5"><text:s text:c="3"/></text:span><text:span text:style-name="T5"><text:s/>(1326 <text:s/>BLACOLVESLEY)</text:span></text:p>
      <text:p text:style-name="P61"><text:s text:c="8"/></text:p>
      <text:p text:style-name="P217"><text:s text:c="2"/>DIESELS NG</text:p>
      <text:p text:style-name="P49"><text:s text:c="18"/>5 <text:s text:c="3"/>(DDC1969) <text:s/>ICL8 <text:s text:c="2"/>2 <text:s text:c="2"/>39 <text:s/>2782 <text:s text:c="2"/>28800 <text:s text:c="2"/>40009 <text:s/></text:p>
      <text:p text:style-name="P262"><text:span text:style-name="T19"><text:s text:c="17"/>51721 <text:s/>277273 4404 </text:span><text:span text:style-name="T17"><text:s text:c="4"/></text:span></text:p>
      <text:p text:style-name="P46"><text:s text:c="9"/><text:span text:style-name="T14"><text:s/></text:span></text:p>
      <text:p text:style-name="P248"><text:s text:c="2"/><text:span text:style-name="T14"><text:s text:c="2"/></text:span><text:span text:style-name="T10"><text:s text:c="2"/></text:span><text:span text:style-name="T12">RAYNE S</text:span></text:p>
      <text:p text:style-name="P49"><text:s text:c="15"/>COACH</text:p>
      <text:p text:style-name="P61"><text:span text:style-name="T117"><text:s text:c="15"/></text:span><text:span text:style-name="T118">5322</text:span></text:p>
      <text:p text:style-name="P231"/>
      <text:p text:style-name="P70"><text:s text:c="15"/>RICHMOND LIGHT RAILWAY <text:s/>NG</text:p>
      <text:p text:style-name="P49"><text:s text:c="18"/>STEAMS</text:p>
      <text:p text:style-name="P70"><text:s text:c="16"/>3175 (LEARY) <text:s/>2442 <text:s/>2090 705 <text:s/>810</text:p>
      <text:p text:style-name="P61"><text:s text:c="13"/></text:p>
      <text:p text:style-name="P164"><text:span text:style-name="T17"><text:s text:c="6"/></text:span><text:span text:style-name="T72"><text:s/></text:span><text:span text:style-name="T19">DIESELS</text:span></text:p>
      <text:p text:style-name="P217"><text:s text:c="10"/>903 <text:s/>20073 <text:s/>8828 3701 <text:s/>7403 235654 1887</text:p>
      <text:p text:style-name="P135"><text:s text:c="18"/>3621 235711 <text:s/></text:p>
      <text:p text:style-name="P46"><text:s text:c="9"/></text:p>
      <text:p text:style-name="P278"><text:s text:c="4"/><text:span text:style-name="T116">RAYNHAM PARK</text:span></text:p>
      <text:p text:style-name="P217"><text:s text:c="9"/>COACHES</text:p>
      <text:p text:style-name="P217"><text:s text:c="12"/><text:span text:style-name="T65"><text:s/>1361</text:span> <text:span text:style-name="T65">41</text:span></text:p>
      <text:p text:style-name="P67"/>
      <text:p text:style-name="P221"><text:span text:style-name="T72"><text:s text:c="2"/></text:span><text:span text:style-name="T116">ROGART STATION</text:span></text:p>
      <text:p text:style-name="P217"><text:s text:c="4"/>COACH</text:p>
      <text:p text:style-name="P61"><text:s text:c="15"/><text:span text:style-name="T65">13437</text:span> <text:s/></text:p>
      <text:p text:style-name="P61"><text:s/></text:p>
      <text:p text:style-name="P61"><text:s text:c="12"/>WAGON</text:p>
      <text:p text:style-name="P70"><text:s text:c="11"/><text:span text:style-name="T65"><text:s/>511063</text:span></text:p>
      <text:p text:style-name="P231"/>
      <text:p text:style-name="P217"><text:span text:style-name="T40"><text:s text:c="3"/></text:span><text:s text:c="2"/></text:p>
      <text:p text:style-name="P175"><text:s text:c="5"/>DIESEL</text:p>
      <text:p text:style-name="P61"><text:span text:style-name="T117"><text:s text:c="15"/></text:span><text:span text:style-name="T118">294263</text:span><text:span text:style-name="T117"> <text:s text:c="4"/></text:span></text:p>
      <text:p text:style-name="P111"><text:s text:c="12"/></text:p>
      <text:p text:style-name="P175"><text:s text:c="7"/>ROMNEY HYTHE DYMCHURCH <text:s text:c="2"/>NG</text:p>
      <text:p text:style-name="P225"><text:s/>STEAMS</text:p>
      <text:p text:style-name="P61"><text:span text:style-name="T117"><text:s text:c="6"/>(8378 OR 4) <text:s/></text:span><text:span text:style-name="T118">(22074 OR 8*)</text:span><text:span text:style-name="T117"> <text:s text:c="2"/></text:span><text:span text:style-name="T118">(22072 OR 6*)</text:span> <text:s text:c="8"/><text:span text:style-name="T117"><text:s text:c="2"/></text:span></text:p>
      <text:p text:style-name="P217">(2008 OR ) <text:s text:c="2"/>(22071 OR 5) <text:s/><text:span text:style-name="T65">(22070 OR 3)</text:span> <text:s text:c="5"/></text:p>
      <text:p text:style-name="P61"><text:s text:c="13"/>(21499 OR 1) (2295 OR 10) (2294 OR 9)</text:p>
      <text:p text:style-name="P164"><text:span text:style-name="T74"><text:s text:c="9"/></text:span><text:span text:style-name="T17"><text:s text:c="4"/></text:span><text:span text:style-name="T16">(21500 OR 2**) </text:span><text:span text:style-name="T17"><text:s text:c="4"/></text:span></text:p>
      <text:p text:style-name="P111"><text:s text:c="10"/></text:p>
      <text:p text:style-name="P61"><text:s text:c="16"/>DIESELS</text:p>
      <text:p text:style-name="P140"><text:s text:c="15"/>(37658 OR 7) <text:s/><text:span text:style-name="T65">(7059 OR 4*)</text:span> <text:s text:c="2"/><text:span text:style-name="T65">(6143 OR 12*)</text:span> <text:s/></text:p>
      <text:p text:style-name="P217"><text:s/><text:span text:style-name="T117"><text:s/></text:span><text:span text:style-name="T118">(2336 OR 14)</text:span><text:span text:style-name="T117"> <text:s text:c="2"/></text:span><text:span text:style-name="T118">(PW5 OR 15)</text:span></text:p>
      <text:p text:style-name="P225"/>
      <text:p text:style-name="P61"><text:s text:c="19"/>ROWDEN MILL</text:p>
      <text:p text:style-name="P265"><text:s text:c="4"/>COACHES</text:p>
      <text:p text:style-name="P61"><text:s text:c="14"/>82 <text:s text:c="2"/><text:span text:style-name="T65">999508</text:span></text:p>
      <text:p text:style-name="P266"><text:s text:c="3"/></text:p>
      <text:p text:style-name="P61"><text:s text:c="13"/>WAGONS</text:p>
      <text:p text:style-name="P61"><text:s text:c="16"/><text:span text:style-name="T65">1XXXXX </text:span></text:p>
      <text:p text:style-name="P61"><text:s text:c="8"/></text:p>
      <text:p text:style-name="P175"><text:s text:c="5"/>782879 </text:p>
      <text:p text:style-name="P70"><text:s text:c="5"/></text:p>
      <text:p text:style-name="P61"><text:s text:c="7"/>ROAD RAILERS</text:p>
      <text:p text:style-name="P61"><text:s text:c="13"/>2 W CYCLE 7526 <text:s text:c="2"/><text:span text:style-name="T117"><text:s text:c="8"/></text:span></text:p>
      <text:p text:style-name="P170"><text:s text:c="5"/><text:span text:style-name="T117"><text:s text:c="4"/></text:span></text:p>
      <text:p text:style-name="P225"><text:s text:c="2"/>ROWLER MANOR </text:p>
      <text:p text:style-name="P46"><text:s text:c="17"/>COACHES</text:p>
      <text:p text:style-name="P111"><text:s text:c="13"/>24079 <text:s text:c="2"/>SR 412</text:p>
      <text:p text:style-name="P111"/>
      <text:p text:style-name="P223">ROWARTH </text:p>
      <text:p text:style-name="P221"><text:span text:style-name="T119"><text:s text:c="15"/></text:span><text:span text:style-name="T117"><text:s/>289*</text:span><text:span text:style-name="T112"> </text:span><text:span text:style-name="T117"><text:s/></text:span><text:span text:style-name="T119"><text:s text:c="2"/></text:span></text:p>
      <text:p text:style-name="P61"><text:s text:c="11"/></text:p>
      <text:p text:style-name="P148"><text:s text:c="4"/><text:span text:style-name="T117">RUILSILP LIDO RAILWAY</text:span></text:p>
      <text:p text:style-name="P217"><text:s text:c="10"/>DIESEILS</text:p>
      <text:p text:style-name="P176"><text:s text:c="9"/>(2140-2-03 8) <text:s/>(DD25-73 3) <text:s/>(222 3 90 7) <text:s/>5 </text:p>
      <text:p text:style-name="P61"><text:s text:c="15"/><text:span text:style-name="T117"><text:s text:c="2"/>(11048011 9)</text:span></text:p>
      <text:p text:style-name="P61"/>
      <text:p text:style-name="P61"><text:s text:c="17"/>STEAM</text:p>
      <text:p text:style-name="P61"><text:span text:style-name="T117"><text:s text:c="16"/>6 <text:s/></text:span><text:s/></text:p>
      <text:p text:style-name="P133"/>
      <text:p text:style-name="P133"><text:s text:c="3"/><text:span text:style-name="T117"><text:s text:c="14"/>RUSPIDGE HALT</text:span></text:p>
      <text:p text:style-name="P250"><text:s text:c="3"/>WAGON </text:p>
      <text:p text:style-name="P135"><text:s text:c="14"/>171 <text:s text:c="2"/></text:p>
      <text:p text:style-name="P111"><text:s/></text:p>
      <text:p text:style-name="P217"><text:span text:style-name="T117"><text:s/></text:span><text:span text:style-name="T120">SANDFORD STATION</text:span></text:p>
      <text:p text:style-name="P217"><text:s text:c="4"/>WAGONS <text:s text:c="19"/></text:p>
      <text:p text:style-name="P61"><text:s text:c="14"/><text:span text:style-name="T65">141056</text:span> <text:span text:style-name="T65">(12T 4W 6PL)</text:span></text:p>
      <text:p text:style-name="P111"><text:s text:c="8"/></text:p>
      <text:p text:style-name="P217"><text:soft-page-break/><text:s text:c="5"/>STEAM</text:p>
      <text:p text:style-name="P61"><text:span text:style-name="T117"><text:s text:c="11"/></text:span><text:span text:style-name="T118">9387 </text:span><text:span text:style-name="T117"><text:s text:c="3"/></text:span><text:s text:c="4"/></text:p>
      <text:p text:style-name="P61"><text:s text:c="7"/></text:p>
      <text:p text:style-name="P46"><text:s text:c="10"/><text:span text:style-name="T14"><text:s text:c="2"/></text:span><text:span text:style-name="T10"><text:s text:c="6"/>COACH</text:span></text:p>
      <text:p text:style-name="P61"><text:span text:style-name="T92"><text:s text:c="14"/></text:span><text:span text:style-name="T118">70826</text:span><text:span text:style-name="T117"> <text:s text:c="3"/></text:span></text:p>
      <text:p text:style-name="P73"/>
      <text:p text:style-name="P231"/>
      <text:p text:style-name="P73"/>
      <text:p text:style-name="P61"><text:s text:c="11"/></text:p>
      <text:p text:style-name="P248"><text:span text:style-name="T14"><text:s text:c="9"/></text:span><text:span text:style-name="T56"><text:s/></text:span></text:p>
      <text:p text:style-name="P67"><text:span text:style-name="T86"><text:s text:c="10"/></text:span><text:span text:style-name="T72"><text:s/></text:span></text:p>
      <text:p text:style-name="P217"><text:s/></text:p>
      <text:p text:style-name="P217"><text:s/></text:p>
      <text:p text:style-name="P220"><text:span text:style-name="T117"><text:s text:c="7"/></text:span><text:span text:style-name="T120">SANDSEND</text:span><text:span text:style-name="T117"> </text:span></text:p>
      <text:p text:style-name="P265"><text:s text:c="4"/>COACH</text:p>
      <text:p text:style-name="P133"><text:span text:style-name="T117"><text:s text:c="13"/></text:span><text:span text:style-name="T118"><text:s/>4606</text:span><text:span text:style-name="T117"> <text:s text:c="6"/></text:span></text:p>
      <text:p text:style-name="P136"><text:s text:c="15"/></text:p>
      <text:p text:style-name="P61"><text:s text:c="14"/><text:span text:style-name="T116">SAUGHTREE STATION</text:span></text:p>
      <text:p text:style-name="P262"><text:s text:c="4"/>WAGONS</text:p>
      <text:p text:style-name="P148"><text:s text:c="12"/><text:span text:style-name="T65">740084* </text:span><text:s/><text:span text:style-name="T65"><text:s/>740080* <text:s/></text:span><text:s text:c="2"/><text:span text:style-name="T65">950001*</text:span></text:p>
      <text:p text:style-name="P61"><text:s text:c="7"/></text:p>
      <text:p text:style-name="P217"><text:s text:c="5"/>DIESEL</text:p>
      <text:p text:style-name="P61"><text:s text:c="12"/><text:span text:style-name="T65">275882* </text:span><text:s text:c="3"/></text:p>
      <text:p text:style-name="P61"><text:s text:c="10"/></text:p>
      <text:p text:style-name="P169">ROAD RAILERS</text:p>
      <text:p text:style-name="P171"><text:span text:style-name="T62"><text:s text:c="15"/></text:span><text:span text:style-name="T118">99709 011209 2*</text:span><text:span text:style-name="T117"> <text:s text:c="2"/></text:span><text:span text:style-name="T118">99709 909135 4*</text:span><text:span text:style-name="T117"> <text:s/></text:span></text:p>
      <text:p text:style-name="P217"><text:s text:c="2"/></text:p>
      <text:p text:style-name="P61"><text:s text:c="12"/><text:span text:style-name="T117"><text:s/>SCOPWICK <text:s text:c="5"/></text:span></text:p>
      <text:p text:style-name="P49"><text:s text:c="15"/>WAGON</text:p>
      <text:p text:style-name="P70"><text:span text:style-name="T40"><text:s text:c="10"/></text:span><text:span text:style-name="T52"><text:s text:c="3"/></text:span>953089 </text:p>
      <text:p text:style-name="P225"><text:s/></text:p>
      <text:p text:style-name="P217"><text:s text:c="2"/><text:span text:style-name="T117">SELLINDGE</text:span></text:p>
      <text:p text:style-name="P111"><text:s text:c="15"/>COACHES</text:p>
      <text:p text:style-name="P169"><text:s text:c="11"/><text:span text:style-name="T65">S1450</text:span> 02613 BARE WOOD (6W THIRD)</text:p>
      <text:p text:style-name="P133"><text:s text:c="19"/>(6W THIRD GRAY)</text:p>
      <text:p text:style-name="P111"/>
      <text:p text:style-name="P217"><text:s text:c="4"/>EMUS</text:p>
      <text:p text:style-name="P61"><text:s text:c="15"/>10096 11201 11825 13003 <text:s/>16117 14573</text:p>
      <text:p text:style-name="P61"/>
      <text:p text:style-name="P217"><text:s text:c="2"/>LONDON UG</text:p>
      <text:p text:style-name="P217"><text:s text:c="18"/>135</text:p>
      <text:p text:style-name="P217"><text:s/><text:span text:style-name="T117"><text:s text:c="2"/></text:span></text:p>
      <text:p text:style-name="P217"><text:s/>STEAMS</text:p>
      <text:p text:style-name="P61"><text:s text:c="10"/>(403 1157) 35025 (355 799) (3180 75130) </text:p>
      <text:p text:style-name="P61"><text:s text:c="9"/>(2212 68078) <text:s text:c="3"/>(531 1134) </text:p>
      <text:p text:style-name="P111"><text:s text:c="10"/></text:p>
      <text:p text:style-name="P61"><text:s text:c="13"/><text:span text:style-name="T117"><text:s/></text:span><text:span text:style-name="T120">SETTLE STATION</text:span></text:p>
      <text:p text:style-name="P217"><text:s text:c="3"/>WAGON</text:p>
      <text:p text:style-name="P61"><text:s text:c="12"/><text:span text:style-name="T65">SETTLE COAL</text:span> <text:s text:c="6"/></text:p>
      <text:p text:style-name="P61"/>
      <text:p text:style-name="P175"><text:s text:c="4"/>SHED 47 GROUP</text:p>
      <text:p text:style-name="P111"><text:s text:c="12"/>DIESELS</text:p>
      <text:p text:style-name="P235"><text:span text:style-name="T72"><text:s text:c="11"/></text:span><text:span text:style-name="T65">D2650</text:span><text:span text:style-name="T72"> <text:s/></text:span><text:span text:style-name="T65">9046*</text:span><text:span text:style-name="T72"> <text:s/></text:span><text:span text:style-name="T65">4210140</text:span><text:span text:style-name="T72"> <text:s/>372 <text:s/>385 </text:span></text:p>
      <text:p text:style-name="P217"/>
      <text:p text:style-name="P225">WAGONS</text:p>
      <text:p text:style-name="P111"><text:s text:c="12"/><text:span text:style-name="T65">881741*</text:span> <text:s/><text:span text:style-name="T65">47930*</text:span> <text:span text:style-name="T65">953544*</text:span> <text:s/><text:span text:style-name="T65">NS161*</text:span> <text:span text:style-name="T65">450022*</text:span></text:p>
      <text:p text:style-name="P110"/>
      <text:p text:style-name="P111"><text:s text:c="13"/>GEISMAR</text:p>
      <text:p text:style-name="P231"><text:span text:style-name="T72"><text:s text:c="12"/></text:span>315885<text:span text:style-name="T103"> <text:s/></text:span><text:s/></text:p>
      <text:p text:style-name="P217"><text:s text:c="6"/></text:p>
      <text:p text:style-name="P268"><text:s/><text:span text:style-name="T11">ROAD RAILER</text:span></text:p>
      <text:p text:style-name="P61"><text:s text:c="12"/><text:span text:style-name="T65"><text:s/>970213 </text:span></text:p>
      <text:p text:style-name="P168"/>
      <text:p text:style-name="P217"><text:s text:c="3"/>TROLLEYS</text:p>
      <text:p text:style-name="P217"><text:s text:c="15"/><text:span text:style-name="T65">XXXX*</text:span> <text:s/>XXXX <text:s text:c="2"/>XXXX <text:span text:style-name="T65">YELLOW* </text:span></text:p>
      <text:p text:style-name="P217"/>
      <text:p text:style-name="P61"><text:s text:c="12"/>DIESELS NG</text:p>
      <text:p text:style-name="P111"><text:s text:c="12"/><text:span text:style-name="T65">440*</text:span> 28 47 21505 (22128 <text:s/>SYLAIA)</text:p>
      <text:p text:style-name="P61"><text:s text:c="14"/></text:p>
      <text:p text:style-name="P217"><text:s text:c="8"/>STEAM</text:p>
      <text:p text:style-name="P111"><text:s text:c="14"/>2296</text:p>
      <text:p text:style-name="P111"/>
      <text:p text:style-name="P111"><text:s text:c="21"/><text:span text:style-name="T116">SHEERNESS</text:span></text:p>
      <text:p text:style-name="P106"><text:s text:c="16"/>GROUND WAGON </text:p>
      <text:p text:style-name="P111"><text:span text:style-name="T117"><text:s text:c="15"/></text:span><text:span text:style-name="T118">12T</text:span><text:span text:style-name="T117"> <text:s/></text:span></text:p>
      <text:p text:style-name="P61"><text:s text:c="12"/></text:p>
      <text:p text:style-name="P225">SHILLINGSTONE</text:p>
      <text:p text:style-name="P250"><text:s text:c="4"/>COACHES</text:p>
      <text:p text:style-name="P151"><text:span text:style-name="T117"><text:s text:c="5"/>25424 </text:span><text:span text:style-name="T118">86742</text:span><text:span text:style-name="T117"> <text:s text:c="2"/></text:span></text:p>
      <text:p text:style-name="P223"/>
      <text:p text:style-name="P61"><text:s text:c="12"/><text:span text:style-name="T117">WAGONS</text:span></text:p>
      <text:p text:style-name="P111"><text:s text:c="17"/>RNAD335 983184 11451 950885 904141 </text:p>
      <text:p text:style-name="P225"><text:s text:c="19"/>SNS0535 <text:s text:c="7"/>083598</text:p>
      <text:p text:style-name="P217"><text:s text:c="3"/></text:p>
      <text:p text:style-name="P166">5<text:span text:style-name="T11">DIESEL</text:span></text:p>
      <text:p text:style-name="P85"><text:span text:style-name="T11"><text:s text:c="9"/>(305302 DS1169)</text:span><text:span text:style-name="T117"> </text:span></text:p>
      <text:p text:style-name="P217"><text:span text:style-name="T117"><text:s/></text:span><text:span text:style-name="T112"><text:s/></text:span></text:p>
      <text:p text:style-name="P111"><text:s text:c="12"/>STEAMS</text:p>
      <text:p text:style-name="P61"><text:s text:c="11"/><text:span text:style-name="T65">30075</text:span> 30076</text:p>
      <text:p text:style-name="P217"><text:s text:c="5"/></text:p>
      <text:p text:style-name="P61"><text:s text:c="14"/><text:span text:style-name="T103"><text:s text:c="2"/></text:span>ROAD RAILERS</text:p>
      <text:p text:style-name="P111"><text:s text:c="8"/>PC023 Q104 BAU </text:p>
      <text:p text:style-name="P46"><text:s text:c="10"/></text:p>
      <text:p text:style-name="P217"><text:s text:c="3"/>WICKHAM</text:p>
      <text:p text:style-name="P70"><text:s text:c="12"/>TP 57P</text:p>
      <text:p text:style-name="P217"/>
      <text:p text:style-name="P217"><text:s text:c="2"/>TROLLEYS</text:p>
      <text:p text:style-name="P111"><text:span text:style-name="T117"><text:s text:c="10"/>XXXX XXXX <text:s text:c="2"/></text:span><text:s text:c="4"/></text:p>
      <text:p text:style-name="P68"><text:s text:c="7"/><text:span text:style-name="T72"><text:s text:c="4"/></text:span></text:p>
      <text:p text:style-name="P70"><text:s text:c="11"/><text:span text:style-name="T116">SHIPTON YORK</text:span></text:p>
      <text:p text:style-name="P217"><text:s text:c="4"/>COACHES</text:p>
      <text:p text:style-name="P70"><text:s text:c="12"/><text:span text:style-name="T65">4663*</text:span> <text:span text:style-name="T65">15932*</text:span> <text:span text:style-name="T65">24434*</text:span> <text:s/><text:span text:style-name="T65">24676</text:span> <text:s text:c="4"/><text:span text:style-name="T65">24977*</text:span></text:p>
      <text:p text:style-name="P118"><text:s text:c="11"/></text:p>
      <text:p text:style-name="P85"><text:s text:c="12"/></text:p>
      <text:p text:style-name="P225"><text:span text:style-name="T85"><text:s/></text:span><text:s text:c="2"/><text:span text:style-name="T116">SKIPWITH</text:span></text:p>
      <text:p text:style-name="P265"><text:s text:c="6"/>COACHES</text:p>
      <text:p text:style-name="P111"><text:s text:c="11"/><text:span text:style-name="T65"><text:s/>5856</text:span> <text:s text:c="3"/><text:span text:style-name="T65">5941</text:span> <text:s text:c="2"/><text:span text:style-name="T65">(14157 977788)</text:span> <text:s text:c="7"/></text:p>
      <text:p text:style-name="P225"/>
      <text:p text:style-name="P217"><text:s text:c="3"/>SOMPTING</text:p>
      <text:p text:style-name="P217"><text:s text:c="7"/>COACH</text:p>
      <text:p text:style-name="P166"><text:span text:style-name="T11"><text:s text:c="14"/>13514 <text:s text:c="8"/></text:span>32</text:p>
      <text:p text:style-name="P111"><text:s text:c="4"/></text:p>
      <text:p text:style-name="P216"><text:s text:c="2"/><text:span text:style-name="T67"><text:s/></text:span><text:span text:style-name="T47"><text:s text:c="2"/></text:span><text:span text:style-name="T67"><text:s/></text:span><text:span text:style-name="T71"><text:s/>SOUTH COAST STEAM</text:span></text:p>
      <text:p text:style-name="P262"><text:s text:c="3"/>GROUND <text:s/>WAGON </text:p>
      <text:p text:style-name="P70"><text:s text:c="17"/>7XXXXX </text:p>
      <text:p text:style-name="P61"/>
      <text:p text:style-name="P61"><text:s text:c="10"/><text:span text:style-name="T117">900027 900037</text:span></text:p>
      <text:p text:style-name="P135"><text:s text:c="14"/></text:p>
      <text:p text:style-name="P217"><text:s text:c="3"/><text:span text:style-name="T117">DIESEL</text:span></text:p>
      <text:p text:style-name="P61"><text:span text:style-name="T49"><text:s text:c="13"/></text:span><text:span text:style-name="T117"><text:s text:c="3"/>10252 </text:span></text:p>
      <text:p text:style-name="P70"/>
      <text:p text:style-name="P61"><text:span text:style-name="T85"><text:s/></text:span><text:s text:c="7"/><text:span text:style-name="T117"><text:s text:c="12"/>STEAM</text:span></text:p>
      <text:p text:style-name="P111"><text:span text:style-name="T85"><text:s text:c="13"/></text:span><text:s/>1317</text:p>
      <text:p text:style-name="P225"><text:s text:c="12"/></text:p>
      <text:p text:style-name="P219"><text:s text:c="3"/><text:span text:style-name="T116">SOUTH SHELDS</text:span></text:p>
      <text:p text:style-name="P262"><text:s text:c="6"/>COACHES</text:p>
      <text:p text:style-name="P217"><text:span text:style-name="T96"><text:s text:c="15"/></text:span><text:s text:c="4"/><text:span text:style-name="T65">3743</text:span> <text:span text:style-name="T65"><text:s/>4751</text:span> <text:s/><text:span text:style-name="T65">11937</text:span></text:p>
      <text:p text:style-name="P61"><text:s text:c="10"/></text:p>
      <text:p text:style-name="P125"><text:s text:c="10"/><text:span text:style-name="T5"><text:s text:c="7"/></text:span><text:span text:style-name="T34"><text:s/>SOUTH OTTERINGTON</text:span></text:p>
      <text:p text:style-name="P265"><text:s text:c="3"/>COACH</text:p>
      <text:p text:style-name="P70"><text:span text:style-name="T103"><text:s text:c="11"/></text:span><text:s text:c="2"/><text:span text:style-name="T65">(14124 17124)*</text:span> <text:s text:c="3"/></text:p>
      <text:p text:style-name="P225"><text:s text:c="2"/></text:p>
      <text:p text:style-name="P217"><text:s text:c="5"/><text:span text:style-name="T117">STAPLECROSS</text:span></text:p>
      <text:p text:style-name="P262"><text:s text:c="6"/>COACH</text:p>
      <text:p text:style-name="P217"><text:s text:c="12"/>1698 <text:s text:c="3"/></text:p>
      <text:p text:style-name="P217"/>
      <text:p text:style-name="P49"><text:s text:c="9"/><text:span text:style-name="T5"><text:s text:c="5"/>STATFOLD BARM RAILWAY</text:span></text:p>
      <text:p text:style-name="P217"><text:s text:c="8"/>COACHES</text:p>
      <text:p text:style-name="P217"><text:s text:c="13"/>31 7573</text:p>
      <text:p text:style-name="P61"><text:s text:c="10"/></text:p>
      <text:p text:style-name="P217"><text:s text:c="5"/>GROUND <text:s text:c="2"/>WAGON </text:p>
      <text:p text:style-name="P225"><text:s text:c="11"/>1XXXX</text:p>
      <text:p text:style-name="P262"><text:s text:c="2"/></text:p>
      <text:p text:style-name="P217"><text:s/><text:span text:style-name="T117"><text:s text:c="2"/>STEAMS</text:span></text:p>
      <text:p text:style-name="P262"><text:s text:c="4"/><text:span text:style-name="T72">439 1991 2067 9902 996 492 1735 921 995 1650 972</text:span></text:p>
      <text:p text:style-name="P70"><text:s text:c="12"/>1632 1709 44657 <text:s/>10750 542 <text:s/>2050 3168 469 <text:s/>3698</text:p>
      <text:p text:style-name="P175"><text:s text:c="2"/>1748 1056 13355 1473 614 4878 3904 1643</text:p>
      <text:p text:style-name="P111"><text:s text:c="12"/>299 2091 1842 5292 684 2 4045 3903 3902 2820</text:p>
      <text:p text:style-name="P70"><text:s text:c="13"/>3128 1172</text:p>
      <text:p text:style-name="P219"><text:s text:c="9"/></text:p>
      <text:p text:style-name="P217">DIESELS</text:p>
      <text:p text:style-name="P217"><text:s text:c="2"/>37066 4049 D1419 <text:s/>DM1447 680 6137 5800 1891</text:p>
      <text:p text:style-name="P61"><text:s text:c="10"/>9332 3746 6720 9976 9351 9294 <text:s/>7010 435</text:p>
      <text:p text:style-name="P61"><text:s text:c="10"/>7588 1001 1033 2019 420253 4724 4524</text:p>
      <text:p text:style-name="P61"><text:s text:c="13"/>5940A 36863 2959 DM803 39924 2463 1776 1278 </text:p>
      <text:p text:style-name="P111"><text:span text:style-name="T92"><text:s text:c="12"/></text:span><text:span text:style-name="T117">1445 <text:s/>11218 8819 8640 6092 5226 3526 4196 </text:span></text:p>
      <text:p text:style-name="P225"><text:s text:c="4"/></text:p>
      <text:p text:style-name="P61"><text:s text:c="13"/>WICKHAMS</text:p>
      <text:p text:style-name="P217"><text:s text:c="17"/>3170 <text:s text:c="2"/>5864 <text:s/></text:p>
      <text:p text:style-name="P217"><text:s text:c="3"/><text:span text:style-name="T85"><text:s text:c="6"/></text:span>ROADRAILER</text:p>
      <text:p text:style-name="P217"><text:span text:style-name="T85"><text:s text:c="14"/></text:span>99709 94207-20</text:p>
      <text:p text:style-name="P61"><text:s/></text:p>
      <text:p text:style-name="P133"><text:s text:c="10"/>CRANE</text:p>
      <text:p text:style-name="P148"><text:s text:c="15"/>1618</text:p>
      <text:p text:style-name="P217"><text:s text:c="2"/></text:p>
      <text:p text:style-name="P111"><text:s text:c="15"/><text:span text:style-name="T116">STRAFFORD</text:span></text:p>
      <text:p text:style-name="P46"><text:s text:c="18"/>STEAM</text:p>
      <text:p text:style-name="P221"><text:span text:style-name="T72"><text:s text:c="11"/></text:span><text:s/>2068*</text:p>
      <text:p text:style-name="P169"><text:s text:c="5"/></text:p>
      <text:p text:style-name="P61"><text:s text:c="12"/><text:span text:style-name="T116">ST HELENS</text:span></text:p>
      <text:p text:style-name="P262"><text:s text:c="4"/>COACH</text:p>
      <text:p text:style-name="P137"><text:span text:style-name="T119"><text:s text:c="11"/></text:span><text:span text:style-name="T117"><text:s text:c="2"/>81062*</text:span></text:p>
      <text:p text:style-name="P225"/>
      <text:p text:style-name="P61"><text:s text:c="8"/><text:span text:style-name="T117"><text:s text:c="11"/></text:span><text:span text:style-name="T120"><text:s/>ST ANDREWS</text:span></text:p>
      <text:p text:style-name="P250"><text:s text:c="4"/>COACH</text:p>
      <text:p text:style-name="P172"><text:span text:style-name="T119"><text:s text:c="10"/></text:span><text:span text:style-name="T117"><text:s text:c="2"/>70859*</text:span></text:p>
      <text:p text:style-name="P20"><text:s text:c="2"/></text:p>
      <text:p text:style-name="P111"><text:s text:c="9"/><text:span text:style-name="T117"><text:s/></text:span><text:span text:style-name="T120">STOKE EDITH OLD S</text:span></text:p>
      <text:p text:style-name="P265"><text:s text:c="3"/>COACHES</text:p>
      <text:p text:style-name="P168"><text:span text:style-name="T117"><text:s text:c="13"/></text:span><text:span text:style-name="T118">86650</text:span><text:span text:style-name="T117"> <text:s/></text:span><text:span text:style-name="T118">35158</text:span></text:p>
      <text:p text:style-name="P168"><text:s text:c="2"/></text:p>
      <text:p text:style-name="P225"><text:s text:c="2"/>DIESEL</text:p>
      <text:p text:style-name="P67"><text:span text:style-name="T86"><text:s text:c="13"/></text:span>463150</text:p>
      <text:p text:style-name="P67"/>
      <text:p text:style-name="P61"><text:s text:c="10"/>WICKHAM</text:p>
      <text:p text:style-name="P133"><text:span text:style-name="T117"><text:s text:c="14"/></text:span><text:span text:style-name="T118">4171</text:span><text:span text:style-name="T117"> <text:s text:c="7"/></text:span></text:p>
      <text:p text:style-name="P61"><text:s text:c="9"/></text:p>
      <text:p text:style-name="P225"/>
      <text:p text:style-name="P156"/>
      <text:p text:style-name="P61"><text:s text:c="10"/><text:span text:style-name="T117"><text:s/>TROLLEY</text:span></text:p>
      <text:p text:style-name="P115"><text:s text:c="8"/><text:span text:style-name="T65">XXXXX </text:span></text:p>
      <text:p text:style-name="P61"><text:s text:c="10"/></text:p>
      <text:p text:style-name="P68"><text:s text:c="8"/><text:span text:style-name="T72"><text:s text:c="6"/></text:span><text:span text:style-name="T116">STRATFORD <text:s/>UP</text:span></text:p>
      <text:p text:style-name="P49"><text:s text:c="16"/>COACHES</text:p>
      <text:p text:style-name="P73"><text:span text:style-name="T72"><text:s text:c="13"/></text:span>34644*<text:span text:style-name="T72"> <text:s text:c="3"/></text:span>92347*</text:p>
      <text:p text:style-name="P76"/>
      <text:p text:style-name="P262"><text:s text:c="2"/></text:p>
      <text:p text:style-name="P225"><text:s text:c="3"/><text:span text:style-name="T116">TELBURY</text:span></text:p>
      <text:p text:style-name="P61"><text:s text:c="10"/>COACH</text:p>
      <text:p text:style-name="P111"><text:span text:style-name="T92"><text:s text:c="5"/></text:span><text:span text:style-name="T117"><text:s text:c="5"/></text:span><text:span text:style-name="T118">22311</text:span></text:p>
      <text:p text:style-name="P262"><text:s/><text:span text:style-name="T73"><text:s text:c="2"/></text:span><text:span text:style-name="T74"><text:s/></text:span><text:span text:style-name="T17"><text:s/></text:span><text:span text:style-name="T58"><text:s text:c="2"/></text:span></text:p>
      <text:p text:style-name="P61"><text:s text:c="12"/><text:span text:style-name="T117">THORNTON</text:span></text:p>
      <text:p text:style-name="P61"><text:s text:c="12"/>Ground Wagons</text:p>
      <text:p text:style-name="P61"><text:s text:c="12"/>12T <text:s/>85XXXX 763076 <text:s text:c="8"/><text:span text:style-name="T96"><text:s text:c="2"/></text:span></text:p>
      <text:p text:style-name="P61"><text:s text:c="10"/></text:p>
      <text:p text:style-name="P61"><text:s text:c="18"/><text:span text:style-name="T116">THORPE THEWLES</text:span></text:p>
      <text:p text:style-name="P262"><text:s text:c="4"/>COACH</text:p>
      <text:p text:style-name="P73"><text:span text:style-name="T72"><text:s text:c="13"/></text:span>4393*</text:p>
      <text:p text:style-name="P61"/>
      <text:p text:style-name="P111"><text:s text:c="2"/><text:span text:style-name="T117"><text:s text:c="12"/></text:span><text:span text:style-name="T120">TRETHOWEL</text:span></text:p>
      <text:p text:style-name="P250"><text:s text:c="5"/>COACHES</text:p>
      <text:p text:style-name="P217"><text:s text:c="6"/><text:span text:style-name="T65"><text:s/>92004</text:span> <text:s text:c="2"/><text:span text:style-name="T65">1025</text:span> <text:s text:c="2"/><text:span text:style-name="T65">92040</text:span></text:p>
      <text:p text:style-name="P221"/>
      <text:p text:style-name="P217"><text:s text:c="9"/>WAGONS </text:p>
      <text:p text:style-name="P217"><text:s text:c="5"/><text:span text:style-name="T65"><text:s/>287664</text:span> <text:s text:c="3"/><text:span text:style-name="T65">35380</text:span></text:p>
      <text:p text:style-name="P46"><text:span text:style-name="T72"><text:s text:c="11"/></text:span><text:span text:style-name="T14"><text:s text:c="3"/></text:span></text:p>
      <text:p text:style-name="P262"><text:s/><text:span text:style-name="T17"><text:s text:c="4"/></text:span><text:span text:style-name="T18">TORRINGTON</text:span></text:p>
      <text:p text:style-name="P250"><text:s text:c="4"/>COACH</text:p>
      <text:p text:style-name="P217"><text:span text:style-name="T89"><text:s text:c="9"/></text:span><text:span text:style-name="T91"><text:s text:c="4"/></text:span><text:span text:style-name="T66"><text:s text:c="2"/></text:span><text:span text:style-name="T65">3924*</text:span> <text:s text:c="5"/></text:p>
      <text:p text:style-name="P61"><text:s text:c="12"/>GROUND WAGON </text:p>
      <text:p text:style-name="P61"><text:s text:c="11"/><text:span text:style-name="T65">774178*</text:span> <text:s/></text:p>
      <text:p text:style-name="P217"><text:s text:c="3"/></text:p>
      <text:p text:style-name="P156"/>
      <text:p text:style-name="P61"><text:s text:c="13"/><text:span text:style-name="T117"><text:s text:c="4"/></text:span><text:span text:style-name="T118">653*</text:span><text:span text:style-name="T117"> </text:span><text:span text:style-name="T118">743169*</text:span><text:span text:style-name="T117"> <text:s/></text:span><text:span text:style-name="T118">954681*</text:span><text:span text:style-name="T117"> </text:span></text:p>
      <text:p text:style-name="P217"><text:s text:c="5"/></text:p>
      <text:p text:style-name="P111"><text:s text:c="18"/>DIESELS</text:p>
      <text:p text:style-name="P70"><text:s text:c="11"/><text:span text:style-name="T65">544998*</text:span> <text:span text:style-name="T65">4000001*</text:span> <text:s text:c="6"/></text:p>
      <text:p text:style-name="P49"><text:s text:c="12"/></text:p>
      <text:p text:style-name="P49"><text:s text:c="7"/><text:span text:style-name="T5"><text:s/></text:span><text:span text:style-name="T103"><text:s/></text:span><text:span text:style-name="T11"><text:s/>TROLLEY</text:span></text:p>
      <text:p text:style-name="P61"><text:span text:style-name="T4"><text:s text:c="17"/>RED</text:span><text:span text:style-name="T121"> <text:s text:c="5"/></text:span><text:span text:style-name="T117"><text:s text:c="4"/></text:span></text:p>
      <text:p text:style-name="P70"><text:s text:c="14"/></text:p>
      <text:p text:style-name="P262"><text:s text:c="2"/><text:span text:style-name="T19"><text:s/></text:span><text:span text:style-name="T24"><text:s/></text:span><text:span text:style-name="T27">TICKENHAM CARRIAGE</text:span></text:p>
      <text:p text:style-name="P262"><text:s text:c="8"/>COACH</text:p>
      <text:p text:style-name="P61"><text:span text:style-name="T99"><text:s text:c="5"/></text:span><text:span text:style-name="T117"><text:s text:c="5"/></text:span><text:span text:style-name="T118">4808</text:span><text:span text:style-name="T117"> <text:s text:c="3"/></text:span></text:p>
      <text:p text:style-name="P221"/>
      <text:p text:style-name="P217"><text:s text:c="16"/></text:p>
      <text:p text:style-name="P217"><text:s/><text:span text:style-name="T117"><text:s text:c="3"/>TINTERN PARVA OLD ST</text:span></text:p>
      <text:p text:style-name="P265"><text:s text:c="2"/>COACHES</text:p>
      <text:p text:style-name="P217"><text:span text:style-name="T90"><text:s text:c="10"/></text:span><text:span text:style-name="T3"><text:s/></text:span><text:span text:style-name="T117"><text:s/>6135 6014</text:span></text:p>
      <text:p text:style-name="P225"/>
      <text:p text:style-name="P133"><text:s text:c="11"/><text:span text:style-name="T117"><text:s text:c="3"/></text:span><text:span text:style-name="T121"><text:s/></text:span><text:span text:style-name="T117"><text:s/></text:span><text:span text:style-name="T120">THREE BRIDGES</text:span></text:p>
      <text:p text:style-name="P61"><text:s text:c="17"/>Ground coach</text:p>
      <text:p text:style-name="P70"><text:span text:style-name="T66"><text:s text:c="15"/></text:span><text:span text:style-name="T65">( 94494 083602)</text:span></text:p>
      <text:p text:style-name="P217"><text:s text:c="6"/></text:p>
      <text:p text:style-name="P128"><text:span text:style-name="T117"><text:s text:c="10"/></text:span><text:span text:style-name="T11"><text:s/></text:span><text:span text:style-name="T12">TONBRIDGE</text:span></text:p>
      <text:p text:style-name="P262"><text:s text:c="6"/>COACH</text:p>
      <text:p text:style-name="P133"><text:s text:c="15"/><text:span text:style-name="T65"><text:s/>205</text:span></text:p>
      <text:p text:style-name="P131"><text:s text:c="4"/></text:p>
      <text:p text:style-name="P217">ULLOCK</text:p>
      <text:p text:style-name="P217"><text:s text:c="5"/>COACH</text:p>
      <text:p text:style-name="P120"><text:span text:style-name="T104"><text:s text:c="7"/></text:span><text:span text:style-name="T72"><text:s text:c="6"/>26013</text:span></text:p>
      <text:p text:style-name="P217"><text:s/></text:p>
      <text:p text:style-name="P217"><text:s text:c="2"/><text:span text:style-name="T120"><text:s/>YEO MILL</text:span></text:p>
      <text:p text:style-name="P265"><text:s text:c="4"/>COACH</text:p>
      <text:p text:style-name="P217"><text:span text:style-name="T117"><text:s text:c="13"/></text:span><text:span text:style-name="T118">34612</text:span><text:span text:style-name="T117"> </text:span></text:p>
      <text:p text:style-name="P148"><text:s text:c="3"/></text:p>
      <text:p text:style-name="P61"><text:s text:c="9"/><text:span text:style-name="T117"><text:s text:c="2"/>VALE OF BERKELEY</text:span></text:p>
      <text:p text:style-name="P250"><text:s text:c="9"/>COACHES</text:p>
      <text:p text:style-name="P61"><text:span text:style-name="T1"><text:s text:c="10"/></text:span><text:s text:c="4"/>16696 (94109 041838) 80434 1535 80411 2943 <text:s text:c="4"/></text:p>
      <text:p text:style-name="P46"><text:span text:style-name="T10"><text:s text:c="12"/>1150 32990 12196 80432</text:span> <text:s text:c="6"/><text:span text:style-name="T42"><text:s/></text:span></text:p>
      <text:p text:style-name="P61"><text:s text:c="12"/></text:p>
      <text:p text:style-name="P217"><text:s/><text:span text:style-name="T117">WAGONS</text:span></text:p>
      <text:p text:style-name="P225"><text:s text:c="2"/>994435 2390 4033 4018 93273 954990 932XX 92 4 <text:s text:c="3"/></text:p>
      <text:p text:style-name="P90"><text:span text:style-name="T17"><text:s text:c="6"/></text:span><text:span text:style-name="T19"><text:s/></text:span><text:span text:style-name="T17"><text:s/></text:span><text:span text:style-name="T88"><text:s text:c="2"/></text:span><text:span text:style-name="T17"><text:s text:c="3"/>691781 733027 <text:s/>732195 SD1 SD2 <text:s text:c="3"/>(071204 106712)</text:span></text:p>
      <text:p text:style-name="P115"><text:s text:c="14"/>732825 <text:s/>730450 267</text:p>
      <text:p text:style-name="P115"/>
      <text:p text:style-name="P111"><text:s text:c="7"/>DIESEL</text:p>
      <text:p text:style-name="P61"><text:s text:c="2"/><text:span text:style-name="T117"><text:s text:c="9"/>7069 </text:span><text:s text:c="4"/></text:p>
      <text:p text:style-name="P225"><text:s text:c="14"/></text:p>
      <text:p text:style-name="P111"><text:s/><text:span text:style-name="T117"><text:s text:c="7"/>STEAM S</text:span></text:p>
      <text:p text:style-name="P78"><text:span text:style-name="T72"><text:s text:c="12"/></text:span><text:span text:style-name="T65">44901</text:span><text:span text:style-name="T72"> 44027 2126 2183</text:span></text:p>
      <text:p text:style-name="P217"><text:s/></text:p>
      <text:p text:style-name="P217"><text:s text:c="3"/>WICKHAM</text:p>
      <text:p text:style-name="P115"><text:s text:c="13"/>4165</text:p>
      <text:p text:style-name="P61"><text:s text:c="8"/></text:p>
      <text:p text:style-name="P61"><text:s text:c="16"/><text:span text:style-name="T117"><text:s/>GEISMARS</text:span></text:p>
      <text:p text:style-name="P217"><text:s text:c="13"/>(99709 909139-6) (99709 011207-6)</text:p>
      <text:p text:style-name="P61"><text:s text:c="11"/></text:p>
      <text:p text:style-name="P151"><text:s text:c="2"/><text:span text:style-name="T117"><text:s text:c="2"/>TROLLEY</text:span></text:p>
      <text:p text:style-name="P225"><text:s text:c="14"/>XXXX</text:p>
      <text:p text:style-name="P225"/>
      <text:p text:style-name="P217"><text:s text:c="2"/>DMUS</text:p>
      <text:p text:style-name="P70"><text:s text:c="11"/><text:span text:style-name="T65">143603</text:span> <text:span text:style-name="T65">143612</text:span></text:p>
      <text:p text:style-name="P231"/>
      <text:p text:style-name="P111"><text:s text:c="12"/></text:p>
      <text:p text:style-name="P217"><text:s text:c="3"/><text:span text:style-name="T116">WALL OLD ST</text:span></text:p>
      <text:p text:style-name="P262"><text:s text:c="5"/>COACH</text:p>
      <text:p text:style-name="P115"><text:s text:c="14"/><text:span text:style-name="T65">34925*</text:span> <text:s text:c="9"/></text:p>
      <text:p text:style-name="P158"/>
      <text:p text:style-name="P232"><text:s/><text:span text:style-name="T72"><text:s text:c="2"/>FANGATE AGRICUITURAL </text:span></text:p>
      <text:p text:style-name="P262"><text:s text:c="4"/>WAGON GROUND</text:p>
      <text:p text:style-name="P59"><text:s text:c="14"/>7XXXXX</text:p>
      <text:p text:style-name="P115"><text:s text:c="14"/></text:p>
      <text:p text:style-name="P225"><text:span text:style-name="T66">65508 530606</text:span> <text:s/></text:p>
      <text:p text:style-name="P49"><text:s text:c="7"/></text:p>
      <text:p text:style-name="P262"><text:s text:c="2"/><text:span text:style-name="T72"><text:s text:c="2"/></text:span><text:span text:style-name="T74"><text:s/></text:span><text:span text:style-name="T17"><text:s text:c="4"/>STEAMS</text:span></text:p>
      <text:p text:style-name="P180"><text:s text:c="11"/>1060 2038 2069</text:p>
      <text:p text:style-name="P180"/>
      <text:p text:style-name="P115"><text:s text:c="14"/>WELLAND </text:p>
      <text:p text:style-name="P61"><text:s text:c="14"/>WAGON</text:p>
      <text:p text:style-name="P217"><text:span text:style-name="T40"><text:s text:c="14"/></text:span>933342<text:span text:style-name="T40"> </text:span></text:p>
      <text:p text:style-name="P201"/>
      <text:p text:style-name="P61"><text:s text:c="12"/>CRANE</text:p>
      <text:p text:style-name="P70"><text:s text:c="13"/>95000 <text:s text:c="10"/></text:p>
      <text:p text:style-name="P225"/>
      <text:p text:style-name="P225"><text:span text:style-name="T40"><text:s/></text:span>WELLS WALSINGHAM</text:p>
      <text:p text:style-name="P262"><text:s text:c="3"/>COACHES</text:p>
      <text:p text:style-name="P217"><text:span text:style-name="T49"><text:s text:c="11"/></text:span><text:span text:style-name="T117"><text:s text:c="3"/>986 995 1560 1390</text:span></text:p>
      <text:p text:style-name="P225"/>
      <text:p text:style-name="P61"><text:s text:c="11"/><text:span text:style-name="T117"><text:s text:c="2"/>STEAMS</text:span></text:p>
      <text:p text:style-name="P61"><text:s text:c="19"/>3 <text:s/>6 <text:s/>(PILGRIM) <text:s/></text:p>
      <text:p text:style-name="P61"><text:s text:c="13"/></text:p>
      <text:p text:style-name="P145"><text:s text:c="2"/><text:span text:style-name="T5"><text:s/>DIESELS</text:span></text:p>
      <text:p text:style-name="P61"><text:s text:c="13"/>(2 WEASEL) WALTHAM WINDMILL</text:p>
      <text:p text:style-name="P225"><text:s text:c="2"/>(NORFOLK HARVESTER) <text:s text:c="3"/></text:p>
      <text:p text:style-name="P160"><text:s text:c="3"/><text:span text:style-name="T117"><text:s/></text:span></text:p>
      <text:p text:style-name="P20"><text:s text:c="5"/>WELSHPOOL NG</text:p>
      <text:p text:style-name="P61"><text:s text:c="14"/>Ground Wagons</text:p>
      <text:p text:style-name="P217"><text:s text:c="7"/>(20T <text:s text:c="3"/>108246 6W BRAKE VAN) (12T VAN) <text:s text:c="8"/></text:p>
      <text:p text:style-name="P217"/>
      <text:p text:style-name="P61"><text:span text:style-name="T66"><text:s text:c="14"/></text:span><text:s text:c="2"/>STEAMS</text:p>
      <text:p text:style-name="P111"><text:s text:c="15"/>(2207 8) (2855 <text:s/>10) <text:s/>(3024 <text:s/>6) (3496 822) ( 3497 823)</text:p>
      <text:p text:style-name="P24"><text:s text:c="10"/>(3815 14) <text:s/>(4407 12) (4506 2) <text:s/></text:p>
      <text:p text:style-name="P183"/>
      <text:p text:style-name="P70"><text:s text:c="13"/>DIESELS</text:p>
      <text:p text:style-name="P71"><text:s text:c="9"/>(2251 11 ) (2263 7) (2400 ) (4270 175) <text:s text:c="3"/></text:p>
      <text:p text:style-name="P71"><text:s text:c="5"/></text:p>
      <text:p text:style-name="P61"><text:s text:c="14"/>ROAD RAILERS</text:p>
      <text:p text:style-name="P168"><text:s text:c="5"/>2904 (3746 9150)</text:p>
      <text:p text:style-name="P168"/>
      <text:p text:style-name="P176"><text:s text:c="2"/>WEST GRINSTEAD OLD ST</text:p>
      <text:p text:style-name="P250"><text:s text:c="5"/>COACH <text:s text:c="3"/></text:p>
      <text:p text:style-name="P176"><text:s text:c="13"/>25853 <text:s text:c="5"/></text:p>
      <text:p text:style-name="P111"><text:s text:c="11"/></text:p>
      <text:p text:style-name="P168"><text:s text:c="7"/>WHEATHAMSTEAD OLD STATION</text:p>
      <text:p text:style-name="P217"><text:s text:c="5"/>WAGON</text:p>
      <text:p text:style-name="P168"><text:span text:style-name="T117"><text:s text:c="10"/>118718 <text:s text:c="5"/></text:span><text:s text:c="2"/></text:p>
      <text:p text:style-name="P61"><text:s text:c="9"/><text:span text:style-name="T117">HIGH HEATH</text:span></text:p>
      <text:p text:style-name="P61"><text:s text:c="14"/>WAGON</text:p>
      <text:p text:style-name="P74"><text:s text:c="15"/>40284 <text:s text:c="4"/></text:p>
      <text:p text:style-name="P232"/>
      <text:p text:style-name="P170"/>
      <text:p text:style-name="P225"><text:s/>WHIPPINGHAM OLD ST</text:p>
      <text:p text:style-name="P217"><text:s text:c="13"/>Ground coach</text:p>
      <text:p text:style-name="P225"><text:s text:c="14"/>SR1533</text:p>
      <text:p text:style-name="P223"/>
      <text:p text:style-name="P217"><text:s text:c="5"/><text:span text:style-name="T116"><text:s/>GRANGE FARM</text:span></text:p>
      <text:p text:style-name="P262"><text:s text:c="5"/>COACH</text:p>
      <text:p text:style-name="P170"><text:s text:c="11"/><text:span text:style-name="T65">474 50 86 29 26 482.3</text:span></text:p>
      <text:p text:style-name="P46"><text:s text:c="13"/><text:span text:style-name="T72"><text:s/></text:span><text:span text:style-name="T14"><text:s/></text:span></text:p>
      <text:p text:style-name="P70"><text:s text:c="16"/>WORKSOP</text:p>
      <text:p text:style-name="P217"><text:s text:c="3"/>DIESELS</text:p>
      <text:p text:style-name="P61"><text:s text:c="11"/>08904 25057 <text:span text:style-name="T65">20901</text:span> <text:s/><text:span text:style-name="T65">D8069</text:span> 08818 <text:s/>(004 08602)</text:p>
      <text:p text:style-name="P217"><text:s text:c="2"/>08892 <text:s/>25313 13000 <text:span text:style-name="T65">47715</text:span> <text:s text:c="2"/>D8069 29 01544 <text:span text:style-name="T65">08500</text:span></text:p>
      <text:p text:style-name="P217"><text:s text:c="3"/>20118 20132 08925 08578 <text:span text:style-name="T65">20311</text:span> <text:span text:style-name="T65">20314</text:span> 20308 20309</text:p>
      <text:p text:style-name="P61"><text:s text:c="10"/>20312 73134 08802 (7600) 10186 01529 01543 <text:span text:style-name="T65">01545*</text:span></text:p>
      <text:p text:style-name="P70"><text:s text:c="11"/>37609 37604 37603 </text:p>
      <text:p text:style-name="P217"/>
      <text:p text:style-name="P217">WAGONS</text:p>
      <text:p text:style-name="P70"><text:s text:c="16"/>967XXX <text:s text:c="3"/>53XXXX</text:p>
      <text:p text:style-name="P225"/>
      <text:p text:style-name="P46"><text:s text:c="10"/><text:span text:style-name="T14"><text:s text:c="4"/>GREAT YAMOUTH CHS</text:span></text:p>
      <text:p text:style-name="P250"><text:s text:c="6"/>COACHES</text:p>
      <text:p text:style-name="P46"><text:span text:style-name="T72"><text:s text:c="11"/></text:span><text:span text:style-name="T72"><text:s/></text:span><text:span text:style-name="T65">1213 </text:span><text:span text:style-name="T72">1692 1696 3051 <text:s/>3060 </text:span><text:span text:style-name="T14">977591 <text:s text:c="3"/>977595 </text:span><text:span text:style-name="T72"><text:s text:c="4"/></text:span></text:p>
      <text:p text:style-name="P46"><text:span text:style-name="T72"><text:s text:c="14"/></text:span><text:span text:style-name="T65">3411 </text:span><text:span text:style-name="T72">5482 </text:span><text:span text:style-name="T65">5647</text:span><text:span text:style-name="T72"> 6415 <text:s text:c="2"/>9448 </text:span><text:span text:style-name="T65">9709</text:span><text:span text:style-name="T72"> <text:s text:c="2"/></text:span><text:span text:style-name="T65">10413</text:span><text:span text:style-name="T72"> <text:s/>17164 <text:s text:c="7"/></text:span></text:p>
      <text:p text:style-name="P46"><text:span text:style-name="T72"><text:s text:c="14"/>26208 </text:span><text:span text:style-name="T65">96371</text:span><text:span text:style-name="T72"> <text:s text:c="2"/>96372 96373 </text:span><text:span text:style-name="T65">96374 </text:span><text:span text:style-name="T72"><text:s/></text:span><text:span text:style-name="T65">86443</text:span><text:span text:style-name="T14"> 977390 <text:s/></text:span></text:p>
      <text:p text:style-name="P46"><text:span text:style-name="T72"><text:s text:c="11"/></text:span><text:span text:style-name="T14"><text:s text:c="4"/>86606 95199 <text:s text:c="4"/></text:span></text:p>
      <text:p text:style-name="P49"><text:s text:c="13"/></text:p>
      <text:p text:style-name="P46"><text:span text:style-name="T72"><text:s text:c="12"/></text:span><text:span text:style-name="T10"><text:s/>DIESELS</text:span></text:p>
      <text:p text:style-name="P70"><text:span text:style-name="T72"><text:s text:c="12"/></text:span><text:span text:style-name="T65">08870</text:span><text:span text:style-name="T72"> <text:s text:c="3"/></text:span><text:span text:style-name="T65">31452</text:span><text:span text:style-name="T72"> <text:s text:c="4"/></text:span><text:span text:style-name="T65">10070</text:span></text:p>
      <text:p text:style-name="P217"><text:s/></text:p>
      <text:p text:style-name="P217"><text:s/></text:p>
      <text:p text:style-name="P217"><text:s text:c="3"/></text:p>
      <text:p text:style-name="P225"><text:s text:c="2"/></text:p>
      <text:p text:style-name="P61"><text:s text:c="11"/></text:p>
      <text:p text:style-name="P111"><text:s text:c="11"/><text:span text:style-name="T117">LAVENDON NG</text:span></text:p>
      <text:p text:style-name="P262"><text:s text:c="4"/>Ground Wagons</text:p>
      <text:p text:style-name="P175"><text:s text:c="14"/>784598 78XXXX 78XXXX 78X XXX</text:p>
      <text:p text:style-name="P111"><text:s text:c="11"/><text:span text:style-name="T117"><text:s text:c="5"/></text:span></text:p>
      <text:p text:style-name="P217"><text:s text:c="3"/><text:span text:style-name="T117"><text:s text:c="3"/>IRLAM STATION</text:span></text:p>
      <text:p text:style-name="P46"><text:s text:c="17"/>WAGONS <text:s text:c="11"/></text:p>
      <text:p text:style-name="P115"><text:s text:c="15"/>4W SLAG LADLE <text:s text:c="4"/>2018<text:span text:style-name="T103">7</text:span></text:p>
      <text:p text:style-name="P217"/>
      <text:p text:style-name="P61"><text:s text:c="9"/><text:span text:style-name="T117"><text:s/></text:span><text:span text:style-name="T121"><text:s/>PUMP <text:s/>TROLLEY </text:span></text:p>
      <text:p text:style-name="P217"><text:s/></text:p>
      <text:p text:style-name="P217"><text:s text:c="3"/>STEAMS</text:p>
      <text:p text:style-name="P69"><text:s text:c="24"/>2027 1973</text:p>
      <text:p text:style-name="P217"><text:s text:c="16"/></text:p>
      <text:p text:style-name="P217"><text:s text:c="2"/>IRLAM </text:p>
      <text:p text:style-name="P49"><text:s text:c="14"/>Ground Wagons</text:p>
      <text:p text:style-name="P61"><text:s text:c="15"/>779872 88XXXX</text:p>
      <text:p text:style-name="P61"><text:s text:c="12"/></text:p>
      <text:p text:style-name="P61"><text:s text:c="15"/>FENCOTE</text:p>
      <text:p text:style-name="P49"><text:s text:c="14"/>COACHES</text:p>
      <text:p text:style-name="P70"><text:s text:c="13"/>45044 2240 <text:s text:c="2"/></text:p>
      <text:p text:style-name="P61"><text:s text:c="12"/><text:span text:style-name="T117">GROUND WAGON </text:span></text:p>
      <text:p text:style-name="P217"><text:s text:c="12"/>7XXXXX</text:p>
      <text:p text:style-name="P70"/>
      <text:p text:style-name="P217"><text:span text:style-name="T117"><text:s/></text:span><text:span text:style-name="T118"><text:s/>35251</text:span></text:p>
      <text:p text:style-name="P231"/>
      <text:p text:style-name="P168"><text:s text:c="9"/><text:span text:style-name="T117"><text:s text:c="2"/>WICKHAM</text:span></text:p>
      <text:p text:style-name="P61"><text:s text:c="12"/>7517 <text:s text:c="5"/></text:p>
      <text:p text:style-name="P49"><text:span text:style-name="T5"><text:s text:c="5"/></text:span><text:s text:c="2"/><text:span text:style-name="T5"><text:s text:c="5"/></text:span></text:p>
      <text:p text:style-name="P61"><text:s text:c="13"/></text:p>
      <text:p text:style-name="P111"><text:s text:c="14"/></text:p>
      <text:p text:style-name="P61"><text:s text:c="6"/><text:span text:style-name="T117"><text:s text:c="3"/>TROLLEYS</text:span></text:p>
      <text:p text:style-name="P61"><text:s text:c="17"/>XXXX BARE WOOD</text:p>
      <text:p text:style-name="P61"/>
      <text:p text:style-name="P70"><text:span text:style-name="T5"><text:s text:c="17"/></text:span><text:span text:style-name="T103"><text:s/></text:span><text:span text:style-name="T5">KFF <text:s/></text:span></text:p>
      <text:p text:style-name="P217"><text:s text:c="3"/><text:span text:style-name="T117"><text:s text:c="12"/>WAGONS <text:s text:c="5"/></text:span></text:p>
      <text:p text:style-name="P61"><text:s text:c="8"/></text:p>
      <text:p text:style-name="P61"><text:s text:c="13"/><text:span text:style-name="T117"><text:s text:c="5"/>TALYLLYN <text:s/>RAILWAY NG</text:span></text:p>
      <text:p text:style-name="P148"><text:s text:c="11"/>STEAMS</text:p>
      <text:p text:style-name="P61"><text:s text:c="15"/>(42 1) (63 2) (323 3) (1431 ) (2263 <text:s/>7) (4047 <text:s/>4) <text:s text:c="3"/></text:p>
      <text:p text:style-name="P61"><text:s/></text:p>
      <text:p text:style-name="P46"><text:span text:style-name="T14"><text:s/></text:span><text:span text:style-name="T72"><text:s text:c="9"/></text:span><text:span text:style-name="T14"><text:s text:c="3"/>DIESELS</text:span></text:p>
      <text:p text:style-name="P217"><text:s text:c="2"/>(200792 5) <text:s text:c="2"/>TOBY (3779 12) (3764 11) 3781 <text:s/></text:p>
      <text:p text:style-name="P217"><text:span text:style-name="T49"><text:s text:c="10"/></text:span><text:span text:style-name="T117"><text:s text:c="3"/>(4136 9) 476109 <text:s text:c="2"/>4135FO</text:span></text:p>
      <text:p text:style-name="P217"><text:s text:c="3"/></text:p>
      <text:p text:style-name="P61"><text:s text:c="11"/>TRACK MACHINE</text:p>
      <text:p text:style-name="P125"><text:span text:style-name="T117"><text:s text:c="16"/></text:span><text:span text:style-name="T11">4873</text:span></text:p>
      <text:p text:style-name="P61"><text:s text:c="13"/></text:p>
      <text:p text:style-name="P217"><text:s text:c="3"/>WELSH HIGHLAND HERITAGE NG</text:p>
      <text:p text:style-name="P169"><text:s text:c="9"/><text:span text:style-name="T117"><text:s text:c="2"/>DIESELS</text:span></text:p>
      <text:p text:style-name="P46"><text:s text:c="14"/>22237 6285 7535 203031 24051 (23389 60) 23387 </text:p>
      <text:p text:style-name="P46"><text:s text:c="11"/>(11102 6) 9350 <text:span text:style-name="T72"><text:s/>555 554 264 9346 (5859 3)</text:span></text:p>
      <text:p text:style-name="P115"><text:s text:c="13"/>354068 (8703 36) <text:s/>(370555 <text:s/>L5) 3510 (29703 1) </text:p>
      <text:p text:style-name="P61"><text:s text:c="12"/></text:p>
      <text:p text:style-name="P217"><text:s text:c="5"/>STEAMS</text:p>
      <text:p text:style-name="P70"><text:s text:c="14"/>(3050 5) 2024 901 652 1578</text:p>
      <text:p text:style-name="P70"/>
      <text:p text:style-name="P70"><text:s text:c="11"/>WELSH HIGHLAND RAILWAY NG</text:p>
      <text:p text:style-name="P61"><text:s text:c="17"/>STEAMS</text:p>
      <text:p text:style-name="P85"><text:s text:c="17"/><text:span text:style-name="T5">(7863 138) <text:s/>2684 7865 (7868 143) 7431 (3267 87) 2683 </text:span></text:p>
      <text:p text:style-name="P70"><text:s text:c="14"/>WATKIN <text:s/><text:span text:style-name="T65">LLANFAIR*</text:span> <text:s text:c="6"/>7 <text:s/></text:p>
      <text:p text:style-name="P61"><text:s text:c="7"/></text:p>
      <text:p text:style-name="P156"><text:s text:c="6"/>DIESELS</text:p>
      <text:p text:style-name="P61"><text:s text:c="13"/>(VALE OF FFESTINIOG) <text:s text:c="12"/></text:p>
      <text:p text:style-name="P115"><text:s text:c="12"/>3831 <text:s/><text:span text:style-name="T65">2395*</text:span> 9248 5X <text:span text:style-name="T65">9262*</text:span> <text:s text:c="3"/>FUNKEY2W</text:p>
      <text:p text:style-name="P74"/>
      <text:p text:style-name="P217"><text:s text:c="8"/>ROAD RAILERS</text:p>
      <text:p text:style-name="P217"><text:s text:c="10"/>(YELLOW) <text:s/>(KMX95) 538002 <text:s/>(YELLOW2) (YELLOW9)</text:p>
      <text:p text:style-name="P61"><text:s text:c="13"/></text:p>
      <text:p text:style-name="P61"><text:s text:c="17"/>BALA RAILWAY NG</text:p>
      <text:p text:style-name="P217"><text:s text:c="12"/>STEAMS IN MUSEUM</text:p>
      <text:p text:style-name="P61"><text:s text:c="18"/>364 780 1270 <text:s text:c="3"/></text:p>
      <text:p text:style-name="P61"><text:s text:c="17"/>680 779 822 (704 S D) 1909 <text:s text:c="6"/><text:span text:style-name="T40"><text:s text:c="4"/></text:span></text:p>
      <text:p text:style-name="P214"><text:s text:c="8"/></text:p>
      <text:p text:style-name="P217"><text:s text:c="9"/>DIESELS <text:s/>IN MUSEUM</text:p>
      <text:p text:style-name="P217"><text:s text:c="14"/>283512 2273 <text:s/></text:p>
      <text:p text:style-name="P225"><text:s text:c="14"/>2024 194771 5697 3776 11898 </text:p>
      <text:p text:style-name="P115"><text:s text:c="12"/></text:p>
      <text:p text:style-name="P168"><text:s text:c="9"/><text:span text:style-name="T117"><text:s text:c="4"/>WICKHAM</text:span></text:p>
      <text:p text:style-name="P217"><text:s text:c="11"/>GREEN 10943 <text:s/></text:p>
      <text:p text:style-name="P154"/>
      <text:p text:style-name="P225"><text:s text:c="6"/>TROLLEY</text:p>
      <text:p text:style-name="P225">PUMP TROLLEY IN RED</text:p>
      <text:p text:style-name="P225"/>
      <text:p text:style-name="P225">BREDGAR RAILWAY NG</text:p>
      <text:p text:style-name="P49"><text:s text:c="19"/>STEAMS</text:p>
      <text:p text:style-name="P70"><text:s text:c="15"/>DHOLPUR (JB EARLE) 6110 <text:s/>6109 <text:s/>(9124 1) <text:s/>JACK </text:p>
      <text:p text:style-name="P217"><text:s text:c="2"/>(VICTORY 7)( LADY JOAN 3) (KATLIE 2) </text:p>
      <text:p text:style-name="P61"><text:s text:c="12"/>(LLMPOPO <text:s text:c="3"/>ZULU (ZAMBEZI 10) (HEIGA 8)</text:p>
      <text:p text:style-name="P61"><text:span text:style-name="T117"><text:s text:c="12"/></text:span><text:span text:style-name="T102"><text:s/></text:span><text:span text:style-name="T117">(EIGIAU 6) <text:s/>ARMISTCE</text:span></text:p>
      <text:p text:style-name="P61"><text:s text:c="11"/><text:span text:style-name="T85"><text:s text:c="2"/></text:span><text:span text:style-name="T49"><text:s text:c="4"/></text:span></text:p>
      <text:p text:style-name="P217"><text:s/>DIESELS</text:p>
      <text:p text:style-name="P168"><text:s text:c="10"/>5239 (721 52) (764 53) (765 14) (9869 12) <text:s/>7498</text:p>
      <text:p text:style-name="P57"><text:span text:style-name="T70"><text:s text:c="10"/>(3775 5 ) (720 NG51</text:span><text:span text:style-name="T66">) </text:span><text:span text:style-name="T70">(7037 13) </text:span><text:span text:style-name="T66">(DM1366 11)</text:span></text:p>
      <text:p text:style-name="P60"/>
      <text:p text:style-name="P74"><text:s text:c="14"/>CASTLETON LIGHT RAILWAY NG</text:p>
      <text:p text:style-name="P46"><text:s text:c="12"/>DIESELS</text:p>
      <text:p text:style-name="P168"><text:span text:style-name="T50"><text:s text:c="11"/></text:span><text:span text:style-name="T121"><text:s/>(7333 2) <text:s/>(7494 ALNE) <text:s/>7215 <text:s text:c="2"/>8655 <text:s text:c="2"/>47414 <text:s/>(3 ALAN <text:s/></text:span><text:s/></text:p>
      <text:p text:style-name="P217"><text:s text:c="6"/></text:p>
      <text:p text:style-name="P225"><text:s text:c="2"/>CLEEMORPES COAST RAILWAY NG</text:p>
      <text:p text:style-name="P111"><text:s text:c="2"/><text:span text:style-name="T40"><text:s text:c="7"/></text:span><text:s text:c="7"/>STEAMS </text:p>
      <text:p text:style-name="P225"><text:s text:c="13"/>6284 (5 11) EFFLE (11( <text:s/><text:span text:style-name="T65">(4 24)</text:span> 1 111 SEABREEZE</text:p>
      <text:p text:style-name="P223"/>
      <text:p text:style-name="P111"><text:s text:c="17"/>DIESELS</text:p>
      <text:p text:style-name="P225"><text:span text:style-name="T100"><text:s text:c="16"/>4 6 11</text:span> </text:p>
      <text:p text:style-name="P61"><text:s text:c="12"/></text:p>
      <text:p text:style-name="P61"><text:s text:c="10"/><text:span text:style-name="T117">CORRIS STEAM RAILWAY NG</text:span></text:p>
      <text:p text:style-name="P46"><text:s text:c="15"/>STEAMS</text:p>
      <text:p text:style-name="P141"><text:span text:style-name="T30"><text:s text:c="15"/>857 (17 7)</text:span>9</text:p>
      <text:p text:style-name="P92"/>
      <text:p text:style-name="P61"><text:s text:c="14"/>DIESELS</text:p>
      <text:p text:style-name="P61"><text:span text:style-name="T1"><text:s text:c="14"/></text:span><text:s/>BO457 6273 518493 22258 25721 <text:s/></text:p>
      <text:p text:style-name="P217"><text:s text:c="6"/>DERBYSHIRE DALES RAILWAY NG</text:p>
      <text:p text:style-name="P217"><text:s text:c="9"/>DIESELS</text:p>
      <text:p text:style-name="P225"><text:s text:c="15"/>8917 (SPONDON) 260712 404967</text:p>
      <text:p text:style-name="P61"><text:s text:c="9"/></text:p>
      <text:p text:style-name="P115"><text:s text:c="12"/>STEAM</text:p>
      <text:p text:style-name="P217"><text:span text:style-name="T110"><text:s text:c="8"/></text:span><text:s text:c="6"/>1939 <text:s text:c="12"/><text:span text:style-name="T40"><text:s text:c="2"/></text:span></text:p>
      <text:p text:style-name="P214"><text:s/></text:p>
      <text:p text:style-name="P46"><text:s text:c="15"/></text:p>
      <text:p text:style-name="P217"><text:s text:c="4"/><text:span text:style-name="T116">EVESHAM LIGHT RAILWAY NG</text:span></text:p>
      <text:p text:style-name="P217"><text:s text:c="15"/>DIESELS</text:p>
      <text:p text:style-name="P217"><text:s text:c="10"/><text:span text:style-name="T65">(2004 BLUE)*</text:span> <text:s text:c="2"/><text:span text:style-name="T65">41545</text:span> <text:span text:style-name="T65">452280*</text:span> </text:p>
      <text:p text:style-name="P217"><text:s/></text:p>
      <text:p text:style-name="P111"><text:s text:c="12"/>STEAMS</text:p>
      <text:p text:style-name="P127"><text:span text:style-name="T39"><text:s text:c="13"/></text:span><text:span text:style-name="T6"><text:s/>312*</text:span><text:span text:style-name="T39"> <text:s/></text:span><text:span text:style-name="T6"><text:s/>300</text:span><text:span text:style-name="T39"> <text:s text:c="2"/></text:span><text:span text:style-name="T6">DDC1970</text:span></text:p>
      <text:p text:style-name="P217"><text:s text:c="3"/><text:span text:style-name="T117"><text:s text:c="7"/></text:span><text:span text:style-name="T121"><text:s text:c="3"/></text:span></text:p>
      <text:p text:style-name="P74"><text:s text:c="9"/></text:p>
      <text:p text:style-name="P225">FAIRBOURNE RAILWAY NG <text:s text:c="13"/></text:p>
      <text:p text:style-name="P148"><text:s text:c="2"/><text:span text:style-name="T103"><text:s/></text:span><text:s text:c="2"/>STEAMS</text:p>
      <text:p text:style-name="P111"><text:s/><text:span text:style-name="T117"><text:s text:c="9"/>RUSSELL BEDDGELERT 759 SHERPA </text:span></text:p>
      <text:p text:style-name="P261"/>
      <text:p text:style-name="P217"><text:s text:c="5"/>DIESELS</text:p>
      <text:p text:style-name="P61"><text:s text:c="13"/>9354 (6 TONY)</text:p>
      <text:p text:style-name="P61"/>
      <text:p text:style-name="P217"><text:s/>GARTELL LIGHT RAILWAY NG</text:p>
      <text:p text:style-name="P61"><text:s text:c="13"/>STEAMS <text:s text:c="10"/></text:p>
      <text:p text:style-name="P225"><text:s text:c="13"/>YEO <text:s/>(JEAN 9) <text:s/>(MR G <text:s text:c="2"/>6 ) <text:s text:c="2"/></text:p>
      <text:p text:style-name="P225"/>
      <text:p text:style-name="P133"><text:s text:c="15"/><text:span text:style-name="T117"><text:s/>DIESELS</text:span></text:p>
      <text:p text:style-name="P109"><text:s text:c="19"/>193984 (3699 2) (10 <text:s/>5) <text:s/>(1 AMANDA) <text:s/></text:p>
      <text:p text:style-name="P46"><text:s text:c="10"/><text:span text:style-name="T14"><text:s/></text:span><text:span text:style-name="T104"><text:s/></text:span><text:span text:style-name="T14">HAMPTON KEMPTON NG</text:span></text:p>
      <text:p text:style-name="P61"><text:s text:c="15"/>STEAM</text:p>
      <text:p text:style-name="P70"><text:span text:style-name="T104"><text:s text:c="14"/>(</text:span>984<text:span text:style-name="T104">984984 3) </text:span></text:p>
      <text:p text:style-name="P156"/>
      <text:p text:style-name="P170"><text:s/></text:p>
      <text:p text:style-name="P225"><text:s text:c="2"/>DIESELS</text:p>
      <text:p text:style-name="P225"><text:s text:c="11"/>3787 4023 <text:s/>9338 9357 1</text:p>
      <text:p text:style-name="P217"><text:s/></text:p>
      <text:p text:style-name="P225"><text:s text:c="4"/>HAYLING SEASIDE RAILWAY NG</text:p>
      <text:p text:style-name="P217"><text:s text:c="2"/>DIESELS</text:p>
      <text:p text:style-name="P61"><text:s text:c="15"/>(23 3) <text:s/>(7199 1) <text:s/>(7002 5)</text:p>
      <text:p text:style-name="P61"><text:s text:c="2"/></text:p>
      <text:p text:style-name="P148"><text:s text:c="2"/>HEATHERSLAW LIGHT RAILWAY NG</text:p>
      <text:p text:style-name="P70"><text:s text:c="15"/>STEAMS</text:p>
      <text:p text:style-name="P46"><text:s text:c="11"/><text:span text:style-name="T14"><text:s text:c="2"/>(85R BUNTY) (1989 THE LADY AUGUSTA)</text:span></text:p>
      <text:p text:style-name="P217"><text:s text:c="13"/></text:p>
      <text:p text:style-name="P61"><text:s text:c="14"/><text:span text:style-name="T117"><text:s text:c="2"/>DIESEL </text:span></text:p>
      <text:p text:style-name="P61"><text:s text:c="21"/>Clive </text:p>
      <text:p text:style-name="P126"><text:s text:c="9"/></text:p>
      <text:p text:style-name="P61"><text:s text:c="10"/><text:span text:style-name="T117"><text:s text:c="2"/>KIRKLEES RAILWAY </text:span></text:p>
      <text:p text:style-name="P49"><text:s text:c="14"/>DMU</text:p>
      <text:p text:style-name="P217"><text:span text:style-name="T117"><text:s text:c="14"/></text:span><text:span text:style-name="T118">56495</text:span> <text:s/></text:p>
      <text:p text:style-name="P61"><text:s text:c="10"/><text:span text:style-name="T117"><text:s text:c="5"/></text:span></text:p>
      <text:p text:style-name="P61"><text:s text:c="18"/>STEAMS NG</text:p>
      <text:p text:style-name="P111"><text:s text:c="14"/>18 14 12 11 10 9</text:p>
      <text:p text:style-name="P111"><text:s text:c="18"/></text:p>
      <text:p text:style-name="P111"><text:s text:c="16"/>DIESELS NG</text:p>
      <text:p text:style-name="P217"><text:s text:c="11"/>8 <text:s/>7 7021</text:p>
      <text:p text:style-name="P61"><text:s text:c="10"/></text:p>
      <text:p text:style-name="P151"><text:s text:c="3"/><text:span text:style-name="T116">LAUNCESTON STEAM RAILWAY NG</text:span></text:p>
      <text:p text:style-name="P49"><text:s text:c="12"/>STEAMS</text:p>
      <text:p text:style-name="P70"><text:s text:c="17"/><text:span text:style-name="T65">763</text:span> <text:span text:style-name="T65">679</text:span> <text:span text:style-name="T65">317</text:span> <text:span text:style-name="T65">(89 PERSEVERANCE)</text:span> </text:p>
      <text:p text:style-name="P70"><text:s text:c="6"/></text:p>
      <text:p text:style-name="P217"><text:s text:c="4"/>DIESELS</text:p>
      <text:p text:style-name="P111"><text:s text:c="13"/><text:span text:style-name="T65"><text:s/>1896</text:span> <text:span text:style-name="T65">5646</text:span> <text:span text:style-name="T65"><text:s/>806</text:span> <text:s text:c="2"/><text:span text:style-name="T65">761</text:span> <text:s text:c="3"/><text:span text:style-name="T65">(THE DILLY) </text:span><text:s text:c="4"/></text:p>
      <text:p text:style-name="P49"><text:s text:c="7"/><text:span text:style-name="T5"><text:s text:c="3"/></text:span></text:p>
      <text:p text:style-name="P248"><text:span text:style-name="T72"><text:s text:c="3"/></text:span><text:span text:style-name="T14"><text:s text:c="2"/>LYNTON BARNSTAPLE RAILWAY NG</text:span></text:p>
      <text:p text:style-name="P265"><text:s text:c="4"/><text:span text:style-name="T73"><text:s text:c="3"/>STEAMS</text:span></text:p>
      <text:p text:style-name="P168"><text:span text:style-name="T54"><text:s text:c="8"/></text:span><text:s text:c="6"/>2819 <text:span text:style-name="T65">(1915</text:span> <text:span text:style-name="T65">AXE)*</text:span> <text:s text:c="3"/><text:span text:style-name="T65">(92 762)</text:span> <text:s text:c="2"/>8 </text:p>
      <text:p text:style-name="P61"><text:s text:c="6"/></text:p>
      <text:p text:style-name="P139"><text:s text:c="14"/>DIESELS</text:p>
      <text:p text:style-name="P61"><text:span text:style-name="T117"><text:s text:c="11"/></text:span><text:span text:style-name="T118"><text:s/>D2393*</text:span><text:span text:style-name="T117"> </text:span><text:span text:style-name="T118">6660</text:span><text:span text:style-name="T117"> </text:span><text:span text:style-name="T118">6652*</text:span> <text:s text:c="3"/></text:p>
      <text:p text:style-name="P61"/>
      <text:p text:style-name="P61"><text:s text:c="14"/><text:span text:style-name="T117">MOSELEY RAILWAY TRUST NG </text:span></text:p>
      <text:p text:style-name="P61"><text:s text:c="14"/>DIESELS <text:s/></text:p>
      <text:p text:style-name="P61"><text:s text:c="21"/>21520 3756 LX1001 46 B4299 4 50888 52528 59262 </text:p>
      <text:p text:style-name="P61"><text:s text:c="12"/>22235 <text:s text:c="3"/>ETOB74 8669 6018 6035 6299 7033 7710 </text:p>
      <text:p text:style-name="P225"><text:s/><text:span text:style-name="T1"><text:s/></text:span>224337 354013 104GO63 2306 556 565 <text:s/>2586</text:p>
      <text:p text:style-name="P217"><text:s text:c="3"/>C6717 8663 5821 <text:s/>9104 BO366V BO922A <text:s/>3582</text:p>
      <text:p text:style-name="P217"><text:s text:c="4"/>8748 8878 9056 1369 1695 1974 6007 2197 584</text:p>
      <text:p text:style-name="P61"><text:s text:c="14"/>D558 1111 1320 3 3444 BO475 40SD516 8827 9082</text:p>
      <text:p text:style-name="P49"><text:s text:c="12"/>4470 4588 5038 D6912 3465 BO495 B1854 52885 </text:p>
      <text:p text:style-name="P61"><text:s text:c="12"/>7522 C6716 8968 <text:s/>260719 7066 10050 497542</text:p>
      <text:p text:style-name="P61"><text:s text:c="10"/>984 8830 11142 22045 52610 164350 84</text:p>
      <text:p text:style-name="P217"><text:s text:c="2"/>195846 83 K7070 LX1002 256314 179870</text:p>
      <text:p text:style-name="P70"><text:s text:c="11"/>189972 198297 223667 223749 235725 191658</text:p>
      <text:p text:style-name="P70"><text:s text:c="14"/></text:p>
      <text:p text:style-name="P49"><text:s text:c="7"/></text:p>
      <text:p text:style-name="P61"><text:s text:c="15"/><text:span text:style-name="T103">0</text:span>DIESEL IN MUSEUM</text:p>
      <text:p text:style-name="P225"><text:s text:c="14"/>280865</text:p>
      <text:p text:style-name="P225"/>
      <text:p text:style-name="P61"><text:s text:c="9"/><text:span text:style-name="T117"><text:s text:c="2"/>STEAMS</text:span></text:p>
      <text:p text:style-name="P170"><text:s text:c="16"/>2395 1238 1215 3014</text:p>
      <text:p text:style-name="P70"><text:s text:c="18"/></text:p>
      <text:p text:style-name="P61"><text:s text:c="11"/>NORTH BAY RALWAY NG</text:p>
      <text:p text:style-name="P111"><text:s text:c="12"/>STEAMS</text:p>
      <text:p text:style-name="P70"><text:s text:c="17"/>5877 (GEORGIAN) 1931 </text:p>
      <text:p text:style-name="P225"><text:s text:c="3"/></text:p>
      <text:p text:style-name="P225">DIESELS</text:p>
      <text:p text:style-name="P61"><text:s text:c="14"/><text:span text:style-name="T117"><text:s text:c="2"/>D570 D573 D582 375360 <text:s/>D565 </text:span></text:p>
      <text:p text:style-name="P70"/>
      <text:p text:style-name="P70"><text:s/><text:span text:style-name="T103"><text:s text:c="15"/></text:span>OLD KILN LIGHT RAILWAY NG <text:s text:c="7"/></text:p>
      <text:p text:style-name="P61"><text:s text:c="23"/>DIESELS</text:p>
      <text:p text:style-name="P49"><text:s text:c="12"/>1769 8981 1944 2528 5297 5713 7011 7012 8887</text:p>
      <text:p text:style-name="P70"><text:s text:c="13"/>177639 181820 <text:s/>497760 <text:s/>7013 20xx </text:p>
      <text:p text:style-name="P46"><text:s text:c="10"/><text:span text:style-name="T14"><text:s text:c="3"/></text:span></text:p>
      <text:p text:style-name="P217"><text:s text:c="6"/><text:span text:style-name="T117"><text:s/>STEAMS</text:span> <text:s text:c="5"/></text:p>
      <text:p text:style-name="P70"><text:s text:c="15"/>920 9998 21160 </text:p>
      <text:p text:style-name="P217"><text:s text:c="2"/></text:p>
      <text:p text:style-name="P46"><text:span text:style-name="T14"><text:s text:c="7"/></text:span><text:span text:style-name="T10"><text:s text:c="3"/></text:span><text:span text:style-name="T114">8</text:span><text:span text:style-name="T10"> <text:s text:c="2"/>WICKHAMS</text:span></text:p>
      <text:p text:style-name="P70"><text:s text:c="14"/>3031 3032 3287</text:p>
      <text:p text:style-name="P61"><text:s text:c="13"/></text:p>
      <text:p text:style-name="P225">RUDYARD LAKE RAILWAY NG</text:p>
      <text:p text:style-name="P111"><text:s text:c="17"/>STEAMS</text:p>
      <text:p text:style-name="P61"><text:s text:c="15"/>(VICTOIRA) 196 <text:s/>8 <text:s/>7 <text:s/>9 <text:s/>6</text:p>
      <text:p text:style-name="P111"><text:s text:c="7"/></text:p>
      <text:p text:style-name="P175"><text:s/>DIESELS</text:p>
      <text:p text:style-name="P111"><text:s text:c="14"/>(FRANCES) (RUDYARD LADY) (MORDRED2)</text:p>
      <text:p text:style-name="P217"><text:s text:c="3"/>(GLEN AULDYN) <text:s/></text:p>
      <text:p text:style-name="P225"><text:s text:c="4"/></text:p>
      <text:p text:style-name="P156"><text:s text:c="6"/>SHERWOOD FOREST RAILWAY NG</text:p>
      <text:p text:style-name="P46"><text:s text:c="15"/>STEAMS</text:p>
      <text:p text:style-name="P71"><text:s text:c="13"/>(SMOKEY JOE 1) (PET2)</text:p>
      <text:p text:style-name="P111"><text:s text:c="11"/></text:p>
      <text:p text:style-name="P46"><text:s text:c="11"/><text:span text:style-name="T14"><text:s text:c="2"/></text:span><text:span text:style-name="T10"><text:s/>DIESELS</text:span></text:p>
      <text:p text:style-name="P111"><text:s text:c="12"/>(ANNE 3) (PIONEER 1) (LOTTIE) <text:s text:c="9"/></text:p>
      <text:p text:style-name="P145"><text:s/><text:span text:style-name="T5"><text:s text:c="3"/></text:span><text:span text:style-name="T31">LISTER <text:s/>4 <text:s text:c="3"/></text:span></text:p>
      <text:p text:style-name="P201"><text:s/></text:p>
      <text:p text:style-name="P214"><text:s text:c="3"/><text:span text:style-name="T67">SITTINGBOURNE KEMSLEY RAILWAY NG</text:span></text:p>
      <text:p text:style-name="P46"><text:s text:c="17"/>STEAMS</text:p>
      <text:p text:style-name="P70"><text:s text:c="14"/>614 4219 1876 886 926 2216 2472 2511 2624</text:p>
      <text:p text:style-name="P215"/>
      <text:p text:style-name="P176">DIESELS</text:p>
      <text:p text:style-name="P156"><text:s text:c="16"/>4182 6651 435403</text:p>
      <text:p text:style-name="P156"/>
      <text:p text:style-name="P225">SNOWDON <text:s/>M RAILWAY NG</text:p>
      <text:p text:style-name="P111"><text:s text:c="13"/>STEAMS</text:p>
      <text:p text:style-name="P62"><text:s text:c="11"/>925 988 989 2838 2869 2870 924</text:p>
      <text:p text:style-name="P175"><text:s text:c="3"/></text:p>
      <text:p text:style-name="P217"/>
      <text:p text:style-name="P217"><text:s text:c="8"/>DIESELS</text:p>
      <text:p text:style-name="P71"><text:span text:style-name="T54"><text:s text:c="12"/></text:span><text:s text:c="2"/>9249 9250 9305 9312 (B4651 1) ( B4651 2)</text:p>
      <text:p text:style-name="P217"><text:s text:c="4"/><text:span text:style-name="T117"><text:s/></text:span></text:p>
      <text:p text:style-name="P106"><text:s text:c="10"/><text:span text:style-name="T5"><text:s/>STEEPLE GREEN NG</text:span></text:p>
      <text:p text:style-name="P111"><text:s text:c="15"/>DIESELS</text:p>
      <text:p text:style-name="P46"><text:s text:c="14"/><text:span text:style-name="T65">1881*</text:span> 416214 5965B B0109B B0922B 6061 5431 </text:p>
      <text:p text:style-name="P217"><text:s text:c="5"/>4008 <text:span text:style-name="T65">3424* </text:span>2493 551 LIZZIE <text:s/>COSTAIN HUDSON</text:p>
      <text:p text:style-name="P217"/>
      <text:p text:style-name="P217"><text:s text:c="13"/>RHIW <text:s/>VALLEY RAILWAY NG</text:p>
      <text:p text:style-name="P49"><text:s text:c="13"/>STEAMS</text:p>
      <text:p text:style-name="P175"><text:s text:c="4"/>25657 20</text:p>
      <text:p text:style-name="P70"><text:s text:c="4"/></text:p>
      <text:p text:style-name="P71"><text:s text:c="10"/>DIESEL</text:p>
      <text:p text:style-name="P70"><text:s text:c="14"/>MONTY</text:p>
      <text:p text:style-name="P61"><text:s text:c="10"/></text:p>
      <text:p text:style-name="P61"><text:s text:c="12"/><text:span text:style-name="T117"><text:s text:c="2"/>NORTH INGS RAILWAY NG</text:span></text:p>
      <text:p text:style-name="P46"><text:s text:c="14"/>STEAM</text:p>
      <text:p text:style-name="P70"><text:s text:c="14"/>1859401 </text:p>
      <text:p text:style-name="P115"/>
      <text:p text:style-name="P225">DIESELS</text:p>
      <text:p text:style-name="P61"><text:s text:c="13"/>(INGIND) 375701 7120 7493 8826 183773 371937</text:p>
      <text:p text:style-name="P61"><text:s text:c="12"/>421433 6013 200744 </text:p>
      <text:p text:style-name="P70"><text:s text:c="14"/>LISTER</text:p>
      <text:p text:style-name="P70"/>
      <text:p text:style-name="P225"><text:s/>PERRYGROVE RAILWAY NG</text:p>
      <text:p text:style-name="P61"><text:s text:c="14"/>STEAMS</text:p>
      <text:p text:style-name="P75"><text:s text:c="13"/>295 27 323 77</text:p>
      <text:p text:style-name="P217"/>
      <text:p text:style-name="P61"><text:s text:c="12"/><text:span text:style-name="T117"><text:s text:c="4"/>DIESELS</text:span></text:p>
      <text:p text:style-name="P61"><text:s text:c="13"/>9352 40407 (ANNA) 26014 9337</text:p>
      <text:p text:style-name="P70"><text:s text:c="9"/></text:p>
      <text:p text:style-name="P111"><text:s text:c="9"/><text:span text:style-name="T112"><text:s/></text:span><text:span text:style-name="T117"><text:s/>VALE OF RHEIDOL LIGHT RAILWAY NG</text:span></text:p>
      <text:p text:style-name="P46"><text:s text:c="18"/>STEAMS</text:p>
      <text:p text:style-name="P46"><text:s text:c="15"/>1382 605 5913 2228 10249 7 8 (106 1877) 1027 </text:p>
      <text:p text:style-name="P46"><text:s text:c="16"/>3114 4766 (11938 21) 5276 <text:s/>(10551 60)</text:p>
      <text:p text:style-name="P70"><text:s text:c="16"/>(15515 23) (2 1213)</text:p>
      <text:p text:style-name="P70"/>
      <text:p text:style-name="P70"><text:s text:c="13"/>DIESELS</text:p>
      <text:p text:style-name="P115"><text:s text:c="13"/>51168 002 D564 7495</text:p>
      <text:p text:style-name="P217"><text:s/></text:p>
      <text:p text:style-name="P62"><text:s text:c="15"/>RAILCAR</text:p>
      <text:p text:style-name="P93"><text:span text:style-name="T5"><text:s text:c="13"/>68804</text:span><text:span text:style-name="T30"> <text:s/></text:span></text:p>
      <text:p text:style-name="P217"><text:s text:c="7"/><text:span text:style-name="T117">ALAN KEEF</text:span></text:p>
      <text:p text:style-name="P46"><text:s text:c="12"/>STEAMS</text:p>
      <text:p text:style-name="P225"><text:span text:style-name="T54"><text:s text:c="11"/></text:span>91 2133 30 (92 762) </text:p>
      <text:p text:style-name="P163"><text:span text:style-name="T15"><text:s text:c="2"/></text:span><text:span text:style-name="T20"><text:s/></text:span><text:span text:style-name="T109"><text:s/></text:span><text:span text:style-name="T108"><text:s text:c="2"/></text:span></text:p>
      <text:p text:style-name="P217"><text:s text:c="2"/></text:p>
      <text:p text:style-name="P225"><text:s text:c="2"/>DIESEL</text:p>
      <text:p text:style-name="P93"><text:s text:c="5"/><text:span text:style-name="T5"><text:s text:c="11"/>2014 <text:s/></text:span>DDD</text:p>
      <text:p text:style-name="P217"><text:s text:c="2"/></text:p>
      <text:p text:style-name="P217"><text:s text:c="3"/><text:span text:style-name="T112">IE</text:span><text:span text:style-name="T117"> WEST LANCASHIRE RAILWAY NG</text:span></text:p>
      <text:p text:style-name="P46"><text:s text:c="14"/>STEAMS</text:p>
      <text:p text:style-name="P61"><text:s text:c="9"/>15991 1760 <text:span text:style-name="T65">823</text:span> 2378 2405 <text:span text:style-name="T65">3506</text:span> 6641 </text:p>
      <text:p text:style-name="P70"><text:span text:style-name="T66"><text:s text:c="10"/>14676 <text:s text:c="2"/>15513</text:span><text:span text:style-name="T115">SEL</text:span></text:p>
      <text:p text:style-name="P111"><text:s text:c="12"/></text:p>
      <text:p text:style-name="P61"><text:s text:c="9"/><text:span text:style-name="T117"><text:s text:c="6"/>DIESELS</text:span></text:p>
      <text:p text:style-name="P70"><text:s text:c="15"/>297054 339105 381705 222074 202036 <text:s/>19XX 8995 <text:s/></text:p>
      <text:p text:style-name="P61"><text:s text:c="12"/><text:span text:style-name="T96"><text:s/></text:span>7955 8992 <text:s text:c="3"/>3002 364251 4478 <text:s text:c="2"/>5906 640 <text:span text:style-name="T65">3916</text:span></text:p>
      <text:p text:style-name="P104"><text:s text:c="15"/>692 <text:span text:style-name="T65">DM750</text:span> 1777 1840 1963 2555 7371 <text:s/><text:span text:style-name="T14">11258 11223</text:span></text:p>
      <text:p text:style-name="P115"><text:s text:c="14"/>DM 1393 10805 29890 <text:span text:style-name="T65">200478</text:span> 613 (3205 173) <text:s text:c="2"/><text:span text:style-name="T85"><text:s/></text:span></text:p>
      <text:p text:style-name="P61"><text:s text:c="9"/><text:span text:style-name="T92"><text:s text:c="2"/></text:span></text:p>
      <text:p text:style-name="P225"><text:s text:c="7"/>YAXHAM LIGHT RAILWAY NG</text:p>
      <text:p text:style-name="P46"><text:s text:c="17"/>STEAM</text:p>
      <text:p text:style-name="P62"><text:s text:c="17"/>2043 </text:p>
      <text:p text:style-name="P231"/>
      <text:p text:style-name="P46"><text:s text:c="10"/><text:span text:style-name="T14"><text:s text:c="8"/></text:span><text:span text:style-name="T10"><text:s text:c="4"/>DIESELS</text:span></text:p>
      <text:p text:style-name="P111"><text:s text:c="15"/>2666 3982 6501 7153 7474 40011 170369 202967</text:p>
      <text:p text:style-name="P61"><text:s text:c="13"/>22100 54684 44 <text:s/></text:p>
      <text:p text:style-name="P61"><text:s text:c="6"/></text:p>
      <text:p text:style-name="P70"><text:s text:c="15"/>YAXHAM STATION YARD</text:p>
      <text:p text:style-name="P46"><text:s text:c="15"/>DIESEL</text:p>
      <text:p text:style-name="P115"><text:s text:c="14"/>32801</text:p>
      <text:p text:style-name="P115"><text:s text:c="16"/>STEAMS <text:s text:c="5"/></text:p>
      <text:p text:style-name="P115"><text:s text:c="13"/>7818 1700 <text:span text:style-name="T65">9596</text:span> 7070 (1) </text:p>
      <text:p text:style-name="P115"><text:s text:c="15"/></text:p>
      <text:p text:style-name="P217"><text:s/></text:p>
      <text:p text:style-name="P225"><text:s text:c="5"/>LANCASHIRE MINING MUSEUM</text:p>
      <text:p text:style-name="P168"><text:s text:c="6"/>WAGONS</text:p>
      <text:p text:style-name="P115"><text:s text:c="11"/><text:span text:style-name="T65">519293*</text:span> <text:s/><text:span text:style-name="T65">MINERAL OPED*</text:span> <text:span text:style-name="T65"><text:s/>FLAT* </text:span><text:s text:c="3"/>284235</text:p>
      <text:p text:style-name="P61"><text:s text:c="5"/></text:p>
      <text:p text:style-name="P70"><text:s text:c="18"/>DIESELS</text:p>
      <text:p text:style-name="P61"><text:span text:style-name="T54"><text:s text:c="8"/></text:span><text:span text:style-name="T61"><text:s text:c="11"/></text:span><text:span text:style-name="T66">120 8566 989 DM1647 DM970 </text:span><text:span text:style-name="T65">3411*</text:span><text:span text:style-name="T66"> </text:span></text:p>
      <text:p text:style-name="P233"><text:span text:style-name="T72"><text:s text:c="10"/>4816 DM1804 </text:span><text:span text:style-name="T65">DM1781*</text:span><text:span text:style-name="T72"> DM1929 DM1173</text:span></text:p>
      <text:p text:style-name="P228"><text:s text:c="9"/>6048 <text:s/>7375 7519 <text:s/>8575 8577 8834 8909 8975</text:p>
      <text:p text:style-name="P217"><text:s text:c="8"/>DM1058 DM933 DM1270 DM1352 DM1413</text:p>
      <text:p text:style-name="P46"><text:s text:c="11"/><text:span text:style-name="T72"><text:s text:c="6"/></text:span><text:span text:style-name="T14">DM1414 DM1439 <text:s/>DM1443 8802 244580 9227</text:span></text:p>
      <text:p text:style-name="P61"><text:s text:c="17"/>2417 8567 85684 97547 DM1164 <text:s text:c="2"/>B4055 DM1</text:p>
      <text:p text:style-name="P111"><text:s text:c="13"/></text:p>
      <text:p text:style-name="P61"><text:s text:c="11"/><text:span text:style-name="T103">K</text:span>CRANES</text:p>
      <text:p text:style-name="P61"><text:s text:c="14"/>RS1030 <text:s text:c="2"/><text:span text:style-name="T65">17895*</text:span> <text:span text:style-name="T65">18503*</text:span></text:p>
      <text:p text:style-name="P217"><text:s text:c="2"/></text:p>
      <text:p text:style-name="P145"><text:s/><text:span text:style-name="T5"><text:s text:c="2"/></text:span><text:span text:style-name="T40"><text:s text:c="3"/></text:span><text:span text:style-name="T5"><text:s text:c="2"/>LOCOMOTIVE SERVICES <text:s text:c="13"/></text:span><text:span text:style-name="T30"><text:s text:c="2"/></text:span><text:span text:style-name="T5"><text:s/></text:span></text:p>
      <text:p text:style-name="P61"><text:s text:c="12"/><text:span text:style-name="T103"><text:s text:c="2"/></text:span>COACHES</text:p>
      <text:p text:style-name="P46"><text:s text:c="17"/>1954 <text:span text:style-name="T65">10593</text:span> 6154 5815 5463 1252 3241 <text:span text:style-name="T65">11077</text:span><text:span text:style-name="T72"> <text:s/></text:span></text:p>
      <text:p text:style-name="P61"><text:span text:style-name="T117"><text:s text:c="16"/>99722 5958 </text:span><text:span text:style-name="T118">11091</text:span><text:span text:style-name="T117"> 1253 6050 6009 6029 5925</text:span></text:p>
      <text:p text:style-name="P70"/>
      <text:p text:style-name="P225"><text:s text:c="5"/>STEAM</text:p>
      <text:p text:style-name="P111"><text:span text:style-name="T117"><text:s text:c="15"/></text:span><text:span text:style-name="T118">LINDSAY</text:span></text:p>
      <text:p text:style-name="P217"><text:s/><text:span text:style-name="T117"><text:s text:c="2"/></text:span></text:p>
      <text:p text:style-name="P217"><text:s text:c="5"/><text:span text:style-name="T92"><text:s/></text:span><text:span text:style-name="T117"><text:s text:c="2"/>DIESELS</text:span></text:p>
      <text:p text:style-name="P225"><text:s text:c="17"/>08737 <text:s/>47816 08780 D2447 37667 </text:p>
      <text:p text:style-name="P61"><text:s text:c="9"/><text:span text:style-name="T117">EMUS </text:span></text:p>
      <text:p text:style-name="P70"><text:s text:c="17"/>61229 61230 68001 68002 68008 68009</text:p>
      <text:p text:style-name="P278"/>
      <text:p text:style-name="P225"><text:s text:c="2"/>DMU</text:p>
      <text:p text:style-name="P70"><text:s text:c="14"/>977873</text:p>
      <text:p text:style-name="P72"><text:s text:c="3"/><text:span text:style-name="T54"><text:s/></text:span></text:p>
      <text:p text:style-name="P61"><text:s text:c="11"/><text:span text:style-name="T117">WAGONS</text:span></text:p>
      <text:p text:style-name="P115"><text:s text:c="10"/>95571 900312</text:p>
      <text:p text:style-name="P70"><text:s text:c="16"/></text:p>
      <text:h text:style-name="P287" text:outline-level="5"><text:s/>GARW VALLEY RAILWAY</text:h>
      <text:p text:style-name="P217"><text:s/>WAGONS <text:s/></text:p>
      <text:p text:style-name="P225"><text:s text:c="2"/>(2170 4140010-2 <text:s/>748120) 95XXXX 993721</text:p>
      <text:p text:style-name="P70"><text:s text:c="7"/></text:p>
      <text:p text:style-name="P225"><text:s text:c="2"/>DMUS</text:p>
      <text:p text:style-name="P70"><text:s text:c="11"/>51919 <text:s text:c="2"/>52048 </text:p>
      <text:p text:style-name="P61"><text:s text:c="8"/><text:span text:style-name="T117"><text:s text:c="4"/></text:span></text:p>
      <text:p text:style-name="P111"><text:s text:c="11"/></text:p>
      <text:p text:style-name="P61"><text:s text:c="10"/><text:span text:style-name="T117">STEAMS</text:span></text:p>
      <text:p text:style-name="P156"><text:s/><text:span text:style-name="T54"><text:s/></text:span><text:s text:c="3"/>7705 3840 </text:p>
      <text:p text:style-name="P112"><text:s text:c="10"/></text:p>
      <text:p text:style-name="P225"><text:s text:c="9"/>DIESELS</text:p>
      <text:p text:style-name="P61"><text:span text:style-name="T40"><text:s text:c="18"/></text:span>4006 <text:s text:c="2"/>D1095</text:p>
      <text:p text:style-name="P157"><text:s text:c="6"/></text:p>
      <text:p text:style-name="P217"><text:span text:style-name="T117"><text:s text:c="3"/></text:span><text:span text:style-name="T112">7</text:span><text:span text:style-name="T117"> <text:s text:c="2"/></text:span><text:span text:style-name="T120">LNIGO JONES SLATE WORKS</text:span></text:p>
      <text:p text:style-name="P46"><text:span text:style-name="T72"><text:s text:c="17"/></text:span><text:span text:style-name="T14">DIESEL</text:span></text:p>
      <text:p text:style-name="P217"><text:span text:style-name="T117"><text:s text:c="9"/></text:span><text:span text:style-name="T118">19XX*</text:span></text:p>
      <text:p text:style-name="P112"><text:s text:c="17"/></text:p>
      <text:p text:style-name="P46"><text:s text:c="6"/><text:span text:style-name="T5"><text:s text:c="5"/></text:span><text:span text:style-name="T10"><text:s text:c="4"/>NARROW GAUGE RAILWAY MUSEUM <text:s/>LL36 9EY</text:span></text:p>
      <text:p text:style-name="P217"><text:s text:c="5"/>STEAMS</text:p>
      <text:p text:style-name="P225"><text:s text:c="14"/>GEORGE HERRY 13L <text:s text:c="2"/>173L <text:s text:c="2"/>541 <text:s/><text:span text:style-name="T65">2817</text:span> </text:p>
      <text:p text:style-name="P225"/>
      <text:p text:style-name="P225"><text:s text:c="11"/>DIESEL</text:p>
      <text:p text:style-name="P70"><text:s text:c="18"/>774 <text:s text:c="6"/></text:p>
      <text:p text:style-name="P217"/>
      <text:p text:style-name="P217"><text:span text:style-name="T96"><text:s text:c="3"/></text:span><text:s/><text:span text:style-name="T116">PITTENCRIEF PARK</text:span></text:p>
      <text:p text:style-name="P250"><text:s/><text:span text:style-name="T5"><text:s text:c="5"/>STEAM</text:span></text:p>
      <text:p text:style-name="P70"><text:span text:style-name="T64"><text:s text:c="20"/></text:span><text:span text:style-name="T65">1996*</text:span></text:p>
      <text:p text:style-name="P70"/>
      <text:p text:style-name="P217"><text:span text:style-name="T117"><text:s text:c="7"/></text:span><text:span text:style-name="T120">POLKERMMET PARK</text:span></text:p>
      <text:p text:style-name="P265"><text:s text:c="3"/>STEAM</text:p>
      <text:p text:style-name="P111"><text:span text:style-name="T111"><text:s text:c="11"/></text:span><text:span text:style-name="T3"><text:s text:c="4"/></text:span><text:span text:style-name="T117"><text:s text:c="2"/></text:span><text:span text:style-name="T118">1175*</text:span><text:span text:style-name="T117"> <text:s text:c="5"/></text:span></text:p>
      <text:p text:style-name="P115"/>
      <text:p text:style-name="P115"><text:s text:c="12"/>LONDON MUSEUM OF WATER STEAM RAILWAY TW8 0EN</text:p>
      <text:p text:style-name="P46"><text:s text:c="14"/><text:span text:style-name="T14">STEAM</text:span></text:p>
      <text:p text:style-name="P225"><text:span text:style-name="T54"><text:s text:c="10"/></text:span><text:s text:c="4"/>3906 </text:p>
      <text:p text:style-name="P262"><text:s text:c="2"/><text:span text:style-name="T17"><text:s text:c="4"/></text:span></text:p>
      <text:p text:style-name="P61"><text:s text:c="14"/>DIESELS</text:p>
      <text:p text:style-name="P225"><text:s text:c="11"/>44052 1676 <text:s text:c="4"/></text:p>
      <text:p text:style-name="P61"><text:s text:c="19"/></text:p>
      <text:p text:style-name="P104"><text:span text:style-name="T10"><text:s text:c="12"/></text:span><text:span text:style-name="T13">TANAT VALLEY RAILWAY</text:span></text:p>
      <text:p text:style-name="P111"><text:s text:c="11"/>DIESELS NG</text:p>
      <text:p text:style-name="P61"><text:s text:c="13"/>9811 8653 7182 7050 5041 7498 4989 3906 4810 <text:s text:c="12"/></text:p>
      <text:p text:style-name="P46"><text:s text:c="15"/><text:span text:style-name="T14">4114 4904 3250 13626 1795 5013 9391 2910 8071</text:span></text:p>
      <text:p text:style-name="P217"><text:s text:c="7"/>8992 14806 3981 13101 2145 14769 14753 14766</text:p>
      <text:p text:style-name="P111"><text:s text:c="15"/>13913 13929 13911 13629 11836 7493 9795 8633</text:p>
      <text:p text:style-name="P61"><text:s text:c="12"/>19XX <text:s/>12869 12713 12649 <text:s/>12634 12438 12432 9537 </text:p>
      <text:p text:style-name="P61"><text:s text:c="17"/>12124 13318 8663 20141 20228 20066 20161 20140</text:p>
      <text:p text:style-name="P169"><text:s text:c="7"/>20091 20069 20067 20265 7281 20222 39005 20240</text:p>
      <text:p text:style-name="P61"><text:s text:c="17"/>20025 8583 8423 8415 8638 8073 9536 8118 20004</text:p>
      <text:p text:style-name="P49"><text:s text:c="14"/><text:span text:style-name="T5">20242 20039 15152 20019 20018 20017 20005 20003 </text:span></text:p>
      <text:p text:style-name="P105"><text:span text:style-name="T72"><text:s text:c="2"/></text:span><text:span text:style-name="T14"><text:s text:c="12"/>20065 20212 20002 20007 20044 15104 6572 7481 </text:span></text:p>
      <text:p text:style-name="P217"><text:s text:c="6"/>7580 14789 13301 13300 15531 <text:s/>13104 12322 12398</text:p>
      <text:p text:style-name="P61"><text:s text:c="14"/>10744 10051 11457 11459 11460 11206 11809 12126 <text:s text:c="9"/></text:p>
      <text:p text:style-name="P217"><text:s text:c="5"/>10248 11338 10067 10593 9925 9869 9853 9852</text:p>
      <text:p text:style-name="P61"><text:s text:c="12"/>9812 <text:s/>10422 13313 15784 15778 10069 10258 416588</text:p>
      <text:p text:style-name="P61"><text:s text:c="12"/>11451 10782 10809 10894 10900 10952 11097 11204 <text:s text:c="2"/></text:p>
      <text:p text:style-name="P217"><text:s text:c="4"/></text:p>
      <text:p text:style-name="P61"><text:s text:c="14"/>STEAMS NG</text:p>
      <text:p text:style-name="P225"><text:span text:style-name="T96"><text:s text:c="8"/></text:span><text:s/>14005 11003 <text:s text:c="3"/><text:span text:style-name="T96"><text:s text:c="2"/></text:span></text:p>
      <text:p text:style-name="P49"><text:s text:c="6"/><text:span text:style-name="T5"><text:s/></text:span></text:p>
      <text:p text:style-name="P61"><text:s text:c="15"/>Ground Wagons</text:p>
      <text:p text:style-name="P70"><text:s text:c="12"/>95456 95013 <text:s/>1XXXXX <text:s/>753xxx <text:s/>79596 <text:s/>357924 </text:p>
      <text:p text:style-name="P70"><text:s text:c="13"/>784199 <text:s/>462760 <text:s/>462725 <text:s/>753xxx <text:s/>909070</text:p>
      <text:p text:style-name="P61"><text:s text:c="12"/></text:p>
      <text:p text:style-name="P225"><text:s text:c="4"/></text:p>
      <text:p text:style-name="P225"><text:s text:c="4"/>Ground coach</text:p>
      <text:p text:style-name="P225"><text:s text:c="13"/>74</text:p>
      <text:p text:style-name="P225"/>
      <text:p text:style-name="P109"><text:s text:c="10"/><text:span text:style-name="T67"><text:s text:c="2"/></text:span><text:span text:style-name="T47"><text:s text:c="3"/></text:span><text:span text:style-name="T67"><text:s text:c="2"/></text:span><text:span text:style-name="T70">87671 99090 <text:s text:c="2"/>40320 <text:s/></text:span><text:span text:style-name="T68">45036uf <text:s/></text:span></text:p>
      <text:p text:style-name="P115"><text:s text:c="3"/></text:p>
      <text:p text:style-name="P225"><text:s text:c="6"/>EMUS</text:p>
      <text:p text:style-name="P156"><text:s text:c="12"/>977963 977964 75642</text:p>
      <text:p text:style-name="P61"><text:span text:style-name="T54"><text:s text:c="11"/></text:span><text:s/></text:p>
      <text:p text:style-name="P225"><text:s text:c="2"/>DMUS</text:p>
      <text:p text:style-name="P61"><text:s text:c="11"/>52031 59791 52005 51993 143601 143616</text:p>
      <text:p text:style-name="P61"/>
      <text:p text:style-name="P217"><text:s text:c="8"/>GRANE</text:p>
      <text:p text:style-name="P79"><text:span text:style-name="T40"><text:s text:c="10"/></text:span><text:span text:style-name="T47"><text:s/></text:span><text:span text:style-name="T67"><text:s/>5196</text:span></text:p>
      <text:p text:style-name="P217"><text:s text:c="3"/>WICKHAMS</text:p>
      <text:p text:style-name="P61"><text:span text:style-name="T95"><text:s text:c="11"/></text:span><text:span text:style-name="T117"><text:s/>6687</text:span><text:span text:style-name="T95"> </text:span><text:span text:style-name="T117">68012</text:span> </text:p>
      <text:p text:style-name="P217"/>
      <text:p text:style-name="P217"/>
      <text:p text:style-name="P61"><text:s text:c="18"/><text:span text:style-name="T117"><text:s/></text:span><text:span text:style-name="T120">HOLYWOOD</text:span></text:p>
      <text:p text:style-name="P49"><text:s text:c="14"/>DIESEL</text:p>
      <text:p text:style-name="P70"><text:span text:style-name="T103"><text:s text:c="10"/></text:span><text:s text:c="3"/><text:span text:style-name="T65">418790*</text:span> </text:p>
      <text:p text:style-name="P61"><text:s text:c="13"/></text:p>
      <text:p text:style-name="P111"><text:s/><text:span text:style-name="T103"><text:s text:c="12"/></text:span><text:s text:c="6"/><text:span text:style-name="T117">ROCHDLE </text:span></text:p>
      <text:p text:style-name="P217"><text:s text:c="10"/>COACH</text:p>
      <text:p text:style-name="P225"><text:s text:c="10"/>(12 10843)</text:p>
      <text:p text:style-name="P111"><text:s text:c="8"/></text:p>
      <text:p text:style-name="P115"><text:span text:style-name="T103"><text:s text:c="13"/></text:span>TALYBONT ON USK</text:p>
      <text:p text:style-name="P217"><text:s text:c="5"/>DMU</text:p>
      <text:p text:style-name="P278"><text:span text:style-name="T66"><text:s text:c="11"/></text:span><text:span text:style-name="T65">59664</text:span><text:span text:style-name="T66"> <text:s text:c="4"/></text:span><text:span text:style-name="T91"><text:s/></text:span></text:p>
      <text:p text:style-name="P285"/>
      <text:p text:style-name="P61"><text:span text:style-name="T117"><text:s text:c="13"/></text:span><text:span text:style-name="T112">I</text:span><text:span text:style-name="T93"> <text:s/></text:span><text:span text:style-name="T121">A BRIDDON </text:span></text:p>
      <text:p text:style-name="P168"><text:s/>DIESELS </text:p>
      <text:p text:style-name="P46"><text:span text:style-name="T14"><text:s text:c="6"/></text:span><text:s/><text:span text:style-name="T14"><text:s text:c="4"/>D1345 <text:s/>2679 312989 6295 486 2675 9222 5578 144</text:span></text:p>
      <text:p text:style-name="P221"><text:span text:style-name="T119"><text:s text:c="2"/></text:span><text:span text:style-name="T117"><text:s/>4220015*</text:span><text:span text:style-name="T119"> <text:s/>10180 27097 D1120 27932 2670 2654 423658</text:span></text:p>
      <text:p text:style-name="P70"/>
      <text:p text:style-name="P61"><text:span text:style-name="T117"><text:s text:c="7"/></text:span><text:span text:style-name="T112"><text:s text:c="3"/></text:span><text:span text:style-name="T117">Ground Wagons</text:span></text:p>
      <text:p text:style-name="P115"><text:span text:style-name="T103">1439 D13</text:span>4W FLAT BLACK <text:s/>786951 110443 6253<text:span text:style-name="T103">87 2940 803 4240015 D1197 9225 RS8 14901</text:span></text:p>
      <text:p text:style-name="P111"><text:span text:style-name="T112"><text:s text:c="10"/></text:span><text:span text:style-name="T117">042236 <text:s text:c="5"/>403XX <text:s/>723</text:span></text:p>
      <text:p text:style-name="P217"/>
      <text:p text:style-name="P217">EMUS</text:p>
      <text:p text:style-name="P70"><text:s text:c="11"/><text:span text:style-name="T65">75407</text:span> <text:s text:c="2"/><text:span text:style-name="T65">61287 </text:span></text:p>
      <text:p text:style-name="P111"><text:s text:c="9"/><text:span text:style-name="T117"><text:s text:c="2"/></text:span></text:p>
      <text:p text:style-name="P225"><text:s text:c="5"/>TROLLEYS</text:p>
      <text:p text:style-name="P61"><text:span text:style-name="T92"><text:s text:c="14"/></text:span><text:span text:style-name="T117">BLACK (19XX BLACK) (XXXX YELLOW)</text:span></text:p>
      <text:p text:style-name="P225"><text:s text:c="3"/></text:p>
      <text:p text:style-name="P225"><text:s text:c="6"/>GEISMAR</text:p>
      <text:p text:style-name="P70"><text:s text:c="12"/>98307</text:p>
      <text:p text:style-name="P217"><text:s text:c="5"/></text:p>
      <text:p text:style-name="P139"><text:s text:c="10"/>RAILCAR</text:p>
      <text:p text:style-name="P70"><text:s text:c="9"/>AD9120 <text:s text:c="8"/></text:p>
      <text:p text:style-name="P111"><text:s text:c="7"/><text:span text:style-name="T112">S</text:span></text:p>
      <text:p text:style-name="P61"><text:s text:c="13"/>PORT ELPHINSTONE <text:s/>AB51 5WU</text:p>
      <text:p text:style-name="P61"><text:s text:c="13"/>COACHES</text:p>
      <text:p text:style-name="P175"><text:span text:style-name="T85"><text:s text:c="11"/></text:span><text:s/><text:span text:style-name="T65">94691</text:span> <text:span text:style-name="T65">889022</text:span> </text:p>
      <text:p text:style-name="P93">E <text:s text:c="4"/></text:p>
      <text:p text:style-name="P61"><text:s text:c="10"/><text:span text:style-name="T117"><text:s text:c="6"/>Kinsley</text:span></text:p>
      <text:p text:style-name="P111"><text:s text:c="11"/>Diesels</text:p>
      <text:p text:style-name="P217"><text:s text:c="2"/><text:span text:style-name="T65">37503</text:span> <text:span text:style-name="T65">60050</text:span> <text:span text:style-name="T65">60086</text:span> <text:s text:c="10"/></text:p>
      <text:p text:style-name="P61"><text:s text:c="13"/></text:p>
      <text:p text:style-name="P111"><text:s text:c="14"/><text:span text:style-name="T116">Langhornes lines</text:span></text:p>
      <text:p text:style-name="P61"><text:s text:c="13"/>Diesel</text:p>
      <text:p text:style-name="P67"><text:span text:style-name="T119"><text:s text:c="13"/></text:span><text:span text:style-name="T117">D1995*</text:span></text:p>
      <text:p text:style-name="P148"><text:s text:c="4"/></text:p>
      <text:p text:style-name="P61"><text:s text:c="15"/><text:span text:style-name="T112"><text:s/></text:span><text:span text:style-name="T117"><text:s text:c="2"/></text:span><text:span text:style-name="T120">L c p <text:s/>Propoesrsties Li t</text:span></text:p>
      <text:p text:style-name="P61"><text:span text:style-name="T117"><text:s text:c="14"/></text:span><text:span text:style-name="T118">Diesel*</text:span><text:span text:style-name="T117"> <text:s text:c="5"/></text:span><text:span text:style-name="T62"><text:s/></text:span></text:p>
      <text:p text:style-name="P70"><text:s text:c="2"/></text:p>
      <text:p text:style-name="P111"><text:s text:c="14"/>Long eaton</text:p>
      <text:p text:style-name="P217">GROUND Coach </text:p>
      <text:p text:style-name="P140"><text:s text:c="14"/>34XX</text:p>
      <text:p text:style-name="P250"><text:span text:style-name="T11"><text:s text:c="4"/></text:span><text:span text:style-name="T9"><text:s/>11074</text:span><text:span text:style-name="T11"> </text:span><text:span text:style-name="T9">12092</text:span><text:span text:style-name="T112"> <text:s text:c="2"/></text:span></text:p>
      <text:p text:style-name="P70"><text:s text:c="11"/></text:p>
      <text:p text:style-name="P61"><text:s text:c="10"/><text:span text:style-name="T117"><text:s text:c="2"/>GROUND WAGON</text:span></text:p>
      <text:p text:style-name="P70"><text:s text:c="13"/>60171 <text:s text:c="2"/></text:p>
      <text:p text:style-name="P125"><text:s text:c="5"/><text:span text:style-name="T5"><text:s text:c="3"/></text:span></text:p>
      <text:p text:style-name="P115"><text:s text:c="16"/>Crowle &amp; Thorne Moors Peat Ry <text:s/>NG</text:p>
      <text:p text:style-name="P111"><text:s text:c="15"/>Diesels </text:p>
      <text:p text:style-name="P70"><text:s text:c="16"/>5130 5129 5220 40$302</text:p>
      <text:p text:style-name="P70"><text:s text:c="10"/></text:p>
      <text:p text:style-name="P61"><text:s text:c="4"/><text:span text:style-name="T117"><text:s text:c="4"/></text:span><text:span text:style-name="T62"><text:s text:c="5"/></text:span><text:span text:style-name="T121">Gwendfaeth Railway</text:span></text:p>
      <text:p text:style-name="P111"><text:s text:c="15"/>Coachs</text:p>
      <text:p text:style-name="P115"><text:span text:style-name="T85"><text:s text:c="16"/></text:span>86200 80257 94121 86226 86396<text:span text:style-name="T103">6 <text:s/>(6</text:span></text:p>
      <text:p text:style-name="P175"><text:s text:c="5"/>Dmu</text:p>
      <text:p text:style-name="P61"><text:s text:c="18"/>977091</text:p>
      <text:p text:style-name="P74"/>
      <text:p text:style-name="P225"><text:s text:c="2"/>Diesels</text:p>
      <text:p text:style-name="P134"><text:s text:c="14"/>08994 08995</text:p>
      <text:p text:style-name="P217"/>
      <text:p text:style-name="P61"><text:s text:c="14"/><text:span text:style-name="T116">Windsor Elton Station</text:span> </text:p>
      <text:p text:style-name="P111"><text:s text:c="12"/>Steam </text:p>
      <text:p text:style-name="P225"><text:span text:style-name="T61"><text:s text:c="10"/></text:span><text:span text:style-name="T66"><text:s text:c="2"/></text:span><text:span text:style-name="T65">3041*</text:span><text:span text:style-name="T66"> <text:s text:c="2"/></text:span><text:s text:c="2"/></text:p>
      <text:p text:style-name="P93"/>
      <text:p text:style-name="P115"><text:span text:style-name="T103"><text:s text:c="12"/>D </text:span><text:s text:c="2"/><text:span text:style-name="T103">83164 783681</text:span></text:p>
      <text:p text:style-name="P225"><text:s text:c="2"/></text:p>
      <text:p text:style-name="P175"><text:s text:c="8"/></text:p>
      <text:p text:style-name="P133"><text:s text:c="10"/></text:p>
      <text:p text:style-name="P217"><text:s/></text:p>
      <text:p text:style-name="P20"/>
      <text:p text:style-name="P225"><text:s text:c="8"/></text:p>
      <text:p text:style-name="P225"><text:s text:c="8"/></text:p>
      <text:p text:style-name="P178"/>
      <text:p text:style-name="P73"/>
      <text:p text:style-name="P272"/>
      <text:p text:style-name="P61"><text:s text:c="11"/></text:p>
      <text:p text:style-name="P61"><text:s text:c="11"/></text:p>
      <text:p text:style-name="P225"><text:s text:c="3"/></text:p>
      <text:p text:style-name="P225"/>
      <text:p text:style-name="P225"><text:s text:c="5"/></text:p>
      <text:p text:style-name="P61"><text:s text:c="10"/><text:span text:style-name="T117"><text:s/></text:span></text:p>
      <text:p text:style-name="P61"><text:s text:c="11"/></text:p>
      <text:p text:style-name="P225"><text:s/></text:p>
      <text:p text:style-name="P168"><text:s text:c="2"/></text:p>
      <text:p text:style-name="P70"><text:s text:c="11"/></text:p>
      <text:p text:style-name="P225"><text:s/></text:p>
      <text:p text:style-name="P61"><text:s text:c="2"/></text:p>
      <text:p text:style-name="P225"><text:s/></text:p>
      <text:p text:style-name="P156"/>
      <text:p text:style-name="P61"><text:s text:c="9"/></text:p>
      <text:p text:style-name="P115"/>
      <text:p text:style-name="P115"><text:s text:c="11"/></text:p>
      <text:p text:style-name="P232"/>
      <text:p text:style-name="P49"><text:s text:c="3"/></text:p>
      <text:p text:style-name="P217"/>
      <text:p text:style-name="P70"><text:s text:c="9"/></text:p>
      <text:p text:style-name="P168"/>
      <text:p text:style-name="P61"><text:s text:c="9"/></text:p>
      <text:p text:style-name="P217"/>
      <text:p text:style-name="P61"><text:s text:c="11"/></text:p>
      <text:p text:style-name="P272"/>
      <text:p text:style-name="P217"><text:s text:c="5"/></text:p>
      <text:p text:style-name="P225"/>
      <text:p text:style-name="P115"><text:s text:c="11"/></text:p>
      <text:p text:style-name="P61"><text:s text:c="9"/></text:p>
      <text:p text:style-name="P225"/>
      <text:p text:style-name="P217"><text:s text:c="2"/><text:span text:style-name="T117"><text:s/></text:span></text:p>
      <text:p text:style-name="P217"><text:s text:c="2"/></text:p>
      <text:p text:style-name="P61"><text:s text:c="14"/></text:p>
      <text:p text:style-name="P49"><text:s text:c="10"/></text:p>
      <text:p text:style-name="P61"/>
      <text:p text:style-name="P76"/>
      <text:p text:style-name="P61"><text:s text:c="17"/></text:p>
      <text:p text:style-name="P61"><text:s text:c="9"/></text:p>
      <text:p text:style-name="P217"><text:s text:c="6"/></text:p>
      <text:p text:style-name="P61"><text:s text:c="14"/></text:p>
      <text:p text:style-name="P175"/>
      <text:p text:style-name="P217"><text:s text:c="7"/></text:p>
      <text:p text:style-name="P61"/>
      <text:p text:style-name="P225"/>
      <text:p text:style-name="P61"><text:s text:c="11"/></text:p>
      <text:p text:style-name="P61"><text:s text:c="8"/></text:p>
      <text:p text:style-name="P225"/>
      <text:p text:style-name="P61"><text:s text:c="10"/><text:span text:style-name="T117"><text:s text:c="4"/></text:span></text:p>
      <text:p text:style-name="P156"><text:s/></text:p>
      <text:p text:style-name="P217"><text:s text:c="2"/></text:p>
      <text:p text:style-name="P59"><text:s text:c="17"/></text:p>
      <text:p text:style-name="P111"><text:s text:c="10"/></text:p>
      <text:p text:style-name="P93"><text:s text:c="10"/></text:p>
      <text:p text:style-name="P61"><text:s text:c="11"/></text:p>
      <text:p text:style-name="P111"><text:s text:c="10"/><text:span text:style-name="T117"><text:s text:c="4"/></text:span></text:p>
      <text:p text:style-name="P70"><text:s text:c="11"/></text:p>
      <text:p text:style-name="P46"><text:s text:c="11"/></text:p>
      <text:p text:style-name="P229"/>
      <text:p text:style-name="P61"><text:s text:c="7"/></text:p>
      <text:p text:style-name="P231"/>
      <text:p text:style-name="P217"><text:s text:c="3"/></text:p>
      <text:p text:style-name="P49"><text:s text:c="10"/></text:p>
      <text:p text:style-name="P238"><text:s text:c="2"/></text:p>
      <text:p text:style-name="P127"><text:s text:c="12"/>42</text:p>
      <text:p text:style-name="P67"/>
      <text:p text:style-name="P127"><text:s text:c="10"/></text:p>
      <text:p text:style-name="P225"/>
      <text:p text:style-name="P225"/>
      <text:p text:style-name="P148"><text:s/></text:p>
      <text:p text:style-name="P61"><text:s text:c="15"/></text:p>
      <text:p text:style-name="P262"><text:s/><text:span text:style-name="T17"><text:s text:c="2"/></text:span><text:span text:style-name="T19"><text:s/></text:span></text:p>
      <text:p text:style-name="P225"><text:s text:c="9"/></text:p>
      <text:p text:style-name="P134"><text:s text:c="14"/></text:p>
      <text:p text:style-name="P61"><text:s text:c="15"/></text:p>
      <text:p text:style-name="P61"><text:s text:c="8"/></text:p>
      <text:p text:style-name="P225"/>
      <text:p text:style-name="P61"><text:s text:c="8"/></text:p>
      <text:p text:style-name="P221"/>
      <text:p text:style-name="P217"><text:span text:style-name="T85"><text:s text:c="4"/></text:span><text:s text:c="2"/></text:p>
      <text:p text:style-name="P231"/>
      <text:p text:style-name="P217"><text:s text:c="2"/></text:p>
      <text:p text:style-name="P217"/>
      <text:p text:style-name="P70"><text:s text:c="7"/></text:p>
      <text:p text:style-name="P130"><text:span text:style-name="T73"><text:s/></text:span><text:span text:style-name="T15"><text:s text:c="8"/></text:span></text:p>
      <text:p text:style-name="P217"><text:s text:c="4"/></text:p>
      <text:p text:style-name="P111"><text:s text:c="3"/><text:span text:style-name="T103">G</text:span> <text:s text:c="6"/></text:p>
      <text:p text:style-name="P61"><text:s text:c="14"/></text:p>
      <text:p text:style-name="P46"><text:s text:c="9"/><text:span text:style-name="T14"><text:s text:c="2"/></text:span></text:p>
      <text:p text:style-name="P61"><text:s text:c="8"/></text:p>
      <text:p text:style-name="P168"><text:s text:c="8"/></text:p>
      <text:p text:style-name="P217"/>
      <text:p text:style-name="P217"><text:s/></text:p>
      <text:p text:style-name="P61"><text:s text:c="13"/></text:p>
      <text:p text:style-name="P217"><text:s text:c="5"/></text:p>
      <text:p text:style-name="P61"><text:s text:c="14"/></text:p>
      <text:p text:style-name="P61"><text:s text:c="15"/></text:p>
      <text:p text:style-name="P61"><text:s text:c="16"/></text:p>
      <text:p text:style-name="P67"/>
      <text:p text:style-name="P110"/>
      <text:p text:style-name="P217"><text:span text:style-name="T103">SR1</text:span> <text:s/></text:p>
      <text:p text:style-name="P168"><text:s text:c="3"/></text:p>
      <text:p text:style-name="P217"/>
      <text:p text:style-name="P168"><text:s text:c="9"/></text:p>
      <text:p text:style-name="P111"><text:s text:c="12"/></text:p>
      <text:p text:style-name="P217"><text:s text:c="4"/><text:span text:style-name="T117"><text:s text:c="2"/></text:span></text:p>
      <text:p text:style-name="P70"><text:s text:c="13"/></text:p>
      <text:p text:style-name="P59"><text:s text:c="16"/></text:p>
      <text:p text:style-name="P111"><text:s text:c="5"/></text:p>
      <text:p text:style-name="P61"><text:s text:c="16"/></text:p>
      <text:p text:style-name="P265"><text:s/><text:span text:style-name="T20"><text:s/></text:span></text:p>
      <text:p text:style-name="P61"><text:s text:c="13"/></text:p>
      <text:p text:style-name="P148"/>
      <text:p text:style-name="P140"><text:s text:c="13"/></text:p>
      <text:p text:style-name="P61"><text:s text:c="15"/></text:p>
      <text:p text:style-name="P139"/>
      <text:p text:style-name="P217"/>
      <text:p text:style-name="P221"/>
      <text:p text:style-name="P217"><text:s text:c="7"/></text:p>
      <text:p text:style-name="P217"/>
      <text:p text:style-name="P217"><text:s text:c="3"/></text:p>
      <text:p text:style-name="P115"><text:s text:c="13"/></text:p>
      <text:p text:style-name="P115"><text:s text:c="10"/></text:p>
      <text:p text:style-name="P217"/>
      <text:p text:style-name="P225"><text:s text:c="2"/></text:p>
      <text:p text:style-name="P70"/>
      <text:p text:style-name="P217"/>
      <text:p text:style-name="P148"><text:s text:c="6"/></text:p>
      <text:p text:style-name="P90"><text:span text:style-name="T73"><text:s text:c="9"/></text:span><text:span text:style-name="T17"><text:s text:c="3"/></text:span></text:p>
      <text:p text:style-name="P217"><text:s text:c="6"/></text:p>
      <text:p text:style-name="P225"><text:s/></text:p>
      <text:p text:style-name="P96"><text:s text:c="9"/></text:p>
      <text:p text:style-name="P49"><text:s text:c="9"/></text:p>
      <text:p text:style-name="P217"/>
      <text:p text:style-name="P217"><text:s text:c="4"/></text:p>
      <text:p text:style-name="P219"><text:s text:c="4"/><text:span text:style-name="T117"><text:s text:c="2"/></text:span></text:p>
      <text:p text:style-name="P61"><text:s text:c="7"/></text:p>
      <text:p text:style-name="P111"><text:s text:c="9"/><text:span text:style-name="T117"><text:s/></text:span></text:p>
      <text:p text:style-name="P168"><text:s text:c="3"/></text:p>
      <text:p text:style-name="P225"/>
      <text:p text:style-name="P61"><text:s text:c="18"/></text:p>
      <text:p text:style-name="P61"><text:s text:c="10"/><text:span text:style-name="T113"><text:s text:c="4"/>50</text:span></text:p>
      <text:p text:style-name="P217"><text:s text:c="4"/></text:p>
      <text:p text:style-name="P111"><text:s text:c="10"/><text:span text:style-name="T103"><text:s/></text:span><text:s text:c="4"/></text:p>
      <text:p text:style-name="P221"/>
      <text:p text:style-name="P61"><text:s text:c="5"/></text:p>
      <text:p text:style-name="P61"><text:s text:c="15"/></text:p>
      <text:p text:style-name="P225"/>
      <text:p text:style-name="P225"/>
      <text:p text:style-name="P217"/>
      <text:p text:style-name="P217"><text:s text:c="3"/></text:p>
      <text:p text:style-name="P61"/>
      <text:p text:style-name="P61"><text:s text:c="13"/></text:p>
      <text:p text:style-name="P169"><text:s text:c="10"/></text:p>
      <text:p text:style-name="P61"/>
      <text:p text:style-name="P169"/>
      <text:p text:style-name="P115"><text:s text:c="11"/></text:p>
      <text:p text:style-name="P62"><text:s text:c="12"/></text:p>
      <text:p text:style-name="P61"><text:s text:c="12"/></text:p>
      <text:p text:style-name="P115"/>
      <text:p text:style-name="P217"/>
      <text:p text:style-name="P61"><text:s text:c="13"/></text:p>
      <text:p text:style-name="P217"><text:s text:c="3"/></text:p>
      <text:p text:style-name="P111"><text:s text:c="10"/></text:p>
      <text:p text:style-name="P61"><text:s text:c="13"/></text:p>
      <text:p text:style-name="P61"><text:s text:c="11"/></text:p>
      <text:p text:style-name="P61"><text:s text:c="10"/></text:p>
      <text:p text:style-name="P225"/>
      <text:p text:style-name="P111"><text:s text:c="11"/></text:p>
      <text:p text:style-name="P221"/>
      <text:p text:style-name="P67"/>
      <text:p text:style-name="P217"><text:s text:c="7"/></text:p>
      <text:p text:style-name="P88"><text:s text:c="10"/></text:p>
      <text:p text:style-name="P61"><text:s text:c="8"/></text:p>
      <text:p text:style-name="P225"/>
      <text:p text:style-name="P112"><text:s text:c="12"/><text:span text:style-name="T117"><text:s/></text:span></text:p>
      <text:p text:style-name="P225"/>
      <text:p text:style-name="P61"><text:s text:c="9"/></text:p>
      <text:p text:style-name="P115"/>
      <text:p text:style-name="P115"><text:s text:c="14"/></text:p>
      <text:p text:style-name="P109"><text:s text:c="6"/></text:p>
      <text:p text:style-name="P272"/>
      <text:p text:style-name="P225"><text:s text:c="6"/></text:p>
      <text:p text:style-name="P61"><text:s text:c="15"/></text:p>
      <text:p text:style-name="P61"><text:span text:style-name="T49"><text:s text:c="9"/></text:span><text:span text:style-name="T117"><text:s text:c="2"/></text:span></text:p>
      <text:p text:style-name="P111"><text:s/><text:span text:style-name="T117"><text:s text:c="10"/></text:span></text:p>
      <text:p text:style-name="P225"><text:s text:c="8"/></text:p>
      <text:p text:style-name="P228"><text:s text:c="4"/></text:p>
      <text:p text:style-name="P111"><text:s text:c="12"/></text:p>
      <text:p text:style-name="P276"/>
      <text:p text:style-name="P61"/>
      <text:p text:style-name="P61"><text:s text:c="17"/></text:p>
      <text:p text:style-name="P61"><text:s text:c="12"/></text:p>
      <text:p text:style-name="P168"><text:s text:c="3"/></text:p>
      <text:p text:style-name="P70"/>
      <text:p text:style-name="P178"/>
      <text:p text:style-name="P231"/>
      <text:p text:style-name="P70"><text:s text:c="9"/></text:p>
      <text:p text:style-name="P225"/>
      <text:p text:style-name="P61"><text:s text:c="6"/></text:p>
      <text:p text:style-name="P148"/>
      <text:p text:style-name="P111"><text:s text:c="9"/></text:p>
      <text:p text:style-name="P111"><text:s text:c="9"/></text:p>
      <text:p text:style-name="P273"/>
      <text:p text:style-name="P61"><text:s text:c="15"/></text:p>
      <text:p text:style-name="P61"><text:s text:c="13"/><text:span text:style-name="T113">0 <text:s/></text:span></text:p>
      <text:p text:style-name="P115"><text:span text:style-name="T103"><text:s text:c="12"/>7</text:span> <text:s text:c="4"/></text:p>
      <text:p text:style-name="P217"><text:s text:c="6"/></text:p>
      <text:p text:style-name="P273"/>
      <text:p text:style-name="P111"><text:s text:c="9"/></text:p>
      <text:p text:style-name="P111"><text:s text:c="11"/></text:p>
      <text:p text:style-name="P61"><text:s text:c="9"/></text:p>
      <text:p text:style-name="P61"/>
      <text:p text:style-name="P46"><text:s text:c="9"/></text:p>
      <text:p text:style-name="P155"/>
      <text:p text:style-name="P217"/>
      <text:p text:style-name="P70"><text:s text:c="9"/></text:p>
      <text:p text:style-name="P217"><text:s text:c="5"/></text:p>
      <text:p text:style-name="P217"><text:s text:c="3"/></text:p>
      <text:p text:style-name="P223"/>
      <text:p text:style-name="P248"><text:span text:style-name="T66"><text:s/></text:span><text:span text:style-name="T14"><text:s text:c="2"/></text:span><text:span text:style-name="T10"><text:s/></text:span></text:p>
      <text:p text:style-name="P217"><text:s/><text:span text:style-name="T117"><text:s/></text:span></text:p>
      <text:p text:style-name="P70"><text:s text:c="11"/></text:p>
      <text:p text:style-name="P217"><text:s text:c="3"/></text:p>
      <text:p text:style-name="P217"/>
      <text:p text:style-name="P61"><text:s text:c="14"/></text:p>
      <text:p text:style-name="P214"><text:s text:c="2"/></text:p>
      <text:p text:style-name="P217"><text:s/></text:p>
      <text:p text:style-name="P217"/>
      <text:p text:style-name="P225"><text:s text:c="8"/></text:p>
      <text:p text:style-name="P61"><text:s/></text:p>
      <text:p text:style-name="P148"><text:s/></text:p>
      <text:p text:style-name="P217"><text:s text:c="2"/></text:p>
      <text:p text:style-name="P61"><text:s text:c="8"/></text:p>
      <text:p text:style-name="P217"><text:s text:c="4"/></text:p>
      <text:p text:style-name="P217"><text:s text:c="3"/><text:span text:style-name="T100"><text:s/></text:span><text:s/><text:span text:style-name="T117"><text:s text:c="4"/></text:span></text:p>
      <text:p text:style-name="P111"><text:s text:c="9"/></text:p>
      <text:p text:style-name="P217"><text:s/></text:p>
      <text:p text:style-name="P61"><text:s text:c="10"/></text:p>
      <text:p text:style-name="P217"><text:s text:c="4"/></text:p>
      <text:p text:style-name="P49"><text:s text:c="10"/><text:span text:style-name="T5"><text:s/></text:span></text:p>
      <text:p text:style-name="P115"><text:s text:c="4"/></text:p>
      <text:p text:style-name="P46"><text:s text:c="7"/></text:p>
      <text:p text:style-name="P225"/>
      <text:p text:style-name="P148"><text:s text:c="8"/></text:p>
      <text:p text:style-name="P223"/>
      <text:p text:style-name="P111"><text:s text:c="4"/></text:p>
      <text:p text:style-name="P225"><text:s text:c="8"/></text:p>
      <text:p text:style-name="P175"/>
      <text:p text:style-name="P70"><text:s text:c="7"/></text:p>
      <text:p text:style-name="P115"><text:s text:c="10"/></text:p>
      <text:p text:style-name="P225"/>
      <text:p text:style-name="P217"/>
      <text:p text:style-name="P108"><text:span text:style-name="T117"><text:s text:c="15"/></text:span><text:span text:style-name="T48"><text:s text:c="2"/></text:span></text:p>
      <text:p text:style-name="P232"/>
      <text:p text:style-name="P140"/>
      <text:p text:style-name="P140"><text:s text:c="10"/></text:p>
      <text:p text:style-name="P154"/>
      <text:h text:style-name="P287" text:outline-level="5"><text:s text:c="3"/></text:h>
      <text:p text:style-name="P217"><text:s/></text:p>
      <text:p text:style-name="P217"><text:s text:c="2"/></text:p>
      <text:p text:style-name="P269"/>
      <text:p text:style-name="P217"><text:s text:c="3"/><text:span text:style-name="T112"><text:s text:c="8"/></text:span></text:p>
      <text:p text:style-name="P61"><text:s text:c="9"/></text:p>
      <text:p text:style-name="P61"><text:soft-page-break/><text:s text:c="13"/><text:span text:style-name="T103"><text:s text:c="2"/></text:span></text:p>
      <text:p text:style-name="P168"><text:s text:c="3"/></text:p>
      <text:p text:style-name="P191"><text:s text:c="5"/></text:p>
      <text:p text:style-name="P217"><text:s text:c="6"/></text:p>
      <text:p text:style-name="P111"><text:s text:c="6"/></text:p>
      <text:p text:style-name="P225"/>
      <text:p text:style-name="P148"/>
      <text:p text:style-name="P61"/>
      <text:p text:style-name="P111"><text:s text:c="14"/><text:span text:style-name="T103">3</text:span></text:p>
      <text:p text:style-name="P111"/>
      <text:p text:style-name="P111"><text:s text:c="14"/></text:p>
      <text:p text:style-name="P217"><text:s/></text:p>
      <text:p text:style-name="P175"/>
      <text:p text:style-name="P61"><text:s text:c="12"/></text:p>
      <text:p text:style-name="P217"><text:s text:c="5"/></text:p>
      <text:p text:style-name="P70"/>
      <text:p text:style-name="P217"><text:s text:c="2"/></text:p>
      <text:p text:style-name="P250"><text:s text:c="2"/><text:span text:style-name="T5"><text:s text:c="4"/></text:span></text:p>
      <text:p text:style-name="P217"><text:s text:c="2"/></text:p>
      <text:p text:style-name="P61"><text:s text:c="11"/></text:p>
      <text:p text:style-name="P61"/>
      <text:p text:style-name="P111"><text:s text:c="7"/></text:p>
      <text:p text:style-name="P225"><text:s/></text:p>
      <text:p text:style-name="P217"/>
      <text:p text:style-name="P111"/>
      <text:p text:style-name="P268"><text:s/><text:span text:style-name="T5"><text:s text:c="3"/></text:span><text:span text:style-name="T103"><text:s text:c="3"/></text:span><text:span text:style-name="T5"><text:s/></text:span></text:p>
      <text:p text:style-name="P217"><text:span text:style-name="T40"><text:s text:c="9"/></text:span><text:s text:c="3"/></text:p>
      <text:p text:style-name="P190"><text:s text:c="4"/></text:p>
      <text:p text:style-name="P168"><text:s text:c="2"/></text:p>
      <text:p text:style-name="P175"><text:s text:c="5"/></text:p>
      <text:p text:style-name="P168"><text:s text:c="12"/></text:p>
      <text:p text:style-name="P139"><text:s text:c="9"/></text:p>
      <text:p text:style-name="P61"><text:s text:c="12"/></text:p>
      <text:p text:style-name="P225"/>
      <text:p text:style-name="P217"><text:s text:c="5"/></text:p>
      <text:p text:style-name="P111"/>
      <text:p text:style-name="P61"><text:s text:c="18"/></text:p>
      <text:p text:style-name="P61"><text:s text:c="16"/></text:p>
      <text:p text:style-name="P61"><text:s text:c="16"/><text:span text:style-name="T103">70 <text:s/>4) <text:s/>(7002-0967 5) 23 </text:span></text:p>
      <text:p text:style-name="P217"/>
      <text:p text:style-name="P217"><text:s text:c="9"/></text:p>
      <text:p text:style-name="P265"><text:s/><text:span text:style-name="T15"><text:s text:c="4"/></text:span></text:p>
      <text:p text:style-name="P139"><text:s text:c="12"/></text:p>
      <text:p text:style-name="P145"><text:s text:c="2"/><text:span text:style-name="T40"><text:s text:c="3"/></text:span><text:span text:style-name="T5"><text:s/></text:span></text:p>
      <text:p text:style-name="P127"><text:s text:c="10"/><text:span text:style-name="T30"><text:s text:c="14"/></text:span></text:p>
      <text:p text:style-name="P161"/>
      <text:p text:style-name="P168"><text:s/></text:p>
      <text:p text:style-name="P225"/>
      <text:p text:style-name="P225"><text:s text:c="14"/></text:p>
      <text:p text:style-name="P116"><text:s text:c="18"/></text:p>
      <text:p text:style-name="P217"><text:s/><text:span text:style-name="T117"><text:s text:c="3"/></text:span><text:s text:c="6"/></text:p>
      <text:p text:style-name="P61"><text:s text:c="11"/></text:p>
      <text:p text:style-name="P217"><text:s text:c="6"/></text:p>
      <text:p text:style-name="P225"/>
      <text:p text:style-name="P119"/>
      <text:p text:style-name="P61"><text:s text:c="7"/></text:p>
      <text:p text:style-name="P62"><text:s text:c="6"/></text:p>
      <text:p text:style-name="P221"/>
      <text:p text:style-name="P225"/>
      <text:p text:style-name="P217"><text:s/></text:p>
      <text:p text:style-name="P139"/>
      <text:p text:style-name="P225"><text:s text:c="3"/></text:p>
      <text:p text:style-name="P217"><text:s text:c="2"/><text:span text:style-name="T117"><text:s text:c="4"/></text:span></text:p>
      <text:p text:style-name="P111"><text:s text:c="9"/></text:p>
      <text:p text:style-name="P61"><text:s text:c="12"/></text:p>
      <text:p text:style-name="P61"><text:s text:c="15"/><text:span text:style-name="T112">SELS</text:span></text:p>
      <text:p text:style-name="P70"><text:s text:c="11"/></text:p>
      <text:p text:style-name="P168"><text:s text:c="2"/></text:p>
      <text:p text:style-name="P70"/>
      <text:p text:style-name="P70"><text:s text:c="13"/></text:p>
      <text:p text:style-name="P217"><text:s text:c="9"/></text:p>
      <text:p text:style-name="P111"><text:s text:c="15"/></text:p>
      <text:p text:style-name="P61"><text:s text:c="13"/></text:p>
      <text:p text:style-name="P217"><text:s text:c="2"/></text:p>
      <text:p text:style-name="P111"/>
      <text:p text:style-name="P111"><text:s text:c="7"/></text:p>
      <text:p text:style-name="P61"><text:s text:c="17"/></text:p>
      <text:p text:style-name="P46"><text:s text:c="7"/><text:span text:style-name="T14"><text:s text:c="6"/></text:span></text:p>
      <text:p text:style-name="P111"><text:s text:c="8"/></text:p>
      <text:p text:style-name="P225"/>
      <text:p text:style-name="P70"><text:s text:c="13"/></text:p>
      <text:p text:style-name="P111"><text:s text:c="20"/></text:p>
      <text:p text:style-name="P217"><text:s/></text:p>
      <text:p text:style-name="P217"/>
      <text:p text:style-name="P133"><text:s text:c="9"/></text:p>
      <text:p text:style-name="P70"><text:s text:c="10"/></text:p>
      <text:p text:style-name="P119"/>
      <text:p text:style-name="P133"><text:s text:c="7"/></text:p>
      <text:p text:style-name="P217"><text:s text:c="3"/></text:p>
      <text:p text:style-name="P111"/>
      <text:p text:style-name="P148"><text:s text:c="2"/></text:p>
      <text:p text:style-name="P169"><text:s text:c="11"/></text:p>
      <text:p text:style-name="P217"><text:s/></text:p>
      <text:p text:style-name="P217"><text:s text:c="4"/></text:p>
      <text:p text:style-name="P231"/>
      <text:p text:style-name="P61"><text:s text:c="13"/></text:p>
      <text:p text:style-name="P111"><text:s text:c="16"/></text:p>
      <text:p text:style-name="P262"><text:s text:c="2"/><text:span text:style-name="T17"><text:s text:c="2"/></text:span></text:p>
      <text:p text:style-name="P168"><text:s text:c="2"/></text:p>
      <text:p text:style-name="P61"/>
      <text:p text:style-name="P217"><text:s text:c="3"/></text:p>
      <text:p text:style-name="P111"><text:s text:c="9"/></text:p>
      <text:p text:style-name="P217"><text:s text:c="2"/></text:p>
      <text:p text:style-name="P217"><text:s text:c="3"/></text:p>
      <text:p text:style-name="P61"/>
      <text:p text:style-name="P61"><text:s text:c="10"/></text:p>
      <text:p text:style-name="P49"><text:s text:c="14"/></text:p>
      <text:p text:style-name="P217"/>
      <text:p text:style-name="P61"/>
      <text:p text:style-name="P139"><text:s text:c="11"/></text:p>
      <text:p text:style-name="P270">199 1) </text:p>
      <text:p text:style-name="P270">(2</text:p>
      <text:p text:style-name="P61"><text:s/></text:p>
      <text:p text:style-name="P61"><text:s text:c="4"/></text:p>
      <text:p text:style-name="P217"/>
      <text:p text:style-name="P61"><text:s text:c="12"/></text:p>
      <text:p text:style-name="P61"><text:s text:c="15"/></text:p>
      <text:p text:style-name="P217"><text:s text:c="2"/></text:p>
      <text:p text:style-name="P225"/>
      <text:p text:style-name="P61"><text:span text:style-name="T40"><text:s text:c="17"/></text:span><text:span text:style-name="T103"><text:s text:c="2"/>51919 52048 </text:span></text:p>
      <text:p text:style-name="P175"><text:s text:c="2"/></text:p>
      <text:p text:style-name="P61"><text:s text:c="16"/></text:p>
      <text:p text:style-name="P61"><text:s text:c="9"/></text:p>
      <text:p text:style-name="P61"><text:s text:c="11"/></text:p>
      <text:p text:style-name="P230"/>
      <text:p text:style-name="P217"/>
      <text:p text:style-name="P217"><text:s text:c="2"/></text:p>
      <text:p text:style-name="P70"><text:s text:c="16"/></text:p>
      <text:p text:style-name="P265"><text:s text:c="2"/></text:p>
      <text:p text:style-name="P111"><text:s text:c="7"/></text:p>
      <text:p text:style-name="P217"/>
      <text:p text:style-name="P217"/>
      <text:p text:style-name="P217"/>
      <text:p text:style-name="P61"><text:s text:c="11"/></text:p>
      <text:p text:style-name="P61"><text:s text:c="11"/></text:p>
      <text:p text:style-name="P61"><text:s text:c="13"/></text:p>
      <text:p text:style-name="P217"/>
      <text:p text:style-name="P217"/>
      <text:p text:style-name="P111"><text:s text:c="16"/></text:p>
      <text:p text:style-name="P217"/>
      <text:p text:style-name="P92"><text:s text:c="17"/>5 <text:s text:c="5"/></text:p>
      <text:p text:style-name="P59"><text:s text:c="14"/></text:p>
      <text:p text:style-name="P135"><text:s text:c="5"/></text:p>
      <text:p text:style-name="P210"/>
      <text:p text:style-name="P57"><text:s/></text:p>
      <text:p text:style-name="P217"/>
      <text:p text:style-name="P61"><text:s text:c="20"/></text:p>
      <text:p text:style-name="P217"><text:s text:c="3"/></text:p>
      <text:p text:style-name="P46"><text:s text:c="13"/></text:p>
      <text:p text:style-name="P111"><text:s text:c="15"/></text:p>
      <text:p text:style-name="P111"><text:s text:c="8"/></text:p>
      <text:p text:style-name="P217"><text:s/><text:span text:style-name="T98"><text:s/></text:span><text:s text:c="2"/></text:p>
      <text:p text:style-name="P61"><text:s text:c="8"/></text:p>
      <text:p text:style-name="P61"/>
      <text:p text:style-name="P61"><text:span text:style-name="T103">1</text:span> <text:s text:c="5"/></text:p>
      <text:p text:style-name="P111"/>
      <text:p text:style-name="P61"><text:s text:c="12"/></text:p>
      <text:p text:style-name="P225"><text:s text:c="4"/></text:p>
      <text:p text:style-name="P88"><text:s text:c="8"/></text:p>
      <text:p text:style-name="P217"><text:s/></text:p>
      <text:p text:style-name="P115"><text:s text:c="14"/></text:p>
      <text:p text:style-name="P111"><text:s/></text:p>
      <text:p text:style-name="P93"><text:s text:c="18"/>68001 68002 68008 68009 61229 61230 001 68002</text:p>
      <text:p text:style-name="P217"/>
      <text:p text:style-name="P61"><text:s text:c="6"/></text:p>
      <text:p text:style-name="P225"><text:s text:c="5"/></text:p>
      <text:p text:style-name="P217"><text:span text:style-name="T85"><text:s text:c="3"/></text:span><text:s/></text:p>
      <text:p text:style-name="P61"><text:s text:c="11"/></text:p>
      <text:p text:style-name="P61"><text:s text:c="12"/><text:span text:style-name="T100"><text:s/></text:span><text:s/></text:p>
      <text:p text:style-name="P115"><text:s text:c="7"/></text:p>
      <text:p text:style-name="P61"><text:s text:c="11"/></text:p>
      <text:p text:style-name="P217"/>
      <text:p text:style-name="P223"/>
      <text:p text:style-name="P111"><text:s text:c="11"/></text:p>
      <text:p text:style-name="P61"><text:s text:c="12"/></text:p>
      <text:p text:style-name="P129"><text:s text:c="15"/></text:p>
      <text:p text:style-name="P70"><text:s text:c="9"/></text:p>
      <text:p text:style-name="P225"/>
      <text:p text:style-name="P61"><text:s text:c="10"/></text:p>
      <text:p text:style-name="P217"/>
      <text:p text:style-name="P175"/>
      <text:p text:style-name="P217"><text:s/></text:p>
      <text:p text:style-name="P111"><text:s text:c="10"/></text:p>
      <text:p text:style-name="P49"><text:s text:c="14"/></text:p>
      <text:p text:style-name="P201"><text:s/><text:span text:style-name="T5"><text:s text:c="3"/></text:span></text:p>
      <text:p text:style-name="P217"><text:s text:c="9"/></text:p>
      <text:p text:style-name="P223"/>
      <text:p text:style-name="P217"/>
      <text:p text:style-name="P223"/>
      <text:p text:style-name="P61"><text:s text:c="10"/></text:p>
      <text:p text:style-name="P263"><text:s text:c="3"/><text:span text:style-name="T17"><text:s/></text:span></text:p>
      <text:p text:style-name="P111"/>
      <text:p text:style-name="P217"><text:s text:c="5"/></text:p>
      <text:p text:style-name="P61"><text:s text:c="12"/></text:p>
      <text:p text:style-name="P225"><text:s text:c="3"/></text:p>
      <text:p text:style-name="P46"><text:s text:c="13"/></text:p>
      <text:p text:style-name="P69"><text:s text:c="7"/></text:p>
      <text:p text:style-name="P111"><text:s text:c="9"/></text:p>
      <text:p text:style-name="P148"><text:s/></text:p>
      <text:p text:style-name="P148"><text:s text:c="4"/></text:p>
      <text:p text:style-name="P225"/>
      <text:p text:style-name="P217"/>
      <text:p text:style-name="P46"><text:s text:c="11"/></text:p>
      <text:p text:style-name="P61"><text:s text:c="14"/></text:p>
      <text:p text:style-name="P46"><text:s text:c="8"/><text:span text:style-name="T14"><text:s text:c="3"/></text:span></text:p>
      <text:p text:style-name="P217"/>
      <text:p text:style-name="P217"/>
      <text:p text:style-name="P217"><text:s text:c="4"/></text:p>
      <text:p text:style-name="P225"/>
      <text:p text:style-name="P217"/>
      <text:p text:style-name="P61"><text:s text:c="8"/></text:p>
      <text:p text:style-name="P182"/>
      <text:p text:style-name="P61"><text:s text:c="16"/></text:p>
      <text:p text:style-name="P61"/>
      <text:p text:style-name="P225"/>
      <text:p text:style-name="P111"><text:s text:c="10"/></text:p>
      <text:p text:style-name="P111"><text:s text:c="8"/></text:p>
      <text:p text:style-name="P217"><text:s text:c="6"/></text:p>
      <text:p text:style-name="P61"><text:s text:c="15"/></text:p>
      <text:p text:style-name="P217"><text:s text:c="7"/></text:p>
      <text:p text:style-name="P217"><text:s/></text:p>
      <text:p text:style-name="P156"/>
      <text:p text:style-name="P274"/>
      <text:p text:style-name="P61"><text:s text:c="11"/><text:span text:style-name="T112"><text:s/>68008 68009</text:span></text:p>
      <text:p text:style-name="P49"><text:span text:style-name="T5"><text:s text:c="14"/></text:span><text:span text:style-name="T11"><text:s/></text:span></text:p>
      <text:p text:style-name="P61"><text:s text:c="7"/></text:p>
      <text:p text:style-name="P111"><text:s text:c="10"/></text:p>
      <text:p text:style-name="P121"><text:s text:c="12"/></text:p>
      <text:p text:style-name="P156"/>
      <text:p text:style-name="P61"><text:s text:c="8"/><text:span text:style-name="T121"><text:s/></text:span></text:p>
      <text:p text:style-name="P61"><text:s text:c="9"/></text:p>
      <text:p text:style-name="P232"><text:s text:c="2"/></text:p>
      <text:p text:style-name="P69"><text:s text:c="14"/></text:p>
      <text:p text:style-name="P217"><text:s/><text:span text:style-name="T54"><text:s/></text:span><text:s/></text:p>
      <text:p text:style-name="P61"><text:s text:c="11"/></text:p>
      <text:p text:style-name="P225"/>
      <text:p text:style-name="P168"/>
      <text:p text:style-name="P61"><text:s text:c="12"/></text:p>
      <text:p text:style-name="P110"/>
      <text:p text:style-name="P111"><text:s text:c="11"/></text:p>
      <text:p text:style-name="P61"><text:s text:c="11"/></text:p>
      <text:p text:style-name="P217"><text:s/></text:p>
      <text:p text:style-name="P217"><text:s text:c="8"/><text:span text:style-name="T103">0</text:span></text:p>
      <text:p text:style-name="P270"><text:s/></text:p>
      <text:p text:style-name="P111"/>
      <text:p text:style-name="P111"><text:s text:c="14"/></text:p>
      <text:p text:style-name="P111"><text:s text:c="14"/></text:p>
      <text:p text:style-name="P111"/>
      <text:p text:style-name="P111"><text:s text:c="16"/></text:p>
      <text:p text:style-name="P111"><text:s text:c="10"/></text:p>
      <text:p text:style-name="P217"/>
      <text:p text:style-name="P61"><text:s text:c="15"/></text:p>
      <text:p text:style-name="P61"><text:s text:c="12"/></text:p>
      <text:p text:style-name="P111"><text:s text:c="16"/></text:p>
      <text:p text:style-name="P70"/>
      <text:p text:style-name="P217"><text:s text:c="5"/></text:p>
      <text:p text:style-name="P46"><text:s text:c="4"/></text:p>
      <text:p text:style-name="P61"><text:s text:c="11"/></text:p>
      <text:p text:style-name="P217"><text:s text:c="4"/></text:p>
      <text:p text:style-name="P61"><text:s text:c="13"/></text:p>
      <text:p text:style-name="P61"><text:s text:c="7"/></text:p>
      <text:p text:style-name="P217"><text:s text:c="3"/></text:p>
      <text:p text:style-name="P61"><text:s text:c="14"/></text:p>
      <text:p text:style-name="P170"><text:s/></text:p>
      <text:p text:style-name="P46"><text:s text:c="12"/></text:p>
      <text:p text:style-name="P61"><text:s text:c="9"/></text:p>
      <text:p text:style-name="P61"><text:s text:c="13"/></text:p>
      <text:p text:style-name="P250"/>
      <text:p text:style-name="P217"><text:s text:c="3"/></text:p>
      <text:p text:style-name="P61"><text:s text:c="11"/></text:p>
      <text:p text:style-name="P168"><text:s/></text:p>
      <text:p text:style-name="P111"><text:s text:c="9"/></text:p>
      <text:p text:style-name="P61"><text:s text:c="7"/></text:p>
      <text:p text:style-name="P217"><text:s/></text:p>
      <text:p text:style-name="P217"><text:s text:c="21"/></text:p>
      <text:p text:style-name="P111"><text:s text:c="13"/></text:p>
      <text:p text:style-name="P115"><text:s text:c="3"/></text:p>
      <text:p text:style-name="P111"><text:span text:style-name="T117"><text:s text:c="3"/></text:span><text:span text:style-name="T112">92 </text:span></text:p>
      <text:p text:style-name="P270"><text:s/><text:span text:style-name="T5"><text:s text:c="2"/></text:span></text:p>
      <text:p text:style-name="P111"><text:s text:c="9"/></text:p>
      <text:p text:style-name="P217"><text:s text:c="3"/></text:p>
      <text:p text:style-name="P111"/>
      <text:p text:style-name="P61"><text:s text:c="12"/></text:p>
      <text:p text:style-name="P231"/>
      <text:p text:style-name="P61"><text:s text:c="9"/></text:p>
      <text:p text:style-name="P270"><text:s text:c="2"/></text:p>
      <text:p text:style-name="P61"><text:s text:c="13"/></text:p>
      <text:p text:style-name="P217"><text:s/><text:span text:style-name="T117"><text:s text:c="2"/></text:span></text:p>
      <text:p text:style-name="P221"/>
      <text:p text:style-name="P154"/>
      <text:p text:style-name="P225"/>
      <text:p text:style-name="P176"><text:s text:c="2"/></text:p>
      <text:p text:style-name="P126"><text:s text:c="8"/></text:p>
      <text:p text:style-name="P62"><text:s text:c="8"/></text:p>
      <text:p text:style-name="P111"><text:s text:c="15"/></text:p>
      <text:p text:style-name="P217"><text:s/></text:p>
      <text:p text:style-name="P61"><text:s text:c="10"/></text:p>
      <text:p text:style-name="P262"><text:s text:c="3"/><text:span text:style-name="T17"><text:s/></text:span></text:p>
      <text:p text:style-name="P217"><text:s text:c="2"/><text:span text:style-name="T85"><text:s/></text:span><text:s/></text:p>
      <text:p text:style-name="P225"><text:s/></text:p>
      <text:p text:style-name="P217"><text:s text:c="6"/></text:p>
      <text:p text:style-name="P217"><text:s text:c="3"/></text:p>
      <text:p text:style-name="P217"/>
      <text:p text:style-name="P217"><text:s text:c="7"/></text:p>
      <text:p text:style-name="P217"><text:s/></text:p>
      <text:p text:style-name="P46"/>
      <text:p text:style-name="P61"><text:s text:c="10"/></text:p>
      <text:p text:style-name="P57"><text:s text:c="9"/></text:p>
      <text:p text:style-name="P283"><text:s text:c="12"/>014 BINKY) (2000 CLIVE) <text:s/></text:p>
      <text:p text:style-name="P111"><text:s text:c="4"/></text:p>
      <text:p text:style-name="P231"/>
      <text:p text:style-name="P217"><text:span text:style-name="T66"><text:s text:c="11"/></text:span><text:s text:c="10"/></text:p>
      <text:p text:style-name="P46"><text:span text:style-name="T72"><text:s text:c="5"/></text:span><text:span text:style-name="T14"><text:s text:c="7"/></text:span></text:p>
      <text:p text:style-name="P56"><text:s text:c="14"/></text:p>
      <text:p text:style-name="P115"><text:s text:c="11"/></text:p>
      <text:p text:style-name="P61"/>
      <text:p text:style-name="P217"/>
      <text:p text:style-name="P217"/>
      <text:p text:style-name="P217"/>
      <text:p text:style-name="P61"><text:s text:c="11"/></text:p>
      <text:p text:style-name="P61"><text:s text:c="13"/></text:p>
      <text:p text:style-name="P217"><text:s text:c="3"/></text:p>
      <text:p text:style-name="P85"><text:s text:c="13"/></text:p>
      <text:p text:style-name="P92"><text:s text:c="5"/>2014 40SD502 1393 2 M002 M003 323</text:p>
      <text:p text:style-name="P111"><text:s text:c="20"/></text:p>
      <text:p text:style-name="P61"><text:s text:c="12"/></text:p>
      <text:p text:style-name="P46"><text:s text:c="2"/><text:span text:style-name="T14"><text:s text:c="12"/></text:span></text:p>
      <text:p text:style-name="P217"/>
      <text:p text:style-name="P217"><text:s text:c="2"/></text:p>
      <text:p text:style-name="P111"><text:s text:c="11"/></text:p>
      <text:p text:style-name="P155"/>
      <text:p text:style-name="P217"><text:s text:c="3"/></text:p>
      <text:p text:style-name="P221"/>
      <text:p text:style-name="P217"><text:s text:c="3"/></text:p>
      <text:p text:style-name="P148"/>
      <text:p text:style-name="P61"/>
      <text:p text:style-name="P61"><text:s text:c="7"/></text:p>
      <text:p text:style-name="P111"><text:s text:c="6"/></text:p>
      <text:p text:style-name="P217"><text:s/></text:p>
      <text:p text:style-name="P277"/>
      <text:p text:style-name="P223"/>
      <text:p text:style-name="P217"/>
      <text:p text:style-name="P201"/>
      <text:p text:style-name="P168"/>
      <text:p text:style-name="P168"/>
      <text:p text:style-name="P168"/>
      <text:p text:style-name="P168"/>
      <text:p text:style-name="P270"/>
      <text:p text:style-name="P172"/>
      <text:p text:style-name="P217"/>
      <text:p text:style-name="P217"><text:s text:c="2"/></text:p>
      <text:p text:style-name="P217"><text:s text:c="3"/></text:p>
      <text:p text:style-name="P148"><text:s text:c="2"/></text:p>
      <text:p text:style-name="P217"/>
      <text:p text:style-name="P217"><text:s text:c="3"/></text:p>
      <text:p text:style-name="P217"/>
      <text:p text:style-name="P111"><text:s text:c="10"/></text:p>
      <text:p text:style-name="P168"><text:s text:c="2"/></text:p>
      <text:p text:style-name="P61"><text:s text:c="11"/></text:p>
      <text:p text:style-name="P225"/>
      <text:p text:style-name="P61"><text:s text:c="16"/></text:p>
      <text:p text:style-name="P61"><text:s text:c="9"/></text:p>
      <text:p text:style-name="P219"/>
      <text:p text:style-name="P250"><text:s/><text:span text:style-name="T5"><text:s text:c="2"/></text:span></text:p>
      <text:p text:style-name="P61"><text:s text:c="15"/></text:p>
      <text:p text:style-name="P217"/>
      <text:p text:style-name="P61"/>
      <text:p text:style-name="P217"><text:s text:c="9"/></text:p>
      <text:p text:style-name="P61"><text:s text:c="12"/></text:p>
      <text:p text:style-name="P111"><text:s text:c="14"/></text:p>
      <text:p text:style-name="P270"><text:s text:c="4"/></text:p>
      <text:p text:style-name="P61"/>
      <text:p text:style-name="P61"><text:s text:c="12"/></text:p>
      <text:p text:style-name="P111"><text:s text:c="19"/></text:p>
      <text:p text:style-name="P223"/>
      <text:p text:style-name="P217"/>
      <text:p text:style-name="P61"><text:s text:c="10"/></text:p>
      <text:p text:style-name="P61"><text:s text:c="11"/></text:p>
      <text:p text:style-name="P217"/>
      <text:p text:style-name="P111"><text:s text:c="11"/></text:p>
      <text:p text:style-name="P111"><text:s/></text:p>
      <text:p text:style-name="P111"><text:s text:c="10"/></text:p>
      <text:p text:style-name="P217"/>
      <text:p text:style-name="P217"/>
      <text:p text:style-name="P49"><text:s text:c="7"/></text:p>
      <text:p text:style-name="P217"/>
      <text:p text:style-name="P217"><text:s text:c="9"/></text:p>
      <text:p text:style-name="P111"><text:s text:c="13"/></text:p>
      <text:p text:style-name="P61"><text:s text:c="11"/></text:p>
      <text:p text:style-name="P61"><text:s text:c="9"/></text:p>
      <text:p text:style-name="P111"><text:s text:c="7"/></text:p>
      <text:p text:style-name="P61"><text:s text:c="13"/></text:p>
      <text:p text:style-name="P111"><text:span text:style-name="T103">6 <text:s text:c="8"/></text:span><text:s text:c="2"/></text:p>
      <text:p text:style-name="P145"><text:s/></text:p>
      <text:p text:style-name="P217"><text:s text:c="4"/></text:p>
      <text:p text:style-name="P217"/>
      <text:p text:style-name="P111"><text:s text:c="10"/></text:p>
      <text:p text:style-name="P111"><text:s text:c="12"/></text:p>
      <text:p text:style-name="P92"><text:s text:c="9"/></text:p>
      <text:p text:style-name="P61"><text:s text:c="11"/></text:p>
      <text:p text:style-name="P217"><text:s text:c="7"/></text:p>
      <text:p text:style-name="P223"/>
      <text:p text:style-name="P61"><text:s text:c="10"/></text:p>
      <text:p text:style-name="P221"/>
      <text:p text:style-name="P225"><text:s text:c="7"/></text:p>
      <text:p text:style-name="P217"/>
      <text:p text:style-name="P61"><text:s text:c="9"/></text:p>
      <text:p text:style-name="P217"><text:s/></text:p>
      <text:p text:style-name="P61"><text:s text:c="12"/></text:p>
      <text:p text:style-name="P61"><text:s text:c="7"/></text:p>
      <text:p text:style-name="P61"/>
      <text:p text:style-name="P217"><text:s/></text:p>
      <text:p text:style-name="P61"><text:s text:c="6"/></text:p>
      <text:p text:style-name="P141"><text:s text:c="12"/></text:p>
      <text:p text:style-name="P217"/>
      <text:p text:style-name="P70"><text:s text:c="8"/></text:p>
      <text:p text:style-name="P225"/>
      <text:p text:style-name="P111"><text:s text:c="7"/></text:p>
      <text:p text:style-name="P223"/>
      <text:p text:style-name="P92"><text:s text:c="13"/>5</text:p>
      <text:p text:style-name="P217"><text:s text:c="9"/></text:p>
      <text:p text:style-name="P148"/>
      <text:p text:style-name="P217"><text:s text:c="3"/></text:p>
      <text:p text:style-name="P217"/>
      <text:p text:style-name="P217"/>
      <text:p text:style-name="P262"><text:span text:style-name="T73"><text:s/></text:span><text:span text:style-name="T19"><text:s text:c="2"/></text:span></text:p>
      <text:p text:style-name="P61"/>
      <text:p text:style-name="P217"><text:s text:c="5"/></text:p>
      <text:p text:style-name="P61"><text:s text:c="13"/><text:span text:style-name="T94">STORED WAGONS ON MAINLINE</text:span> <text:s text:c="17"/></text:p>
      <text:p text:style-name="P262"><text:s/></text:p>
      <text:p text:style-name="P265"><text:span text:style-name="T5"><text:s text:c="2"/></text:span><text:span text:style-name="T15"><text:s text:c="7"/>A.P. WEBB </text:span></text:p>
      <text:p text:style-name="P46"><text:s text:c="17"/>741360</text:p>
      <text:p text:style-name="P46"><text:s text:c="9"/></text:p>
      <text:p text:style-name="P49"><text:s text:c="12"/>ALBERT LOOM LTD</text:p>
      <text:p text:style-name="P250"><text:s text:c="4"/>GROUND</text:p>
      <text:p text:style-name="P111"><text:s text:c="12"/>7XXXXX </text:p>
      <text:p text:style-name="P111"/>
      <text:p text:style-name="P111"><text:s text:c="12"/>ANCASTER STATION</text:p>
      <text:p text:style-name="P111"><text:s text:c="11"/>952445 </text:p>
      <text:p text:style-name="P111"><text:s text:c="13"/></text:p>
      <text:p text:style-name="P104"><text:span text:style-name="T33"><text:s text:c="20"/></text:span><text:span text:style-name="T14"><text:s text:c="4"/>AYR STATION GROUND</text:span></text:p>
      <text:p text:style-name="P111"><text:s text:c="19"/>756199 <text:s text:c="2"/></text:p>
      <text:p text:style-name="P49"><text:s text:c="14"/></text:p>
      <text:p text:style-name="P111"><text:s text:c="11"/>BLETCHLEY TMD</text:p>
      <text:p text:style-name="P61"><text:s text:c="11"/>360321 73XXXXX</text:p>
      <text:p text:style-name="P61"/>
      <text:p text:style-name="P61"><text:s text:c="15"/>GROUND <text:s/></text:p>
      <text:p text:style-name="P46"><text:s text:c="12"/><text:span text:style-name="T72"><text:s text:c="4"/>851856</text:span></text:p>
      <text:p text:style-name="P250"/>
      <text:p text:style-name="P49"/>
      <text:p text:style-name="P49"><text:s text:c="16"/>BODEN RAIL GROUND</text:p>
      <text:p text:style-name="P46"><text:s text:c="11"/>755705</text:p>
      <text:p text:style-name="P49"><text:s text:c="11"/></text:p>
      <text:p text:style-name="P49"><text:s text:c="12"/>BRISTOL KINGSLAND <text:s text:c="3"/>GROUND</text:p>
      <text:p text:style-name="P108"><text:s text:c="13"/>AFU CONTAINER</text:p>
      <text:p text:style-name="P217"><text:s text:c="8"/></text:p>
      <text:p text:style-name="P217"><text:s/>CARDIFF CANTON TMD</text:p>
      <text:p text:style-name="P108"><text:s text:c="11"/>061196 061197</text:p>
      <text:p text:style-name="P49"><text:s text:c="8"/><text:span text:style-name="T5"><text:s text:c="4"/>C F BOOTH</text:span></text:p>
      <text:p text:style-name="P46"><text:s text:c="11"/>GROUND</text:p>
      <text:p text:style-name="P61"><text:s text:c="11"/>777195 783216 5929 57448 355719 915469 </text:p>
      <text:p text:style-name="P221"/>
      <text:p text:style-name="P111"><text:s text:c="19"/>CLELAND STATION</text:p>
      <text:p text:style-name="P111"><text:s text:c="11"/>745232 <text:s text:c="2"/></text:p>
      <text:p text:style-name="P217"><text:s/></text:p>
      <text:p text:style-name="P111"><text:s text:c="6"/>DEE MARSH <text:s text:c="2"/>GROUND</text:p>
      <text:p text:style-name="P217"><text:s text:c="7"/>200578</text:p>
      <text:p text:style-name="P217"/>
      <text:p text:style-name="P217"><text:s/>DERBY WORKS</text:p>
      <text:p text:style-name="P49"><text:s text:c="11"/>200312 200561 200750 200857 210175 210309 </text:p>
      <text:p text:style-name="P106"><text:span text:style-name="T35"><text:s text:c="8"/></text:span><text:span text:style-name="T5"><text:s/>391014 354036 733500 737914 <text:s/>601049 </text:span></text:p>
      <text:p text:style-name="P61"><text:s text:c="11"/>355286 <text:s/>356341 530672 601034</text:p>
      <text:p text:style-name="P61"><text:s text:c="12"/></text:p>
      <text:p text:style-name="P217"><text:s text:c="4"/>DERBY RTC</text:p>
      <text:p text:style-name="P61"><text:span text:style-name="T1"><text:s text:c="17"/></text:span><text:s text:c="2"/>462740</text:p>
      <text:p text:style-name="P61"><text:s text:c="10"/></text:p>
      <text:p text:style-name="P265"><text:s/><text:span text:style-name="T15">DB <text:s/>CARGO</text:span></text:p>
      <text:p text:style-name="P46"><text:s text:c="14"/>WAGONS</text:p>
      <text:p text:style-name="P217"><text:s text:c="15"/>979051 983840</text:p>
      <text:p text:style-name="P61"><text:s text:c="12"/></text:p>
      <text:p text:style-name="P111"><text:s text:c="11"/>EASTLEIGH TMD <text:s/>GROUND</text:p>
      <text:p text:style-name="P61"><text:s text:c="16"/>200073 200332 201032</text:p>
      <text:p text:style-name="P54"><text:s text:c="14"/><text:span text:style-name="T67"><text:s text:c="3"/>200018 200073 200123 889201 889203 900010</text:span></text:p>
      <text:p text:style-name="P111"><text:s text:c="15"/>900922 900929 901702</text:p>
      <text:p text:style-name="P217"><text:s text:c="7"/></text:p>
      <text:p text:style-name="P111"><text:s text:c="17"/>EAST OF WEST DRAYTON STATION GROUND</text:p>
      <text:p text:style-name="P217"><text:s text:c="14"/>78XXXX </text:p>
      <text:p text:style-name="P111"><text:s text:c="13"/>FLIXBOROUGH WHARF</text:p>
      <text:p text:style-name="P111"><text:s text:c="11"/>85911 993604 <text:s text:c="4"/></text:p>
      <text:p text:style-name="P115"/>
      <text:p text:style-name="P217"><text:s text:c="2"/>HARTLEBURY </text:p>
      <text:p text:style-name="P217">777676 986100 283710 297765</text:p>
      <text:p text:style-name="P217"/>
      <text:p text:style-name="P250"><text:s text:c="8"/>HARWICH WEST DOCK ROAD GROUND</text:p>
      <text:p text:style-name="P106"><text:span text:style-name="T35"><text:s text:c="9"/></text:span><text:span text:style-name="T5"><text:s text:c="2"/>CONTAAINER 7XXXXX</text:span></text:p>
      <text:p text:style-name="P236"/>
      <text:p text:style-name="P49"><text:s text:c="11"/>HELSBY</text:p>
      <text:p text:style-name="P217"><text:s text:c="11"/>991XXX <text:s text:c="13"/></text:p>
      <text:p text:style-name="P217"><text:s/></text:p>
      <text:p text:style-name="P217"><text:s text:c="2"/>HUNTINGDON <text:s/>GROUND </text:p>
      <text:p text:style-name="P49"><text:s text:c="13"/>LMS LNER</text:p>
      <text:p text:style-name="P46"><text:s text:c="12"/><text:span text:style-name="T72"><text:s/></text:span></text:p>
      <text:p text:style-name="P46"><text:s text:c="11"/></text:p>
      <text:p text:style-name="P35"><text:span text:style-name="T72"><text:s text:c="16"/></text:span><text:span text:style-name="T8"><text:s text:c="2"/></text:span><text:span text:style-name="T36"><text:s text:c="3"/>JARVIS BROOK GOODS YARD</text:span></text:p>
      <text:p text:style-name="P61"><text:s text:c="12"/>943887</text:p>
      <text:p text:style-name="P217"/>
      <text:p text:style-name="P61"><text:s text:c="17"/>KNOTTINGLEY </text:p>
      <text:p text:style-name="P61"><text:s text:c="12"/>350002</text:p>
      <text:p text:style-name="P61"/>
      <text:p text:style-name="P88"><text:s text:c="14"/><text:span text:style-name="T5"><text:s text:c="4"/>LAFARGE <text:s/>CEMENT</text:span></text:p>
      <text:p text:style-name="P106"><text:s text:c="12"/>886400 994123 996386</text:p>
      <text:p text:style-name="P217"/>
      <text:p text:style-name="P217"><text:s/>LAIRA TMD</text:p>
      <text:p text:style-name="P56"><text:s text:c="12"/>787133 </text:p>
      <text:p text:style-name="P111"><text:s text:c="12"/></text:p>
      <text:p text:style-name="P168"><text:s text:c="8"/>LANDORE</text:p>
      <text:p text:style-name="P61"><text:s text:c="12"/>909025</text:p>
      <text:p text:style-name="P111"><text:s text:c="11"/></text:p>
      <text:p text:style-name="P217"><text:s text:c="4"/>LONGPORT</text:p>
      <text:p text:style-name="P217"><text:s text:c="12"/>460070 460293 460506 <text:s text:c="2"/></text:p>
      <text:p text:style-name="P233"/>
      <text:p text:style-name="P217"><text:s text:c="4"/><text:span text:style-name="T116"><text:s text:c="2"/>MANA</text:span></text:p>
      <text:p text:style-name="P61"><text:s text:c="12"/><text:span text:style-name="T65">59455</text:span></text:p>
      <text:p text:style-name="P217"><text:s text:c="5"/></text:p>
      <text:p text:style-name="P61"><text:s text:c="12"/><text:span text:style-name="T116">MOBBERLEY STATION</text:span></text:p>
      <text:p text:style-name="P46"><text:s text:c="12"/>GROUND</text:p>
      <text:p text:style-name="P111"><text:s text:c="11"/><text:span text:style-name="T65">12T</text:span> <text:s/><text:span text:style-name="T65">12T</text:span> <text:s/><text:span text:style-name="T65">12T</text:span></text:p>
      <text:p text:style-name="P18"/>
      <text:p text:style-name="P148"><text:s text:c="3"/>NEVILLE HILL</text:p>
      <text:p text:style-name="P111"><text:s text:c="12"/>042181 042180 278497 510001 947937 947960 952647</text:p>
      <text:p text:style-name="P111"/>
      <text:p text:style-name="P217"><text:span text:style-name="T103"><text:s/>N</text:span> <text:s/>NORTHWICH</text:p>
      <text:p text:style-name="P111"><text:s text:c="17"/>991344 <text:s/>(2187 4145 258 3) </text:p>
      <text:p text:style-name="P250"/>
      <text:p text:style-name="P264"><text:span text:style-name="T72"><text:s/></text:span><text:span text:style-name="T17">PANTYFFYMON STATION</text:span></text:p>
      <text:p text:style-name="P54"><text:s text:c="14"/>12T VAN</text:p>
      <text:p text:style-name="P54"/>
      <text:p text:style-name="P49"><text:s text:c="9"/><text:span text:style-name="T5"><text:s text:c="3"/></text:span><text:span text:style-name="T11"><text:s/></text:span><text:span text:style-name="T12">PENZANCE LONG ROCK</text:span></text:p>
      <text:p text:style-name="P49"><text:span text:style-name="T5"><text:s text:c="14"/></text:span><text:span text:style-name="T6">83300</text:span><text:span text:style-name="T5"> <text:s text:c="2"/></text:span><text:span text:style-name="T6">87520 <text:s text:c="2"/></text:span></text:p>
      <text:p text:style-name="P111"><text:s text:c="14"/></text:p>
      <text:p text:style-name="P61"><text:s text:c="14"/>PERTH STATION</text:p>
      <text:p text:style-name="P217"><text:s text:c="22"/>? VAN <text:s/></text:p>
      <text:p text:style-name="P111"><text:s text:c="10"/></text:p>
      <text:p text:style-name="P217"><text:s text:c="4"/><text:span text:style-name="T116">PLASMOR LTD</text:span></text:p>
      <text:p text:style-name="P221"><text:span text:style-name="T72"><text:s text:c="16"/></text:span>67982*<text:span text:style-name="T72"> <text:s text:c="8"/></text:span></text:p>
      <text:p text:style-name="P61"><text:s text:c="19"/>POTTER GROUP</text:p>
      <text:p text:style-name="P56"><text:s text:c="11"/><text:span text:style-name="T67">BOGIE RAMPED <text:s/>LOADER</text:span></text:p>
      <text:p text:style-name="P90"><text:span text:style-name="T44"><text:s text:c="11"/></text:span><text:span text:style-name="T17"><text:s text:c="2"/></text:span></text:p>
      <text:p text:style-name="P111"><text:s text:c="12"/><text:span text:style-name="T116"><text:s text:c="2"/>SANDY STATION <text:s/>GROUND</text:span></text:p>
      <text:p text:style-name="P49"><text:span text:style-name="T32"><text:s text:c="6"/></text:span><text:span text:style-name="T5"><text:s text:c="6"/></text:span><text:span text:style-name="T6">VAN</text:span><text:span text:style-name="T5"> <text:s/></text:span><text:span text:style-name="T6">VAN</text:span><text:span text:style-name="T5"> <text:s/></text:span><text:span text:style-name="T6">VAN</text:span><text:span text:style-name="T5"> </text:span><text:span text:style-name="T6">VAN</text:span></text:p>
      <text:p text:style-name="P61"><text:s text:c="9"/></text:p>
      <text:p text:style-name="P61"><text:s text:c="11"/></text:p>
      <text:p text:style-name="P46"><text:s text:c="22"/><text:span text:style-name="T14">S E WARD <text:s/>GROUND</text:span></text:p>
      <text:p text:style-name="P148"><text:s text:c="12"/>3415 40XXX 26XXXX 38556 5556948 <text:s/>7XXXXX ? </text:p>
      <text:p text:style-name="P61"><text:s text:c="18"/></text:p>
      <text:p text:style-name="P148"><text:s text:c="5"/>SHETTLESTONE OTP</text:p>
      <text:p text:style-name="P217"><text:s text:c="12"/>45158 460951 786386 954479</text:p>
      <text:p text:style-name="P217"><text:span text:style-name="T54"><text:s/></text:span><text:span text:style-name="T103"><text:s text:c="9"/></text:span></text:p>
      <text:p text:style-name="P217"><text:s text:c="7"/>SHIPPEA HILL STATION GROUND</text:p>
      <text:p text:style-name="P61"><text:s text:c="16"/>1XXXXX</text:p>
      <text:p text:style-name="P61"><text:s text:c="7"/></text:p>
      <text:p text:style-name="P61"><text:s text:c="13"/><text:span text:style-name="T116">SHENFIELD STATION</text:span></text:p>
      <text:p text:style-name="P61"><text:s text:c="13"/><text:span text:style-name="T65">993733</text:span></text:p>
      <text:p text:style-name="P67"/>
      <text:p text:style-name="P217"><text:s/>SNAILWELL</text:p>
      <text:p text:style-name="P250"><text:s text:c="11"/>GROUND</text:p>
      <text:p text:style-name="P181"><text:s text:c="2"/><text:span text:style-name="T67"><text:s/>87867</text:span></text:p>
      <text:p text:style-name="P168"/>
      <text:p text:style-name="P217"><text:s/>THURSO STATION <text:s/>GROUND</text:p>
      <text:p text:style-name="P148"><text:s text:c="14"/>?</text:p>
      <text:p text:style-name="P104"><text:s text:c="12"/><text:span text:style-name="T14"><text:s text:c="2"/></text:span></text:p>
      <text:p text:style-name="P217"><text:s/>THURSO BUILDING <text:s/>GROUND</text:p>
      <text:p text:style-name="P61"><text:s text:c="11"/><text:span text:style-name="T54"><text:s/></text:span>120434</text:p>
      <text:p text:style-name="P126">ORTHAM EMU DEPOT SOUTHAMPTON</text:p>
      <text:p text:style-name="P271"/>
      <text:p text:style-name="P168"><text:s text:c="9"/>TYNE YARD</text:p>
      <text:p text:style-name="P61"><text:s text:c="15"/>786933 787106 787148</text:p>
      <text:p text:style-name="P111"><text:s text:c="12"/></text:p>
      <text:p text:style-name="P46"><text:s text:c="11"/><text:span text:style-name="T14"><text:s text:c="7"/>WATFORD JUNCTION YARD</text:span></text:p>
      <text:p text:style-name="P168"><text:s text:c="13"/>(12 T GROUND) 748029 <text:s text:c="5"/></text:p>
      <text:p text:style-name="P61"><text:s text:c="11"/></text:p>
      <text:p text:style-name="P61"><text:s text:c="5"/><text:span text:style-name="T117"><text:s text:c="4"/></text:span></text:p>
      <text:p text:style-name="P111"/>
      <text:p text:style-name="P61"><text:s text:c="10"/><text:span text:style-name="T54"><text:s/></text:span><text:s text:c="9"/></text:p>
      <text:p text:style-name="P70"><text:s text:c="7"/></text:p>
      <text:p text:style-name="P272"><text:s text:c="6"/></text:p>
      <text:p text:style-name="P111"><text:s text:c="5"/></text:p>
      <text:p text:style-name="P217"><text:s text:c="5"/></text:p>
      <text:p text:style-name="P217"/>
      <text:p text:style-name="P168"/>
      <text:p text:style-name="P217"><text:s text:c="11"/></text:p>
      <text:p text:style-name="P61"/>
      <text:p text:style-name="P217"/>
      <text:p text:style-name="P46"><text:s text:c="14"/><text:span text:style-name="T14"><text:s/></text:span><text:span text:style-name="T86"><text:s/></text:span></text:p>
      <text:p text:style-name="P217"><text:s text:c="3"/></text:p>
      <text:p text:style-name="P219"/>
      <text:p text:style-name="P111"><text:s text:c="11"/></text:p>
      <text:p text:style-name="P217"><text:s text:c="3"/></text:p>
      <text:p text:style-name="P61"/>
      <text:p text:style-name="P217"><text:s text:c="7"/></text:p>
      <text:p text:style-name="P61"><text:s text:c="12"/></text:p>
      <text:p text:style-name="P238"><text:s/></text:p>
      <text:p text:style-name="P61"/>
      <text:p text:style-name="P217"><text:s text:c="14"/></text:p>
      <text:p text:style-name="P217"><text:s text:c="9"/></text:p>
      <text:p text:style-name="P61"><text:s text:c="9"/><text:span text:style-name="T103">7</text:span></text:p>
      <text:p text:style-name="P61"><text:s text:c="11"/></text:p>
      <text:p text:style-name="P61"><text:s text:c="13"/></text:p>
      <text:p text:style-name="P61"><text:s text:c="9"/></text:p>
      <text:p text:style-name="P111"><text:s text:c="12"/></text:p>
      <text:p text:style-name="P217"><text:s/></text:p>
      <text:p text:style-name="P88"><text:s text:c="15"/></text:p>
      <text:p text:style-name="P217"><text:s text:c="8"/></text:p>
      <text:p text:style-name="P61"><text:s text:c="9"/></text:p>
      <text:p text:style-name="P217"/>
      <text:p text:style-name="P217"/>
      <text:p text:style-name="P217"/>
      <text:p text:style-name="P61"><text:s text:c="34"/></text:p>
      <text:p text:style-name="P217"><text:s text:c="6"/></text:p>
      <text:p text:style-name="P61"/>
      <text:p text:style-name="P217"><text:s text:c="2"/></text:p>
      <text:p text:style-name="P61"><text:s text:c="12"/></text:p>
      <text:p text:style-name="P217"><text:s text:c="4"/></text:p>
      <text:p text:style-name="P148"/>
      <text:p text:style-name="P61"><text:s text:c="13"/></text:p>
      <text:p text:style-name="P217"><text:s text:c="12"/></text:p>
      <text:p text:style-name="P61"><text:s text:c="9"/></text:p>
      <text:p text:style-name="P217"><text:s text:c="2"/><text:span text:style-name="T85"><text:s/></text:span></text:p>
      <text:p text:style-name="P217"><text:s text:c="4"/></text:p>
      <text:p text:style-name="P221"/>
      <text:p text:style-name="P61"><text:s text:c="17"/></text:p>
      <text:p text:style-name="P217"/>
      <text:p text:style-name="P46"><text:s text:c="13"/><text:span text:style-name="T14"><text:s/></text:span></text:p>
      <text:p text:style-name="P49"><text:s text:c="15"/></text:p>
      <text:p text:style-name="P67"/>
      <text:p text:style-name="P61"><text:s text:c="9"/></text:p>
      <text:p text:style-name="P61"><text:s text:c="8"/></text:p>
      <text:p text:style-name="P221"/>
      <text:p text:style-name="P217"><text:s/></text:p>
      <text:p text:style-name="P46"><text:s text:c="11"/><text:span text:style-name="T10"><text:s/></text:span></text:p>
      <text:p text:style-name="P217"/>
      <text:p text:style-name="P139"><text:s text:c="14"/></text:p>
      <text:p text:style-name="P172"/>
      <text:p text:style-name="P168"><text:s text:c="2"/><text:span text:style-name="T85"><text:s text:c="2"/></text:span></text:p>
      <text:p text:style-name="P217"/>
      <text:p text:style-name="P217"/>
      <text:p text:style-name="P49"><text:s text:c="15"/></text:p>
      <text:p text:style-name="P46"><text:s text:c="12"/></text:p>
      <text:p text:style-name="P201"><text:s text:c="3"/></text:p>
      <text:p text:style-name="P61"><text:s text:c="11"/></text:p>
      <text:p text:style-name="P148"><text:s/></text:p>
      <text:p text:style-name="P223"/>
      <text:p text:style-name="P250"><text:s/></text:p>
      <text:p text:style-name="P217"/>
      <text:p text:style-name="P111"><text:s text:c="16"/></text:p>
      <text:p text:style-name="P217"/>
      <text:p text:style-name="P217"><text:s/></text:p>
      <text:p text:style-name="P61"/>
      <text:p text:style-name="P217"><text:s text:c="2"/></text:p>
      <text:p text:style-name="P61"/>
      <text:p text:style-name="P111"><text:s text:c="11"/></text:p>
      <text:p text:style-name="P61"><text:s/></text:p>
      <text:p text:style-name="P46"><text:s text:c="10"/></text:p>
      <text:p text:style-name="P61"><text:s text:c="10"/></text:p>
      <text:p text:style-name="P217"><text:s text:c="6"/></text:p>
      <text:p text:style-name="P221"/>
      <text:p text:style-name="P217"><text:s text:c="2"/></text:p>
      <text:p text:style-name="P110"/>
      <text:p text:style-name="P168"><text:s text:c="6"/></text:p>
      <text:p text:style-name="P111"><text:s text:c="13"/></text:p>
      <text:p text:style-name="P217"/>
      <text:p text:style-name="P217"><text:s/></text:p>
      <text:p text:style-name="P111"><text:s text:c="2"/></text:p>
      <text:p text:style-name="P61"><text:s text:c="14"/></text:p>
      <text:p text:style-name="P217"><text:s text:c="5"/></text:p>
      <text:p text:style-name="P111"><text:s text:c="4"/></text:p>
      <text:p text:style-name="P217"><text:s text:c="9"/></text:p>
      <text:p text:style-name="P217"/>
      <text:p text:style-name="P49"><text:s text:c="11"/></text:p>
      <text:p text:style-name="P111"><text:s text:c="15"/></text:p>
      <text:p text:style-name="P126"><text:s text:c="10"/><text:span text:style-name="T5"><text:s text:c="3"/></text:span></text:p>
      <text:p text:style-name="P61"/>
      <text:p text:style-name="P217"><text:s text:c="6"/></text:p>
      <text:p text:style-name="P270"/>
      <text:p text:style-name="P61"><text:s text:c="11"/></text:p>
      <text:p text:style-name="P217"/>
      <text:p text:style-name="P61"><text:s text:c="13"/></text:p>
      <text:p text:style-name="P217"/>
      <text:p text:style-name="P111"><text:s text:c="13"/></text:p>
      <text:p text:style-name="P61"><text:s text:c="11"/></text:p>
      <text:p text:style-name="P61"><text:s text:c="12"/></text:p>
      <text:p text:style-name="P261"><text:s text:c="3"/></text:p>
      <text:p text:style-name="P61"><text:s text:c="19"/></text:p>
      <text:p text:style-name="P61"><text:s text:c="11"/></text:p>
      <text:p text:style-name="P217"><text:s text:c="2"/></text:p>
      <text:p text:style-name="P61"><text:s text:c="14"/></text:p>
      <text:p text:style-name="P61"><text:s text:c="2"/></text:p>
      <text:p text:style-name="P217"><text:s text:c="8"/></text:p>
      <text:p text:style-name="P217"/>
      <text:p text:style-name="P92">0KKM</text:p>
      <text:p text:style-name="P106"><text:s text:c="9"/></text:p>
      <text:p text:style-name="P61"><text:s text:c="15"/></text:p>
      <text:p text:style-name="P111"><text:s text:c="7"/></text:p>
      <text:p text:style-name="P61"><text:s text:c="11"/></text:p>
      <text:p text:style-name="P217"/>
      <text:p text:style-name="P217"><text:s text:c="2"/></text:p>
      <text:p text:style-name="P217"><text:s text:c="10"/></text:p>
      <text:p text:style-name="P217"><text:s text:c="2"/></text:p>
      <text:p text:style-name="P61"/>
      <text:p text:style-name="P61"><text:s text:c="14"/></text:p>
      <text:p text:style-name="P61"><text:s text:c="11"/></text:p>
      <text:p text:style-name="P61"><text:s text:c="9"/></text:p>
      <text:p text:style-name="P217"><text:s text:c="7"/></text:p>
      <text:p text:style-name="P61"><text:s text:c="18"/></text:p>
      <text:p text:style-name="P110"/>
      <text:p text:style-name="P61"><text:s text:c="4"/></text:p>
      <text:p text:style-name="P61"><text:s text:c="13"/></text:p>
      <text:p text:style-name="P61"><text:s text:c="15"/></text:p>
      <text:p text:style-name="P217"><text:s text:c="14"/></text:p>
      <text:p text:style-name="P61"><text:s text:c="13"/></text:p>
      <text:p text:style-name="P111"><text:s text:c="5"/></text:p>
      <text:p text:style-name="P61"><text:s/><text:span text:style-name="T103">E <text:s text:c="11"/></text:span><text:s/></text:p>
      <text:p text:style-name="P217"><text:s text:c="2"/></text:p>
      <text:p text:style-name="P217"><text:s text:c="4"/></text:p>
      <text:p text:style-name="P169"><text:s text:c="3"/></text:p>
      <text:p text:style-name="P61"><text:s text:c="16"/></text:p>
      <text:p text:style-name="P68"><text:s text:c="7"/></text:p>
      <text:p text:style-name="P61"><text:s text:c="11"/></text:p>
      <text:p text:style-name="P46"><text:s text:c="10"/></text:p>
      <text:p text:style-name="P49"><text:s/><text:span text:style-name="T5"><text:s text:c="2"/></text:span></text:p>
      <text:p text:style-name="P148"><text:s text:c="2"/></text:p>
      <text:p text:style-name="P217"><text:s text:c="7"/></text:p>
      <text:p text:style-name="P217"/>
      <text:p text:style-name="P61"><text:s text:c="17"/></text:p>
      <text:p text:style-name="P217"/>
      <text:p text:style-name="P225"><text:s text:c="3"/></text:p>
      <text:p text:style-name="P217"><text:s text:c="4"/></text:p>
      <text:p text:style-name="P221"/>
      <text:p text:style-name="P106"><text:s text:c="4"/><text:span text:style-name="T5"><text:s text:c="11"/></text:span></text:p>
      <text:p text:style-name="P49"><text:s text:c="9"/><text:span text:style-name="T5"><text:s/></text:span></text:p>
      <text:p text:style-name="P61"><text:s text:c="13"/></text:p>
      <text:p text:style-name="P73"/>
      <text:p text:style-name="P217"><text:s text:c="2"/></text:p>
      <text:p text:style-name="P61"><text:s text:c="12"/></text:p>
      <text:p text:style-name="P217"><text:s text:c="2"/></text:p>
      <text:p text:style-name="P221"/>
      <text:p text:style-name="P46"><text:s text:c="12"/><text:span text:style-name="T14"><text:s text:c="5"/></text:span></text:p>
      <text:p text:style-name="P217"><text:s text:c="5"/></text:p>
      <text:p text:style-name="P61"><text:s text:c="16"/></text:p>
      <text:p text:style-name="P217"/>
      <text:p text:style-name="P225"><text:s text:c="3"/></text:p>
      <text:p text:style-name="P217"/>
      <text:p text:style-name="P111"><text:s text:c="2"/></text:p>
      <text:p text:style-name="P61"><text:s text:c="13"/></text:p>
      <text:p text:style-name="P229"/>
      <text:p text:style-name="P217"><text:s text:c="14"/></text:p>
      <text:p text:style-name="P111"><text:s text:c="15"/><text:span text:style-name="T54"><text:s/></text:span></text:p>
      <text:p text:style-name="P217"><text:s text:c="14"/></text:p>
      <text:p text:style-name="P61"><text:s text:c="15"/></text:p>
      <text:p text:style-name="P217"><text:s/></text:p>
      <text:p text:style-name="P148"><text:s text:c="10"/></text:p>
      <text:p text:style-name="P61"><text:s text:c="8"/></text:p>
      <text:p text:style-name="P217"/>
      <text:p text:style-name="P148"/>
      <text:p text:style-name="P61"><text:s text:c="10"/><text:span text:style-name="T54"><text:s text:c="4"/></text:span><text:s text:c="2"/></text:p>
      <text:p text:style-name="P128"><text:s text:c="3"/><text:span text:style-name="T5"><text:s text:c="2"/></text:span></text:p>
      <text:p text:style-name="P111"><text:s text:c="18"/></text:p>
      <text:p text:style-name="P221"/>
      <text:p text:style-name="P217"/>
      <text:p text:style-name="P225"/>
      <text:p text:style-name="P225"><text:s text:c="2"/></text:p>
      <text:p text:style-name="P61"><text:s text:c="9"/></text:p>
      <text:p text:style-name="P217"><text:s/></text:p>
      <text:p text:style-name="P61"><text:s text:c="13"/></text:p>
      <text:p text:style-name="P61"/>
      <text:p text:style-name="P217"><text:s text:c="13"/></text:p>
      <text:p text:style-name="P221"/>
      <text:p text:style-name="P217"><text:s text:c="3"/></text:p>
      <text:p text:style-name="P217"><text:s text:c="9"/></text:p>
      <text:p text:style-name="P217"/>
      <text:p text:style-name="P217"/>
      <text:p text:style-name="P61"/>
      <text:p text:style-name="P217"><text:s/></text:p>
      <text:p text:style-name="P217"><text:s/></text:p>
      <text:p text:style-name="P217"/>
      <text:p text:style-name="P61"><text:s text:c="13"/></text:p>
      <text:p text:style-name="P248"><text:span text:style-name="T14"><text:s text:c="3"/></text:span><text:span text:style-name="T8"><text:s text:c="2"/></text:span></text:p>
      <text:p text:style-name="P248"/>
      <text:p text:style-name="P61"><text:s text:c="12"/></text:p>
      <text:p text:style-name="P46"><text:s text:c="6"/></text:p>
      <text:p text:style-name="P262"><text:s/><text:span text:style-name="T17"><text:s/></text:span></text:p>
      <text:p text:style-name="P111"><text:s text:c="8"/></text:p>
      <text:p text:style-name="P111"><text:s text:c="13"/></text:p>
      <text:p text:style-name="P217"><text:s text:c="2"/></text:p>
      <text:p text:style-name="P250"><text:s text:c="2"/></text:p>
      <text:p text:style-name="P154"/>
      <text:p text:style-name="P217"/>
      <text:p text:style-name="P217"><text:s text:c="6"/></text:p>
      <text:p text:style-name="P221"/>
      <text:p text:style-name="P217"><text:s/></text:p>
      <text:p text:style-name="P262"><text:s text:c="2"/></text:p>
      <text:p text:style-name="P61"><text:s text:c="9"/></text:p>
      <text:p text:style-name="P46"><text:s text:c="10"/></text:p>
      <text:p text:style-name="P217"><text:s/></text:p>
      <text:p text:style-name="P217"><text:s text:c="3"/></text:p>
      <text:p text:style-name="P217"><text:s text:c="4"/></text:p>
      <text:p text:style-name="P46"><text:s text:c="8"/><text:span text:style-name="T72"><text:s/></text:span></text:p>
      <text:p text:style-name="P217"/>
      <text:p text:style-name="P111"><text:s text:c="15"/></text:p>
      <text:p text:style-name="P221"/>
      <text:p text:style-name="P217"/>
      <text:p text:style-name="P217"><text:s text:c="5"/><text:span text:style-name="T117"><text:s/></text:span></text:p>
      <text:p text:style-name="P217"><text:s text:c="5"/></text:p>
      <text:p text:style-name="P111"><text:s text:c="12"/></text:p>
      <text:p text:style-name="P148"><text:s text:c="6"/></text:p>
      <text:p text:style-name="P61"><text:s text:c="14"/></text:p>
      <text:p text:style-name="P111"/>
      <text:p text:style-name="P217"/>
      <text:p text:style-name="P61"><text:s text:c="8"/></text:p>
      <text:p text:style-name="P61"><text:s text:c="11"/></text:p>
      <text:p text:style-name="P61"><text:s text:c="14"/></text:p>
      <text:p text:style-name="P46"><text:s text:c="10"/><text:span text:style-name="T72"><text:s/></text:span></text:p>
      <text:p text:style-name="P111"><text:s text:c="11"/></text:p>
      <text:p text:style-name="P111"><text:span text:style-name="T117"><text:s text:c="13"/></text:span><text:span text:style-name="T62"><text:s text:c="2"/></text:span><text:span text:style-name="T117"><text:s text:c="2"/></text:span></text:p>
      <text:p text:style-name="P61"><text:s text:c="13"/></text:p>
      <text:p text:style-name="P61"><text:s text:c="10"/></text:p>
      <text:p text:style-name="P61"><text:s text:c="15"/></text:p>
      <text:p text:style-name="P61"/>
      <text:p text:style-name="P217"><text:s text:c="3"/></text:p>
      <text:p text:style-name="P111"><text:s text:c="11"/></text:p>
      <text:p text:style-name="P61"/>
      <text:p text:style-name="P223"/>
      <text:p text:style-name="P217"><text:s text:c="10"/></text:p>
      <text:p text:style-name="P111"/>
      <text:p text:style-name="P61"><text:s text:c="9"/></text:p>
      <text:p text:style-name="P217"><text:s/></text:p>
      <text:p text:style-name="P221"/>
      <text:p text:style-name="P223"/>
      <text:p text:style-name="P46"><text:s text:c="10"/><text:span text:style-name="T14"><text:s text:c="5"/></text:span></text:p>
      <text:p text:style-name="P61"><text:s text:c="10"/></text:p>
      <text:p text:style-name="P69"><text:s text:c="10"/><text:span text:style-name="T72"><text:s text:c="3"/></text:span></text:p>
      <text:p text:style-name="P111"/>
      <text:p text:style-name="P217"/>
      <text:p text:style-name="P46"><text:s text:c="13"/></text:p>
      <text:p text:style-name="P92"><text:s text:c="14"/>6000</text:p>
      <text:p text:style-name="P217"><text:s text:c="5"/></text:p>
      <text:p text:style-name="P92"/>
      <text:p text:style-name="P61"><text:s text:c="5"/></text:p>
      <text:p text:style-name="P111"><text:s text:c="20"/></text:p>
      <text:p text:style-name="P61"><text:s text:c="13"/></text:p>
      <text:p text:style-name="P217"/>
      <text:p text:style-name="P61"><text:s text:c="17"/></text:p>
      <text:p text:style-name="P217"><text:s text:c="5"/></text:p>
      <text:p text:style-name="P262"><text:s text:c="3"/><text:span text:style-name="T17"><text:s text:c="4"/></text:span></text:p>
      <text:p text:style-name="P217"><text:s/></text:p>
      <text:p text:style-name="P217"/>
      <text:p text:style-name="P111"><text:s text:c="12"/><text:span text:style-name="T66"><text:s text:c="2"/></text:span></text:p>
      <text:p text:style-name="P270"/>
      <text:p text:style-name="P61"><text:s text:c="20"/></text:p>
      <text:p text:style-name="P111"><text:s text:c="12"/><text:span text:style-name="T40"><text:s text:c="6"/></text:span></text:p>
      <text:p text:style-name="P217"/>
      <text:p text:style-name="P61"><text:s text:c="15"/><text:span text:style-name="T40"><text:s/></text:span><text:span text:style-name="T103"><text:s/></text:span></text:p>
      <text:p text:style-name="P111"><text:s text:c="10"/></text:p>
      <text:p text:style-name="P61"><text:s text:c="13"/></text:p>
      <text:p text:style-name="P217"/>
      <text:p text:style-name="P61"><text:s text:c="15"/></text:p>
      <text:p text:style-name="P61"><text:s text:c="10"/></text:p>
      <text:p text:style-name="P70"><text:s text:c="14"/></text:p>
      <text:p text:style-name="P61"><text:s text:c="5"/></text:p>
      <text:p text:style-name="P111"><text:s text:c="11"/></text:p>
      <text:p text:style-name="P270">(</text:p>
      <text:p text:style-name="P217"><text:s text:c="6"/></text:p>
      <text:p text:style-name="P217"/>
      <text:p text:style-name="P111"><text:s text:c="14"/></text:p>
      <text:p text:style-name="P61"><text:s text:c="13"/></text:p>
      <text:p text:style-name="P111"><text:s text:c="15"/></text:p>
      <text:p text:style-name="P111"/>
      <text:p text:style-name="P217"/>
      <text:p text:style-name="P262"><text:span text:style-name="T17"><text:s text:c="3"/></text:span><text:span text:style-name="T58"><text:s/></text:span><text:span text:style-name="T17"><text:s/></text:span></text:p>
      <text:p text:style-name="P225"><text:s/></text:p>
      <text:p text:style-name="P217"><text:s text:c="2"/></text:p>
      <text:p text:style-name="P111"/>
      <text:p text:style-name="P169"><text:s text:c="9"/></text:p>
      <text:p text:style-name="P61"><text:s text:c="13"/></text:p>
      <text:p text:style-name="P123"><text:s text:c="20"/></text:p>
      <text:p text:style-name="P46"><text:s text:c="15"/></text:p>
      <text:p text:style-name="P61"/>
      <text:p text:style-name="P61"><text:s text:c="19"/></text:p>
      <text:p text:style-name="P61"><text:s text:c="18"/></text:p>
      <text:p text:style-name="P61"/>
      <text:p text:style-name="P61"><text:s/><text:span text:style-name="T54"><text:s/></text:span><text:s text:c="14"/></text:p>
      <text:p text:style-name="P250"><text:s text:c="2"/><text:span text:style-name="T5"><text:s text:c="3"/></text:span></text:p>
      <text:p text:style-name="P61"><text:s text:c="17"/></text:p>
      <text:p text:style-name="P111"><text:s text:c="16"/></text:p>
      <text:p text:style-name="P168"><text:s text:c="2"/></text:p>
      <text:p text:style-name="P61"><text:s text:c="12"/></text:p>
      <text:p text:style-name="P217"/>
      <text:p text:style-name="P217"><text:s text:c="5"/></text:p>
      <text:p text:style-name="P111"><text:s text:c="10"/></text:p>
      <text:p text:style-name="P61"/>
      <text:p text:style-name="P61"><text:s text:c="12"/></text:p>
      <text:p text:style-name="P111"><text:s text:c="8"/></text:p>
      <text:p text:style-name="P169"><text:s/></text:p>
      <text:p text:style-name="P111"><text:s text:c="13"/></text:p>
      <text:p text:style-name="P217"><text:s text:c="3"/></text:p>
      <text:p text:style-name="P221"/>
      <text:p text:style-name="P111"><text:s text:c="16"/></text:p>
      <text:p text:style-name="P217"><text:s/></text:p>
      <text:p text:style-name="P217"/>
      <text:p text:style-name="P217"><text:s text:c="2"/></text:p>
      <text:p text:style-name="P90"><text:span text:style-name="T73"><text:s text:c="6"/></text:span><text:span text:style-name="T74"><text:s/></text:span></text:p>
      <text:p text:style-name="P250"><text:s/><text:span text:style-name="T5"><text:s text:c="2"/></text:span></text:p>
      <text:p text:style-name="P217"/>
      <text:p text:style-name="P217"><text:s/></text:p>
      <text:p text:style-name="P61"><text:s text:c="4"/><text:span text:style-name="T54"><text:s text:c="9"/></text:span><text:s/></text:p>
      <text:p text:style-name="P217"><text:s text:c="2"/></text:p>
      <text:p text:style-name="P61"><text:s text:c="12"/></text:p>
      <text:p text:style-name="P217"><text:s text:c="8"/></text:p>
      <text:p text:style-name="P217"><text:s text:c="6"/></text:p>
      <text:p text:style-name="P61"><text:s text:c="14"/></text:p>
      <text:p text:style-name="P221"/>
      <text:p text:style-name="P217"/>
      <text:p text:style-name="P61"><text:s text:c="14"/></text:p>
      <text:p text:style-name="P217"/>
      <text:p text:style-name="P226"><text:s text:c="4"/></text:p>
      <text:p text:style-name="P217"><text:s text:c="3"/></text:p>
      <text:p text:style-name="P61"><text:s text:c="16"/></text:p>
      <text:p text:style-name="P172"/>
      <text:p text:style-name="P70"><text:s text:c="13"/></text:p>
      <text:p text:style-name="P277"/>
      <text:p text:style-name="P221"/>
      <text:p text:style-name="P217"/>
      <text:p text:style-name="P61"/>
      <text:p text:style-name="P46"><text:s text:c="15"/></text:p>
      <text:p text:style-name="P262"><text:span text:style-name="T88"><text:s/></text:span><text:span text:style-name="T17"><text:s text:c="6"/></text:span></text:p>
      <text:p text:style-name="P217"><text:s text:c="3"/></text:p>
      <text:p text:style-name="P217"/>
      <text:p text:style-name="P217"><text:s/></text:p>
      <text:p text:style-name="P61"><text:s text:c="13"/></text:p>
      <text:p text:style-name="P217"><text:s text:c="11"/></text:p>
      <text:p text:style-name="P217"><text:s text:c="4"/></text:p>
      <text:p text:style-name="P111"/>
      <text:p text:style-name="P61"><text:s text:c="11"/></text:p>
      <text:p text:style-name="P217"><text:s text:c="3"/></text:p>
      <text:p text:style-name="P148"><text:s text:c="3"/></text:p>
      <text:p text:style-name="P217"><text:s text:c="6"/></text:p>
      <text:p text:style-name="P146"><text:span text:style-name="T72"><text:s/></text:span><text:span text:style-name="T14"><text:s text:c="5"/></text:span></text:p>
      <text:p text:style-name="P217"><text:s text:c="5"/></text:p>
      <text:p text:style-name="P169"><text:s text:c="2"/></text:p>
      <text:p text:style-name="P221"/>
      <text:p text:style-name="P67"/>
      <text:p text:style-name="P61"><text:s text:c="15"/></text:p>
      <text:p text:style-name="P217"><text:s text:c="3"/></text:p>
      <text:p text:style-name="P106"><text:s text:c="12"/><text:span text:style-name="T5"><text:s text:c="3"/></text:span></text:p>
      <text:p text:style-name="P61"/>
      <text:p text:style-name="P46"><text:s text:c="13"/><text:span text:style-name="T14"><text:s/></text:span></text:p>
      <text:p text:style-name="P111"/>
      <text:p text:style-name="P61"><text:s text:c="18"/></text:p>
      <text:p text:style-name="P111"><text:s text:c="11"/></text:p>
      <text:p text:style-name="P217"><text:s text:c="2"/></text:p>
      <text:p text:style-name="P217"/>
      <text:p text:style-name="P217"/>
      <text:p text:style-name="P61"><text:s text:c="13"/></text:p>
      <text:p text:style-name="P61"><text:s text:c="11"/></text:p>
      <text:p text:style-name="P250"><text:s/><text:span text:style-name="T5"><text:s/></text:span></text:p>
      <text:p text:style-name="P61"/>
      <text:p text:style-name="P248"><text:s text:c="3"/></text:p>
      <text:p text:style-name="P46"><text:s text:c="20"/></text:p>
      <text:p text:style-name="P223"/>
      <text:p text:style-name="P221"/>
      <text:p text:style-name="P176"/>
      <text:p text:style-name="P238"><text:s text:c="3"/><text:span text:style-name="T76"><text:s text:c="4"/></text:span></text:p>
      <text:p text:style-name="P49"><text:s text:c="9"/><text:span text:style-name="T11"><text:s text:c="2"/></text:span></text:p>
      <text:p text:style-name="P111"><text:s text:c="14"/></text:p>
      <text:p text:style-name="P111"><text:s text:c="11"/></text:p>
      <text:p text:style-name="P217"><text:s text:c="5"/></text:p>
      <text:p text:style-name="P61"/>
      <text:p text:style-name="P217"><text:s text:c="3"/></text:p>
      <text:p text:style-name="P69"><text:s text:c="10"/></text:p>
      <text:p text:style-name="P168"><text:s text:c="9"/></text:p>
      <text:p text:style-name="P225"><text:s text:c="5"/></text:p>
      <text:p text:style-name="P217"/>
      <text:p text:style-name="P217"/>
      <text:p text:style-name="P111"><text:s text:c="4"/></text:p>
      <text:p text:style-name="P46"><text:s text:c="11"/></text:p>
      <text:p text:style-name="P168"/>
      <text:p text:style-name="P217"><text:s text:c="5"/></text:p>
      <text:p text:style-name="P217"><text:s text:c="2"/></text:p>
      <text:p text:style-name="P217"><text:s text:c="3"/></text:p>
      <text:p text:style-name="P217"/>
      <text:p text:style-name="P217"/>
      <text:p text:style-name="P61"><text:s text:c="14"/></text:p>
      <text:p text:style-name="P217"><text:s text:c="8"/></text:p>
      <text:p text:style-name="P61"><text:s text:c="14"/></text:p>
      <text:p text:style-name="P176"><text:s text:c="2"/></text:p>
      <text:p text:style-name="P221"/>
      <text:p text:style-name="P111"><text:s/></text:p>
      <text:p text:style-name="P61"><text:s text:c="16"/></text:p>
      <text:p text:style-name="P217"><text:s text:c="2"/></text:p>
      <text:p text:style-name="P217"><text:s text:c="5"/></text:p>
      <text:p text:style-name="P217"><text:s/></text:p>
      <text:p text:style-name="P217"><text:s text:c="3"/></text:p>
      <text:p text:style-name="P111"><text:s text:c="11"/></text:p>
      <text:p text:style-name="P217"/>
      <text:p text:style-name="P221"/>
      <text:p text:style-name="P221"/>
      <text:p text:style-name="P270">41</text:p>
      <text:p text:style-name="P110"/>
      <text:p text:style-name="P111"><text:s text:c="13"/></text:p>
      <text:p text:style-name="P217"><text:s/></text:p>
      <text:p text:style-name="P49"><text:s text:c="5"/><text:span text:style-name="T5"><text:s/></text:span><text:span text:style-name="T30"><text:s text:c="11"/></text:span></text:p>
      <text:p text:style-name="P39"><text:span text:style-name="T67"><text:s text:c="7"/></text:span><text:span text:style-name="T38"><text:s text:c="4"/></text:span></text:p>
      <text:p text:style-name="P61"><text:s text:c="14"/></text:p>
      <text:p text:style-name="P270"><text:s text:c="12"/>920 9998 21160</text:p>
      <text:p text:style-name="P61"><text:s text:c="9"/><text:span text:style-name="T54"><text:s/></text:span></text:p>
      <text:p text:style-name="P217"/>
      <text:p text:style-name="P61"><text:span text:style-name="T54"><text:s text:c="13"/></text:span><text:s/></text:p>
      <text:p text:style-name="P217"><text:s text:c="3"/></text:p>
      <text:p text:style-name="P106"><text:s text:c="12"/></text:p>
      <text:p text:style-name="P61"><text:s text:c="3"/></text:p>
      <text:p text:style-name="P217"><text:s text:c="5"/></text:p>
      <text:p text:style-name="P111"><text:s text:c="22"/></text:p>
      <text:p text:style-name="P61"><text:s text:c="12"/></text:p>
      <text:p text:style-name="P217"><text:s text:c="2"/></text:p>
      <text:p text:style-name="P262"><text:s text:c="2"/></text:p>
      <text:p text:style-name="P170"><text:s text:c="18"/></text:p>
      <text:p text:style-name="P217"><text:s text:c="5"/></text:p>
      <text:p text:style-name="P217"/>
      <text:p text:style-name="P217"><text:span text:style-name="T40"><text:s/></text:span><text:s/></text:p>
      <text:p text:style-name="P217"><text:s text:c="5"/></text:p>
      <text:p text:style-name="P61"><text:s text:c="9"/></text:p>
      <text:p text:style-name="P46"><text:s text:c="12"/></text:p>
      <text:p text:style-name="P217"><text:s text:c="9"/></text:p>
      <text:p text:style-name="P106"><text:s text:c="4"/><text:span text:style-name="T5"><text:s text:c="9"/></text:span></text:p>
      <text:p text:style-name="P88"><text:s text:c="12"/></text:p>
      <text:p text:style-name="P111"><text:s text:c="18"/></text:p>
      <text:p text:style-name="P217"/>
      <text:p text:style-name="P61"><text:s text:c="16"/></text:p>
      <text:p text:style-name="P217"/>
      <text:p text:style-name="P217"><text:s text:c="4"/></text:p>
      <text:p text:style-name="P217"/>
      <text:p text:style-name="P61"><text:s text:c="16"/></text:p>
      <text:p text:style-name="P217"><text:s/></text:p>
      <text:p text:style-name="P217"><text:s text:c="3"/></text:p>
      <text:p text:style-name="P110"/>
      <text:p text:style-name="P61"><text:s text:c="16"/></text:p>
      <text:p text:style-name="P221"/>
      <text:p text:style-name="P49"><text:s text:c="5"/><text:span text:style-name="T5"><text:s text:c="6"/></text:span><text:span text:style-name="T103">2</text:span></text:p>
      <text:p text:style-name="P276"><text:s text:c="4"/></text:p>
      <text:p text:style-name="P61"><text:s text:c="9"/></text:p>
      <text:p text:style-name="P217"><text:s text:c="2"/></text:p>
      <text:p text:style-name="P223"/>
      <text:p text:style-name="P217"><text:s text:c="2"/></text:p>
      <text:p text:style-name="P221"/>
      <text:p text:style-name="P217"/>
      <text:p text:style-name="P61"><text:s text:c="16"/></text:p>
      <text:p text:style-name="P217"><text:s text:c="2"/></text:p>
      <text:p text:style-name="P111"><text:s text:c="4"/></text:p>
      <text:p text:style-name="P106"><text:s text:c="12"/></text:p>
      <text:p text:style-name="P46"><text:s text:c="11"/></text:p>
      <text:p text:style-name="P217"><text:s/></text:p>
      <text:p text:style-name="P61"><text:s text:c="10"/></text:p>
      <text:p text:style-name="P61"/>
      <text:p text:style-name="P217"><text:s/></text:p>
      <text:p text:style-name="P217"><text:s text:c="12"/></text:p>
      <text:p text:style-name="P168"><text:s text:c="2"/></text:p>
      <text:p text:style-name="P217"><text:s text:c="2"/></text:p>
      <text:p text:style-name="P57"/>
      <text:p text:style-name="P61"><text:s text:c="13"/></text:p>
      <text:p text:style-name="P217"/>
      <text:p text:style-name="P46"><text:s text:c="13"/><text:span text:style-name="T14"><text:s text:c="3"/></text:span></text:p>
      <text:p text:style-name="P46"><text:s text:c="10"/></text:p>
      <text:p text:style-name="P46"><text:s text:c="11"/><text:span text:style-name="T72"><text:s text:c="3"/></text:span></text:p>
      <text:p text:style-name="P61"><text:s text:c="11"/></text:p>
      <text:p text:style-name="P217"><text:s text:c="2"/></text:p>
      <text:p text:style-name="P217"/>
      <text:p text:style-name="P217"><text:s text:c="10"/></text:p>
      <text:p text:style-name="P217"><text:s/></text:p>
      <text:p text:style-name="P217"/>
      <text:p text:style-name="P168"><text:s text:c="3"/></text:p>
      <text:p text:style-name="P168"/>
      <text:p text:style-name="P111"><text:s text:c="13"/></text:p>
      <text:p text:style-name="P46"><text:s text:c="6"/><text:span text:style-name="T72"><text:s text:c="2"/></text:span><text:span text:style-name="T14"><text:s text:c="3"/></text:span><text:span text:style-name="T56"><text:s/></text:span></text:p>
      <text:p text:style-name="P61"><text:s text:c="16"/></text:p>
      <text:p text:style-name="P61"/>
      <text:p text:style-name="P217"><text:s text:c="15"/></text:p>
      <text:p text:style-name="P217"/>
      <text:p text:style-name="P111"><text:s text:c="19"/></text:p>
      <text:p text:style-name="P217"><text:s text:c="3"/></text:p>
      <text:p text:style-name="P168"/>
      <text:p text:style-name="P217"/>
      <text:p text:style-name="P46"><text:s text:c="12"/></text:p>
      <text:p text:style-name="P111"><text:s text:c="13"/></text:p>
      <text:p text:style-name="P61"><text:s text:c="4"/></text:p>
      <text:p text:style-name="P217"><text:s text:c="2"/></text:p>
      <text:p text:style-name="P111"><text:s text:c="16"/></text:p>
      <text:p text:style-name="P61"><text:s text:c="9"/></text:p>
      <text:p text:style-name="P49"><text:s text:c="14"/></text:p>
      <text:p text:style-name="P49"><text:s text:c="9"/></text:p>
      <text:p text:style-name="P111"><text:s text:c="31"/></text:p>
      <text:p text:style-name="P61"><text:s text:c="10"/></text:p>
      <text:p text:style-name="P62"><text:s text:c="9"/></text:p>
      <text:p text:style-name="P217"/>
      <text:p text:style-name="P217"><text:s text:c="2"/></text:p>
      <text:p text:style-name="P217"><text:s text:c="7"/></text:p>
      <text:p text:style-name="P217"><text:s text:c="11"/></text:p>
      <text:p text:style-name="P111"><text:s text:c="12"/></text:p>
      <text:p text:style-name="P217"><text:s text:c="2"/></text:p>
      <text:p text:style-name="P169"><text:s text:c="6"/></text:p>
      <text:p text:style-name="P174"/>
      <text:p text:style-name="P217"><text:s text:c="11"/></text:p>
      <text:p text:style-name="P61"><text:s text:c="18"/></text:p>
      <text:p text:style-name="P61"><text:s text:c="16"/></text:p>
      <text:p text:style-name="P217"><text:s/></text:p>
      <text:p text:style-name="P61"><text:s text:c="9"/></text:p>
      <text:p text:style-name="P168"><text:s text:c="16"/></text:p>
      <text:p text:style-name="P217"/>
      <text:p text:style-name="P61"><text:s text:c="14"/></text:p>
      <text:p text:style-name="P106"><text:span text:style-name="T5"><text:s text:c="6"/></text:span><text:s text:c="5"/></text:p>
      <text:p text:style-name="P250"><text:s text:c="2"/></text:p>
      <text:p text:style-name="P46"><text:s text:c="13"/></text:p>
      <text:p text:style-name="P61"><text:s text:c="11"/></text:p>
      <text:p text:style-name="P217"><text:s/></text:p>
      <text:p text:style-name="P94"><text:s text:c="8"/><text:span text:style-name="T5"><text:s text:c="6"/></text:span></text:p>
      <text:p text:style-name="P217"><text:s text:c="5"/></text:p>
      <text:p text:style-name="P61"/>
      <text:p text:style-name="P221"/>
      <text:p text:style-name="P148"><text:s/></text:p>
      <text:p text:style-name="P168"/>
      <text:p text:style-name="P61"><text:s text:c="16"/></text:p>
      <text:p text:style-name="P217"><text:s text:c="3"/></text:p>
      <text:p text:style-name="P61"><text:s text:c="15"/></text:p>
      <text:p text:style-name="P217"/>
      <text:p text:style-name="P217"><text:s text:c="9"/></text:p>
      <text:p text:style-name="P217"><text:s text:c="5"/></text:p>
      <text:p text:style-name="P111"><text:s text:c="14"/></text:p>
      <text:p text:style-name="P61"><text:s text:c="10"/></text:p>
      <text:p text:style-name="P168"><text:s text:c="3"/></text:p>
      <text:p text:style-name="P217"><text:s/></text:p>
      <text:p text:style-name="P217"><text:s text:c="3"/></text:p>
      <text:p text:style-name="P46"><text:s text:c="9"/></text:p>
      <text:p text:style-name="P111"><text:s text:c="16"/></text:p>
      <text:p text:style-name="P49"><text:span text:style-name="T7"><text:s text:c="8"/></text:span><text:span text:style-name="T5"><text:s text:c="2"/></text:span></text:p>
      <text:p text:style-name="P111"><text:s text:c="13"/></text:p>
      <text:p text:style-name="P111"><text:s text:c="19"/></text:p>
      <text:p text:style-name="P46"><text:s text:c="9"/><text:span text:style-name="T72"><text:s/></text:span></text:p>
      <text:p text:style-name="P46"><text:soft-page-break/><text:s text:c="13"/></text:p>
      <text:p text:style-name="P217"><text:s text:c="3"/></text:p>
      <text:p text:style-name="P217"><text:s text:c="2"/></text:p>
      <text:p text:style-name="P61"><text:s text:c="16"/></text:p>
      <text:p text:style-name="P148"><text:s text:c="5"/></text:p>
      <text:p text:style-name="P217"><text:s text:c="4"/></text:p>
      <text:p text:style-name="P61"><text:s text:c="17"/></text:p>
      <text:p text:style-name="P217"/>
      <text:p text:style-name="P35"><text:s text:c="5"/><text:span text:style-name="T94"><text:s text:c="5"/></text:span><text:span text:style-name="T67"><text:s/></text:span></text:p>
      <text:p text:style-name="P46"><text:s text:c="12"/></text:p>
      <text:p text:style-name="P217"/>
      <text:p text:style-name="P250"><text:s text:c="5"/></text:p>
      <text:p text:style-name="P46"><text:s text:c="12"/></text:p>
      <text:p text:style-name="P61"><text:s text:c="12"/></text:p>
      <text:p text:style-name="P104"/>
      <text:p text:style-name="P46"><text:s text:c="8"/></text:p>
      <text:p text:style-name="P61"><text:s text:c="9"/></text:p>
      <text:p text:style-name="P217"><text:s text:c="2"/></text:p>
      <text:p text:style-name="P123"><text:s text:c="12"/><text:span text:style-name="T67"><text:s/></text:span></text:p>
      <text:p text:style-name="P61"><text:s text:c="8"/></text:p>
      <text:p text:style-name="P111"><text:s text:c="12"/></text:p>
      <text:p text:style-name="P61"><text:s text:c="11"/></text:p>
      <text:p text:style-name="P111"><text:s text:c="2"/></text:p>
      <text:p text:style-name="P111"><text:s text:c="2"/></text:p>
      <text:p text:style-name="P61"><text:s text:c="16"/></text:p>
      <text:p text:style-name="P217"><text:s text:c="4"/></text:p>
      <text:p text:style-name="P217"><text:s text:c="3"/></text:p>
      <text:p text:style-name="P111"><text:s text:c="14"/></text:p>
      <text:p text:style-name="P217"/>
      <text:p text:style-name="P111"><text:s text:c="12"/></text:p>
      <text:p text:style-name="P217"/>
      <text:p text:style-name="P217"><text:s text:c="4"/></text:p>
      <text:p text:style-name="P217"><text:s text:c="8"/></text:p>
      <text:p text:style-name="P61"><text:s text:c="18"/></text:p>
      <text:p text:style-name="P61"/>
      <text:p text:style-name="P61"><text:s text:c="12"/></text:p>
      <text:p text:style-name="P217"><text:s text:c="2"/></text:p>
      <text:p text:style-name="P111"><text:s text:c="13"/></text:p>
      <text:p text:style-name="P270"><text:s/><text:span text:style-name="T5"><text:s/></text:span></text:p>
      <text:p text:style-name="P111"><text:s text:c="16"/><text:span text:style-name="T54"><text:s/></text:span></text:p>
      <text:p text:style-name="P111"><text:s text:c="13"/></text:p>
      <text:p text:style-name="P61"><text:s text:c="14"/></text:p>
      <text:p text:style-name="P111"><text:s text:c="12"/></text:p>
      <text:p text:style-name="P111"><text:s text:c="14"/></text:p>
      <text:p text:style-name="P61"><text:s text:c="11"/></text:p>
      <text:p text:style-name="P111"><text:s text:c="15"/></text:p>
      <text:p text:style-name="P61"><text:s text:c="13"/></text:p>
      <text:p text:style-name="P217"/>
      <text:p text:style-name="P61"><text:s text:c="12"/></text:p>
      <text:p text:style-name="P61"/>
      <text:p text:style-name="P111"><text:s text:c="12"/></text:p>
      <text:p text:style-name="P250"><text:s/><text:span text:style-name="T5"><text:s text:c="2"/></text:span></text:p>
      <text:p text:style-name="P61"><text:span text:style-name="T103"><text:s text:c="11"/></text:span><text:s/></text:p>
      <text:p text:style-name="P67"/>
      <text:p text:style-name="P49"><text:s text:c="6"/><text:span text:style-name="T5"><text:s text:c="3"/></text:span></text:p>
      <text:p text:style-name="P61"><text:s text:c="15"/></text:p>
      <text:p text:style-name="P262"><text:s text:c="2"/><text:span text:style-name="T17"><text:s text:c="2"/></text:span></text:p>
      <text:p text:style-name="P148"><text:s text:c="2"/></text:p>
      <text:p text:style-name="P217"><text:s text:c="11"/></text:p>
      <text:p text:style-name="P107"/>
      <text:p text:style-name="P46"><text:s text:c="14"/><text:span text:style-name="T14"><text:s text:c="2"/></text:span></text:p>
      <text:p text:style-name="P61"><text:s text:c="13"/></text:p>
      <text:p text:style-name="P217"><text:s/></text:p>
      <text:p text:style-name="P168"><text:s text:c="2"/></text:p>
      <text:p text:style-name="P111"><text:s text:c="12"/></text:p>
      <text:p text:style-name="P168"><text:s text:c="6"/></text:p>
      <text:p text:style-name="P61"/>
      <text:p text:style-name="P268"><text:s text:c="4"/></text:p>
      <text:p text:style-name="P61"><text:s text:c="7"/></text:p>
      <text:p text:style-name="P61"><text:s text:c="13"/></text:p>
      <text:p text:style-name="P61"><text:s text:c="15"/></text:p>
      <text:p text:style-name="P61"><text:s text:c="17"/><text:span text:style-name="T103"><text:s/></text:span><text:s text:c="3"/></text:p>
      <text:p text:style-name="P217"><text:s text:c="8"/></text:p>
      <text:p text:style-name="P217"><text:s text:c="2"/></text:p>
      <text:p text:style-name="P169"><text:s text:c="12"/></text:p>
      <text:p text:style-name="P217"><text:s text:c="10"/></text:p>
      <text:p text:style-name="P61"><text:s text:c="12"/></text:p>
      <text:p text:style-name="P61"><text:s text:c="13"/></text:p>
      <text:p text:style-name="P217"><text:s text:c="4"/></text:p>
      <text:p text:style-name="P217"><text:s text:c="3"/></text:p>
      <text:p text:style-name="P111"><text:s text:c="13"/></text:p>
      <text:p text:style-name="P217"><text:s text:c="7"/></text:p>
      <text:p text:style-name="P148"><text:s text:c="5"/></text:p>
      <text:p text:style-name="P217"/>
      <text:p text:style-name="P169"/>
      <text:p text:style-name="P217"><text:s text:c="3"/></text:p>
      <text:p text:style-name="P217"/>
      <text:p text:style-name="P192"/>
      <text:p text:style-name="P217"/>
      <text:p text:style-name="P61"><text:s text:c="14"/></text:p>
      <text:p text:style-name="P61"><text:s text:c="13"/></text:p>
      <text:p text:style-name="P61"><text:s text:c="8"/></text:p>
      <text:p text:style-name="P61"><text:s text:c="11"/></text:p>
      <text:p text:style-name="P61"><text:s text:c="13"/></text:p>
      <text:p text:style-name="P217"/>
      <text:p text:style-name="P217"><text:s text:c="6"/></text:p>
      <text:p text:style-name="P61"><text:s text:c="16"/></text:p>
      <text:p text:style-name="P111"><text:s text:c="18"/></text:p>
      <text:p text:style-name="P61"><text:s text:c="11"/></text:p>
      <text:p text:style-name="P217"><text:s text:c="6"/></text:p>
      <text:p text:style-name="P61"><text:s text:c="11"/></text:p>
      <text:p text:style-name="P49"><text:s text:c="11"/></text:p>
      <text:p text:style-name="P46"><text:s text:c="9"/></text:p>
      <text:p text:style-name="P49"><text:s text:c="13"/></text:p>
      <text:p text:style-name="P217"><text:s text:c="4"/></text:p>
      <text:p text:style-name="P217"><text:s/></text:p>
      <text:p text:style-name="P61"><text:s text:c="10"/></text:p>
      <text:p text:style-name="P61"><text:s text:c="10"/></text:p>
      <text:p text:style-name="P111"><text:s text:c="15"/></text:p>
      <text:p text:style-name="P46"><text:s text:c="13"/><text:span text:style-name="T72"><text:s text:c="3"/></text:span></text:p>
      <text:p text:style-name="P217"/>
      <text:p text:style-name="P111"><text:s text:c="7"/></text:p>
      <text:p text:style-name="P61"/>
      <text:p text:style-name="P221"/>
      <text:p text:style-name="P61"><text:s text:c="9"/></text:p>
      <text:p text:style-name="P61"><text:s text:c="17"/></text:p>
      <text:p text:style-name="P61"/>
      <text:p text:style-name="P250"><text:s text:c="5"/></text:p>
      <text:p text:style-name="P49"><text:s text:c="6"/></text:p>
      <text:p text:style-name="P223"/>
      <text:p text:style-name="P217"/>
      <text:p text:style-name="P61"><text:s text:c="11"/></text:p>
      <text:p text:style-name="P217"/>
      <text:p text:style-name="P61"><text:s text:c="13"/></text:p>
      <text:p text:style-name="P217"><text:s text:c="6"/></text:p>
      <text:p text:style-name="P46"><text:s text:c="11"/></text:p>
      <text:p text:style-name="P217"/>
      <text:p text:style-name="P61"><text:s text:c="10"/></text:p>
      <text:p text:style-name="P111"><text:s text:c="18"/></text:p>
      <text:p text:style-name="P217"><text:s text:c="11"/></text:p>
      <text:p text:style-name="P190"><text:s text:c="4"/></text:p>
      <text:p text:style-name="P217"><text:s text:c="2"/><text:span text:style-name="T85"><text:s/></text:span></text:p>
      <text:p text:style-name="P217"><text:s text:c="3"/></text:p>
      <text:p text:style-name="P61"><text:s text:c="13"/></text:p>
      <text:p text:style-name="P61"><text:s text:c="22"/></text:p>
      <text:p text:style-name="P217"/>
      <text:p text:style-name="P262"><text:s/><text:span text:style-name="T17"><text:s text:c="2"/></text:span></text:p>
      <text:p text:style-name="P217"><text:s text:c="3"/></text:p>
      <text:p text:style-name="P49"><text:s text:c="9"/><text:span text:style-name="T5"><text:s text:c="5"/></text:span></text:p>
      <text:p text:style-name="P217"/>
      <text:p text:style-name="P61"><text:s text:c="15"/></text:p>
      <text:p text:style-name="P61"><text:s/></text:p>
      <text:p text:style-name="P223"/>
      <text:p text:style-name="P217"><text:s/></text:p>
      <text:p text:style-name="P217"/>
      <text:p text:style-name="P217"/>
      <text:p text:style-name="P221"/>
      <text:p text:style-name="P217"/>
      <text:p text:style-name="P210"/>
      <text:p text:style-name="P276"><text:s text:c="6"/></text:p>
      <text:p text:style-name="P139"><text:s text:c="12"/></text:p>
      <text:p text:style-name="P110"/>
      <text:p text:style-name="P217"><text:s text:c="3"/></text:p>
      <text:p text:style-name="P262"><text:s text:c="5"/></text:p>
      <text:p text:style-name="P106"><text:s text:c="9"/><text:span text:style-name="T5"><text:s text:c="2"/></text:span></text:p>
      <text:p text:style-name="P250"><text:span text:style-name="T7"><text:s/></text:span><text:span text:style-name="T5"><text:s/></text:span></text:p>
      <text:p text:style-name="P50"/>
      <text:p text:style-name="P217"/>
      <text:p text:style-name="P61"/>
      <text:p text:style-name="P61"><text:s text:c="19"/></text:p>
      <text:p text:style-name="P217"/>
      <text:p text:style-name="P49"><text:s text:c="3"/></text:p>
      <text:p text:style-name="P250"/>
      <text:p text:style-name="P49"><text:s text:c="12"/></text:p>
      <text:p text:style-name="P35"><text:s text:c="7"/></text:p>
      <text:p text:style-name="P49"><text:s text:c="7"/></text:p>
      <text:p text:style-name="P46"><text:s text:c="18"/></text:p>
      <text:p text:style-name="P217"/>
      <text:p text:style-name="P61"><text:s text:c="10"/></text:p>
      <text:p text:style-name="P111"><text:s text:c="9"/></text:p>
      <text:p text:style-name="P61"><text:s text:c="15"/></text:p>
      <text:p text:style-name="P111"><text:s text:c="17"/></text:p>
      <text:p text:style-name="P217"><text:s/></text:p>
      <text:p text:style-name="P61"><text:s text:c="12"/></text:p>
      <text:p text:style-name="P217"/>
      <text:p text:style-name="P94"><text:s text:c="14"/></text:p>
      <text:p text:style-name="P270"><text:s text:c="12"/></text:p>
      <text:p text:style-name="P217"><text:s/></text:p>
      <text:p text:style-name="P61"><text:s text:c="14"/></text:p>
      <text:p text:style-name="P217"/>
      <text:p text:style-name="P223"/>
      <text:p text:style-name="P217"/>
      <text:p text:style-name="P61"/>
      <text:p text:style-name="P61"><text:s text:c="16"/></text:p>
      <text:p text:style-name="P217"/>
      <text:p text:style-name="P61"><text:s text:c="14"/></text:p>
      <text:p text:style-name="P49"><text:s text:c="9"/><text:span text:style-name="T5"><text:s text:c="7"/></text:span></text:p>
      <text:p text:style-name="P268"><text:s text:c="2"/><text:span text:style-name="T5"><text:s text:c="2"/></text:span></text:p>
      <text:p text:style-name="P111"/>
      <text:p text:style-name="P221"/>
      <text:p text:style-name="P111"><text:s text:c="13"/></text:p>
      <text:p text:style-name="P221"/>
      <text:p text:style-name="P61"><text:s text:c="9"/></text:p>
      <text:p text:style-name="P217"/>
      <text:p text:style-name="P111"><text:s text:c="9"/></text:p>
      <text:p text:style-name="P111"><text:s text:c="14"/></text:p>
      <text:p text:style-name="P49"><text:s text:c="10"/></text:p>
      <text:p text:style-name="P61"><text:s text:c="13"/></text:p>
      <text:p text:style-name="P61"><text:s text:c="13"/></text:p>
      <text:p text:style-name="P61"><text:s text:c="12"/></text:p>
      <text:p text:style-name="P61"><text:s text:c="17"/></text:p>
      <text:p text:style-name="P61"/>
      <text:p text:style-name="P217"/>
      <text:p text:style-name="P61"><text:s text:c="14"/></text:p>
      <text:p text:style-name="P111"><text:s text:c="12"/></text:p>
      <text:p text:style-name="P217"/>
      <text:p text:style-name="P61"><text:s text:c="15"/></text:p>
      <text:p text:style-name="P61"><text:s text:c="12"/></text:p>
      <text:p text:style-name="P111"><text:s text:c="14"/></text:p>
      <text:p text:style-name="P61"><text:s text:c="11"/></text:p>
      <text:p text:style-name="P61"><text:s text:c="12"/></text:p>
      <text:p text:style-name="P217"><text:s text:c="14"/></text:p>
      <text:p text:style-name="P148"><text:s text:c="8"/></text:p>
      <text:p text:style-name="P61"><text:s text:c="9"/></text:p>
      <text:p text:style-name="P61"><text:s text:c="15"/></text:p>
      <text:p text:style-name="P217"><text:s text:c="3"/></text:p>
      <text:p text:style-name="P221"/>
      <text:p text:style-name="P68"><text:s text:c="9"/><text:span text:style-name="T72"><text:s text:c="2"/></text:span></text:p>
      <text:p text:style-name="P61"><text:s text:c="12"/></text:p>
      <text:p text:style-name="P223"/>
      <text:p text:style-name="P250"><text:s/></text:p>
      <text:p text:style-name="P155"/>
      <text:p text:style-name="P90"><text:span text:style-name="T73"><text:s text:c="8"/></text:span><text:span text:style-name="T74"><text:s/></text:span></text:p>
      <text:p text:style-name="P111"><text:s text:c="7"/></text:p>
      <text:p text:style-name="P111"><text:s text:c="10"/></text:p>
      <text:p text:style-name="P61"><text:s text:c="12"/></text:p>
      <text:p text:style-name="P217"><text:s text:c="2"/></text:p>
      <text:p text:style-name="P217"/>
      <text:p text:style-name="P217"><text:s text:c="5"/></text:p>
      <text:p text:style-name="P217"/>
      <text:p text:style-name="P217"><text:s text:c="3"/></text:p>
      <text:p text:style-name="P217"><text:s text:c="12"/></text:p>
      <text:p text:style-name="P262"><text:s text:c="2"/><text:span text:style-name="T74"><text:s text:c="2"/></text:span></text:p>
      <text:p text:style-name="P217"><text:s text:c="2"/></text:p>
      <text:p text:style-name="P67"/>
      <text:p text:style-name="P61"><text:s text:c="11"/></text:p>
      <text:p text:style-name="P126"><text:s text:c="3"/>ROYAL MUSEUM</text:p>
      <text:p text:style-name="P265"><text:s/></text:p>
      <text:p text:style-name="P217"><text:s text:c="7"/></text:p>
      <text:p text:style-name="P265"><text:s text:c="2"/><text:span text:style-name="T73"><text:s/></text:span><text:span text:style-name="T15"><text:s text:c="3"/></text:span></text:p>
      <text:p text:style-name="P217"><text:s text:c="12"/></text:p>
      <text:p text:style-name="P217"><text:s text:c="5"/></text:p>
      <text:p text:style-name="P217"/>
      <text:p text:style-name="P223"/>
      <text:p text:style-name="P250"><text:s text:c="3"/></text:p>
      <text:p text:style-name="P221"/>
      <text:p text:style-name="P61"><text:s text:c="10"/><text:span text:style-name="T54"><text:s/></text:span></text:p>
      <text:p text:style-name="P217"><text:s text:c="12"/></text:p>
      <text:p text:style-name="P217"/>
      <text:p text:style-name="P268"><text:s text:c="10"/></text:p>
      <text:p text:style-name="P69"/>
      <text:p text:style-name="P61"><text:s text:c="22"/></text:p>
      <text:p text:style-name="P111"><text:s text:c="15"/></text:p>
      <text:p text:style-name="P61"><text:s text:c="15"/><text:span text:style-name="T100"><text:s/></text:span></text:p>
      <text:p text:style-name="P57"><text:s text:c="16"/></text:p>
      <text:p text:style-name="P217"><text:s text:c="7"/></text:p>
      <text:p text:style-name="P61"><text:s text:c="9"/></text:p>
      <text:p text:style-name="P217"><text:s text:c="2"/><text:span text:style-name="T103"><text:s text:c="2"/></text:span><text:s/></text:p>
      <text:p text:style-name="P165"/>
      <text:p text:style-name="P148"/>
      <text:p text:style-name="P217"><text:s text:c="5"/></text:p>
      <text:p text:style-name="P61"><text:s text:c="15"/></text:p>
      <text:p text:style-name="P217"><text:s text:c="3"/></text:p>
      <text:p text:style-name="P111"><text:s text:c="19"/></text:p>
      <text:p text:style-name="P61"><text:s text:c="8"/></text:p>
      <text:p text:style-name="P111"><text:s text:c="14"/></text:p>
      <text:p text:style-name="P61"><text:s text:c="15"/></text:p>
      <text:p text:style-name="P217"/>
      <text:p text:style-name="P217"/>
      <text:p text:style-name="P61"><text:s text:c="12"/></text:p>
      <text:p text:style-name="P92"><text:s text:c="8"/><text:span text:style-name="T5"><text:s text:c="4"/></text:span></text:p>
      <text:p text:style-name="P111"><text:s text:c="14"/></text:p>
      <text:p text:style-name="P217"><text:s text:c="4"/></text:p>
      <text:p text:style-name="P111"/>
      <text:p text:style-name="P217"><text:s text:c="6"/></text:p>
      <text:p text:style-name="P217"/>
      <text:p text:style-name="P217"/>
      <text:p text:style-name="P61"><text:s text:c="9"/></text:p>
      <text:p text:style-name="P217"><text:s text:c="4"/></text:p>
      <text:p text:style-name="P61"><text:s text:c="8"/></text:p>
      <text:p text:style-name="P217"/>
      <text:p text:style-name="P61"><text:s text:c="17"/></text:p>
      <text:p text:style-name="P67"/>
      <text:p text:style-name="P217"><text:s text:c="10"/></text:p>
      <text:p text:style-name="P217"/>
      <text:p text:style-name="P217"><text:s text:c="4"/></text:p>
      <text:p text:style-name="P61"><text:s text:c="13"/></text:p>
      <text:p text:style-name="P217"/>
      <text:p text:style-name="P217"/>
      <text:p text:style-name="P61"><text:s text:c="10"/></text:p>
      <text:p text:style-name="P217"><text:s text:c="4"/></text:p>
      <text:p text:style-name="P49"><text:s text:c="10"/><text:span text:style-name="T5"><text:s/></text:span></text:p>
      <text:p text:style-name="P217"/>
      <text:p text:style-name="P145"><text:s text:c="3"/></text:p>
      <text:p text:style-name="P217"><text:s text:c="3"/></text:p>
      <text:p text:style-name="P217"/>
      <text:p text:style-name="P217"><text:s text:c="3"/></text:p>
      <text:p text:style-name="P217"><text:s text:c="3"/></text:p>
      <text:p text:style-name="P217"><text:s/></text:p>
      <text:p text:style-name="P61"><text:s text:c="13"/></text:p>
      <text:p text:style-name="P217"/>
      <text:p text:style-name="P106"><text:s text:c="6"/></text:p>
      <text:p text:style-name="P217"/>
      <text:p text:style-name="P111"/>
      <text:p text:style-name="P61"><text:s text:c="11"/></text:p>
      <text:p text:style-name="P61"><text:s text:c="14"/></text:p>
      <text:p text:style-name="P276"><text:s text:c="9"/></text:p>
      <text:p text:style-name="P262"><text:s text:c="3"/><text:span text:style-name="T17"><text:s text:c="4"/></text:span><text:span text:style-name="T58"><text:s/></text:span></text:p>
      <text:p text:style-name="P61"><text:s text:c="13"/></text:p>
      <text:p text:style-name="P221"/>
      <text:p text:style-name="P46"><text:s text:c="8"/><text:span text:style-name="T72"><text:s text:c="6"/></text:span><text:span text:style-name="T14"><text:s/></text:span></text:p>
      <text:p text:style-name="P248"><text:span text:style-name="T72"><text:s/></text:span><text:span text:style-name="T14"><text:s text:c="3"/></text:span></text:p>
      <text:p text:style-name="P61"><text:s text:c="14"/></text:p>
      <text:p text:style-name="P217"/>
      <text:p text:style-name="P217"><text:s text:c="5"/></text:p>
      <text:p text:style-name="P61"><text:s text:c="6"/></text:p>
      <text:p text:style-name="P46"/>
      <text:p text:style-name="P61"><text:s text:c="11"/></text:p>
      <text:p text:style-name="P61"><text:s text:c="9"/></text:p>
      <text:p text:style-name="P111"/>
      <text:p text:style-name="P217"><text:s text:c="3"/></text:p>
      <text:p text:style-name="P217"><text:s text:c="3"/></text:p>
      <text:p text:style-name="P217"/>
      <text:p text:style-name="P217"><text:s text:c="5"/></text:p>
      <text:p text:style-name="P61"><text:s text:c="16"/></text:p>
      <text:p text:style-name="P270"/>
      <text:p text:style-name="P217"><text:s text:c="13"/></text:p>
      <text:p text:style-name="P46"><text:s text:c="6"/><text:span text:style-name="T72"><text:s text:c="5"/></text:span><text:span text:style-name="T14"><text:s/></text:span></text:p>
      <text:p text:style-name="P217"><text:s text:c="5"/></text:p>
      <text:p text:style-name="P217"><text:s text:c="6"/></text:p>
      <text:p text:style-name="P217"><text:s text:c="6"/></text:p>
      <text:p text:style-name="P217"><text:s text:c="2"/></text:p>
      <text:p text:style-name="P85"><text:s text:c="11"/></text:p>
      <text:p text:style-name="P61"/>
      <text:p text:style-name="P238"><text:s text:c="5"/></text:p>
      <text:p text:style-name="P217"/>
      <text:p text:style-name="P223"/>
      <text:p text:style-name="P111"><text:s text:c="14"/></text:p>
      <text:p text:style-name="P168"/>
      <text:p text:style-name="P217"><text:s text:c="2"/><text:span text:style-name="T103"><text:s/></text:span></text:p>
      <text:p text:style-name="P217"><text:s text:c="2"/></text:p>
      <text:p text:style-name="P217"/>
      <text:p text:style-name="P217"/>
      <text:p text:style-name="P61"><text:s text:c="7"/></text:p>
      <text:p text:style-name="P49"><text:s text:c="8"/></text:p>
      <text:p text:style-name="P111"><text:s text:c="13"/></text:p>
      <text:p text:style-name="P61"><text:s text:c="8"/></text:p>
      <text:p text:style-name="P61"><text:s text:c="16"/></text:p>
      <text:p text:style-name="P49"><text:s text:c="8"/><text:span text:style-name="T5"><text:s text:c="4"/></text:span></text:p>
      <text:p text:style-name="P217"><text:s text:c="11"/></text:p>
      <text:p text:style-name="P61"><text:s text:c="10"/></text:p>
      <text:p text:style-name="P61"><text:s text:c="11"/></text:p>
      <text:p text:style-name="P217"/>
      <text:p text:style-name="P217"/>
      <text:p text:style-name="P217"/>
      <text:p text:style-name="P221"/>
      <text:p text:style-name="P61"><text:s text:c="14"/></text:p>
      <text:p text:style-name="P46"><text:s text:c="7"/></text:p>
      <text:p text:style-name="P217"/>
      <text:p text:style-name="P61"/>
      <text:p text:style-name="P61"><text:s text:c="13"/></text:p>
      <text:p text:style-name="P217"/>
      <text:p text:style-name="P49"><text:s text:c="12"/></text:p>
      <text:p text:style-name="P61"/>
      <text:p text:style-name="P61"><text:s text:c="11"/></text:p>
      <text:p text:style-name="P61"><text:s text:c="11"/></text:p>
      <text:p text:style-name="P49"><text:s text:c="8"/></text:p>
      <text:p text:style-name="P217"><text:s text:c="5"/></text:p>
      <text:p text:style-name="P110"/>
      <text:p text:style-name="P217"/>
      <text:p text:style-name="P111"/>
      <text:p text:style-name="P61"><text:s text:c="7"/></text:p>
      <text:p text:style-name="P61"/>
      <text:p text:style-name="P221"/>
      <text:p text:style-name="P207"/>
      <text:p text:style-name="P217"/>
      <text:p text:style-name="P217"/>
      <text:p text:style-name="P217"/>
      <text:p text:style-name="P217"/>
      <text:p text:style-name="P217"><text:s text:c="2"/></text:p>
      <text:p text:style-name="P61"><text:s text:c="18"/></text:p>
      <text:p text:style-name="P217"><text:s text:c="2"/></text:p>
      <text:p text:style-name="P217"/>
      <text:p text:style-name="P111"><text:s text:c="6"/></text:p>
      <text:p text:style-name="P61"><text:s text:c="12"/></text:p>
      <text:p text:style-name="P61"><text:s text:c="13"/></text:p>
      <text:p text:style-name="P217"/>
      <text:p text:style-name="P111"><text:s text:c="16"/></text:p>
      <text:p text:style-name="P217"/>
      <text:p text:style-name="P217"><text:s text:c="14"/></text:p>
      <text:p text:style-name="P61"><text:s text:c="16"/></text:p>
      <text:p text:style-name="P217"/>
      <text:p text:style-name="P61"><text:s text:c="13"/></text:p>
      <text:p text:style-name="P217"><text:s text:c="4"/></text:p>
      <text:p text:style-name="P61"/>
      <text:p text:style-name="P217"><text:s text:c="12"/></text:p>
      <text:p text:style-name="P217"/>
      <text:p text:style-name="P217"/>
      <text:p text:style-name="P111"><text:s text:c="14"/></text:p>
      <text:p text:style-name="P111"><text:s text:c="6"/></text:p>
      <text:p text:style-name="P217"><text:s text:c="3"/></text:p>
      <text:p text:style-name="P111"><text:s text:c="7"/></text:p>
      <text:p text:style-name="P111"><text:s text:c="9"/></text:p>
      <text:p text:style-name="P61"><text:s text:c="13"/></text:p>
      <text:p text:style-name="P168"><text:s text:c="4"/></text:p>
      <text:p text:style-name="P217"><text:s/></text:p>
      <text:p text:style-name="P217"><text:s/></text:p>
      <text:p text:style-name="P61"><text:s text:c="13"/></text:p>
      <text:p text:style-name="P168"><text:s text:c="10"/></text:p>
      <text:p text:style-name="P217"><text:s text:c="4"/></text:p>
      <text:p text:style-name="P49"><text:s text:c="12"/></text:p>
      <text:p text:style-name="P262"><text:s text:c="3"/><text:span text:style-name="T14"><text:s/></text:span></text:p>
      <text:p text:style-name="P61"><text:s text:c="8"/></text:p>
      <text:p text:style-name="P144"><text:s/><text:span text:style-name="T14"><text:s text:c="3"/></text:span></text:p>
      <text:p text:style-name="P148"/>
      <text:p text:style-name="P61"><text:s text:c="13"/></text:p>
      <text:p text:style-name="P217"/>
      <text:p text:style-name="P217"/>
      <text:p text:style-name="P217"><text:s text:c="3"/></text:p>
      <text:p text:style-name="P250"><text:span text:style-name="T5"><text:s/></text:span><text:span text:style-name="T32"><text:s/></text:span><text:span text:style-name="T5"><text:s text:c="4"/></text:span></text:p>
      <text:p text:style-name="P221"/>
      <text:p text:style-name="P50"/>
      <text:p text:style-name="P217"/>
      <text:p text:style-name="P106"/>
      <text:p text:style-name="P106"><text:s text:c="11"/></text:p>
      <text:p text:style-name="P248"/>
      <text:p text:style-name="P223"/>
      <text:p text:style-name="P250"><text:s/><text:span text:style-name="T5"><text:s text:c="4"/></text:span></text:p>
      <text:p text:style-name="P252"/>
      <text:p text:style-name="P217"><text:s text:c="2"/></text:p>
      <text:p text:style-name="P61"><text:s text:c="7"/></text:p>
      <text:p text:style-name="P221"/>
      <text:p text:style-name="P106"><text:s text:c="7"/></text:p>
      <text:p text:style-name="P217"><text:s text:c="6"/></text:p>
      <text:p text:style-name="P250"><text:span text:style-name="T5"><text:s text:c="2"/></text:span><text:span text:style-name="T85"><text:s/></text:span><text:span text:style-name="T5"><text:s text:c="3"/></text:span></text:p>
      <text:p text:style-name="P61"><text:s text:c="12"/></text:p>
      <text:p text:style-name="P217"><text:s/></text:p>
      <text:p text:style-name="P49"><text:s text:c="10"/><text:span text:style-name="T5"><text:s/></text:span></text:p>
      <text:p text:style-name="P217"><text:s/></text:p>
      <text:p text:style-name="P262"><text:s/><text:span text:style-name="T73"><text:s text:c="3"/></text:span></text:p>
      <text:p text:style-name="P217"><text:s text:c="4"/></text:p>
      <text:p text:style-name="P49"/>
      <text:p text:style-name="P217"><text:s text:c="2"/></text:p>
      <text:p text:style-name="P217"/>
      <text:p text:style-name="P217"><text:s text:c="5"/><text:span text:style-name="T100"><text:s text:c="2"/></text:span></text:p>
      <text:p text:style-name="P217"/>
      <text:p text:style-name="P46"><text:s text:c="8"/></text:p>
      <text:p text:style-name="P111"><text:s/></text:p>
      <text:p text:style-name="P61"><text:s text:c="15"/></text:p>
      <text:p text:style-name="P61"><text:s text:c="15"/></text:p>
      <text:p text:style-name="P217"><text:s text:c="3"/></text:p>
      <text:p text:style-name="P217"/>
      <text:p text:style-name="P168"/>
      <text:p text:style-name="P111"><text:s text:c="14"/></text:p>
      <text:p text:style-name="P217"><text:s text:c="2"/></text:p>
      <text:p text:style-name="P217"/>
      <text:p text:style-name="P262"><text:span text:style-name="T72"><text:s/></text:span><text:span text:style-name="T17"><text:s text:c="8"/></text:span></text:p>
      <text:p text:style-name="P61"><text:s text:c="7"/></text:p>
      <text:p text:style-name="P61"><text:s text:c="11"/></text:p>
      <text:p text:style-name="P61"><text:s text:c="7"/></text:p>
      <text:p text:style-name="P61"><text:s text:c="10"/></text:p>
      <text:p text:style-name="P61"><text:s text:c="17"/></text:p>
      <text:p text:style-name="P111"><text:s text:c="3"/></text:p>
      <text:p text:style-name="P61"><text:s text:c="14"/></text:p>
      <text:p text:style-name="P111"><text:s text:c="5"/></text:p>
      <text:p text:style-name="P217"><text:s text:c="5"/></text:p>
      <text:p text:style-name="P61"><text:s text:c="16"/></text:p>
      <text:p text:style-name="P61"><text:s text:c="16"/></text:p>
      <text:p text:style-name="P61"><text:s text:c="17"/></text:p>
      <text:p text:style-name="P61"><text:s text:c="12"/></text:p>
      <text:p text:style-name="P61"><text:s text:c="16"/></text:p>
      <text:p text:style-name="P61"><text:s text:c="11"/></text:p>
      <text:p text:style-name="P111"><text:s text:c="9"/></text:p>
      <text:p text:style-name="P217"><text:s text:c="6"/></text:p>
      <text:p text:style-name="P61"><text:s text:c="2"/></text:p>
      <text:p text:style-name="P217"><text:s text:c="8"/></text:p>
      <text:p text:style-name="P61"><text:s text:c="10"/></text:p>
      <text:p text:style-name="P250"/>
      <text:p text:style-name="P221"/>
      <text:p text:style-name="P217"><text:s text:c="5"/></text:p>
      <text:p text:style-name="P223"/>
      <text:p text:style-name="P217"/>
      <text:p text:style-name="P61"/>
      <text:p text:style-name="P61"><text:s text:c="13"/></text:p>
      <text:p text:style-name="P217"><text:s text:c="13"/></text:p>
      <text:p text:style-name="P217"><text:s text:c="2"/></text:p>
      <text:p text:style-name="P61"><text:s text:c="13"/></text:p>
      <text:p text:style-name="P61"><text:s text:c="11"/></text:p>
      <text:p text:style-name="P217"><text:s text:c="2"/></text:p>
      <text:p text:style-name="P133"><text:s text:c="17"/></text:p>
      <text:p text:style-name="P217"><text:s text:c="2"/></text:p>
      <text:p text:style-name="P221"/>
      <text:p text:style-name="P217"><text:s text:c="6"/></text:p>
      <text:p text:style-name="P111"/>
      <text:p text:style-name="P223"/>
      <text:p text:style-name="P111"><text:s text:c="11"/></text:p>
      <text:p text:style-name="P223"/>
      <text:p text:style-name="P217"><text:s/></text:p>
      <text:p text:style-name="P211"/>
      <text:p text:style-name="P61"><text:s text:c="16"/></text:p>
      <text:p text:style-name="P61"><text:s text:c="14"/></text:p>
      <text:p text:style-name="P106"><text:s text:c="11"/></text:p>
      <text:p text:style-name="P217"><text:s text:c="4"/></text:p>
      <text:p text:style-name="P61"><text:s text:c="8"/></text:p>
      <text:p text:style-name="P61"/>
      <text:p text:style-name="P217"><text:s text:c="3"/></text:p>
      <text:p text:style-name="P210"><text:s text:c="4"/></text:p>
      <text:p text:style-name="P185"><text:s text:c="3"/><text:span text:style-name="T5"><text:s/></text:span></text:p>
      <text:p text:style-name="P217"><text:s/></text:p>
      <text:p text:style-name="P61"><text:s text:c="9"/></text:p>
      <text:p text:style-name="P217"><text:s text:c="2"/></text:p>
      <text:p text:style-name="P217"/>
      <text:p text:style-name="P61"><text:s text:c="6"/></text:p>
      <text:p text:style-name="P148"><text:s text:c="2"/></text:p>
      <text:p text:style-name="P49"><text:s text:c="16"/><text:span text:style-name="T5"><text:s text:c="2"/></text:span></text:p>
      <text:p text:style-name="P217"><text:s text:c="9"/></text:p>
      <text:p text:style-name="P61"><text:s text:c="12"/></text:p>
      <text:p text:style-name="P217"/>
      <text:p text:style-name="P61"><text:s text:c="9"/></text:p>
      <text:p text:style-name="P217"><text:s text:c="2"/></text:p>
      <text:p text:style-name="P61"><text:s text:c="10"/></text:p>
      <text:p text:style-name="P221"/>
      <text:p text:style-name="P138"><text:span text:style-name="T2"><text:s/></text:span><text:span text:style-name="T72"><text:s text:c="3"/></text:span></text:p>
      <text:p text:style-name="P217"><text:s/><text:span text:style-name="T85"><text:s text:c="2"/></text:span><text:s text:c="4"/></text:p>
      <text:p text:style-name="P80"><text:s text:c="10"/></text:p>
      <text:p text:style-name="P217"/>
      <text:p text:style-name="P250"><text:s/><text:span text:style-name="T5"><text:s/></text:span></text:p>
      <text:p text:style-name="P111"><text:s text:c="10"/></text:p>
      <text:p text:style-name="P61"><text:s text:c="8"/></text:p>
      <text:p text:style-name="P248"><text:s text:c="5"/><text:span text:style-name="T14"><text:s text:c="7"/></text:span></text:p>
      <text:p text:style-name="P265"><text:s/><text:span text:style-name="T73"><text:s text:c="2"/></text:span><text:span text:style-name="T22"><text:s/></text:span></text:p>
      <text:p text:style-name="P61"><text:s text:c="8"/></text:p>
      <text:p text:style-name="P221"/>
      <text:p text:style-name="P217"><text:s text:c="5"/></text:p>
      <text:p text:style-name="P217"><text:s/></text:p>
      <text:p text:style-name="P217"><text:s text:c="6"/></text:p>
      <text:p text:style-name="P49"><text:s text:c="12"/></text:p>
      <text:p text:style-name="P217"><text:s text:c="4"/></text:p>
      <text:p text:style-name="P128"><text:s text:c="13"/></text:p>
      <text:p text:style-name="P128"><text:s text:c="12"/></text:p>
      <text:p text:style-name="P217"><text:s/></text:p>
      <text:p text:style-name="P61"><text:s text:c="17"/></text:p>
      <text:p text:style-name="P61"><text:s text:c="19"/></text:p>
      <text:p text:style-name="P217"><text:s text:c="2"/></text:p>
      <text:p text:style-name="P111"/>
      <text:p text:style-name="P111"><text:s text:c="12"/></text:p>
      <text:p text:style-name="P46"><text:span text:style-name="T72"><text:s text:c="8"/></text:span><text:span text:style-name="T14"><text:s text:c="2"/></text:span></text:p>
      <text:p text:style-name="P221"/>
      <text:p text:style-name="P262"><text:s text:c="3"/></text:p>
      <text:p text:style-name="P248"><text:s text:c="10"/></text:p>
      <text:p text:style-name="P49"><text:s text:c="9"/></text:p>
      <text:p text:style-name="P61"><text:s text:c="14"/></text:p>
      <text:p text:style-name="P217"><text:s text:c="7"/></text:p>
      <text:p text:style-name="P217"><text:s text:c="5"/></text:p>
      <text:p text:style-name="P217"/>
      <text:p text:style-name="P61"><text:s text:c="12"/></text:p>
      <text:p text:style-name="P111"/>
      <text:p text:style-name="P49"><text:s text:c="15"/><text:span text:style-name="T5"><text:s/></text:span></text:p>
      <text:p text:style-name="P111"><text:s text:c="10"/></text:p>
      <text:p text:style-name="P111"><text:s text:c="11"/></text:p>
      <text:p text:style-name="P61"><text:s text:c="12"/></text:p>
      <text:p text:style-name="P217"><text:s text:c="8"/></text:p>
      <text:p text:style-name="P61"><text:s/></text:p>
      <text:p text:style-name="P61"><text:s text:c="8"/></text:p>
      <text:p text:style-name="P61"><text:s text:c="5"/></text:p>
      <text:p text:style-name="P217"><text:s text:c="11"/></text:p>
      <text:p text:style-name="P61"><text:s text:c="12"/></text:p>
      <text:p text:style-name="P61"><text:s text:c="10"/></text:p>
      <text:p text:style-name="P61"><text:s text:c="16"/></text:p>
      <text:p text:style-name="P217"><text:s text:c="5"/></text:p>
      <text:p text:style-name="P61"><text:s text:c="10"/></text:p>
      <text:p text:style-name="P111"><text:s text:c="8"/></text:p>
      <text:p text:style-name="P61"><text:s text:c="15"/></text:p>
      <text:p text:style-name="P49"><text:s text:c="9"/></text:p>
      <text:p text:style-name="P46"><text:s text:c="10"/><text:span text:style-name="T14"><text:s text:c="5"/></text:span></text:p>
      <text:p text:style-name="P221"/>
      <text:p text:style-name="P111"><text:s text:c="13"/></text:p>
      <text:p text:style-name="P61"><text:s text:c="8"/></text:p>
      <text:p text:style-name="P221"/>
      <text:p text:style-name="P111"><text:s text:c="14"/></text:p>
      <text:p text:style-name="P217"/>
      <text:p text:style-name="P217"><text:s text:c="3"/></text:p>
      <text:p text:style-name="P46"><text:s text:c="14"/></text:p>
      <text:p text:style-name="P217"><text:s text:c="6"/></text:p>
      <text:p text:style-name="P217"><text:s text:c="2"/></text:p>
      <text:p text:style-name="P217"><text:s text:c="6"/></text:p>
      <text:p text:style-name="P217"><text:s text:c="5"/></text:p>
      <text:p text:style-name="P61"><text:s text:c="16"/></text:p>
      <text:p text:style-name="P61"><text:s text:c="13"/></text:p>
      <text:p text:style-name="P111"><text:s text:c="17"/></text:p>
      <text:p text:style-name="P217"/>
      <text:p text:style-name="P217"><text:s text:c="2"/></text:p>
      <text:p text:style-name="P217"><text:s text:c="9"/></text:p>
      <text:p text:style-name="P61"><text:s text:c="12"/></text:p>
      <text:p text:style-name="P61"><text:s text:c="10"/></text:p>
      <text:p text:style-name="P61"><text:s text:c="9"/></text:p>
      <text:p text:style-name="P217"><text:s text:c="5"/></text:p>
      <text:p text:style-name="P217"/>
      <text:p text:style-name="P61"><text:s text:c="10"/></text:p>
      <text:p text:style-name="P111"/>
      <text:p text:style-name="P217"/>
      <text:p text:style-name="P61"><text:s text:c="14"/></text:p>
      <text:p text:style-name="P169"><text:s text:c="4"/></text:p>
      <text:p text:style-name="P49"><text:s text:c="2"/></text:p>
      <text:p text:style-name="P46"><text:s text:c="11"/></text:p>
      <text:p text:style-name="P46"><text:s text:c="11"/></text:p>
      <text:p text:style-name="P46"><text:s text:c="16"/></text:p>
      <text:p text:style-name="P49"><text:s text:c="15"/></text:p>
      <text:p text:style-name="P49"><text:s text:c="10"/></text:p>
      <text:p text:style-name="P144"><text:s text:c="6"/><text:span text:style-name="T72"><text:s text:c="2"/></text:span></text:p>
      <text:p text:style-name="P46"><text:span text:style-name="T72"><text:s text:c="2"/></text:span><text:span text:style-name="T14"><text:s text:c="13"/></text:span></text:p>
      <text:p text:style-name="P46"><text:s text:c="15"/></text:p>
      <text:p text:style-name="P46"><text:s text:c="19"/></text:p>
      <text:p text:style-name="P46"><text:s text:c="14"/></text:p>
      <text:p text:style-name="P68"/>
      <text:p text:style-name="P46"><text:s text:c="10"/></text:p>
      <text:p text:style-name="P46"><text:s text:c="17"/></text:p>
      <text:p text:style-name="P46"><text:s text:c="13"/><text:span text:style-name="T5"><text:s/></text:span></text:p>
      <text:p text:style-name="P46"><text:s text:c="15"/></text:p>
      <text:p text:style-name="P46"/>
      <text:p text:style-name="P46"><text:s text:c="12"/></text:p>
      <text:p text:style-name="P49"><text:s text:c="11"/></text:p>
      <text:p text:style-name="P46"><text:s text:c="16"/></text:p>
      <text:p text:style-name="P94"><text:s text:c="4"/></text:p>
      <text:p text:style-name="P46"><text:s text:c="9"/></text:p>
      <text:p text:style-name="P46"><text:s text:c="9"/><text:span text:style-name="T5"><text:s text:c="2"/></text:span></text:p>
      <text:p text:style-name="P46"><text:s text:c="12"/></text:p>
      <text:p text:style-name="P49"><text:s text:c="14"/></text:p>
      <text:p text:style-name="P49"><text:s text:c="8"/></text:p>
      <text:p text:style-name="P46"><text:s text:c="10"/></text:p>
      <text:p text:style-name="P46"><text:s text:c="13"/></text:p>
      <text:p text:style-name="P46"><text:s text:c="12"/></text:p>
      <text:p text:style-name="P49"><text:s text:c="8"/></text:p>
      <text:p text:style-name="P46"><text:s text:c="11"/></text:p>
      <text:p text:style-name="P67"/>
      <text:p text:style-name="P144"><text:s text:c="2"/><text:span text:style-name="T72"><text:s text:c="5"/></text:span></text:p>
      <text:p text:style-name="P46"><text:s text:c="17"/></text:p>
      <text:p text:style-name="P49"><text:s text:c="15"/></text:p>
      <text:p text:style-name="P46"><text:s text:c="12"/></text:p>
      <text:p text:style-name="P49"><text:s text:c="16"/></text:p>
      <text:p text:style-name="P61"><text:s text:c="12"/></text:p>
      <text:p text:style-name="P46"><text:s text:c="10"/></text:p>
      <text:p text:style-name="P46"><text:s text:c="14"/></text:p>
      <text:p text:style-name="P61"><text:s text:c="14"/></text:p>
      <text:p text:style-name="P49"><text:s text:c="12"/></text:p>
      <text:p text:style-name="P61"><text:s text:c="11"/></text:p>
      <text:p text:style-name="P46"><text:s text:c="11"/><text:span text:style-name="T72"><text:s text:c="3"/></text:span></text:p>
      <text:p text:style-name="P144"><text:s/></text:p>
      <text:p text:style-name="P145"/>
      <text:p text:style-name="P49"><text:s text:c="12"/></text:p>
      <text:p text:style-name="P49"><text:s text:c="9"/></text:p>
      <text:p text:style-name="P46"><text:s text:c="9"/><text:span text:style-name="T5"><text:s text:c="6"/></text:span></text:p>
      <text:p text:style-name="P145"/>
      <text:p text:style-name="P145"/>
      <text:p text:style-name="P145"><text:s text:c="3"/></text:p>
      <text:p text:style-name="P46"><text:s text:c="11"/></text:p>
      <text:p text:style-name="P46"><text:s text:c="15"/></text:p>
      <text:p text:style-name="P145"/>
      <text:p text:style-name="P49"><text:s text:c="15"/></text:p>
      <text:p text:style-name="P187"/>
      <text:p text:style-name="P185"><text:s text:c="2"/></text:p>
      <text:p text:style-name="P185"/>
      <text:p text:style-name="P148"/>
      <text:p text:style-name="P46"><text:s text:c="9"/></text:p>
      <text:p text:style-name="P49"><text:s text:c="14"/></text:p>
      <text:p text:style-name="P49"><text:s text:c="9"/></text:p>
      <text:p text:style-name="P264"/>
      <text:p text:style-name="P250"/>
      <text:p text:style-name="P46"><text:s text:c="9"/><text:span text:style-name="T72"><text:s text:c="3"/></text:span></text:p>
      <text:p text:style-name="P145"/>
      <text:p text:style-name="P46"><text:s text:c="10"/></text:p>
      <text:p text:style-name="P46"><text:s text:c="12"/></text:p>
      <text:p text:style-name="P46"><text:s text:c="9"/></text:p>
      <text:p text:style-name="P265"><text:s/><text:span text:style-name="T73"><text:s/></text:span><text:span text:style-name="T43"><text:s text:c="3"/></text:span><text:span text:style-name="T15"><text:s text:c="2"/></text:span></text:p>
      <text:p text:style-name="P172"/>
      <text:p text:style-name="P265"><text:s/></text:p>
      <text:p text:style-name="P46"><text:s text:c="7"/></text:p>
      <text:p text:style-name="P221"/>
      <text:p text:style-name="P148"/>
      <text:p text:style-name="P46"><text:s text:c="10"/></text:p>
      <text:p text:style-name="P46"><text:s text:c="15"/></text:p>
      <text:p text:style-name="P49"><text:s text:c="14"/></text:p>
      <text:p text:style-name="P262"><text:s text:c="2"/></text:p>
      <text:p text:style-name="P49"><text:s text:c="12"/></text:p>
      <text:p text:style-name="P46"><text:s text:c="6"/></text:p>
      <text:p text:style-name="P250"><text:s text:c="3"/></text:p>
      <text:p text:style-name="P144"><text:s text:c="3"/></text:p>
      <text:p text:style-name="P152"><text:s/></text:p>
      <text:p text:style-name="P185"/>
      <text:p text:style-name="P49"><text:s text:c="10"/></text:p>
      <text:p text:style-name="P252"/>
      <text:p text:style-name="P49"><text:s text:c="14"/></text:p>
      <text:p text:style-name="P217"/>
      <text:p text:style-name="P217"/>
      <text:p text:style-name="P46"><text:span text:style-name="T72"><text:s text:c="19"/></text:span><text:span text:style-name="T14"><text:s/></text:span></text:p>
      <text:p text:style-name="P262"><text:s/></text:p>
      <text:p text:style-name="P173"><text:s text:c="6"/></text:p>
      <text:p text:style-name="P49"><text:s text:c="12"/></text:p>
      <text:p text:style-name="P250"/>
      <text:p text:style-name="P217"/>
      <text:p text:style-name="P46"/>
      <text:p text:style-name="P46"><text:s text:c="16"/></text:p>
      <text:p text:style-name="P46"><text:s text:c="6"/></text:p>
      <text:p text:style-name="P221"/>
      <text:p text:style-name="P250"><text:s text:c="2"/></text:p>
      <text:p text:style-name="P132"/>
      <text:p text:style-name="P222"/>
      <text:p text:style-name="P250"><text:s text:c="10"/></text:p>
      <text:p text:style-name="P46"><text:s text:c="8"/></text:p>
      <text:p text:style-name="P217"/>
      <text:p text:style-name="P148"><text:s text:c="2"/></text:p>
      <text:p text:style-name="P221"/>
      <text:p text:style-name="P46"><text:s text:c="15"/></text:p>
      <text:p text:style-name="P17"/>
      <text:p text:style-name="P49"><text:s text:c="13"/></text:p>
      <text:p text:style-name="P46"><text:s text:c="12"/><text:span text:style-name="T72"><text:s/></text:span></text:p>
      <text:p text:style-name="P46"><text:s text:c="15"/><text:span text:style-name="T72"><text:s/></text:span></text:p>
      <text:p text:style-name="P106"><text:s text:c="5"/></text:p>
      <text:p text:style-name="P49"/>
      <text:p text:style-name="P49"><text:s text:c="6"/></text:p>
      <text:p text:style-name="P49"><text:s text:c="11"/></text:p>
      <text:p text:style-name="P265"/>
      <text:p text:style-name="P217"/>
      <text:p text:style-name="P49"><text:s text:c="14"/></text:p>
      <text:p text:style-name="P217"/>
      <text:p text:style-name="P61"><text:s text:c="10"/></text:p>
      <text:p text:style-name="P217"/>
      <text:p text:style-name="P219"><text:s/></text:p>
      <text:p text:style-name="P262"><text:s text:c="3"/></text:p>
      <text:p text:style-name="P61"><text:s text:c="5"/></text:p>
      <text:p text:style-name="P250"><text:s/></text:p>
      <text:p text:style-name="P145"><text:s/></text:p>
      <text:p text:style-name="P168"/>
      <text:p text:style-name="P217"/>
      <text:p text:style-name="P148"><text:s text:c="6"/></text:p>
      <text:p text:style-name="P61"><text:s text:c="14"/></text:p>
      <text:p text:style-name="P221"/>
      <text:p text:style-name="P221"/>
      <text:p text:style-name="P168"><text:s/></text:p>
      <text:p text:style-name="P148"><text:s/></text:p>
      <text:p text:style-name="P46"><text:s text:c="8"/></text:p>
      <text:p text:style-name="P218"><text:s text:c="3"/></text:p>
      <text:p text:style-name="P145"/>
      <text:p text:style-name="P49"><text:s text:c="8"/></text:p>
      <text:p text:style-name="P217"><text:s text:c="15"/></text:p>
      <text:p text:style-name="P168"><text:s text:c="5"/></text:p>
      <text:p text:style-name="P248"><text:s/><text:span text:style-name="T14"><text:s text:c="7"/></text:span></text:p>
      <text:p text:style-name="P61"><text:s text:c="9"/></text:p>
      <text:p text:style-name="P262"><text:span text:style-name="T72"><text:s text:c="4"/></text:span><text:span text:style-name="T17"><text:s/></text:span></text:p>
      <text:p text:style-name="P61"><text:s text:c="6"/></text:p>
      <text:p text:style-name="P217"/>
      <text:p text:style-name="P61"><text:s text:c="9"/></text:p>
      <text:p text:style-name="P110"/>
      <text:p text:style-name="P148"><text:s text:c="2"/></text:p>
      <text:p text:style-name="P217"><text:s/></text:p>
      <text:p text:style-name="P217"><text:s/></text:p>
      <text:p text:style-name="P217"><text:s text:c="4"/></text:p>
      <text:p text:style-name="P262"><text:s text:c="4"/></text:p>
      <text:p text:style-name="P61"><text:s text:c="10"/></text:p>
      <text:p text:style-name="P49"><text:s text:c="11"/></text:p>
      <text:p text:style-name="P252"/>
      <text:p text:style-name="P61"><text:s text:c="10"/></text:p>
      <text:p text:style-name="P148"><text:span text:style-name="T40"><text:s/></text:span><text:s/></text:p>
      <text:p text:style-name="P111"/>
      <text:p text:style-name="P217"><text:s text:c="5"/></text:p>
      <text:p text:style-name="P268"><text:s text:c="2"/><text:span text:style-name="T5"><text:s/></text:span></text:p>
      <text:p text:style-name="P262"><text:s/><text:span text:style-name="T17"><text:s text:c="3"/></text:span></text:p>
      <text:p text:style-name="P185"><text:s/></text:p>
      <text:p text:style-name="P217"><text:s/></text:p>
      <text:p text:style-name="P61"><text:s/></text:p>
      <text:p text:style-name="P169"><text:s text:c="5"/></text:p>
      <text:p text:style-name="P276"/>
      <text:p text:style-name="P217"><text:s text:c="9"/></text:p>
      <text:p text:style-name="P217"><text:s text:c="18"/></text:p>
      <text:p text:style-name="P221"/>
      <text:p text:style-name="P217"/>
      <text:p text:style-name="P217"/>
      <text:p text:style-name="P111"/>
      <text:p text:style-name="P217"/>
      <text:p text:style-name="P262"><text:s text:c="3"/></text:p>
      <text:p text:style-name="P46"><text:s text:c="11"/><text:span text:style-name="T14"><text:s/></text:span></text:p>
      <text:p text:style-name="P111"><text:s text:c="15"/></text:p>
      <text:p text:style-name="P61"><text:s text:c="10"/></text:p>
      <text:p text:style-name="P46"><text:s text:c="9"/></text:p>
      <text:p text:style-name="P250"><text:s text:c="2"/></text:p>
      <text:p text:style-name="P61"><text:s text:c="7"/></text:p>
      <text:p text:style-name="P250"><text:s/></text:p>
      <text:p text:style-name="P217"/>
      <text:p text:style-name="P61"><text:s text:c="12"/></text:p>
      <text:p text:style-name="P217"/>
      <text:p text:style-name="P217"><text:s text:c="3"/></text:p>
      <text:p text:style-name="P61"><text:s text:c="15"/></text:p>
      <text:p text:style-name="P217"><text:s/></text:p>
      <text:p text:style-name="P223"/>
      <text:p text:style-name="P61"><text:s text:c="21"/></text:p>
      <text:p text:style-name="P110"/>
      <text:p text:style-name="P61"><text:s text:c="13"/></text:p>
      <text:p text:style-name="P107"/>
      <text:p text:style-name="P213"/>
      <text:p text:style-name="P217"/>
      <text:p text:style-name="P217"><text:s text:c="3"/></text:p>
      <text:p text:style-name="P111"><text:s text:c="11"/></text:p>
      <text:p text:style-name="P265"><text:s text:c="3"/></text:p>
      <text:p text:style-name="P61"><text:s text:c="17"/></text:p>
      <text:p text:style-name="P279"><text:s text:c="2"/></text:p>
      <text:p text:style-name="P250"><text:s text:c="2"/><text:span text:style-name="T5"><text:s text:c="10"/></text:span></text:p>
      <text:p text:style-name="P111"><text:s text:c="14"/></text:p>
      <text:p text:style-name="P111"><text:s text:c="14"/></text:p>
      <text:p text:style-name="P217"><text:s text:c="2"/></text:p>
      <text:p text:style-name="P61"><text:s text:c="9"/></text:p>
      <text:p text:style-name="P217"/>
      <text:p text:style-name="P217"><text:s text:c="8"/></text:p>
      <text:p text:style-name="P148"><text:s text:c="2"/></text:p>
      <text:p text:style-name="P61"><text:s text:c="10"/></text:p>
      <text:p text:style-name="P217"><text:s text:c="6"/></text:p>
      <text:p text:style-name="P221"/>
      <text:p text:style-name="P248"><text:s text:c="5"/><text:span text:style-name="T14"><text:s text:c="3"/></text:span></text:p>
      <text:p text:style-name="P111"><text:s text:c="13"/></text:p>
      <text:p text:style-name="P61"><text:s text:c="12"/></text:p>
      <text:p text:style-name="P217"/>
      <text:p text:style-name="P265"><text:s text:c="3"/><text:span text:style-name="T15"><text:s text:c="4"/></text:span></text:p>
      <text:p text:style-name="P250"><text:s text:c="3"/></text:p>
      <text:p text:style-name="P217"><text:s text:c="3"/></text:p>
      <text:p text:style-name="P217"><text:s text:c="5"/></text:p>
      <text:p text:style-name="P276"><text:s text:c="12"/></text:p>
      <text:p text:style-name="P217"/>
      <text:p text:style-name="P262"><text:s text:c="2"/><text:span text:style-name="T17"><text:s text:c="4"/></text:span></text:p>
      <text:p text:style-name="P217"><text:s text:c="11"/></text:p>
      <text:p text:style-name="P61"><text:s text:c="9"/></text:p>
      <text:p text:style-name="P217"/>
      <text:p text:style-name="P104"><text:s text:c="11"/><text:span text:style-name="T14"><text:s text:c="5"/></text:span></text:p>
      <text:p text:style-name="P217"><text:s text:c="2"/></text:p>
      <text:p text:style-name="P61"><text:s text:c="14"/></text:p>
      <text:p text:style-name="P46"><text:s text:c="8"/><text:span text:style-name="T56"><text:s/></text:span><text:span text:style-name="T14"><text:s/></text:span></text:p>
      <text:p text:style-name="P217"/>
      <text:p text:style-name="P49"><text:s text:c="9"/></text:p>
      <text:p text:style-name="P217"><text:s/></text:p>
      <text:p text:style-name="P217"/>
      <text:p text:style-name="P61"><text:s text:c="16"/></text:p>
      <text:p text:style-name="P61"><text:s text:c="14"/></text:p>
      <text:p text:style-name="P61"><text:s text:c="8"/></text:p>
      <text:p text:style-name="P264"/>
      <text:p text:style-name="P61"><text:s text:c="9"/></text:p>
      <text:p text:style-name="P223"/>
      <text:p text:style-name="P217"><text:s/></text:p>
      <text:p text:style-name="P61"><text:s text:c="13"/></text:p>
      <text:p text:style-name="P217"/>
      <text:p text:style-name="P217"><text:s text:c="3"/></text:p>
      <text:p text:style-name="P61"><text:s text:c="8"/></text:p>
      <text:p text:style-name="P61"><text:s text:c="17"/></text:p>
      <text:p text:style-name="P111"><text:s text:c="15"/></text:p>
      <text:p text:style-name="P221"/>
      <text:p text:style-name="P61"><text:s text:c="17"/></text:p>
      <text:p text:style-name="P265"><text:s text:c="2"/></text:p>
      <text:p text:style-name="P217"><text:s text:c="2"/></text:p>
      <text:p text:style-name="P262"><text:s/><text:span text:style-name="T17"><text:s text:c="4"/></text:span></text:p>
      <text:p text:style-name="P148"><text:s text:c="2"/></text:p>
      <text:p text:style-name="P217"><text:s text:c="3"/></text:p>
      <text:p text:style-name="P46"><text:s text:c="8"/></text:p>
      <text:p text:style-name="P49"/>
      <text:p text:style-name="P61"><text:s text:c="6"/></text:p>
      <text:p text:style-name="P250"><text:s text:c="2"/></text:p>
      <text:p text:style-name="P106"><text:s text:c="12"/></text:p>
      <text:p text:style-name="P61"/>
      <text:p text:style-name="P217"><text:s/></text:p>
      <text:p text:style-name="P168"><text:s/></text:p>
      <text:p text:style-name="P223"/>
      <text:p text:style-name="P221"/>
      <text:p text:style-name="P111"><text:s text:c="12"/></text:p>
      <text:p text:style-name="P217"><text:s text:c="6"/></text:p>
      <text:p text:style-name="P61"><text:s text:c="11"/></text:p>
      <text:p text:style-name="P111"><text:s text:c="13"/></text:p>
      <text:p text:style-name="P49"><text:s text:c="8"/><text:span text:style-name="T5"><text:s text:c="3"/></text:span></text:p>
      <text:p text:style-name="P111"><text:s text:c="4"/></text:p>
      <text:p text:style-name="P61"><text:s text:c="14"/></text:p>
      <text:p text:style-name="P111"><text:s text:c="5"/></text:p>
      <text:p text:style-name="P106"><text:s text:c="13"/><text:span text:style-name="T5"><text:s/></text:span></text:p>
      <text:p text:style-name="P217"><text:s text:c="5"/></text:p>
      <text:p text:style-name="P46"><text:s text:c="10"/><text:span text:style-name="T72"><text:s text:c="5"/></text:span><text:span text:style-name="T14"><text:s/></text:span></text:p>
      <text:p text:style-name="P217"/>
      <text:p text:style-name="P61"/>
      <text:p text:style-name="P201"><text:s text:c="3"/></text:p>
      <text:p text:style-name="P61"><text:s text:c="14"/></text:p>
      <text:p text:style-name="P61"><text:s text:c="15"/></text:p>
      <text:p text:style-name="P217"/>
      <text:p text:style-name="P46"><text:s text:c="18"/><text:span text:style-name="T14"><text:s/></text:span></text:p>
      <text:p text:style-name="P49"><text:s text:c="9"/></text:p>
      <text:p text:style-name="P262"><text:s/></text:p>
      <text:p text:style-name="P217"/>
      <text:p text:style-name="P217"><text:s text:c="3"/></text:p>
      <text:p text:style-name="P217"><text:s text:c="7"/></text:p>
      <text:p text:style-name="P67"/>
      <text:p text:style-name="P221"/>
      <text:p text:style-name="P217"/>
      <text:p text:style-name="P61"><text:s text:c="15"/></text:p>
      <text:p text:style-name="P46"><text:s text:c="11"/><text:span text:style-name="T14"><text:s text:c="2"/></text:span></text:p>
      <text:p text:style-name="P217"/>
      <text:p text:style-name="P61"><text:s text:c="15"/></text:p>
      <text:p text:style-name="P217"/>
      <text:p text:style-name="P221"/>
      <text:p text:style-name="P148"/>
      <text:p text:style-name="P223"/>
      <text:p text:style-name="P61"><text:s text:c="10"/></text:p>
      <text:p text:style-name="P46"><text:s text:c="4"/></text:p>
      <text:p text:style-name="P217"><text:s text:c="3"/></text:p>
      <text:p text:style-name="P221"/>
      <text:p text:style-name="P217"><text:s text:c="6"/></text:p>
      <text:p text:style-name="P217"><text:s text:c="4"/></text:p>
      <text:p text:style-name="P61"><text:s text:c="9"/></text:p>
      <text:p text:style-name="P61"><text:s text:c="13"/></text:p>
      <text:p text:style-name="P61"><text:s text:c="12"/></text:p>
      <text:p text:style-name="P110"/>
      <text:p text:style-name="P61"><text:s text:c="14"/></text:p>
      <text:p text:style-name="P217"><text:s text:c="13"/></text:p>
      <text:p text:style-name="P111"><text:s text:c="9"/></text:p>
      <text:p text:style-name="P221"/>
      <text:p text:style-name="P217"><text:s text:c="5"/><text:span text:style-name="T85"><text:s text:c="3"/></text:span></text:p>
      <text:p text:style-name="P223"/>
      <text:p text:style-name="P61"><text:s text:c="15"/></text:p>
      <text:p text:style-name="P111"><text:s text:c="12"/></text:p>
      <text:p text:style-name="P217"><text:s text:c="3"/></text:p>
      <text:p text:style-name="P221"/>
      <text:p text:style-name="P217"><text:s text:c="7"/></text:p>
      <text:p text:style-name="P250"/>
      <text:p text:style-name="P248"/>
      <text:p text:style-name="P49"><text:s text:c="13"/></text:p>
      <text:p text:style-name="P265"><text:s text:c="4"/><text:span text:style-name="T43"><text:s text:c="2"/></text:span><text:span text:style-name="T15"><text:s text:c="2"/></text:span></text:p>
      <text:p text:style-name="P217"/>
      <text:p text:style-name="P46"><text:s text:c="11"/></text:p>
      <text:p text:style-name="P46"><text:s text:c="8"/></text:p>
      <text:p text:style-name="P168"/>
      <text:p text:style-name="P217"><text:s text:c="4"/></text:p>
      <text:p text:style-name="P114"/>
      <text:p text:style-name="P111"><text:s text:c="12"/></text:p>
      <text:p text:style-name="P111"><text:s text:c="16"/></text:p>
      <text:p text:style-name="P154"/>
      <text:p text:style-name="P217"><text:s text:c="8"/></text:p>
      <text:p text:style-name="P217"><text:s text:c="2"/></text:p>
      <text:p text:style-name="P61"/>
      <text:p text:style-name="P61"><text:s text:c="13"/></text:p>
      <text:p text:style-name="P61"><text:s text:c="12"/></text:p>
      <text:p text:style-name="P61"><text:s text:c="13"/></text:p>
      <text:p text:style-name="P61"><text:s text:c="11"/></text:p>
      <text:p text:style-name="P67"/>
      <text:p text:style-name="P217"><text:s text:c="12"/></text:p>
      <text:p text:style-name="P49"/>
      <text:p text:style-name="P248"><text:s text:c="3"/></text:p>
      <text:p text:style-name="P221"/>
      <text:p text:style-name="P217"><text:s text:c="4"/></text:p>
      <text:p text:style-name="P217"/>
      <text:p text:style-name="P61"><text:s text:c="13"/></text:p>
      <text:p text:style-name="P110"/>
      <text:p text:style-name="P262"><text:s/><text:span text:style-name="T17"><text:s text:c="2"/></text:span><text:span text:style-name="T88"><text:s/></text:span></text:p>
      <text:p text:style-name="P67"/>
      <text:p text:style-name="P61"><text:s text:c="14"/></text:p>
      <text:p text:style-name="P61"><text:s text:c="11"/></text:p>
      <text:p text:style-name="P250"><text:s/></text:p>
      <text:p text:style-name="P250"><text:s text:c="6"/></text:p>
      <text:p text:style-name="P111"><text:s text:c="9"/></text:p>
      <text:p text:style-name="P250"><text:s/><text:span text:style-name="T5"><text:s/></text:span></text:p>
      <text:p text:style-name="P223"/>
      <text:p text:style-name="P265"><text:s/><text:span text:style-name="T57"><text:s text:c="3"/></text:span><text:span text:style-name="T59"><text:s/></text:span></text:p>
      <text:p text:style-name="P217"/>
      <text:p text:style-name="P61"><text:s text:c="14"/></text:p>
      <text:p text:style-name="P61"><text:s text:c="6"/></text:p>
      <text:p text:style-name="P217"/>
      <text:p text:style-name="P111"><text:s text:c="14"/></text:p>
      <text:p text:style-name="P217"/>
      <text:p text:style-name="P217"/>
      <text:p text:style-name="P217"/>
      <text:p text:style-name="P217"><text:s text:c="3"/></text:p>
      <text:p text:style-name="P61"/>
      <text:p text:style-name="P90"><text:span text:style-name="T74"><text:s text:c="6"/></text:span><text:span text:style-name="T17"><text:s text:c="5"/></text:span></text:p>
      <text:p text:style-name="P61"><text:s text:c="19"/></text:p>
      <text:p text:style-name="P265"><text:span text:style-name="T5"><text:s/></text:span><text:span text:style-name="T15"><text:s text:c="2"/></text:span></text:p>
      <text:p text:style-name="P217"><text:s text:c="3"/></text:p>
      <text:p text:style-name="P217"/>
      <text:p text:style-name="P111"><text:s text:c="11"/></text:p>
      <text:p text:style-name="P217"><text:s text:c="5"/></text:p>
      <text:p text:style-name="P217"/>
      <text:p text:style-name="P217"><text:s/></text:p>
      <text:p text:style-name="P111"><text:s text:c="14"/></text:p>
      <text:p text:style-name="P217"/>
      <text:p text:style-name="P217"><text:s text:c="2"/></text:p>
      <text:p text:style-name="P61"><text:s text:c="13"/></text:p>
      <text:p text:style-name="P125"/>
      <text:p text:style-name="P111"><text:s text:c="10"/><text:span text:style-name="T85"><text:s text:c="3"/></text:span><text:s/></text:p>
      <text:p text:style-name="P61"><text:s text:c="13"/></text:p>
      <text:p text:style-name="P61"><text:s text:c="13"/></text:p>
      <text:p text:style-name="P61"><text:s text:c="11"/></text:p>
      <text:p text:style-name="P217"><text:s/></text:p>
      <text:p text:style-name="P61"/>
      <text:p text:style-name="P217"><text:s text:c="4"/></text:p>
      <text:p text:style-name="P192"><text:s text:c="6"/></text:p>
      <text:p text:style-name="P46"><text:s text:c="13"/></text:p>
      <text:p text:style-name="P61"><text:s text:c="12"/></text:p>
      <text:p text:style-name="P217"><text:s text:c="3"/></text:p>
      <text:p text:style-name="P61"><text:s text:c="8"/></text:p>
      <text:p text:style-name="P61"><text:s text:c="15"/></text:p>
      <text:p text:style-name="P46"/>
      <text:p text:style-name="P49"><text:s text:c="8"/></text:p>
      <text:p text:style-name="P217"/>
      <text:p text:style-name="P46"><text:span text:style-name="T14"><text:s/></text:span><text:span text:style-name="T86"><text:s text:c="2"/></text:span><text:span text:style-name="T14"><text:s text:c="3"/></text:span></text:p>
      <text:p text:style-name="P46"><text:s text:c="9"/><text:span text:style-name="T72"><text:s text:c="2"/></text:span></text:p>
      <text:p text:style-name="P111"><text:s text:c="6"/></text:p>
      <text:p text:style-name="P223"/>
      <text:p text:style-name="P111"><text:s text:c="12"/></text:p>
      <text:p text:style-name="P61"/>
      <text:p text:style-name="P217"><text:s text:c="3"/></text:p>
      <text:p text:style-name="P223"/>
      <text:p text:style-name="P61"><text:s text:c="16"/></text:p>
      <text:p text:style-name="P217"/>
      <text:p text:style-name="P221"/>
      <text:p text:style-name="P217"/>
      <text:p text:style-name="P217"><text:s text:c="5"/></text:p>
      <text:p text:style-name="P217"><text:s/></text:p>
      <text:p text:style-name="P217"/>
      <text:p text:style-name="P217"/>
      <text:p text:style-name="P217"/>
      <text:p text:style-name="P61"><text:s text:c="8"/></text:p>
      <text:p text:style-name="P169"/>
      <text:p text:style-name="P61"><text:s text:c="9"/></text:p>
      <text:p text:style-name="P217"><text:s/><text:span text:style-name="T85"><text:s text:c="4"/></text:span></text:p>
      <text:p text:style-name="P238"><text:s text:c="5"/><text:span text:style-name="T73"><text:s text:c="2"/></text:span></text:p>
      <text:p text:style-name="P217"/>
      <text:p text:style-name="P217"><text:s text:c="3"/></text:p>
      <text:p text:style-name="P61"><text:s text:c="32"/></text:p>
      <text:p text:style-name="P217"><text:s text:c="3"/></text:p>
      <text:p text:style-name="P217"><text:s text:c="7"/></text:p>
      <text:p text:style-name="P61"><text:s text:c="11"/></text:p>
      <text:p text:style-name="P35"><text:s text:c="15"/></text:p>
      <text:p text:style-name="P217"/>
      <text:p text:style-name="P125"><text:s text:c="13"/></text:p>
      <text:p text:style-name="P61"/>
      <text:p text:style-name="P46"><text:s text:c="12"/><text:span text:style-name="T14"><text:s text:c="2"/></text:span></text:p>
      <text:p text:style-name="P217"/>
      <text:p text:style-name="P217"><text:s/></text:p>
      <text:p text:style-name="P61"/>
      <text:p text:style-name="P217"><text:s text:c="3"/></text:p>
      <text:p text:style-name="P250"><text:s text:c="3"/><text:span text:style-name="T5"><text:s text:c="2"/></text:span></text:p>
      <text:p text:style-name="P217"><text:s/></text:p>
      <text:p text:style-name="P217"><text:s text:c="2"/></text:p>
      <text:p text:style-name="P217"><text:s text:c="6"/></text:p>
      <text:p text:style-name="P111"><text:s text:c="12"/></text:p>
      <text:p text:style-name="P217"><text:s text:c="4"/></text:p>
      <text:p text:style-name="P90"><text:span text:style-name="T74"><text:s text:c="14"/></text:span><text:span text:style-name="T14"><text:s/></text:span></text:p>
      <text:p text:style-name="P217"><text:s text:c="4"/></text:p>
      <text:p text:style-name="P217"/>
      <text:p text:style-name="P46"><text:s text:c="12"/></text:p>
      <text:p text:style-name="P223"/>
      <text:p text:style-name="P46"><text:s text:c="9"/></text:p>
      <text:p text:style-name="P262"><text:s text:c="2"/></text:p>
      <text:p text:style-name="P61"/>
      <text:p text:style-name="P61"><text:s text:c="12"/></text:p>
      <text:p text:style-name="P114"/>
      <text:p text:style-name="P111"><text:s text:c="20"/></text:p>
      <text:p text:style-name="P61"><text:s text:c="16"/></text:p>
      <text:p text:style-name="P46"><text:s text:c="9"/></text:p>
      <text:p text:style-name="P61"><text:s text:c="11"/></text:p>
      <text:p text:style-name="P217"><text:s text:c="7"/></text:p>
      <text:p text:style-name="P49"/>
      <text:p text:style-name="P217"><text:s/></text:p>
      <text:p text:style-name="P61"/>
      <text:p text:style-name="P61"><text:s text:c="12"/></text:p>
      <text:p text:style-name="P217"><text:s text:c="3"/></text:p>
      <text:p text:style-name="P217"><text:s/></text:p>
      <text:p text:style-name="P217"><text:s text:c="8"/></text:p>
      <text:p text:style-name="P221"/>
      <text:p text:style-name="P111"><text:s text:c="8"/></text:p>
      <text:p text:style-name="P61"><text:s text:c="11"/></text:p>
      <text:p text:style-name="P61"/>
      <text:p text:style-name="P250"><text:s/><text:span text:style-name="T5"><text:s text:c="2"/></text:span></text:p>
      <text:p text:style-name="P111"><text:s text:c="6"/></text:p>
      <text:p text:style-name="P61"><text:s text:c="9"/></text:p>
      <text:p text:style-name="P49"><text:s text:c="11"/></text:p>
      <text:p text:style-name="P61"><text:s text:c="14"/></text:p>
      <text:p text:style-name="P61"><text:s text:c="8"/></text:p>
      <text:p text:style-name="P217"/>
      <text:p text:style-name="P61"><text:s text:c="22"/></text:p>
      <text:p text:style-name="P217"/>
      <text:p text:style-name="P217"><text:s text:c="3"/></text:p>
      <text:p text:style-name="P217"><text:s text:c="13"/></text:p>
      <text:p text:style-name="P61"><text:s text:c="13"/></text:p>
      <text:p text:style-name="P61"/>
      <text:p text:style-name="P111"><text:s text:c="17"/></text:p>
      <text:p text:style-name="P217"><text:s text:c="2"/></text:p>
      <text:p text:style-name="P217"><text:span text:style-name="T85"><text:s text:c="4"/></text:span><text:s text:c="2"/></text:p>
      <text:p text:style-name="P61"><text:s text:c="12"/></text:p>
      <text:p text:style-name="P217"><text:s text:c="4"/></text:p>
      <text:p text:style-name="P168"/>
      <text:p text:style-name="P61"/>
      <text:p text:style-name="P61"><text:s text:c="10"/></text:p>
      <text:p text:style-name="P217"><text:s text:c="6"/></text:p>
      <text:p text:style-name="P49"/>
      <text:p text:style-name="P49"><text:s text:c="12"/><text:span text:style-name="T5"><text:s text:c="2"/></text:span></text:p>
      <text:p text:style-name="P217"><text:s text:c="11"/></text:p>
      <text:p text:style-name="P49"/>
      <text:p text:style-name="P217"><text:s text:c="4"/></text:p>
      <text:p text:style-name="P262"><text:s text:c="2"/><text:span text:style-name="T74"><text:s/></text:span></text:p>
      <text:p text:style-name="P217"/>
      <text:p text:style-name="P217"><text:s/></text:p>
      <text:p text:style-name="P111"><text:s text:c="13"/></text:p>
      <text:p text:style-name="P61"><text:s text:c="2"/></text:p>
      <text:p text:style-name="P217"><text:s text:c="2"/><text:span text:style-name="T54"><text:s/></text:span><text:s text:c="20"/></text:p>
      <text:p text:style-name="P217"/>
      <text:p text:style-name="P217"><text:s text:c="2"/></text:p>
      <text:p text:style-name="P217"/>
      <text:p text:style-name="P125"><text:s text:c="11"/></text:p>
      <text:p text:style-name="P111"/>
      <text:p text:style-name="P217"><text:s/></text:p>
      <text:p text:style-name="P268"><text:s text:c="3"/></text:p>
      <text:p text:style-name="P61"/>
      <text:p text:style-name="P111"><text:s text:c="12"/></text:p>
      <text:p text:style-name="P61"/>
      <text:p text:style-name="P61"><text:s text:c="11"/></text:p>
      <text:p text:style-name="P61"><text:s text:c="11"/></text:p>
      <text:p text:style-name="P46"><text:s text:c="13"/></text:p>
      <text:p text:style-name="P217"><text:s/></text:p>
      <text:p text:style-name="P262"><text:s/><text:span text:style-name="T17"><text:s text:c="3"/></text:span></text:p>
      <text:p text:style-name="P49"><text:s text:c="11"/></text:p>
      <text:p text:style-name="P217"/>
      <text:p text:style-name="P61"/>
      <text:p text:style-name="P61"><text:s text:c="12"/></text:p>
      <text:p text:style-name="P250"><text:s text:c="5"/></text:p>
      <text:p text:style-name="P217"/>
      <text:p text:style-name="P217"><text:s text:c="5"/></text:p>
      <text:p text:style-name="P61"><text:s text:c="10"/></text:p>
      <text:p text:style-name="P49"><text:s text:c="16"/></text:p>
      <text:p text:style-name="P61"><text:s text:c="5"/></text:p>
      <text:p text:style-name="P217"/>
      <text:p text:style-name="P217"><text:s/></text:p>
      <text:p text:style-name="P217"><text:s/></text:p>
      <text:p text:style-name="P111"/>
      <text:p text:style-name="P46"><text:s text:c="12"/><text:span text:style-name="T72"><text:s/></text:span><text:span text:style-name="T14"><text:s text:c="4"/></text:span></text:p>
      <text:p text:style-name="P221"/>
      <text:p text:style-name="P104"><text:s text:c="9"/></text:p>
      <text:p text:style-name="P61"><text:s text:c="10"/></text:p>
      <text:p text:style-name="P250"><text:s text:c="2"/></text:p>
      <text:p text:style-name="P217"><text:s text:c="4"/></text:p>
      <text:p text:style-name="P250"/>
      <text:p text:style-name="P217"><text:s text:c="2"/></text:p>
      <text:p text:style-name="P217"/>
      <text:p text:style-name="P217"/>
      <text:p text:style-name="P250"><text:s/></text:p>
      <text:p text:style-name="P168"><text:s text:c="14"/></text:p>
      <text:p text:style-name="P61"><text:s text:c="11"/></text:p>
      <text:p text:style-name="P144"><text:span text:style-name="T72"><text:s text:c="4"/></text:span><text:span text:style-name="T14"><text:s/></text:span></text:p>
      <text:p text:style-name="P49"><text:s text:c="9"/></text:p>
      <text:p text:style-name="P217"/>
      <text:p text:style-name="P111"><text:s text:c="14"/></text:p>
      <text:p text:style-name="P217"><text:s/></text:p>
      <text:p text:style-name="P46"><text:s text:c="9"/></text:p>
      <text:p text:style-name="P250"/>
      <text:p text:style-name="P221"/>
      <text:p text:style-name="P217"><text:s text:c="12"/></text:p>
      <text:p text:style-name="P221"/>
      <text:p text:style-name="P265"><text:s/></text:p>
      <text:p text:style-name="P61"/>
      <text:p text:style-name="P46"><text:s text:c="11"/></text:p>
      <text:p text:style-name="P49"><text:soft-page-break/><text:s text:c="6"/></text:p>
      <text:p text:style-name="P250"><text:s/><text:span text:style-name="T5"><text:s text:c="6"/></text:span></text:p>
      <text:p text:style-name="P221"/>
      <text:p text:style-name="P217"><text:s text:c="4"/></text:p>
      <text:p text:style-name="P49"><text:s text:c="3"/><text:span text:style-name="T5"><text:s text:c="12"/></text:span></text:p>
      <text:p text:style-name="P61"><text:s text:c="15"/></text:p>
      <text:p text:style-name="P217"><text:s text:c="5"/></text:p>
      <text:p text:style-name="P238"><text:s text:c="2"/><text:span text:style-name="T85"><text:s/></text:span><text:span text:style-name="T73"><text:s/></text:span></text:p>
      <text:p text:style-name="P106"><text:s text:c="12"/></text:p>
      <text:p text:style-name="P111"><text:s text:c="7"/></text:p>
      <text:p text:style-name="P217"/>
      <text:p text:style-name="P217"/>
      <text:p text:style-name="P217"/>
      <text:p text:style-name="P221"/>
      <text:p text:style-name="P217"><text:s/></text:p>
      <text:p text:style-name="P221"/>
      <text:p text:style-name="P261"><text:s/></text:p>
      <text:p text:style-name="P262"><text:s text:c="3"/><text:span text:style-name="T58"><text:s/></text:span></text:p>
      <text:p text:style-name="P262"><text:s/><text:span text:style-name="T74"><text:s/></text:span><text:span text:style-name="T17"><text:s/></text:span></text:p>
      <text:p text:style-name="P217"/>
      <text:p text:style-name="P217"><text:s/></text:p>
      <text:p text:style-name="P61"><text:s text:c="11"/></text:p>
      <text:p text:style-name="P111"><text:s text:c="12"/></text:p>
      <text:p text:style-name="P217"><text:s text:c="5"/></text:p>
      <text:p text:style-name="P221"/>
      <text:p text:style-name="P221"/>
      <text:p text:style-name="P46"><text:s text:c="12"/><text:span text:style-name="T72"><text:s/></text:span></text:p>
      <text:p text:style-name="P111"><text:s text:c="12"/></text:p>
      <text:p text:style-name="P217"><text:s text:c="3"/></text:p>
      <text:p text:style-name="P223"/>
      <text:p text:style-name="P111"><text:s text:c="11"/></text:p>
      <text:p text:style-name="P221"/>
      <text:p text:style-name="P148"/>
      <text:p text:style-name="P111"><text:s text:c="15"/></text:p>
      <text:p text:style-name="P221"/>
      <text:p text:style-name="P61"><text:s/></text:p>
      <text:p text:style-name="P49"><text:s text:c="13"/><text:span text:style-name="T5"><text:s/></text:span></text:p>
      <text:p text:style-name="P265"><text:s text:c="3"/><text:span text:style-name="T73"><text:s text:c="2"/></text:span><text:span text:style-name="T15"><text:s/></text:span></text:p>
      <text:p text:style-name="P250"><text:s text:c="2"/></text:p>
      <text:p text:style-name="P217"><text:s text:c="5"/></text:p>
      <text:p text:style-name="P49"/>
      <text:p text:style-name="P132"><text:s text:c="8"/></text:p>
      <text:p text:style-name="P217"><text:s text:c="2"/></text:p>
      <text:p text:style-name="P110"/>
      <text:p text:style-name="P265"><text:s text:c="4"/></text:p>
      <text:p text:style-name="P49"><text:s text:c="9"/></text:p>
      <text:p text:style-name="P221"/>
      <text:p text:style-name="P262"><text:s text:c="2"/><text:span text:style-name="T73"><text:s/></text:span></text:p>
      <text:p text:style-name="P50"/>
      <text:p text:style-name="P61"><text:s text:c="11"/></text:p>
      <text:p text:style-name="P217"/>
      <text:p text:style-name="P217"><text:s text:c="3"/></text:p>
      <text:p text:style-name="P217"/>
      <text:p text:style-name="P217"/>
      <text:p text:style-name="P217"><text:s text:c="2"/></text:p>
      <text:p text:style-name="P111"><text:s text:c="14"/></text:p>
      <text:p text:style-name="P217"><text:s text:c="9"/></text:p>
      <text:p text:style-name="P217"/>
      <text:p text:style-name="P46"><text:s text:c="10"/></text:p>
      <text:p text:style-name="P217"/>
      <text:p text:style-name="P61"><text:s text:c="18"/></text:p>
      <text:p text:style-name="P217"/>
      <text:p text:style-name="P217"/>
      <text:p text:style-name="P61"><text:s text:c="20"/></text:p>
      <text:p text:style-name="P217"/>
      <text:p text:style-name="P217"/>
      <text:p text:style-name="P217"/>
      <text:p text:style-name="P217"><text:s/></text:p>
      <text:p text:style-name="P250"><text:s/><text:span text:style-name="T5"><text:s text:c="5"/></text:span></text:p>
      <text:p text:style-name="P104"/>
      <text:p text:style-name="P217"><text:s text:c="9"/></text:p>
      <text:p text:style-name="P217"><text:s text:c="3"/></text:p>
      <text:p text:style-name="P217"/>
      <text:p text:style-name="P61"><text:s text:c="14"/></text:p>
      <text:p text:style-name="P250"><text:s text:c="2"/></text:p>
      <text:p text:style-name="P262"><text:s/></text:p>
      <text:p text:style-name="P61"><text:s text:c="14"/></text:p>
      <text:p text:style-name="P61"><text:s text:c="12"/></text:p>
      <text:p text:style-name="P46"/>
      <text:p text:style-name="P46"/>
      <text:p text:style-name="P46"><text:s text:c="12"/><text:span text:style-name="T72"><text:s text:c="4"/></text:span></text:p>
      <text:p text:style-name="P61"><text:s text:c="16"/></text:p>
      <text:p text:style-name="P61"/>
      <text:p text:style-name="P106"><text:s text:c="5"/></text:p>
      <text:p text:style-name="P217"><text:s text:c="11"/></text:p>
      <text:p text:style-name="P61"><text:s text:c="13"/></text:p>
      <text:p text:style-name="P61"><text:s text:c="5"/></text:p>
      <text:p text:style-name="P248"><text:s text:c="2"/><text:span text:style-name="T14"><text:s/></text:span></text:p>
      <text:p text:style-name="P61"><text:s text:c="16"/></text:p>
      <text:p text:style-name="P217"><text:s/></text:p>
      <text:p text:style-name="P217"><text:s text:c="2"/></text:p>
      <text:p text:style-name="P61"><text:s text:c="9"/></text:p>
      <text:p text:style-name="P217"><text:s text:c="12"/></text:p>
      <text:p text:style-name="P46"><text:s text:c="5"/></text:p>
      <text:p text:style-name="P145"><text:s/><text:span text:style-name="T5"><text:s/></text:span></text:p>
      <text:p text:style-name="P223"/>
      <text:p text:style-name="P61"><text:s text:c="12"/></text:p>
      <text:p text:style-name="P217"><text:s text:c="7"/></text:p>
      <text:p text:style-name="P217"><text:s text:c="2"/></text:p>
      <text:p text:style-name="P217"/>
      <text:p text:style-name="P148"><text:s text:c="6"/></text:p>
      <text:p text:style-name="P286"><text:s text:c="2"/><text:span text:style-name="T5"><text:s text:c="3"/></text:span></text:p>
      <text:p text:style-name="P217"/>
      <text:p text:style-name="P217"><text:s/></text:p>
      <text:p text:style-name="P185"><text:s text:c="5"/></text:p>
      <text:p text:style-name="P61"><text:s text:c="11"/></text:p>
      <text:p text:style-name="P217"/>
      <text:p text:style-name="P217"><text:s text:c="2"/></text:p>
      <text:p text:style-name="P61"><text:s text:c="10"/></text:p>
      <text:p text:style-name="P217"/>
      <text:p text:style-name="P217"/>
      <text:p text:style-name="P61"><text:s text:c="11"/></text:p>
      <text:p text:style-name="P217"><text:s text:c="3"/></text:p>
      <text:p text:style-name="P67"/>
      <text:p text:style-name="P49"><text:s/></text:p>
      <text:p text:style-name="P61"><text:s text:c="11"/></text:p>
      <text:p text:style-name="P262"><text:s/><text:span text:style-name="T14"><text:s text:c="4"/></text:span><text:span text:style-name="T17"><text:s/></text:span></text:p>
      <text:p text:style-name="P61"><text:s text:c="4"/></text:p>
      <text:p text:style-name="P61"><text:s text:c="3"/></text:p>
      <text:p text:style-name="P46"><text:s text:c="10"/><text:span text:style-name="T14"><text:s text:c="2"/></text:span></text:p>
      <text:p text:style-name="P46"><text:s text:c="9"/></text:p>
      <text:p text:style-name="P172"/>
      <text:p text:style-name="P217"><text:s text:c="4"/></text:p>
      <text:p text:style-name="P193"/>
      <text:p text:style-name="P111"><text:s text:c="10"/></text:p>
      <text:p text:style-name="P62"/>
      <text:p text:style-name="P217"/>
      <text:p text:style-name="P111"/>
      <text:p text:style-name="P61"><text:s text:c="9"/></text:p>
      <text:p text:style-name="P221"/>
      <text:p text:style-name="P268"><text:s text:c="3"/></text:p>
      <text:p text:style-name="P250"><text:s text:c="5"/><text:span text:style-name="T5"><text:s text:c="2"/></text:span></text:p>
      <text:p text:style-name="P169"/>
      <text:p text:style-name="P217"/>
      <text:p text:style-name="P169"><text:s text:c="4"/></text:p>
      <text:p text:style-name="P61"/>
      <text:p text:style-name="P61"><text:s text:c="15"/></text:p>
      <text:p text:style-name="P217"><text:s/></text:p>
      <text:p text:style-name="P110"/>
      <text:p text:style-name="P217"><text:s text:c="3"/></text:p>
      <text:p text:style-name="P148"/>
      <text:p text:style-name="P217"/>
      <text:p text:style-name="P217"/>
      <text:p text:style-name="P217"><text:s text:c="11"/></text:p>
      <text:p text:style-name="P262"><text:s text:c="6"/><text:span text:style-name="T72"><text:s/></text:span><text:span text:style-name="T17"><text:s text:c="2"/></text:span></text:p>
      <text:p text:style-name="P238"><text:s/><text:span text:style-name="T73"><text:s text:c="3"/></text:span></text:p>
      <text:p text:style-name="P49"><text:s text:c="14"/></text:p>
      <text:p text:style-name="P217"><text:s text:c="11"/></text:p>
      <text:p text:style-name="P217"><text:s/></text:p>
      <text:p text:style-name="P144"><text:s/><text:span text:style-name="T5"><text:s/></text:span><text:span text:style-name="T14"><text:s text:c="6"/></text:span></text:p>
      <text:p text:style-name="P217"><text:s text:c="3"/></text:p>
      <text:p text:style-name="P217"><text:s text:c="2"/></text:p>
      <text:p text:style-name="P217"><text:s text:c="9"/></text:p>
      <text:p text:style-name="P252"/>
      <text:p text:style-name="P217"><text:s/></text:p>
      <text:p text:style-name="P217"><text:s text:c="4"/></text:p>
      <text:p text:style-name="P217"><text:s text:c="3"/></text:p>
      <text:p text:style-name="P265"><text:span text:style-name="T73"><text:s text:c="5"/></text:span><text:span text:style-name="T15"><text:s/></text:span></text:p>
      <text:p text:style-name="P217"><text:s text:c="4"/></text:p>
      <text:p text:style-name="P217"/>
      <text:p text:style-name="P217"/>
      <text:p text:style-name="P217"/>
      <text:p text:style-name="P61"><text:s text:c="13"/></text:p>
      <text:p text:style-name="P238"><text:s/></text:p>
      <text:p text:style-name="P111"><text:s text:c="12"/></text:p>
      <text:p text:style-name="P148"><text:s/></text:p>
      <text:p text:style-name="P217"/>
      <text:p text:style-name="P106"><text:s text:c="7"/></text:p>
      <text:p text:style-name="P110"/>
      <text:p text:style-name="P217"><text:s/></text:p>
      <text:p text:style-name="P148"/>
      <text:p text:style-name="P111"><text:s text:c="13"/></text:p>
      <text:p text:style-name="P250"><text:s/><text:span text:style-name="T5"><text:s text:c="4"/></text:span></text:p>
      <text:p text:style-name="P106"><text:s text:c="11"/></text:p>
      <text:p text:style-name="P111"/>
      <text:p text:style-name="P111"><text:s text:c="15"/></text:p>
      <text:p text:style-name="P106"><text:s text:c="12"/></text:p>
      <text:p text:style-name="P61"><text:s text:c="13"/></text:p>
      <text:p text:style-name="P262"><text:span text:style-name="T72"><text:s/></text:span><text:span text:style-name="T17"><text:s text:c="2"/></text:span></text:p>
      <text:p text:style-name="P217"/>
      <text:p text:style-name="P217"/>
      <text:p text:style-name="P217"><text:s text:c="3"/></text:p>
      <text:p text:style-name="P217"><text:s text:c="9"/></text:p>
      <text:p text:style-name="P217"><text:s text:c="3"/></text:p>
      <text:p text:style-name="P217"><text:s text:c="5"/></text:p>
      <text:p text:style-name="P217"><text:s text:c="2"/></text:p>
      <text:p text:style-name="P148"><text:s/></text:p>
      <text:p text:style-name="P61"><text:s text:c="10"/></text:p>
      <text:p text:style-name="P217"><text:s text:c="3"/></text:p>
      <text:p text:style-name="P61"><text:s text:c="12"/></text:p>
      <text:p text:style-name="P85"><text:s text:c="2"/><text:span text:style-name="T5"><text:s/></text:span><text:s text:c="7"/></text:p>
      <text:p text:style-name="P61"><text:s text:c="9"/></text:p>
      <text:p text:style-name="P61"><text:s text:c="12"/></text:p>
      <text:p text:style-name="P262"><text:s text:c="2"/></text:p>
      <text:p text:style-name="P221"/>
      <text:p text:style-name="P61"><text:s text:c="12"/></text:p>
      <text:p text:style-name="P186"><text:s text:c="2"/><text:span text:style-name="T14"><text:s text:c="2"/></text:span></text:p>
      <text:p text:style-name="P61"><text:s text:c="13"/></text:p>
      <text:p text:style-name="P106"><text:s text:c="10"/></text:p>
      <text:p text:style-name="P252"/>
      <text:p text:style-name="P252"/>
      <text:p text:style-name="P221"/>
      <text:p text:style-name="P262"><text:s/></text:p>
      <text:p text:style-name="P217"/>
      <text:p text:style-name="P223"/>
      <text:p text:style-name="P111"><text:s text:c="13"/></text:p>
      <text:p text:style-name="P217"><text:s text:c="4"/></text:p>
      <text:p text:style-name="P250"><text:s/></text:p>
      <text:p text:style-name="P217"/>
      <text:p text:style-name="P217"><text:s text:c="3"/></text:p>
      <text:p text:style-name="P61"><text:s text:c="10"/></text:p>
      <text:p text:style-name="P217"/>
      <text:p text:style-name="P61"><text:s text:c="10"/></text:p>
      <text:p text:style-name="P46"><text:s text:c="7"/></text:p>
      <text:p text:style-name="P61"/>
      <text:p text:style-name="P262"><text:span text:style-name="T73"><text:s/></text:span><text:span text:style-name="T74"><text:s text:c="2"/></text:span></text:p>
      <text:p text:style-name="P217"/>
      <text:p text:style-name="P61"><text:s text:c="10"/></text:p>
      <text:p text:style-name="P276"/>
      <text:p text:style-name="P221"/>
      <text:p text:style-name="P61"><text:s text:c="8"/></text:p>
      <text:p text:style-name="P217"><text:s text:c="10"/></text:p>
      <text:p text:style-name="P217"><text:s/></text:p>
      <text:p text:style-name="P223"/>
      <text:p text:style-name="P221"/>
      <text:p text:style-name="P169"/>
      <text:p text:style-name="P217"><text:s/></text:p>
      <text:p text:style-name="P262"><text:s text:c="3"/></text:p>
      <text:p text:style-name="P217"><text:s text:c="4"/></text:p>
      <text:p text:style-name="P217"/>
      <text:p text:style-name="P111"><text:s text:c="6"/></text:p>
      <text:p text:style-name="P217"/>
      <text:p text:style-name="P217"/>
      <text:p text:style-name="P217"><text:s/></text:p>
      <text:p text:style-name="P284"><text:s text:c="2"/></text:p>
      <text:p text:style-name="P61"><text:s text:c="12"/></text:p>
      <text:p text:style-name="P264"/>
      <text:p text:style-name="P262"><text:s/><text:span text:style-name="T73"><text:s text:c="6"/></text:span></text:p>
      <text:p text:style-name="P248"/>
      <text:p text:style-name="P46"/>
      <text:p text:style-name="P49"><text:s text:c="11"/><text:span text:style-name="T5"><text:s text:c="3"/></text:span></text:p>
      <text:p text:style-name="P61"><text:s text:c="12"/></text:p>
      <text:p text:style-name="P238"><text:s text:c="2"/></text:p>
      <text:p text:style-name="P262"><text:s text:c="3"/></text:p>
      <text:p text:style-name="P106"><text:s text:c="8"/></text:p>
      <text:p text:style-name="P217"/>
      <text:p text:style-name="P217"><text:s text:c="2"/></text:p>
      <text:p text:style-name="P168"><text:s text:c="4"/></text:p>
      <text:p text:style-name="P111"><text:s text:c="11"/></text:p>
      <text:p text:style-name="P262"><text:s text:c="2"/><text:span text:style-name="T17"><text:s/></text:span></text:p>
      <text:p text:style-name="P49"/>
      <text:p text:style-name="P217"><text:s text:c="11"/></text:p>
      <text:p text:style-name="P262"><text:s text:c="2"/></text:p>
      <text:p text:style-name="P217"/>
      <text:p text:style-name="P217"/>
      <text:p text:style-name="P61"><text:s text:c="9"/></text:p>
      <text:p text:style-name="P111"><text:s text:c="6"/></text:p>
      <text:p text:style-name="P250"/>
      <text:p text:style-name="P221"/>
      <text:p text:style-name="P217"/>
      <text:p text:style-name="P193"><text:s/></text:p>
      <text:p text:style-name="P61"/>
      <text:p text:style-name="P221"/>
      <text:p text:style-name="P144"><text:s text:c="2"/></text:p>
      <text:p text:style-name="P49"><text:s text:c="14"/><text:span text:style-name="T5"><text:s text:c="2"/></text:span></text:p>
      <text:p text:style-name="P217"><text:s/></text:p>
      <text:p text:style-name="P217"><text:s text:c="5"/></text:p>
      <text:p text:style-name="P217"><text:s text:c="3"/></text:p>
      <text:p text:style-name="P217"><text:s text:c="2"/></text:p>
      <text:p text:style-name="P217"><text:s text:c="2"/></text:p>
      <text:p text:style-name="P221"/>
      <text:p text:style-name="P106"><text:s text:c="11"/></text:p>
      <text:p text:style-name="P110"/>
      <text:p text:style-name="P49"><text:s text:c="5"/><text:span text:style-name="T5"><text:s/></text:span></text:p>
      <text:p text:style-name="P61"><text:s text:c="12"/></text:p>
      <text:p text:style-name="P217"/>
      <text:p text:style-name="P250"><text:s text:c="9"/></text:p>
      <text:p text:style-name="P250"><text:span text:style-name="T5"><text:s text:c="2"/></text:span><text:s text:c="3"/><text:span text:style-name="T5"><text:s/></text:span></text:p>
      <text:p text:style-name="P217"/>
      <text:p text:style-name="P49"><text:s text:c="12"/></text:p>
      <text:p text:style-name="P61"><text:s text:c="11"/></text:p>
      <text:p text:style-name="P46"><text:s text:c="11"/></text:p>
      <text:p text:style-name="P217"><text:s text:c="4"/></text:p>
      <text:p text:style-name="P270"><text:s/></text:p>
      <text:p text:style-name="P221"/>
      <text:p text:style-name="P217"><text:s text:c="3"/></text:p>
      <text:p text:style-name="P61"><text:s text:c="12"/></text:p>
      <text:p text:style-name="P111"><text:s text:c="12"/></text:p>
      <text:p text:style-name="P61"/>
      <text:p text:style-name="P217"><text:s text:c="5"/></text:p>
      <text:p text:style-name="P223"/>
      <text:p text:style-name="P217"><text:s text:c="2"/></text:p>
      <text:p text:style-name="P217"/>
      <text:p text:style-name="P49"><text:s text:c="4"/><text:span text:style-name="T5"><text:s text:c="3"/></text:span></text:p>
      <text:p text:style-name="P217"/>
      <text:p text:style-name="P61"><text:s text:c="10"/></text:p>
      <text:p text:style-name="P223"/>
      <text:p text:style-name="P262"><text:s text:c="6"/><text:span text:style-name="T17"><text:s text:c="2"/></text:span></text:p>
      <text:p text:style-name="P61"><text:s text:c="12"/></text:p>
      <text:p text:style-name="P111"><text:s text:c="2"/></text:p>
      <text:p text:style-name="P61"><text:s text:c="13"/></text:p>
      <text:p text:style-name="P250"><text:s/></text:p>
      <text:p text:style-name="P217"><text:s text:c="5"/></text:p>
      <text:p text:style-name="P217"><text:s text:c="7"/></text:p>
      <text:p text:style-name="P217"><text:s text:c="5"/></text:p>
      <text:p text:style-name="P67"/>
      <text:p text:style-name="P217"/>
      <text:p text:style-name="P46"><text:s text:c="12"/></text:p>
      <text:p text:style-name="P46"><text:s text:c="6"/></text:p>
      <text:p text:style-name="P46"><text:s text:c="18"/></text:p>
      <text:p text:style-name="P221"/>
      <text:p text:style-name="P217"><text:s text:c="3"/></text:p>
      <text:p text:style-name="P217"><text:s text:c="5"/></text:p>
      <text:p text:style-name="P262"><text:s text:c="2"/></text:p>
      <text:p text:style-name="P217"/>
      <text:p text:style-name="P61"><text:s text:c="8"/></text:p>
      <text:p text:style-name="P250"><text:s/><text:span text:style-name="T5"><text:s/></text:span></text:p>
      <text:p text:style-name="P49"><text:s text:c="13"/></text:p>
      <text:p text:style-name="P248"><text:s text:c="2"/><text:span text:style-name="T72"><text:s text:c="3"/></text:span></text:p>
      <text:p text:style-name="P88"><text:s text:c="9"/></text:p>
      <text:p text:style-name="P265"><text:s text:c="2"/></text:p>
      <text:p text:style-name="P217"><text:s text:c="14"/></text:p>
      <text:p text:style-name="P268"/>
      <text:p text:style-name="P217"><text:s text:c="5"/></text:p>
      <text:p text:style-name="P49"><text:s text:c="14"/></text:p>
      <text:p text:style-name="P217"><text:s/></text:p>
      <text:p text:style-name="P217"><text:s/></text:p>
      <text:p text:style-name="P111"><text:s text:c="13"/></text:p>
      <text:p text:style-name="P111"><text:s text:c="15"/></text:p>
      <text:p text:style-name="P111"><text:s text:c="8"/></text:p>
      <text:p text:style-name="P217"><text:s text:c="2"/></text:p>
      <text:p text:style-name="P46"><text:s/><text:span text:style-name="T14"><text:s text:c="13"/></text:span></text:p>
      <text:p text:style-name="P49"><text:s text:c="14"/><text:span text:style-name="T5"><text:s text:c="2"/></text:span></text:p>
      <text:p text:style-name="P217"><text:s text:c="3"/></text:p>
      <text:p text:style-name="P217"/>
      <text:p text:style-name="P217"><text:s text:c="8"/></text:p>
      <text:p text:style-name="P61"/>
      <text:p text:style-name="P61"><text:s text:c="13"/></text:p>
      <text:p text:style-name="P217"><text:s text:c="3"/></text:p>
      <text:p text:style-name="P217"/>
      <text:p text:style-name="P46"><text:s text:c="14"/><text:span text:style-name="T14"><text:s text:c="2"/></text:span></text:p>
      <text:p text:style-name="P217"/>
      <text:p text:style-name="P217"/>
      <text:p text:style-name="P217"><text:s/></text:p>
      <text:p text:style-name="P217"><text:s text:c="3"/></text:p>
      <text:p text:style-name="P217"/>
      <text:p text:style-name="P217"><text:s/></text:p>
      <text:p text:style-name="P144"><text:s/></text:p>
      <text:p text:style-name="P148"><text:s text:c="7"/></text:p>
      <text:p text:style-name="P217"><text:s text:c="4"/></text:p>
      <text:p text:style-name="P262"><text:s/></text:p>
      <text:p text:style-name="P61"><text:s text:c="11"/></text:p>
      <text:p text:style-name="P217"><text:s text:c="3"/></text:p>
      <text:p text:style-name="P217"/>
      <text:p text:style-name="P217"><text:s text:c="10"/></text:p>
      <text:p text:style-name="P111"><text:s text:c="13"/></text:p>
      <text:p text:style-name="P49"><text:s text:c="22"/><text:span text:style-name="T5"><text:s text:c="2"/></text:span></text:p>
      <text:p text:style-name="P248"><text:s text:c="8"/></text:p>
      <text:p text:style-name="P125"><text:s text:c="15"/></text:p>
      <text:p text:style-name="P46"><text:span text:style-name="T56"><text:s text:c="3"/></text:span><text:span text:style-name="T14"><text:s text:c="7"/></text:span></text:p>
      <text:p text:style-name="P217"/>
      <text:p text:style-name="P61"><text:s text:c="11"/></text:p>
      <text:p text:style-name="P110"/>
      <text:p text:style-name="P217"><text:s text:c="3"/></text:p>
      <text:p text:style-name="P61"/>
      <text:p text:style-name="P49"/>
      <text:p text:style-name="P61"><text:s text:c="12"/></text:p>
      <text:p text:style-name="P61"><text:s text:c="15"/></text:p>
      <text:p text:style-name="P61"><text:s text:c="10"/></text:p>
      <text:p text:style-name="P46"><text:s text:c="11"/></text:p>
      <text:p text:style-name="P61"/>
      <text:p text:style-name="P111"><text:s text:c="14"/></text:p>
      <text:p text:style-name="P217"><text:s/></text:p>
      <text:p text:style-name="P111"/>
      <text:p text:style-name="P217"><text:s text:c="3"/></text:p>
      <text:p text:style-name="P250"/>
      <text:p text:style-name="P61"><text:s text:c="15"/></text:p>
      <text:p text:style-name="P262"><text:span text:style-name="T72"><text:s/></text:span><text:span text:style-name="T17"><text:s text:c="4"/></text:span></text:p>
      <text:p text:style-name="P217"/>
      <text:p text:style-name="P111"><text:s text:c="15"/></text:p>
      <text:p text:style-name="P217"/>
      <text:p text:style-name="P46"><text:s text:c="12"/><text:span text:style-name="T14"><text:s text:c="4"/></text:span></text:p>
      <text:p text:style-name="P46"><text:s text:c="12"/></text:p>
      <text:p text:style-name="P61"/>
      <text:p text:style-name="P49"><text:s text:c="14"/></text:p>
      <text:p text:style-name="P262"><text:s text:c="4"/></text:p>
      <text:p text:style-name="P46"><text:s text:c="13"/></text:p>
      <text:p text:style-name="P250"/>
      <text:p text:style-name="P262"><text:s/></text:p>
      <text:p text:style-name="P61"/>
      <text:p text:style-name="P217"><text:s text:c="6"/></text:p>
      <text:p text:style-name="P49"/>
      <text:p text:style-name="P262"><text:s text:c="2"/><text:span text:style-name="T17"><text:s text:c="3"/></text:span></text:p>
      <text:p text:style-name="P61"><text:s text:c="13"/></text:p>
      <text:p text:style-name="P49"><text:s text:c="16"/></text:p>
      <text:p text:style-name="P49"><text:s text:c="11"/></text:p>
      <text:p text:style-name="P46"><text:s text:c="9"/></text:p>
      <text:p text:style-name="P217"><text:s text:c="6"/></text:p>
      <text:p text:style-name="P111"><text:s text:c="13"/></text:p>
      <text:p text:style-name="P46"/>
      <text:p text:style-name="P46"><text:s text:c="12"/></text:p>
      <text:p text:style-name="P61"><text:s text:c="12"/></text:p>
      <text:p text:style-name="P46"><text:s text:c="13"/><text:span text:style-name="T72"><text:s/></text:span></text:p>
      <text:p text:style-name="P49"><text:s text:c="13"/></text:p>
      <text:p text:style-name="P217"/>
      <text:p text:style-name="P61"><text:s text:c="13"/></text:p>
      <text:p text:style-name="P250"/>
      <text:p text:style-name="P217"><text:s text:c="6"/></text:p>
      <text:p text:style-name="P46"><text:s text:c="13"/></text:p>
      <text:p text:style-name="P46"><text:s text:c="9"/><text:span text:style-name="T14"><text:s text:c="4"/></text:span></text:p>
      <text:p text:style-name="P46"><text:s text:c="10"/></text:p>
      <text:p text:style-name="P221"/>
      <text:p text:style-name="P217"/>
      <text:p text:style-name="P221"/>
      <text:p text:style-name="P217"/>
      <text:p text:style-name="P217"><text:s text:c="4"/></text:p>
      <text:p text:style-name="P217"/>
      <text:p text:style-name="P217"><text:s text:c="6"/></text:p>
      <text:p text:style-name="P61"><text:s text:c="10"/></text:p>
      <text:p text:style-name="P46"><text:s text:c="12"/></text:p>
      <text:p text:style-name="P217"/>
      <text:p text:style-name="P217"><text:s text:c="3"/></text:p>
      <text:p text:style-name="P217"/>
      <text:p text:style-name="P221"/>
      <text:p text:style-name="P217"><text:s text:c="3"/></text:p>
      <text:p text:style-name="P221"/>
      <text:p text:style-name="P262"><text:s text:c="2"/><text:span text:style-name="T17"><text:s text:c="3"/></text:span></text:p>
      <text:p text:style-name="P217"/>
      <text:p text:style-name="P46"><text:s text:c="8"/></text:p>
      <text:p text:style-name="P217"/>
      <text:p text:style-name="P262"><text:s text:c="2"/></text:p>
      <text:p text:style-name="P238"><text:s text:c="2"/></text:p>
      <text:p text:style-name="P46"><text:s text:c="10"/></text:p>
      <text:p text:style-name="P67"/>
      <text:p text:style-name="P250"/>
      <text:p text:style-name="P250"><text:s/></text:p>
      <text:p text:style-name="P250"/>
      <text:p text:style-name="P250"><text:s text:c="2"/></text:p>
      <text:p text:style-name="P262"><text:s/><text:span text:style-name="T72"><text:s text:c="2"/></text:span><text:span text:style-name="T17"><text:s/></text:span></text:p>
      <text:p text:style-name="P217"><text:s text:c="5"/></text:p>
      <text:p text:style-name="P49"><text:s text:c="10"/></text:p>
      <text:p text:style-name="P217"/>
      <text:p text:style-name="P217"/>
      <text:p text:style-name="P46"><text:s text:c="11"/></text:p>
      <text:p text:style-name="P250"/>
      <text:p text:style-name="P49"/>
      <text:p text:style-name="P221"/>
      <text:p text:style-name="P61"><text:s text:c="7"/></text:p>
      <text:p text:style-name="P221"/>
      <text:p text:style-name="P217"><text:s text:c="3"/></text:p>
      <text:p text:style-name="P250"/>
      <text:p text:style-name="P49"><text:s text:c="13"/></text:p>
      <text:p text:style-name="P46"><text:s text:c="7"/></text:p>
      <text:p text:style-name="P252"/>
      <text:p text:style-name="P262"><text:s/></text:p>
      <text:p text:style-name="P221"/>
      <text:p text:style-name="P217"/>
      <text:p text:style-name="P111"><text:s text:c="11"/></text:p>
      <text:p text:style-name="P111"/>
      <text:p text:style-name="P221"/>
      <text:p text:style-name="P61"><text:s text:c="13"/></text:p>
      <text:p text:style-name="P250"><text:s text:c="3"/></text:p>
      <text:p text:style-name="P276"/>
      <text:p text:style-name="P250"><text:s text:c="5"/></text:p>
      <text:p text:style-name="P67"/>
      <text:p text:style-name="P250"><text:s text:c="3"/></text:p>
      <text:p text:style-name="P61"><text:s text:c="10"/></text:p>
      <text:p text:style-name="P49"><text:s text:c="11"/></text:p>
      <text:p text:style-name="P61"/>
      <text:p text:style-name="P216"><text:s/></text:p>
      <text:p text:style-name="P61"/>
      <text:p text:style-name="P238"><text:s/></text:p>
      <text:p text:style-name="P61"><text:s text:c="13"/></text:p>
      <text:p text:style-name="P49"><text:s text:c="9"/></text:p>
      <text:p text:style-name="P61"><text:s text:c="14"/></text:p>
      <text:p text:style-name="P61"><text:s text:c="10"/></text:p>
      <text:p text:style-name="P46"><text:s text:c="15"/></text:p>
      <text:p text:style-name="P250"><text:s text:c="5"/></text:p>
      <text:p text:style-name="P217"/>
      <text:p text:style-name="P217"/>
      <text:p text:style-name="P61"/>
      <text:p text:style-name="P217"><text:s text:c="2"/></text:p>
      <text:p text:style-name="P90"><text:span text:style-name="T73"><text:s text:c="8"/></text:span><text:span text:style-name="T74"><text:s text:c="3"/></text:span></text:p>
      <text:p text:style-name="P209"/>
      <text:p text:style-name="P217"/>
      <text:p text:style-name="P111"><text:s text:c="11"/></text:p>
      <text:p text:style-name="P217"><text:s text:c="2"/></text:p>
      <text:p text:style-name="P223"/>
      <text:p text:style-name="P250"><text:s/></text:p>
      <text:p text:style-name="P250"/>
      <text:p text:style-name="P283"><text:s text:c="3"/></text:p>
      <text:p text:style-name="P221"/>
      <text:p text:style-name="P46"><text:s text:c="10"/></text:p>
      <text:p text:style-name="P250"><text:s text:c="2"/></text:p>
      <text:p text:style-name="P131"><text:s text:c="8"/><text:span text:style-name="T5"><text:s/></text:span></text:p>
      <text:p text:style-name="P239"><text:span text:style-name="T72"><text:s/></text:span><text:span text:style-name="T74"><text:s/></text:span></text:p>
      <text:p text:style-name="P217"><text:s text:c="2"/></text:p>
      <text:p text:style-name="P217"/>
      <text:p text:style-name="P253"/>
      <text:p text:style-name="P49"><text:s text:c="12"/></text:p>
      <text:p text:style-name="P221"/>
      <text:p text:style-name="P221"/>
      <text:p text:style-name="P217"/>
      <text:p text:style-name="P276"><text:s text:c="2"/></text:p>
      <text:p text:style-name="P250"><text:s/></text:p>
      <text:p text:style-name="P223"/>
      <text:p text:style-name="P217"/>
      <text:p text:style-name="P49"><text:s text:c="14"/></text:p>
      <text:p text:style-name="P49"><text:s text:c="12"/></text:p>
      <text:p text:style-name="P276"/>
      <text:p text:style-name="P270"/>
      <text:p text:style-name="P250"><text:s/><text:span text:style-name="T103">5 A</text:span><text:span text:style-name="T103"> 2</text:span></text:p>
      <text:p text:style-name="P221"/>
      <text:p text:style-name="P90"><text:span text:style-name="T73"><text:s text:c="6"/></text:span><text:span text:style-name="T14"><text:s text:c="2"/></text:span></text:p>
      <text:p text:style-name="P221"/>
      <text:p text:style-name="P217"><text:s text:c="4"/></text:p>
      <text:p text:style-name="P221"/>
      <text:p text:style-name="P49"><text:s text:c="15"/></text:p>
      <text:p text:style-name="P223"/>
      <text:p text:style-name="P250"/>
      <text:p text:style-name="P61"><text:s text:c="17"/></text:p>
      <text:p text:style-name="P61"><text:s text:c="15"/></text:p>
      <text:p text:style-name="P49"><text:s text:c="14"/></text:p>
      <text:p text:style-name="P46"><text:s text:c="13"/><text:span text:style-name="T72"><text:s text:c="2"/></text:span></text:p>
      <text:p text:style-name="P250"><text:s text:c="2"/></text:p>
      <text:p text:style-name="P223"/>
      <text:p text:style-name="P217"><text:s text:c="3"/></text:p>
      <text:p text:style-name="P265"/>
      <text:p text:style-name="P250"><text:s text:c="3"/></text:p>
      <text:p text:style-name="P250"><text:s/></text:p>
      <text:p text:style-name="P90"><text:span text:style-name="T73"><text:s text:c="11"/></text:span><text:span text:style-name="T74"><text:s/></text:span></text:p>
      <text:p text:style-name="P61"/>
      <text:p text:style-name="P61"><text:s text:c="11"/></text:p>
      <text:p text:style-name="P248"><text:s/></text:p>
      <text:p text:style-name="P217"/>
      <text:p text:style-name="P217"/>
      <text:p text:style-name="P217"/>
      <text:p text:style-name="P61"><text:s text:c="14"/></text:p>
      <text:p text:style-name="P217"/>
      <text:p text:style-name="P61"><text:s text:c="13"/></text:p>
      <text:p text:style-name="P248"><text:span text:style-name="T72"><text:s text:c="6"/></text:span><text:span text:style-name="T14"><text:s text:c="2"/></text:span></text:p>
      <text:p text:style-name="P265"><text:s text:c="2"/><text:span text:style-name="T73"><text:s text:c="3"/></text:span></text:p>
      <text:p text:style-name="P61"><text:s text:c="12"/></text:p>
      <text:p text:style-name="P67"/>
      <text:p text:style-name="P262"><text:s/></text:p>
      <text:p text:style-name="P46"><text:s text:c="13"/></text:p>
      <text:p text:style-name="P49"><text:s text:c="8"/></text:p>
      <text:p text:style-name="P61"><text:s text:c="14"/></text:p>
      <text:p text:style-name="P217"><text:s text:c="2"/></text:p>
      <text:p text:style-name="P168"/>
      <text:p text:style-name="P250"><text:s text:c="3"/></text:p>
      <text:p text:style-name="P262"><text:s/><text:span text:style-name="T73"><text:s/></text:span></text:p>
      <text:p text:style-name="P61"><text:s text:c="5"/></text:p>
      <text:p text:style-name="P217"><text:s text:c="3"/></text:p>
      <text:p text:style-name="P250"><text:s/></text:p>
      <text:p text:style-name="P61"><text:s text:c="14"/></text:p>
      <text:p text:style-name="P61"/>
      <text:p text:style-name="P61"><text:s text:c="7"/></text:p>
      <text:p text:style-name="P46"><text:s text:c="9"/><text:span text:style-name="T14"><text:s text:c="2"/></text:span></text:p>
      <text:p text:style-name="P49"><text:s text:c="9"/></text:p>
      <text:p text:style-name="P262"><text:span text:style-name="T74"><text:s/></text:span><text:span text:style-name="T17"><text:s text:c="4"/></text:span></text:p>
      <text:p text:style-name="P49"><text:s text:c="14"/></text:p>
      <text:p text:style-name="P61"/>
      <text:p text:style-name="P46"><text:s text:c="9"/></text:p>
      <text:p text:style-name="P250"/>
      <text:p text:style-name="P248"><text:s text:c="3"/></text:p>
      <text:p text:style-name="P46"><text:s text:c="9"/><text:span text:style-name="T72"><text:s/></text:span></text:p>
      <text:p text:style-name="P111"><text:s text:c="14"/></text:p>
      <text:p text:style-name="P49"><text:s text:c="12"/></text:p>
      <text:p text:style-name="P46"><text:s text:c="16"/></text:p>
      <text:p text:style-name="P49"/>
      <text:p text:style-name="P49"><text:s text:c="12"/></text:p>
      <text:p text:style-name="P61"/>
      <text:p text:style-name="P61"><text:s text:c="13"/></text:p>
      <text:p text:style-name="P221"/>
      <text:p text:style-name="P217"><text:s text:c="2"/></text:p>
      <text:p text:style-name="P265"><text:s text:c="2"/></text:p>
      <text:p text:style-name="P61"><text:s text:c="12"/></text:p>
      <text:p text:style-name="P61"/>
      <text:p text:style-name="P61"><text:s text:c="14"/></text:p>
      <text:p text:style-name="P61"/>
      <text:p text:style-name="P217"><text:s text:c="4"/></text:p>
      <text:p text:style-name="P217"><text:s text:c="5"/></text:p>
      <text:p text:style-name="P223"/>
      <text:p text:style-name="P217"><text:s text:c="3"/></text:p>
      <text:p text:style-name="P111"><text:s text:c="8"/></text:p>
      <text:p text:style-name="P61"/>
      <text:p text:style-name="P61"><text:s text:c="11"/></text:p>
      <text:p text:style-name="P217"/>
      <text:p text:style-name="P111"/>
      <text:p text:style-name="P56"><text:s text:c="7"/></text:p>
      <text:p text:style-name="P61"><text:s text:c="14"/></text:p>
      <text:p text:style-name="P88"/>
      <text:p text:style-name="P262"><text:s text:c="2"/></text:p>
      <text:p text:style-name="P111"/>
      <text:p text:style-name="P46"><text:span text:style-name="T14"><text:s text:c="12"/></text:span><text:span text:style-name="T33"><text:s text:c="2"/></text:span><text:span text:style-name="T14"><text:s text:c="2"/></text:span></text:p>
      <text:p text:style-name="P79"><text:s text:c="8"/></text:p>
      <text:p text:style-name="P217"/>
      <text:p text:style-name="P217"/>
      <text:p text:style-name="P111"><text:s text:c="12"/></text:p>
      <text:p text:style-name="P61"><text:s text:c="5"/></text:p>
      <text:p text:style-name="P250"><text:s/></text:p>
      <text:p text:style-name="P217"><text:s text:c="10"/></text:p>
      <text:p text:style-name="P49"><text:s text:c="10"/></text:p>
      <text:p text:style-name="P262"><text:span text:style-name="T73"><text:s text:c="2"/></text:span><text:span text:style-name="T17"><text:s/></text:span></text:p>
      <text:p text:style-name="P61"><text:s text:c="11"/></text:p>
      <text:p text:style-name="P61"/>
      <text:p text:style-name="P217"/>
      <text:p text:style-name="P61"/>
      <text:p text:style-name="P49"><text:s text:c="8"/></text:p>
      <text:p text:style-name="P111"><text:s text:c="15"/></text:p>
      <text:p text:style-name="P217"><text:s text:c="4"/></text:p>
      <text:p text:style-name="P217"/>
      <text:p text:style-name="P46"><text:s text:c="12"/></text:p>
      <text:p text:style-name="P46"><text:s text:c="11"/></text:p>
      <text:p text:style-name="P111"><text:s text:c="11"/></text:p>
      <text:p text:style-name="P162"/>
      <text:p text:style-name="P217"/>
      <text:p text:style-name="P106"><text:s text:c="13"/></text:p>
      <text:p text:style-name="P262"><text:s text:c="4"/><text:span text:style-name="T74"><text:s/></text:span></text:p>
      <text:p text:style-name="P61"><text:s text:c="3"/></text:p>
      <text:p text:style-name="P217"/>
      <text:p text:style-name="P217"><text:s text:c="4"/></text:p>
      <text:p text:style-name="P217"><text:s/></text:p>
      <text:p text:style-name="P217"><text:s/></text:p>
      <text:p text:style-name="P46"><text:s text:c="12"/></text:p>
      <text:p text:style-name="P61"><text:s text:c="13"/></text:p>
      <text:p text:style-name="P46"/>
      <text:p text:style-name="P49"><text:s text:c="9"/></text:p>
      <text:p text:style-name="P49"><text:s/><text:span text:style-name="T5"><text:s text:c="13"/></text:span></text:p>
      <text:p text:style-name="P49"><text:s text:c="11"/></text:p>
      <text:p text:style-name="P46"><text:s text:c="17"/></text:p>
      <text:p text:style-name="P262"><text:s text:c="3"/></text:p>
      <text:p text:style-name="P250"><text:s text:c="2"/></text:p>
      <text:p text:style-name="P46"><text:s text:c="9"/><text:span text:style-name="T72"><text:s/></text:span></text:p>
      <text:p text:style-name="P49"/>
      <text:p text:style-name="P49"><text:s text:c="11"/></text:p>
      <text:p text:style-name="P46"><text:s text:c="14"/></text:p>
      <text:p text:style-name="P61"><text:s text:c="12"/></text:p>
      <text:p text:style-name="P111"><text:s text:c="15"/></text:p>
      <text:p text:style-name="P250"/>
      <text:p text:style-name="P217"/>
      <text:p text:style-name="P262"><text:s/><text:span text:style-name="T74"><text:s/></text:span></text:p>
      <text:p text:style-name="P262"/>
      <text:p text:style-name="P217"/>
      <text:p text:style-name="P217"/>
      <text:p text:style-name="P61"/>
      <text:p text:style-name="P111"><text:s text:c="18"/></text:p>
      <text:p text:style-name="P250"/>
      <text:p text:style-name="P49"><text:s text:c="11"/></text:p>
      <text:p text:style-name="P265"><text:s text:c="9"/></text:p>
      <text:p text:style-name="P217"><text:s text:c="4"/></text:p>
      <text:p text:style-name="P46"><text:s text:c="9"/></text:p>
      <text:p text:style-name="P217"><text:s/></text:p>
      <text:p text:style-name="P217"/>
      <text:p text:style-name="P111"/>
      <text:p text:style-name="P221"/>
      <text:p text:style-name="P217"><text:s text:c="2"/></text:p>
      <text:p text:style-name="P152"><text:s/><text:span text:style-name="T72"><text:s text:c="3"/></text:span></text:p>
      <text:p text:style-name="P46"><text:s text:c="12"/></text:p>
      <text:p text:style-name="P217"/>
      <text:p text:style-name="P168"/>
      <text:p text:style-name="P262"><text:s text:c="2"/><text:span text:style-name="T17"><text:s text:c="3"/></text:span></text:p>
      <text:p text:style-name="P236"/>
      <text:p text:style-name="P50"/>
      <text:p text:style-name="P46"><text:s text:c="10"/></text:p>
      <text:p text:style-name="P221"/>
      <text:p text:style-name="P217"><text:s/></text:p>
      <text:p text:style-name="P61"><text:s text:c="14"/></text:p>
      <text:p text:style-name="P56"><text:s text:c="13"/></text:p>
      <text:p text:style-name="P46"><text:s text:c="10"/></text:p>
      <text:p text:style-name="P49"><text:s text:c="9"/></text:p>
      <text:p text:style-name="P61"><text:s text:c="12"/></text:p>
      <text:p text:style-name="P61"><text:s text:c="11"/></text:p>
      <text:p text:style-name="P250"/>
      <text:p text:style-name="P61"/>
      <text:p text:style-name="P61"><text:s text:c="7"/></text:p>
      <text:p text:style-name="P217"/>
      <text:p text:style-name="P263"><text:s text:c="4"/></text:p>
      <text:p text:style-name="P238"><text:s text:c="5"/></text:p>
      <text:p text:style-name="P217"><text:s text:c="3"/></text:p>
      <text:p text:style-name="P106"><text:s text:c="2"/></text:p>
      <text:p text:style-name="P106"><text:s text:c="10"/></text:p>
      <text:p text:style-name="P250"/>
      <text:p text:style-name="P61"><text:s text:c="12"/></text:p>
      <text:p text:style-name="P217"/>
      <text:p text:style-name="P61"><text:s text:c="12"/></text:p>
      <text:p text:style-name="P248"><text:s text:c="2"/></text:p>
      <text:p text:style-name="P217"><text:s/></text:p>
      <text:p text:style-name="P262"><text:span text:style-name="T14"><text:s text:c="2"/></text:span><text:span text:style-name="T17"><text:s/></text:span></text:p>
      <text:p text:style-name="P49"/>
      <text:p text:style-name="P61"><text:s text:c="9"/></text:p>
      <text:p text:style-name="P250"/>
      <text:p text:style-name="P250"><text:s/></text:p>
      <text:p text:style-name="P250"><text:s text:c="5"/></text:p>
      <text:p text:style-name="P46"><text:s text:c="10"/></text:p>
      <text:p text:style-name="P61"><text:s text:c="16"/></text:p>
      <text:p text:style-name="P47"><text:s text:c="10"/></text:p>
      <text:p text:style-name="P238"><text:s text:c="2"/></text:p>
      <text:p text:style-name="P262"><text:s/></text:p>
      <text:p text:style-name="P111"><text:s text:c="12"/></text:p>
      <text:p text:style-name="P248"><text:s text:c="2"/><text:span text:style-name="T72"><text:s text:c="3"/></text:span></text:p>
      <text:p text:style-name="P61"><text:s text:c="14"/></text:p>
      <text:p text:style-name="P111"><text:s text:c="14"/></text:p>
      <text:p text:style-name="P49"><text:s text:c="18"/></text:p>
      <text:p text:style-name="P217"><text:s text:c="5"/></text:p>
      <text:p text:style-name="P265"><text:s text:c="3"/></text:p>
      <text:p text:style-name="P264"/>
      <text:p text:style-name="P217"><text:s/></text:p>
      <text:p text:style-name="P67"/>
      <text:p text:style-name="P248"><text:s text:c="2"/></text:p>
      <text:p text:style-name="P217"/>
      <text:p text:style-name="P223"/>
      <text:p text:style-name="P49"><text:s text:c="16"/></text:p>
      <text:p text:style-name="P217"><text:s text:c="4"/></text:p>
      <text:p text:style-name="P250"/>
      <text:p text:style-name="P126"><text:s text:c="6"/></text:p>
      <text:p text:style-name="P262"><text:s text:c="2"/></text:p>
      <text:p text:style-name="P145"><text:span text:style-name="T5"><text:s text:c="3"/></text:span><text:span text:style-name="T54"><text:s text:c="2"/></text:span></text:p>
      <text:p text:style-name="P262"><text:s text:c="3"/></text:p>
      <text:p text:style-name="P49"><text:s text:c="10"/></text:p>
      <text:p text:style-name="P61"><text:s text:c="13"/></text:p>
      <text:p text:style-name="P270"><text:s text:c="6"/>WAGON <text:s/>GROUND</text:p>
      <text:p text:style-name="P106"><text:s text:c="11"/></text:p>
      <text:p text:style-name="P217"/>
      <text:p text:style-name="P49"><text:s text:c="9"/></text:p>
      <text:p text:style-name="P49"><text:s text:c="11"/></text:p>
      <text:p text:style-name="P262"/>
      <text:p text:style-name="P262"><text:s/></text:p>
      <text:p text:style-name="P262"><text:s/></text:p>
      <text:p text:style-name="P111"><text:s text:c="7"/></text:p>
      <text:p text:style-name="P248"><text:s/></text:p>
      <text:p text:style-name="P250"/>
      <text:p text:style-name="P217"><text:s/></text:p>
      <text:p text:style-name="P217"/>
      <text:p text:style-name="P217"/>
      <text:p text:style-name="P217"><text:s text:c="2"/></text:p>
      <text:p text:style-name="P262"><text:s/></text:p>
      <text:p text:style-name="P265"><text:s/></text:p>
      <text:p text:style-name="P250"><text:s text:c="8"/></text:p>
      <text:p text:style-name="P61"/>
      <text:p text:style-name="P276"/>
      <text:p text:style-name="P262"><text:s text:c="2"/></text:p>
      <text:p text:style-name="P270"><text:s/></text:p>
      <text:p text:style-name="P262"><text:s text:c="2"/></text:p>
      <text:p text:style-name="P241"><text:span text:style-name="T72"><text:s text:c="3"/></text:span><text:span text:style-name="T69"><text:s/></text:span></text:p>
      <text:p text:style-name="P248"/>
      <text:p text:style-name="P248"><text:s text:c="5"/><text:span text:style-name="T14"><text:s text:c="2"/></text:span></text:p>
      <text:p text:style-name="P217"/>
      <text:p text:style-name="P250"><text:s/></text:p>
      <text:p text:style-name="P196"><text:s text:c="2"/></text:p>
      <text:p text:style-name="P262"><text:s text:c="2"/></text:p>
      <text:p text:style-name="P262"><text:s text:c="4"/></text:p>
      <text:p text:style-name="P106"/>
      <text:p text:style-name="P111"><text:s text:c="11"/></text:p>
      <text:p text:style-name="P217"><text:s text:c="2"/></text:p>
      <text:p text:style-name="P252"/>
      <text:p text:style-name="P49"><text:s text:c="15"/></text:p>
      <text:p text:style-name="P217"/>
      <text:p text:style-name="P262"><text:s text:c="5"/></text:p>
      <text:p text:style-name="P217"><text:s text:c="8"/></text:p>
      <text:p text:style-name="P238"/>
      <text:p text:style-name="P221"/>
      <text:p text:style-name="P49"><text:s text:c="8"/></text:p>
      <text:p text:style-name="P217"><text:s text:c="3"/></text:p>
      <text:p text:style-name="P250"><text:s text:c="4"/></text:p>
      <text:p text:style-name="P250"><text:s/></text:p>
      <text:p text:style-name="P250"><text:s text:c="5"/></text:p>
      <text:p text:style-name="P49"/>
      <text:p text:style-name="P250"><text:s/></text:p>
      <text:p text:style-name="P250"><text:s text:c="3"/></text:p>
      <text:p text:style-name="P217"><text:s text:c="2"/></text:p>
      <text:p text:style-name="P217"><text:s/></text:p>
      <text:p text:style-name="P221"/>
      <text:p text:style-name="P250"><text:s/></text:p>
      <text:p text:style-name="P250"/>
      <text:p text:style-name="P250"/>
      <text:p text:style-name="P217"/>
      <text:p text:style-name="P217"><text:s text:c="4"/></text:p>
      <text:p text:style-name="P111"><text:s text:c="16"/></text:p>
      <text:p text:style-name="P217"/>
      <text:p text:style-name="P217"><text:s text:c="11"/></text:p>
      <text:p text:style-name="P276"><text:s text:c="2"/></text:p>
      <text:p text:style-name="P49"><text:s text:c="11"/></text:p>
      <text:p text:style-name="P250"><text:s text:c="8"/></text:p>
      <text:p text:style-name="P264"/>
      <text:p text:style-name="P217"/>
      <text:p text:style-name="P61"><text:s text:c="16"/></text:p>
      <text:p text:style-name="P250"><text:s/></text:p>
      <text:p text:style-name="P217"/>
      <text:p text:style-name="P217"/>
      <text:p text:style-name="P217"/>
      <text:p text:style-name="P88"><text:s text:c="14"/></text:p>
      <text:p text:style-name="P49"><text:s text:c="13"/></text:p>
      <text:p text:style-name="P217"/>
      <text:p text:style-name="P217"><text:s/></text:p>
      <text:p text:style-name="P217"/>
      <text:p text:style-name="P49"/>
      <text:p text:style-name="P250"/>
      <text:p text:style-name="P46"><text:s text:c="14"/></text:p>
      <text:p text:style-name="P46"><text:s text:c="14"/><text:span text:style-name="T14"><text:s text:c="5"/></text:span></text:p>
      <text:p text:style-name="P46"><text:s text:c="10"/></text:p>
      <text:p text:style-name="P46"><text:span text:style-name="T14"><text:s text:c="12"/></text:span><text:s text:c="13"/></text:p>
      <text:p text:style-name="P49"><text:s text:c="13"/></text:p>
      <text:p text:style-name="P282"/>
      <text:p text:style-name="P262"><text:s text:c="4"/></text:p>
      <text:p text:style-name="P262"><text:span text:style-name="T74"><text:s text:c="4"/></text:span><text:span text:style-name="T17"><text:s text:c="5"/></text:span></text:p>
      <text:p text:style-name="P217"><text:s/></text:p>
      <text:p text:style-name="P67"/>
      <text:p text:style-name="P49"><text:span text:style-name="T54"><text:s text:c="10"/></text:span><text:span text:style-name="T5"><text:s text:c="4"/></text:span></text:p>
      <text:p text:style-name="P250"><text:s text:c="2"/></text:p>
      <text:p text:style-name="P49"><text:s text:c="12"/></text:p>
      <text:p text:style-name="P217"/>
      <text:p text:style-name="P111"/>
      <text:p text:style-name="P217"/>
      <text:p text:style-name="P61"><text:s text:c="15"/></text:p>
      <text:p text:style-name="P111"/>
      <text:p text:style-name="P61"><text:s text:c="11"/></text:p>
      <text:p text:style-name="P61"/>
      <text:p text:style-name="P61"><text:s text:c="13"/></text:p>
      <text:p text:style-name="P217"><text:s/></text:p>
      <text:p text:style-name="P250"/>
      <text:p text:style-name="P217"/>
      <text:p text:style-name="P49"><text:s text:c="11"/></text:p>
      <text:p text:style-name="P250"/>
      <text:p text:style-name="P250"><text:s text:c="4"/></text:p>
      <text:p text:style-name="P217"><text:s text:c="11"/></text:p>
      <text:p text:style-name="P250"><text:s text:c="5"/><text:span text:style-name="T5"><text:s/></text:span></text:p>
      <text:p text:style-name="P217"><text:s text:c="6"/></text:p>
      <text:p text:style-name="P46"><text:s text:c="12"/></text:p>
      <text:p text:style-name="P250"><text:s text:c="3"/></text:p>
      <text:p text:style-name="P49"/>
      <text:p text:style-name="P262"><text:s text:c="2"/></text:p>
      <text:p text:style-name="P264"/>
      <text:p text:style-name="P250"><text:s text:c="11"/></text:p>
      <text:p text:style-name="P61"><text:s text:c="13"/></text:p>
      <text:p text:style-name="P106"><text:s text:c="12"/></text:p>
      <text:p text:style-name="P250"><text:s text:c="3"/></text:p>
      <text:p text:style-name="P46"><text:s text:c="11"/></text:p>
      <text:p text:style-name="P217"><text:s text:c="5"/></text:p>
      <text:p text:style-name="P106"><text:s text:c="15"/></text:p>
      <text:p text:style-name="P49"><text:s text:c="12"/></text:p>
      <text:p text:style-name="P46"><text:s text:c="9"/></text:p>
      <text:p text:style-name="P106"/>
      <text:p text:style-name="P49"><text:s text:c="14"/></text:p>
      <text:p text:style-name="P250"><text:s text:c="5"/></text:p>
      <text:p text:style-name="P46"><text:s text:c="12"/></text:p>
      <text:p text:style-name="P221"/>
      <text:p text:style-name="P217"><text:s text:c="2"/></text:p>
      <text:p text:style-name="P111"><text:span text:style-name="T94"><text:s/></text:span><text:s text:c="11"/></text:p>
      <text:p text:style-name="P122"><text:s text:c="10"/></text:p>
      <text:p text:style-name="P217"/>
      <text:p text:style-name="P217"><text:s text:c="6"/></text:p>
      <text:p text:style-name="P49"><text:s text:c="8"/></text:p>
      <text:p text:style-name="P49"><text:s text:c="9"/></text:p>
      <text:p text:style-name="P61"><text:s text:c="11"/></text:p>
      <text:p text:style-name="P250"><text:s/></text:p>
      <text:p text:style-name="P46"><text:s text:c="9"/></text:p>
      <text:p text:style-name="P46"><text:s text:c="6"/></text:p>
      <text:p text:style-name="P49"/>
      <text:p text:style-name="P46"><text:s text:c="14"/></text:p>
      <text:p text:style-name="P46"><text:s text:c="11"/></text:p>
      <text:p text:style-name="P250"><text:s/></text:p>
      <text:p text:style-name="P46"><text:s text:c="7"/><text:span text:style-name="T72"><text:s text:c="3"/></text:span></text:p>
      <text:p text:style-name="P111"/>
      <text:p text:style-name="P61"><text:s text:c="11"/></text:p>
      <text:p text:style-name="P61"><text:s text:c="10"/></text:p>
      <text:p text:style-name="P262"><text:span text:style-name="T14"><text:s/></text:span><text:span text:style-name="T17"><text:s text:c="2"/></text:span></text:p>
      <text:p text:style-name="P248"><text:s text:c="3"/></text:p>
      <text:p text:style-name="P49"><text:s text:c="11"/></text:p>
      <text:p text:style-name="P61"><text:s text:c="13"/></text:p>
      <text:p text:style-name="P217"/>
      <text:p text:style-name="P217"><text:s text:c="11"/></text:p>
      <text:p text:style-name="P46"><text:s text:c="12"/></text:p>
      <text:p text:style-name="P185"><text:s text:c="2"/></text:p>
      <text:p text:style-name="P262"><text:s text:c="3"/><text:span text:style-name="T17"><text:s/></text:span></text:p>
      <text:p text:style-name="P217"><text:s text:c="2"/></text:p>
      <text:p text:style-name="P49"><text:s text:c="14"/></text:p>
      <text:p text:style-name="P104"><text:s text:c="8"/></text:p>
      <text:p text:style-name="P217"/>
      <text:p text:style-name="P144"><text:s text:c="2"/></text:p>
      <text:p text:style-name="P217"><text:s/></text:p>
      <text:p text:style-name="P262"><text:s text:c="4"/></text:p>
      <text:p text:style-name="P217"><text:s text:c="14"/></text:p>
      <text:p text:style-name="P262"><text:s/></text:p>
      <text:p text:style-name="P262"/>
      <text:p text:style-name="P262"><text:s text:c="2"/><text:span text:style-name="T17"><text:s/></text:span></text:p>
      <text:p text:style-name="P111"><text:s text:c="6"/></text:p>
      <text:p text:style-name="P46"><text:s text:c="11"/></text:p>
      <text:p text:style-name="P46"><text:s text:c="13"/></text:p>
      <text:p text:style-name="P262"><text:s text:c="2"/></text:p>
      <text:p text:style-name="P49"><text:s text:c="10"/></text:p>
      <text:p text:style-name="P46"><text:s text:c="14"/></text:p>
      <text:p text:style-name="P262"><text:s text:c="3"/><text:span text:style-name="T72"><text:s/></text:span></text:p>
      <text:p text:style-name="P217"/>
      <text:p text:style-name="P252"/>
      <text:p text:style-name="P61"><text:s text:c="14"/></text:p>
      <text:p text:style-name="P217"/>
      <text:p text:style-name="P252"/>
      <text:p text:style-name="P264"/>
      <text:p text:style-name="P265"><text:span text:style-name="T5"><text:s/></text:span><text:span text:style-name="T15"><text:s text:c="2"/></text:span></text:p>
      <text:p text:style-name="P46"><text:s text:c="16"/></text:p>
      <text:p text:style-name="P46"><text:s text:c="11"/></text:p>
      <text:p text:style-name="P106"><text:s text:c="10"/></text:p>
      <text:p text:style-name="P188"/>
      <text:p text:style-name="P262"/>
      <text:p text:style-name="P262"/>
      <text:p text:style-name="P262"/>
      <text:p text:style-name="P217"/>
      <text:p text:style-name="P49"><text:s text:c="17"/></text:p>
      <text:p text:style-name="P262"><text:s/></text:p>
      <text:p text:style-name="P217"/>
      <text:p text:style-name="P250"><text:s text:c="2"/></text:p>
      <text:p text:style-name="P61"><text:s text:c="13"/></text:p>
      <text:p text:style-name="P250"/>
      <text:p text:style-name="P217"/>
      <text:p text:style-name="P46"><text:s text:c="12"/></text:p>
      <text:p text:style-name="P217"/>
      <text:p text:style-name="P49"><text:s text:c="10"/></text:p>
      <text:p text:style-name="P250"><text:s text:c="2"/></text:p>
      <text:p text:style-name="P250"/>
      <text:p text:style-name="P250"/>
      <text:p text:style-name="P265"/>
      <text:p text:style-name="P248"/>
      <text:p text:style-name="P168"><text:s text:c="3"/></text:p>
      <text:p text:style-name="P46"/>
      <text:p text:style-name="P46"><text:s text:c="13"/></text:p>
      <text:p text:style-name="P250"/>
      <text:p text:style-name="P250"><text:s/></text:p>
      <text:p text:style-name="P188"><text:span text:style-name="T73"><text:s/></text:span><text:span text:style-name="T74"><text:s text:c="3"/></text:span></text:p>
      <text:p text:style-name="P248"><text:s text:c="2"/></text:p>
      <text:p text:style-name="P217"><text:s text:c="2"/></text:p>
      <text:p text:style-name="P264"/>
      <text:p text:style-name="P265"><text:s text:c="6"/></text:p>
      <text:p text:style-name="P61"><text:s text:c="16"/></text:p>
      <text:p text:style-name="P217"><text:s/></text:p>
      <text:p text:style-name="P265"><text:s text:c="2"/></text:p>
      <text:p text:style-name="P262"><text:s text:c="2"/></text:p>
      <text:p text:style-name="P239"/>
      <text:p text:style-name="P262"><text:s text:c="3"/><text:span text:style-name="T17"><text:s text:c="2"/></text:span></text:p>
      <text:p text:style-name="P239"/>
      <text:p text:style-name="P265"><text:s text:c="3"/></text:p>
      <text:p text:style-name="P49"><text:s text:c="8"/></text:p>
      <text:p text:style-name="P46"><text:s text:c="9"/></text:p>
      <text:p text:style-name="P250"/>
      <text:p text:style-name="P250"/>
      <text:p text:style-name="P46"><text:s text:c="8"/></text:p>
      <text:p text:style-name="P46"><text:s text:c="13"/><text:span text:style-name="T72"><text:s text:c="4"/></text:span></text:p>
      <text:p text:style-name="P262"/>
      <text:p text:style-name="P217"><text:s text:c="3"/></text:p>
      <text:p text:style-name="P262"/>
      <text:p text:style-name="P217"><text:s text:c="3"/></text:p>
      <text:p text:style-name="P250"><text:s text:c="12"/></text:p>
      <text:p text:style-name="P104"><text:s text:c="14"/></text:p>
      <text:p text:style-name="P217"/>
      <text:p text:style-name="P250"/>
      <text:p text:style-name="P238"><text:s text:c="2"/></text:p>
      <text:p text:style-name="P217"><text:s text:c="7"/></text:p>
      <text:p text:style-name="P238"><text:s text:c="7"/></text:p>
      <text:p text:style-name="P262"><text:s/></text:p>
      <text:p text:style-name="P46"><text:s text:c="14"/></text:p>
      <text:p text:style-name="P265"><text:s/></text:p>
      <text:p text:style-name="P46"><text:s text:c="14"/></text:p>
      <text:p text:style-name="P223"/>
      <text:p text:style-name="P217"/>
      <text:p text:style-name="P61"><text:s text:c="16"/></text:p>
      <text:p text:style-name="P217"/>
      <text:p text:style-name="P217"><text:s text:c="3"/></text:p>
      <text:p text:style-name="P217"><text:s/></text:p>
      <text:p text:style-name="P61"><text:s text:c="13"/></text:p>
      <text:p text:style-name="P248"><text:s/></text:p>
      <text:p text:style-name="P262"/>
      <text:p text:style-name="P262"><text:s/></text:p>
      <text:p text:style-name="P61"><text:s text:c="15"/></text:p>
      <text:p text:style-name="P217"><text:s text:c="4"/></text:p>
      <text:p text:style-name="P217"><text:s/></text:p>
      <text:p text:style-name="P46"><text:s text:c="14"/></text:p>
      <text:p text:style-name="P217"/>
      <text:p text:style-name="P221"/>
      <text:p text:style-name="P217"><text:s text:c="2"/></text:p>
      <text:p text:style-name="P265"><text:s/></text:p>
      <text:p text:style-name="P217"><text:s text:c="4"/></text:p>
      <text:p text:style-name="P46"><text:s text:c="12"/></text:p>
      <text:p text:style-name="P61"><text:s text:c="11"/></text:p>
      <text:p text:style-name="P262"><text:s/></text:p>
      <text:p text:style-name="P46"><text:s text:c="11"/><text:span text:style-name="T14"><text:s text:c="3"/></text:span></text:p>
      <text:p text:style-name="P67"/>
      <text:p text:style-name="P61"><text:s text:c="13"/></text:p>
      <text:p text:style-name="P46"><text:s text:c="8"/></text:p>
      <text:p text:style-name="P217"><text:s text:c="4"/></text:p>
      <text:p text:style-name="P262"><text:s/></text:p>
      <text:p text:style-name="P221"/>
      <text:p text:style-name="P46"><text:s text:c="10"/><text:span text:style-name="T14"><text:s text:c="4"/></text:span></text:p>
      <text:p text:style-name="P61"><text:s text:c="9"/></text:p>
      <text:p text:style-name="P217"/>
      <text:p text:style-name="P250"><text:s text:c="2"/></text:p>
      <text:p text:style-name="P250"/>
      <text:p text:style-name="P104"><text:s text:c="16"/></text:p>
      <text:p text:style-name="P49"><text:s text:c="12"/></text:p>
      <text:p text:style-name="P250"/>
      <text:p text:style-name="P61"><text:s text:c="12"/></text:p>
      <text:p text:style-name="P217"><text:s text:c="4"/></text:p>
      <text:p text:style-name="P46"><text:s text:c="7"/></text:p>
      <text:p text:style-name="P221"/>
      <text:p text:style-name="P46"><text:s text:c="10"/></text:p>
      <text:p text:style-name="P104"><text:s text:c="9"/></text:p>
      <text:p text:style-name="P61"><text:s text:c="12"/></text:p>
      <text:p text:style-name="P111"><text:s text:c="9"/></text:p>
      <text:p text:style-name="P106"><text:s text:c="15"/><text:span text:style-name="T5"><text:s text:c="6"/></text:span></text:p>
      <text:p text:style-name="P265"><text:s/></text:p>
      <text:p text:style-name="P106"><text:s text:c="9"/></text:p>
      <text:p text:style-name="P61"><text:s text:c="5"/></text:p>
      <text:p text:style-name="P250"><text:s/></text:p>
      <text:p text:style-name="P217"><text:s text:c="2"/></text:p>
      <text:p text:style-name="P268"><text:s/></text:p>
      <text:p text:style-name="P61"><text:s text:c="18"/></text:p>
      <text:p text:style-name="P49"><text:s text:c="14"/></text:p>
      <text:p text:style-name="P262"><text:s text:c="3"/></text:p>
      <text:p text:style-name="P262"><text:s text:c="3"/></text:p>
      <text:p text:style-name="P262"><text:s text:c="3"/></text:p>
      <text:p text:style-name="P46"><text:s text:c="12"/></text:p>
      <text:p text:style-name="P262"><text:s text:c="2"/></text:p>
      <text:p text:style-name="P106"><text:s text:c="14"/></text:p>
      <text:p text:style-name="P217"><text:s/></text:p>
      <text:p text:style-name="P262"><text:s/></text:p>
      <text:p text:style-name="P217"/>
      <text:p text:style-name="P221"/>
      <text:p text:style-name="P104"><text:s text:c="10"/></text:p>
      <text:p text:style-name="P248"/>
      <text:p text:style-name="P262"/>
      <text:p text:style-name="P217"/>
      <text:p text:style-name="P262"><text:s text:c="2"/><text:span text:style-name="T72"><text:s text:c="2"/></text:span></text:p>
      <text:p text:style-name="P49"><text:s text:c="10"/></text:p>
      <text:p text:style-name="P217"><text:s/></text:p>
      <text:p text:style-name="P67"/>
      <text:p text:style-name="P61"><text:s text:c="13"/></text:p>
      <text:p text:style-name="P106"/>
      <text:p text:style-name="P217"><text:s/></text:p>
      <text:p text:style-name="P217"/>
      <text:p text:style-name="P111"><text:s text:c="8"/></text:p>
      <text:p text:style-name="P265"><text:s text:c="3"/></text:p>
      <text:p text:style-name="P221"/>
      <text:p text:style-name="P61"><text:s text:c="8"/></text:p>
      <text:p text:style-name="P61"><text:s text:c="3"/></text:p>
      <text:p text:style-name="P250"><text:s/></text:p>
      <text:p text:style-name="P61"><text:s text:c="10"/></text:p>
      <text:p text:style-name="P250"><text:s text:c="2"/></text:p>
      <text:p text:style-name="P262"><text:s/><text:span text:style-name="T74"><text:s text:c="2"/></text:span></text:p>
      <text:p text:style-name="P221"/>
      <text:p text:style-name="P49"><text:s text:c="15"/><text:span text:style-name="T5"><text:s text:c="7"/></text:span></text:p>
      <text:p text:style-name="P250"><text:s text:c="4"/></text:p>
      <text:p text:style-name="P111"><text:s text:c="11"/></text:p>
      <text:p text:style-name="P46"><text:s text:c="11"/></text:p>
      <text:p text:style-name="P104"><text:s text:c="14"/></text:p>
      <text:p text:style-name="P61"><text:s text:c="12"/></text:p>
      <text:p text:style-name="P248"><text:s text:c="4"/></text:p>
      <text:p text:style-name="P46"><text:s text:c="14"/></text:p>
      <text:p text:style-name="P265"><text:s text:c="5"/></text:p>
      <text:p text:style-name="P61"><text:s text:c="11"/></text:p>
      <text:p text:style-name="P111"><text:s text:c="15"/></text:p>
      <text:p text:style-name="P111"><text:s text:c="7"/></text:p>
      <text:p text:style-name="P92"><text:s text:c="17"/>260 (7P TIPPER UF) <text:s/>(7PL TIPPER)</text:p>
      <text:p text:style-name="P61"><text:s text:c="8"/></text:p>
      <text:p text:style-name="P61"><text:s text:c="14"/></text:p>
      <text:p text:style-name="P265"><text:s text:c="3"/></text:p>
      <text:p text:style-name="P265"><text:s text:c="9"/></text:p>
      <text:p text:style-name="P49"><text:s text:c="14"/></text:p>
      <text:p text:style-name="P223"/>
      <text:p text:style-name="P217"><text:s text:c="8"/></text:p>
      <text:p text:style-name="P217"/>
      <text:p text:style-name="P111"><text:s text:c="12"/></text:p>
      <text:p text:style-name="P250"/>
      <text:p text:style-name="P262"><text:s text:c="3"/><text:span text:style-name="T17"><text:s/></text:span></text:p>
      <text:p text:style-name="P252"/>
      <text:p text:style-name="P91"><text:span text:style-name="T15"><text:s text:c="14"/></text:span><text:span text:style-name="T106"><text:s/></text:span></text:p>
      <text:p text:style-name="P265"><text:s text:c="2"/></text:p>
      <text:p text:style-name="P250"><text:s text:c="5"/></text:p>
      <text:p text:style-name="P221"/>
      <text:p text:style-name="P221"/>
      <text:p text:style-name="P248"/>
      <text:p text:style-name="P250"><text:s text:c="2"/><text:span text:style-name="T5"><text:s/></text:span></text:p>
      <text:p text:style-name="P46"><text:s text:c="11"/></text:p>
      <text:p text:style-name="P262"><text:s/><text:span text:style-name="T74"><text:s/></text:span></text:p>
      <text:p text:style-name="P261"><text:s/></text:p>
      <text:p text:style-name="P281"><text:s text:c="7"/></text:p>
      <text:p text:style-name="P49"><text:s text:c="12"/></text:p>
      <text:p text:style-name="P49"><text:s text:c="15"/></text:p>
      <text:p text:style-name="P250"/>
      <text:p text:style-name="P262"><text:s/></text:p>
      <text:p text:style-name="P250"><text:s text:c="4"/><text:span text:style-name="T5"><text:s text:c="2"/></text:span></text:p>
      <text:p text:style-name="P49"><text:s text:c="11"/></text:p>
      <text:p text:style-name="P217"/>
      <text:p text:style-name="P223"/>
      <text:p text:style-name="P252"/>
      <text:p text:style-name="P253"/>
      <text:p text:style-name="P221"/>
      <text:p text:style-name="P110"/>
      <text:p text:style-name="P111"><text:s text:c="5"/></text:p>
      <text:p text:style-name="P265"><text:s/></text:p>
      <text:p text:style-name="P46"><text:s text:c="14"/></text:p>
      <text:p text:style-name="P250"><text:s text:c="17"/></text:p>
      <text:p text:style-name="P217"><text:s text:c="4"/></text:p>
      <text:p text:style-name="P217"><text:s/></text:p>
      <text:p text:style-name="P217"><text:s text:c="4"/></text:p>
      <text:p text:style-name="P262"><text:s/></text:p>
      <text:p text:style-name="P217"><text:s/></text:p>
      <text:p text:style-name="P248"><text:s text:c="4"/></text:p>
      <text:p text:style-name="P276"/>
      <text:p text:style-name="P217"/>
      <text:p text:style-name="P217"/>
      <text:p text:style-name="P217"><text:s/></text:p>
      <text:p text:style-name="P49"><text:s text:c="15"/></text:p>
      <text:p text:style-name="P49"><text:s text:c="13"/></text:p>
      <text:p text:style-name="P46"><text:s text:c="11"/></text:p>
      <text:p text:style-name="P61"><text:s text:c="9"/></text:p>
      <text:p text:style-name="P46"><text:s/></text:p>
      <text:p text:style-name="P46"><text:s text:c="14"/></text:p>
      <text:p text:style-name="P46"/>
      <text:p text:style-name="P46"><text:s text:c="13"/></text:p>
      <text:p text:style-name="P61"><text:s text:c="13"/></text:p>
      <text:p text:style-name="P61"/>
      <text:p text:style-name="P61"><text:s text:c="10"/></text:p>
      <text:p text:style-name="P46"><text:s text:c="12"/></text:p>
      <text:p text:style-name="P262"><text:span text:style-name="T72"><text:s text:c="2"/></text:span><text:span text:style-name="T74"><text:s text:c="2"/></text:span></text:p>
      <text:p text:style-name="P46"><text:s text:c="11"/></text:p>
      <text:p text:style-name="P61"><text:s text:c="16"/></text:p>
      <text:p text:style-name="P262"><text:s text:c="2"/><text:span text:style-name="T73"><text:s text:c="2"/></text:span><text:span text:style-name="T74"><text:s text:c="2"/></text:span><text:span text:style-name="T58"><text:s/></text:span></text:p>
      <text:p text:style-name="P46"><text:s text:c="10"/><text:span text:style-name="T14"><text:s/></text:span></text:p>
      <text:p text:style-name="P168"><text:s text:c="8"/></text:p>
      <text:p text:style-name="P49"><text:s text:c="10"/></text:p>
      <text:p text:style-name="P61"><text:s text:c="15"/></text:p>
      <text:p text:style-name="P248"/>
      <text:p text:style-name="P250"><text:s/></text:p>
      <text:p text:style-name="P46"/>
      <text:p text:style-name="P46"><text:s text:c="14"/></text:p>
      <text:p text:style-name="P49"><text:s text:c="20"/></text:p>
      <text:p text:style-name="P217"><text:s text:c="5"/></text:p>
      <text:p text:style-name="P49"><text:soft-page-break/></text:p>
      <text:p text:style-name="P49"><text:s text:c="16"/></text:p>
      <text:p text:style-name="P46"><text:s text:c="16"/></text:p>
      <text:p text:style-name="P61"><text:s/></text:p>
      <text:p text:style-name="P46"><text:s text:c="9"/><text:span text:style-name="T72"><text:s text:c="2"/></text:span></text:p>
      <text:p text:style-name="P217"><text:s text:c="2"/></text:p>
      <text:p text:style-name="P46"><text:s text:c="10"/><text:span text:style-name="T72"><text:s text:c="2"/></text:span></text:p>
      <text:p text:style-name="P262"><text:s text:c="2"/><text:span text:style-name="T74"><text:s text:c="2"/></text:span></text:p>
      <text:p text:style-name="P262"><text:s text:c="3"/></text:p>
      <text:p text:style-name="P111"><text:s text:c="16"/></text:p>
      <text:p text:style-name="P111"><text:s text:c="17"/></text:p>
      <text:p text:style-name="P217"/>
      <text:p text:style-name="P217"><text:s text:c="2"/></text:p>
      <text:p text:style-name="P250"><text:s text:c="5"/></text:p>
      <text:p text:style-name="P46"><text:s text:c="11"/><text:span text:style-name="T14"><text:s text:c="2"/></text:span></text:p>
      <text:p text:style-name="P111"><text:s text:c="4"/></text:p>
      <text:p text:style-name="P254"/>
      <text:p text:style-name="P217"/>
      <text:p text:style-name="P250"/>
      <text:p text:style-name="P49"/>
      <text:p text:style-name="P49"><text:s text:c="8"/></text:p>
      <text:p text:style-name="P46"><text:s text:c="10"/></text:p>
      <text:p text:style-name="P46"><text:s text:c="12"/></text:p>
      <text:p text:style-name="P248"><text:s/><text:span text:style-name="T72"><text:s/></text:span></text:p>
      <text:p text:style-name="P61"><text:s text:c="9"/></text:p>
      <text:p text:style-name="P46"/>
      <text:p text:style-name="P46"><text:s text:c="12"/></text:p>
      <text:p text:style-name="P46"><text:s text:c="12"/></text:p>
      <text:p text:style-name="P61"><text:s text:c="16"/></text:p>
      <text:p text:style-name="P262"><text:s text:c="3"/></text:p>
      <text:p text:style-name="P221"/>
      <text:p text:style-name="P253"/>
      <text:p text:style-name="P262"><text:s text:c="3"/><text:span text:style-name="T17"><text:s/></text:span></text:p>
      <text:p text:style-name="P217"><text:s text:c="3"/></text:p>
      <text:p text:style-name="P250"><text:s text:c="4"/></text:p>
      <text:p text:style-name="P111"><text:s text:c="13"/></text:p>
      <text:p text:style-name="P224"/>
      <text:p text:style-name="P248"><text:s/></text:p>
      <text:p text:style-name="P106"><text:s text:c="14"/></text:p>
      <text:p text:style-name="P49"/>
      <text:p text:style-name="P49"><text:s text:c="9"/></text:p>
      <text:p text:style-name="P262"><text:s/></text:p>
      <text:p text:style-name="P105"><text:span text:style-name="T14"><text:s text:c="11"/></text:span><text:span text:style-name="T72"><text:s text:c="11"/></text:span></text:p>
      <text:p text:style-name="P106"><text:s text:c="15"/></text:p>
      <text:p text:style-name="P125"><text:s text:c="13"/></text:p>
      <text:p text:style-name="P61"><text:s text:c="12"/></text:p>
      <text:p text:style-name="P106"/>
      <text:p text:style-name="P49"><text:s text:c="11"/></text:p>
      <text:p text:style-name="P46"><text:s text:c="11"/></text:p>
      <text:p text:style-name="P61"><text:s text:c="14"/></text:p>
      <text:p text:style-name="P38"><text:s text:c="10"/><text:span text:style-name="T72"><text:s/></text:span></text:p>
      <text:p text:style-name="P42"><text:span text:style-name="T5"><text:s text:c="12"/></text:span><text:span text:style-name="T38"><text:s/></text:span></text:p>
      <text:p text:style-name="P248"><text:s text:c="2"/></text:p>
      <text:p text:style-name="P250"/>
      <text:p text:style-name="P262"><text:s text:c="4"/></text:p>
      <text:p text:style-name="P248"><text:s text:c="5"/></text:p>
      <text:p text:style-name="P217"/>
      <text:p text:style-name="P61"><text:s text:c="14"/></text:p>
      <text:p text:style-name="P49"><text:s text:c="10"/></text:p>
      <text:p text:style-name="P217"><text:s text:c="3"/></text:p>
      <text:p text:style-name="P217"><text:s text:c="11"/></text:p>
      <text:p text:style-name="P217"/>
      <text:p text:style-name="P111"><text:s text:c="3"/></text:p>
      <text:p text:style-name="P217"><text:s text:c="2"/></text:p>
      <text:p text:style-name="P280"><text:span text:style-name="T14"><text:s text:c="5"/></text:span><text:span text:style-name="T14"><text:s/></text:span></text:p>
      <text:p text:style-name="P217"/>
      <text:p text:style-name="P217"><text:s/></text:p>
      <text:p text:style-name="P217"/>
      <text:p text:style-name="P61"><text:s text:c="2"/></text:p>
      <text:p text:style-name="P217"/>
      <text:p text:style-name="P217"><text:s text:c="2"/></text:p>
      <text:p text:style-name="P250"><text:s text:c="5"/></text:p>
      <text:p text:style-name="P61"><text:s text:c="12"/></text:p>
      <text:p text:style-name="P217"/>
      <text:p text:style-name="P217"><text:s/></text:p>
      <text:p text:style-name="P217"><text:s/></text:p>
      <text:p text:style-name="P221"/>
      <text:p text:style-name="P217"><text:s/></text:p>
      <text:p text:style-name="P221"/>
      <text:p text:style-name="P49"><text:s text:c="12"/></text:p>
      <text:p text:style-name="P250"><text:s text:c="2"/></text:p>
      <text:p text:style-name="P248"><text:s text:c="2"/></text:p>
      <text:p text:style-name="P49"><text:s text:c="10"/></text:p>
      <text:p text:style-name="P248"/>
      <text:p text:style-name="P46"><text:s text:c="11"/></text:p>
      <text:p text:style-name="P265"><text:s/></text:p>
      <text:p text:style-name="P262"><text:s text:c="2"/></text:p>
      <text:p text:style-name="P217"/>
      <text:p text:style-name="P107"><text:s text:c="10"/></text:p>
      <text:p text:style-name="P217"/>
      <text:p text:style-name="P217"><text:s text:c="4"/></text:p>
      <text:p text:style-name="P217"/>
      <text:p text:style-name="P104"><text:s text:c="16"/></text:p>
      <text:p text:style-name="P217"><text:s text:c="4"/></text:p>
      <text:p text:style-name="P111"><text:s text:c="13"/></text:p>
      <text:p text:style-name="P217"><text:s text:c="3"/></text:p>
      <text:p text:style-name="P111"><text:s text:c="14"/></text:p>
      <text:p text:style-name="P261"><text:s text:c="2"/></text:p>
      <text:p text:style-name="P111"><text:s text:c="9"/></text:p>
      <text:p text:style-name="P61"><text:s text:c="13"/></text:p>
      <text:p text:style-name="P61"/>
      <text:p text:style-name="P262"><text:s text:c="3"/></text:p>
      <text:p text:style-name="P238"/>
      <text:p text:style-name="P221"/>
      <text:p text:style-name="P221"/>
      <text:p text:style-name="P262"><text:s/></text:p>
      <text:p text:style-name="P217"><text:s text:c="3"/></text:p>
      <text:p text:style-name="P46"><text:s text:c="13"/></text:p>
      <text:p text:style-name="P46"><text:s text:c="12"/></text:p>
      <text:p text:style-name="P248"/>
      <text:p text:style-name="P61"/>
      <text:p text:style-name="P49"><text:s text:c="11"/></text:p>
      <text:p text:style-name="P49"><text:s text:c="9"/><text:span text:style-name="T5"><text:s text:c="5"/></text:span></text:p>
      <text:p text:style-name="P61"/>
      <text:p text:style-name="P217"><text:s text:c="4"/></text:p>
      <text:p text:style-name="P61"><text:s text:c="16"/></text:p>
      <text:p text:style-name="P250"><text:s text:c="5"/></text:p>
      <text:p text:style-name="P217"/>
      <text:p text:style-name="P217"/>
      <text:p text:style-name="P217"/>
      <text:p text:style-name="P221"/>
      <text:p text:style-name="P252"/>
      <text:p text:style-name="P250"/>
      <text:p text:style-name="P252"/>
      <text:p text:style-name="P248"><text:s text:c="2"/></text:p>
      <text:p text:style-name="P61"><text:s text:c="8"/></text:p>
      <text:p text:style-name="P250"/>
      <text:p text:style-name="P111"/>
      <text:p text:style-name="P217"/>
      <text:p text:style-name="P49"><text:s text:c="12"/></text:p>
      <text:p text:style-name="P49"><text:s text:c="8"/></text:p>
      <text:p text:style-name="P262"><text:s text:c="3"/></text:p>
      <text:p text:style-name="P106"><text:s text:c="16"/></text:p>
      <text:p text:style-name="P217"/>
      <text:p text:style-name="P248"><text:s text:c="3"/></text:p>
      <text:p text:style-name="P61"><text:s text:c="9"/></text:p>
      <text:p text:style-name="P49"><text:s text:c="10"/></text:p>
      <text:p text:style-name="P262"><text:span text:style-name="T72"><text:s text:c="2"/></text:span><text:span text:style-name="T104"><text:s/></text:span><text:span text:style-name="T107"><text:s text:c="2"/>RAYNHAM PARK </text:span></text:p>
      <text:p text:style-name="P217"/>
      <text:p text:style-name="P217"/>
      <text:p text:style-name="P61"><text:s text:c="14"/></text:p>
      <text:p text:style-name="P61"><text:s text:c="11"/></text:p>
      <text:p text:style-name="P253"/>
      <text:p text:style-name="P46"><text:s text:c="9"/></text:p>
      <text:p text:style-name="P50"/>
      <text:p text:style-name="P262"><text:s text:c="2"/><text:span text:style-name="T72"><text:s/></text:span></text:p>
      <text:p text:style-name="P250"/>
      <text:p text:style-name="P223"/>
      <text:p text:style-name="P250"><text:s text:c="2"/></text:p>
      <text:p text:style-name="P61"><text:s text:c="14"/></text:p>
      <text:p text:style-name="P217"><text:s text:c="4"/></text:p>
      <text:p text:style-name="P61"><text:s text:c="17"/></text:p>
      <text:p text:style-name="P262"><text:s text:c="3"/></text:p>
      <text:p text:style-name="P250"><text:s text:c="4"/><text:span text:style-name="T103">52319) 1097</text:span></text:p>
      <text:p text:style-name="P46"><text:s text:c="15"/><text:span text:style-name="T72"><text:s text:c="2"/></text:span></text:p>
      <text:p text:style-name="P250"/>
      <text:p text:style-name="P217"><text:s/></text:p>
      <text:p text:style-name="P250"/>
      <text:p text:style-name="P265"><text:s text:c="4"/></text:p>
      <text:p text:style-name="P252"/>
      <text:p text:style-name="P250"><text:s text:c="2"/></text:p>
      <text:p text:style-name="P248"><text:s text:c="2"/></text:p>
      <text:p text:style-name="P250"><text:s text:c="2"/></text:p>
      <text:p text:style-name="P265"><text:s text:c="4"/></text:p>
      <text:p text:style-name="P61"><text:s text:c="12"/></text:p>
      <text:p text:style-name="P253"/>
      <text:p text:style-name="P270"><text:s text:c="5"/>TETBURY</text:p>
      <text:p text:style-name="P262"><text:s text:c="3"/></text:p>
      <text:p text:style-name="P262"><text:s text:c="2"/></text:p>
      <text:p text:style-name="P264"/>
      <text:p text:style-name="P270"><text:s text:c="17"/>26013 <text:s text:c="2"/></text:p>
      <text:p text:style-name="P46"><text:s text:c="8"/></text:p>
      <text:p text:style-name="P217"><text:s/></text:p>
      <text:p text:style-name="P262"><text:s/></text:p>
      <text:p text:style-name="P262"><text:s text:c="2"/></text:p>
      <text:p text:style-name="P61"><text:s text:c="4"/></text:p>
      <text:p text:style-name="P262"><text:s/></text:p>
      <text:p text:style-name="P262"><text:s text:c="3"/></text:p>
      <text:p text:style-name="P262"><text:s text:c="2"/></text:p>
      <text:p text:style-name="P262"><text:s text:c="2"/></text:p>
      <text:p text:style-name="P250"/>
      <text:p text:style-name="P262"><text:s text:c="4"/></text:p>
      <text:p text:style-name="P217"/>
      <text:p text:style-name="P221"/>
      <text:p text:style-name="P250"><text:s text:c="4"/></text:p>
      <text:p text:style-name="P250"><text:s text:c="4"/></text:p>
      <text:p text:style-name="P106"><text:s text:c="14"/></text:p>
      <text:p text:style-name="P250"><text:s text:c="15"/></text:p>
      <text:p text:style-name="P217"/>
      <text:p text:style-name="P217"><text:s/></text:p>
      <text:p text:style-name="P262"><text:s text:c="2"/></text:p>
      <text:p text:style-name="P125"/>
      <text:p text:style-name="P49"><text:s text:c="14"/><text:span text:style-name="T5"><text:s text:c="2"/></text:span></text:p>
      <text:p text:style-name="P250"><text:s text:c="5"/></text:p>
      <text:p text:style-name="P49"><text:s text:c="12"/></text:p>
      <text:p text:style-name="P46"><text:s text:c="13"/></text:p>
      <text:p text:style-name="P46"><text:s text:c="10"/></text:p>
      <text:p text:style-name="P46"><text:s text:c="16"/></text:p>
      <text:p text:style-name="P248"><text:s text:c="2"/></text:p>
      <text:p text:style-name="P238"/>
      <text:p text:style-name="P250"/>
      <text:p text:style-name="P265"><text:s text:c="4"/></text:p>
      <text:p text:style-name="P61"/>
      <text:p text:style-name="P61"><text:s text:c="13"/></text:p>
      <text:p text:style-name="P250"><text:s text:c="3"/></text:p>
      <text:p text:style-name="P250"/>
      <text:p text:style-name="P61"><text:s text:c="8"/></text:p>
      <text:p text:style-name="P217"/>
      <text:p text:style-name="P223"/>
      <text:p text:style-name="P46"><text:s text:c="17"/></text:p>
      <text:p text:style-name="P61"><text:s text:c="11"/></text:p>
      <text:p text:style-name="P217"/>
      <text:p text:style-name="P61"><text:s text:c="11"/></text:p>
      <text:p text:style-name="P49"><text:s text:c="9"/></text:p>
      <text:p text:style-name="P248"><text:span text:style-name="T72"><text:s text:c="2"/></text:span><text:s text:c="2"/></text:p>
      <text:p text:style-name="P46"><text:s text:c="14"/></text:p>
      <text:p text:style-name="P49"><text:s text:c="13"/></text:p>
      <text:p text:style-name="P46"><text:s text:c="14"/><text:span text:style-name="T72"><text:s/></text:span></text:p>
      <text:p text:style-name="P46"><text:s text:c="11"/></text:p>
      <text:p text:style-name="P46"><text:s text:c="9"/></text:p>
      <text:p text:style-name="P90"><text:span text:style-name="T73"><text:s text:c="11"/></text:span><text:s text:c="9"/><text:span text:style-name="T73"><text:s/></text:span></text:p>
      <text:p text:style-name="P49"><text:s text:c="10"/></text:p>
      <text:p text:style-name="P217"/>
      <text:p text:style-name="P61"/>
      <text:p text:style-name="P46"><text:s text:c="11"/><text:span text:style-name="T97"><text:s/></text:span><text:span text:style-name="T101"><text:s text:c="2"/></text:span><text:span text:style-name="T29"><text:s/></text:span></text:p>
      <text:p text:style-name="P49"><text:s text:c="10"/></text:p>
      <text:p text:style-name="P35"><text:s text:c="12"/></text:p>
      <text:p text:style-name="P245"><text:s/></text:p>
      <text:p text:style-name="P36"><text:s text:c="12"/></text:p>
      <text:p text:style-name="P46"><text:s text:c="9"/><text:span text:style-name="T72"><text:s text:c="4"/></text:span></text:p>
      <text:p text:style-name="P46"><text:s text:c="12"/></text:p>
      <text:p text:style-name="P46"><text:s text:c="11"/></text:p>
      <text:p text:style-name="P46"><text:s text:c="8"/></text:p>
      <text:p text:style-name="P46"><text:s text:c="13"/></text:p>
      <text:p text:style-name="P46"><text:s text:c="7"/></text:p>
      <text:p text:style-name="P49"><text:s text:c="9"/></text:p>
      <text:p text:style-name="P46"><text:s text:c="8"/></text:p>
      <text:p text:style-name="P46"><text:s text:c="10"/><text:span text:style-name="T8"><text:s/></text:span><text:span text:style-name="T14"><text:s text:c="2"/></text:span></text:p>
      <text:p text:style-name="P46"><text:s text:c="10"/></text:p>
      <text:p text:style-name="P49"><text:s text:c="10"/></text:p>
      <text:p text:style-name="P46"><text:s text:c="9"/></text:p>
      <text:p text:style-name="P49"><text:s text:c="9"/></text:p>
      <text:p text:style-name="P49"><text:s text:c="12"/></text:p>
      <text:p text:style-name="P49"><text:s text:c="11"/></text:p>
      <text:p text:style-name="P49"><text:s text:c="14"/></text:p>
      <text:p text:style-name="P111"><text:s text:c="14"/></text:p>
      <text:p text:style-name="P107"><text:s text:c="11"/></text:p>
      <text:p text:style-name="P217"><text:s text:c="3"/></text:p>
      <text:p text:style-name="P217"><text:s text:c="6"/></text:p>
      <text:p text:style-name="P46"><text:s text:c="12"/></text:p>
      <text:p text:style-name="P106"><text:s text:c="9"/></text:p>
      <text:p text:style-name="P145"><text:s/></text:p>
      <text:p text:style-name="P46"><text:s text:c="12"/><text:span text:style-name="T72"><text:s text:c="2"/></text:span></text:p>
      <text:p text:style-name="P262"><text:s text:c="6"/></text:p>
      <text:p text:style-name="P248"/>
      <text:p text:style-name="P262"><text:s text:c="2"/></text:p>
      <text:p text:style-name="P217"/>
      <text:p text:style-name="P248"><text:s text:c="2"/></text:p>
      <text:p text:style-name="P217"/>
      <text:p text:style-name="P49"><text:s text:c="12"/></text:p>
      <text:p text:style-name="P56"><text:s text:c="9"/></text:p>
      <text:p text:style-name="P38"/>
      <text:p text:style-name="P242"><text:s text:c="6"/></text:p>
      <text:p text:style-name="P262"><text:span text:style-name="T5"><text:s/></text:span><text:span text:style-name="T17"><text:s text:c="2"/></text:span></text:p>
      <text:p text:style-name="P265"><text:s text:c="4"/><text:span text:style-name="T73"><text:s/></text:span></text:p>
      <text:p text:style-name="P262"><text:s text:c="3"/></text:p>
      <text:p text:style-name="P111"/>
      <text:p text:style-name="P248"><text:s text:c="3"/></text:p>
      <text:p text:style-name="P217"/>
      <text:p text:style-name="P49"><text:s text:c="11"/></text:p>
      <text:p text:style-name="P46"><text:s text:c="19"/></text:p>
      <text:p text:style-name="P221"/>
      <text:p text:style-name="P262"><text:s text:c="3"/></text:p>
      <text:p text:style-name="P217"/>
      <text:p text:style-name="P250"/>
      <text:p text:style-name="P250"><text:s/></text:p>
      <text:p text:style-name="P250"><text:s text:c="3"/></text:p>
      <text:p text:style-name="P46"><text:s text:c="13"/></text:p>
      <text:p text:style-name="P46"><text:s text:c="11"/></text:p>
      <text:p text:style-name="P250"><text:s text:c="5"/></text:p>
      <text:p text:style-name="P250"/>
      <text:p text:style-name="P217"><text:s/></text:p>
      <text:p text:style-name="P252"/>
      <text:p text:style-name="P250"><text:s text:c="4"/></text:p>
      <text:p text:style-name="P217"><text:s text:c="2"/></text:p>
      <text:p text:style-name="P221"/>
      <text:p text:style-name="P262"><text:s/></text:p>
      <text:p text:style-name="P250"/>
      <text:p text:style-name="P262"><text:s/></text:p>
      <text:p text:style-name="P265"><text:s/></text:p>
      <text:p text:style-name="P250"><text:s/></text:p>
      <text:p text:style-name="P217"/>
      <text:p text:style-name="P250"><text:s/></text:p>
      <text:p text:style-name="P250"/>
      <text:p text:style-name="P250"><text:s text:c="4"/></text:p>
      <text:p text:style-name="P49"><text:s text:c="14"/></text:p>
      <text:p text:style-name="P105"><text:span text:style-name="T72"><text:s text:c="13"/></text:span><text:span text:style-name="T14"><text:s/></text:span></text:p>
      <text:p text:style-name="P265"><text:s text:c="4"/></text:p>
      <text:p text:style-name="P262"><text:s text:c="4"/><text:span text:style-name="T74"><text:s/></text:span></text:p>
      <text:p text:style-name="P262"><text:s/></text:p>
      <text:p text:style-name="P61"/>
      <text:p text:style-name="P248"/>
      <text:p text:style-name="P46"><text:s text:c="13"/></text:p>
      <text:p text:style-name="P61"><text:s text:c="16"/></text:p>
      <text:p text:style-name="P49"><text:s text:c="15"/></text:p>
      <text:p text:style-name="P250"/>
      <text:p text:style-name="P248"><text:s/></text:p>
      <text:p text:style-name="P61"/>
      <text:p text:style-name="P61"><text:s text:c="15"/></text:p>
      <text:p text:style-name="P250"/>
      <text:p text:style-name="P49"><text:s text:c="15"/></text:p>
      <text:p text:style-name="P250"/>
      <text:p text:style-name="P250"><text:s/></text:p>
      <text:p text:style-name="P49"/>
      <text:p text:style-name="P262"><text:span text:style-name="T72"><text:s text:c="5"/></text:span><text:span text:style-name="T74"><text:s text:c="2"/></text:span></text:p>
      <text:p text:style-name="P250"><text:s text:c="5"/></text:p>
      <text:p text:style-name="P250"><text:s text:c="7"/></text:p>
      <text:p text:style-name="P262"><text:s text:c="3"/></text:p>
      <text:p text:style-name="P262"><text:span text:style-name="T72"><text:s/></text:span><text:span text:style-name="T74"><text:s/></text:span></text:p>
      <text:p text:style-name="P49"><text:s text:c="14"/></text:p>
      <text:p text:style-name="P46"><text:s text:c="11"/></text:p>
      <text:p text:style-name="P46"><text:s text:c="11"/></text:p>
      <text:p text:style-name="P46"/>
      <text:p text:style-name="P46"><text:s text:c="12"/></text:p>
      <text:p text:style-name="P46"><text:s text:c="14"/></text:p>
      <text:p text:style-name="P46"><text:s text:c="7"/></text:p>
      <text:p text:style-name="P46"/>
      <text:p text:style-name="P46"><text:s text:c="16"/></text:p>
      <text:p text:style-name="P49"/>
      <text:p text:style-name="P49"><text:s text:c="8"/></text:p>
      <text:p text:style-name="P46"><text:s text:c="11"/></text:p>
      <text:p text:style-name="P49"><text:s text:c="11"/></text:p>
      <text:p text:style-name="P111"><text:s text:c="9"/></text:p>
      <text:p text:style-name="P61"><text:s text:c="14"/></text:p>
      <text:p text:style-name="P250"><text:s text:c="13"/></text:p>
      <text:p text:style-name="P46"><text:s text:c="15"/></text:p>
      <text:p text:style-name="P46"><text:s text:c="11"/></text:p>
      <text:p text:style-name="P111"><text:s text:c="13"/></text:p>
      <text:p text:style-name="P46"><text:s text:c="10"/><text:span text:style-name="T14"><text:s/></text:span></text:p>
      <text:p text:style-name="P36"/>
      <text:p text:style-name="P36"><text:s text:c="15"/></text:p>
      <text:p text:style-name="P101"><text:s text:c="10"/></text:p>
      <text:p text:style-name="P103"><text:s text:c="9"/></text:p>
      <text:p text:style-name="P101"><text:s text:c="12"/></text:p>
      <text:p text:style-name="P35"/>
      <text:p text:style-name="P35"><text:s text:c="12"/></text:p>
      <text:p text:style-name="P35"><text:s text:c="17"/></text:p>
      <text:p text:style-name="P35"><text:s text:c="14"/></text:p>
      <text:p text:style-name="P216"><text:s text:c="17"/></text:p>
      <text:p text:style-name="P35"><text:s text:c="12"/></text:p>
      <text:p text:style-name="P196"/>
      <text:p text:style-name="P244"><text:s/></text:p>
      <text:p text:style-name="P35"><text:s text:c="13"/></text:p>
      <text:p text:style-name="P35"><text:s text:c="12"/></text:p>
      <text:p text:style-name="P35"><text:s text:c="13"/></text:p>
      <text:p text:style-name="P243"/>
      <text:p text:style-name="P38"><text:s text:c="14"/></text:p>
      <text:p text:style-name="P35"><text:s text:c="12"/></text:p>
      <text:p text:style-name="P41"/>
      <text:p text:style-name="P35"><text:s text:c="12"/></text:p>
      <text:p text:style-name="P38"><text:s text:c="8"/></text:p>
      <text:p text:style-name="P35"><text:s text:c="12"/></text:p>
      <text:p text:style-name="P35"><text:s text:c="16"/></text:p>
      <text:p text:style-name="P41"><text:s text:c="14"/></text:p>
      <text:p text:style-name="P38"><text:s text:c="10"/></text:p>
      <text:p text:style-name="P107"><text:s text:c="11"/></text:p>
      <text:p text:style-name="P108"><text:s text:c="13"/></text:p>
      <text:p text:style-name="P38"/>
      <text:p text:style-name="P38"><text:s text:c="12"/></text:p>
      <text:p text:style-name="P38"><text:s text:c="11"/></text:p>
      <text:p text:style-name="P39"><text:s text:c="9"/></text:p>
      <text:p text:style-name="P38"><text:s text:c="12"/><text:span text:style-name="T100"><text:s/></text:span></text:p>
      <text:p text:style-name="P208"><text:s text:c="3"/></text:p>
      <text:p text:style-name="P107"><text:s text:c="13"/></text:p>
      <text:p text:style-name="P243"><text:s text:c="8"/></text:p>
      <text:p text:style-name="P242"><text:s text:c="11"/></text:p>
      <text:p text:style-name="P98"><text:span text:style-name="T14"><text:s text:c="10"/></text:span><text:span text:style-name="T33"><text:s text:c="2"/></text:span></text:p>
      <text:p text:style-name="P107"/>
      <text:p text:style-name="P98"><text:span text:style-name="T33"><text:s text:c="15"/></text:span><text:span text:style-name="T36"><text:s/></text:span></text:p>
      <text:p text:style-name="P250"><text:s text:c="4"/></text:p>
      <text:p text:style-name="P46"><text:s text:c="14"/></text:p>
      <text:p text:style-name="P46"><text:s text:c="9"/></text:p>
      <text:p text:style-name="P36"><text:s text:c="11"/></text:p>
      <text:p text:style-name="P35"><text:s text:c="10"/></text:p>
      <text:p text:style-name="P210"/>
      <text:p text:style-name="P54"><text:s text:c="13"/></text:p>
      <text:p text:style-name="P39"><text:s text:c="15"/><text:span text:style-name="T5"><text:s/></text:span></text:p>
      <text:p text:style-name="P99"><text:s text:c="13"/></text:p>
      <text:p text:style-name="P99"><text:s text:c="14"/></text:p>
      <text:p text:style-name="P38"><text:s text:c="7"/></text:p>
      <text:p text:style-name="P38"><text:s text:c="14"/></text:p>
      <text:p text:style-name="P210"><text:s/></text:p>
      <text:p text:style-name="P38"><text:s text:c="13"/></text:p>
      <text:p text:style-name="P57"><text:s text:c="12"/></text:p>
      <text:p text:style-name="P147"><text:s text:c="96"/></text:p>
      <text:p text:style-name="P107"><text:s text:c="13"/></text:p>
      <text:p text:style-name="P206"><text:s/></text:p>
      <text:p text:style-name="P87"/>
      <text:p text:style-name="P86"><text:span text:style-name="T73"><text:s text:c="13"/></text:span><text:span text:style-name="T81"><text:s/></text:span><text:span text:style-name="T73"><text:s/></text:span></text:p>
      <text:p text:style-name="P38"><text:s text:c="10"/></text:p>
      <text:p text:style-name="P242"/>
      <text:p text:style-name="P38"><text:s text:c="16"/></text:p>
      <text:p text:style-name="P98"/>
      <text:p text:style-name="P41"><text:s text:c="12"/><text:span text:style-name="T72"><text:s text:c="2"/></text:span></text:p>
      <text:p text:style-name="P57"/>
      <text:p text:style-name="P38"><text:s text:c="11"/></text:p>
      <text:p text:style-name="P199"><text:span text:style-name="T56"><text:s text:c="2"/></text:span><text:span text:style-name="T55"><text:s/></text:span></text:p>
      <text:p text:style-name="P107"><text:s text:c="9"/></text:p>
      <text:p text:style-name="P240"/>
      <text:p text:style-name="P39"><text:s text:c="16"/></text:p>
      <text:p text:style-name="P56"/>
      <text:p text:style-name="P56"><text:s text:c="15"/></text:p>
      <text:p text:style-name="P196"><text:s/><text:span text:style-name="T100"><text:s/></text:span></text:p>
      <text:p text:style-name="P99"><text:s text:c="13"/></text:p>
      <text:p text:style-name="P242"><text:s text:c="9"/></text:p>
      <text:p text:style-name="P56"><text:s text:c="12"/></text:p>
      <text:p text:style-name="P56"><text:s text:c="13"/></text:p>
      <text:p text:style-name="P196"><text:s text:c="4"/></text:p>
      <text:p text:style-name="P39"><text:s text:c="13"/></text:p>
      <text:p text:style-name="P211"/>
      <text:p text:style-name="P241"/>
      <text:p text:style-name="P86"><text:span text:style-name="T73"><text:s text:c="13"/></text:span><text:span text:style-name="T81"><text:s/></text:span></text:p>
      <text:p text:style-name="P206"><text:s text:c="2"/></text:p>
      <text:p text:style-name="P99"><text:s text:c="15"/></text:p>
      <text:p text:style-name="P99"/>
      <text:p text:style-name="P87"><text:s text:c="14"/></text:p>
      <text:p text:style-name="P56"><text:s text:c="13"/></text:p>
      <text:p text:style-name="P241"><text:s/></text:p>
      <text:p text:style-name="P196"><text:s/></text:p>
      <text:p text:style-name="P198"/>
      <text:p text:style-name="P196"><text:s/></text:p>
      <text:p text:style-name="P198"/>
      <text:p text:style-name="P42"><text:s text:c="10"/></text:p>
      <text:p text:style-name="P196"><text:s text:c="2"/></text:p>
      <text:p text:style-name="P196"><text:s/></text:p>
      <text:p text:style-name="P244"><text:s/></text:p>
      <text:p text:style-name="P206"><text:s text:c="4"/></text:p>
      <text:p text:style-name="P206"><text:s text:c="3"/></text:p>
      <text:p text:style-name="P257"><text:s/></text:p>
      <text:p text:style-name="P196"><text:s text:c="4"/><text:span text:style-name="T17"><text:s/></text:span></text:p>
      <text:p text:style-name="P206"/>
      <text:p text:style-name="P206"/>
      <text:p text:style-name="P206"/>
      <text:p text:style-name="P206"/>
      <text:p text:style-name="P107"><text:s text:c="15"/></text:p>
      <text:p text:style-name="P207"/>
      <text:p text:style-name="P196"><text:s text:c="5"/></text:p>
      <text:p text:style-name="P242"><text:s text:c="3"/><text:span text:style-name="T96"><text:s/></text:span></text:p>
      <text:p text:style-name="P196"><text:span text:style-name="T17"><text:s text:c="2"/></text:span><text:s/></text:p>
      <text:p text:style-name="P107"/>
      <text:p text:style-name="P196"/>
      <text:p text:style-name="P56"><text:s text:c="14"/></text:p>
      <text:p text:style-name="P107"><text:s text:c="23"/></text:p>
      <text:p text:style-name="P206"/>
      <text:p text:style-name="P206"><text:s text:c="2"/></text:p>
      <text:p text:style-name="P107"><text:s text:c="13"/></text:p>
      <text:p text:style-name="P196"><text:s/></text:p>
      <text:p text:style-name="P99"/>
      <text:p text:style-name="P237"/>
      <text:p text:style-name="P242"><text:s/></text:p>
      <text:p text:style-name="P107"><text:s text:c="15"/></text:p>
      <text:p text:style-name="P207"/>
      <text:p text:style-name="P196"><text:s/></text:p>
      <text:p text:style-name="P207"/>
      <text:p text:style-name="P211"/>
      <text:p text:style-name="P245"><text:s text:c="3"/></text:p>
      <text:p text:style-name="P196"><text:s/><text:span text:style-name="T26"><text:s/></text:span></text:p>
      <text:p text:style-name="P99"><text:s text:c="14"/></text:p>
      <text:p text:style-name="P99"><text:span text:style-name="T30"><text:s text:c="12"/></text:span><text:span text:style-name="T5"><text:s/></text:span></text:p>
      <text:p text:style-name="P54"><text:s text:c="11"/></text:p>
      <text:p text:style-name="P54"><text:s text:c="13"/></text:p>
      <text:p text:style-name="P54"><text:s text:c="12"/></text:p>
      <text:p text:style-name="P107"><text:s text:c="14"/></text:p>
      <text:p text:style-name="P210"><text:s/></text:p>
      <text:p text:style-name="P206"><text:s text:c="7"/></text:p>
      <text:p text:style-name="P213"/>
      <text:p text:style-name="P196"><text:s/></text:p>
      <text:p text:style-name="P206"/>
      <text:p text:style-name="P213"/>
      <text:p text:style-name="P198"><text:span text:style-name="T15"><text:s/></text:span><text:span text:style-name="T25"><text:s/></text:span></text:p>
      <text:p text:style-name="P205"><text:span text:style-name="T73"><text:s text:c="6"/></text:span><text:span text:style-name="T57"><text:s text:c="2"/></text:span><text:span text:style-name="T73"><text:s/></text:span></text:p>
      <text:p text:style-name="P206"><text:s text:c="2"/></text:p>
      <text:p text:style-name="P210"/>
      <text:p text:style-name="P99"><text:s text:c="12"/></text:p>
      <text:p text:style-name="P108"/>
      <text:p text:style-name="P196"><text:s/></text:p>
      <text:p text:style-name="P107"><text:s text:c="9"/></text:p>
      <text:p text:style-name="P241"><text:s text:c="5"/></text:p>
      <text:p text:style-name="P107"><text:s text:c="12"/></text:p>
      <text:p text:style-name="P243"/>
      <text:p text:style-name="P42"><text:s text:c="11"/></text:p>
      <text:p text:style-name="P56"><text:s text:c="10"/></text:p>
      <text:p text:style-name="P245"><text:s text:c="4"/></text:p>
      <text:p text:style-name="P207"/>
      <text:p text:style-name="P38"><text:s text:c="10"/><text:span text:style-name="T96"><text:s/></text:span></text:p>
      <text:p text:style-name="P206"/>
      <text:p text:style-name="P38"><text:s text:c="12"/></text:p>
      <text:p text:style-name="P56"/>
      <text:p text:style-name="P206"><text:s text:c="6"/></text:p>
      <text:p text:style-name="P167"><text:s text:c="3"/></text:p>
      <text:p text:style-name="P196"><text:s text:c="2"/><text:span text:style-name="T72"><text:s/></text:span></text:p>
      <text:p text:style-name="P241"/>
      <text:p text:style-name="P242"/>
      <text:p text:style-name="P99"><text:s text:c="12"/></text:p>
      <text:p text:style-name="P99"/>
      <text:p text:style-name="P98"><text:s text:c="12"/></text:p>
      <text:p text:style-name="P57"/>
      <text:p text:style-name="P124"><text:span text:style-name="T17"><text:s text:c="11"/></text:span><text:span text:style-name="T26"><text:s text:c="2"/></text:span></text:p>
      <text:p text:style-name="P56"><text:s text:c="14"/></text:p>
      <text:p text:style-name="P196"><text:s text:c="2"/><text:span text:style-name="T72"><text:s text:c="3"/></text:span></text:p>
      <text:p text:style-name="P38"><text:s text:c="13"/></text:p>
      <text:p text:style-name="P101"/>
      <text:p text:style-name="P99"><text:s text:c="15"/></text:p>
      <text:p text:style-name="P38"><text:s text:c="13"/></text:p>
      <text:p text:style-name="P35"><text:s text:c="13"/></text:p>
      <text:p text:style-name="P241"><text:s text:c="2"/></text:p>
      <text:p text:style-name="P99"><text:s text:c="15"/></text:p>
      <text:p text:style-name="P242"><text:s text:c="4"/><text:span text:style-name="T5"><text:s text:c="3"/></text:span></text:p>
      <text:p text:style-name="P211"/>
      <text:p text:style-name="P196"><text:s text:c="3"/></text:p>
      <text:p text:style-name="P245"><text:s text:c="4"/></text:p>
      <text:p text:style-name="P39"><text:s text:c="12"/></text:p>
      <text:p text:style-name="P242"><text:s/></text:p>
      <text:p text:style-name="P196"><text:s text:c="4"/><text:span text:style-name="T72"><text:s/></text:span></text:p>
      <text:p text:style-name="P206"><text:s text:c="6"/></text:p>
      <text:p text:style-name="P237"><text:s text:c="3"/></text:p>
      <text:p text:style-name="P242"><text:s text:c="3"/></text:p>
      <text:p text:style-name="P40"/>
      <text:p text:style-name="P39"><text:s text:c="15"/><text:span text:style-name="T100"><text:s/></text:span></text:p>
      <text:p text:style-name="P196"><text:s text:c="5"/></text:p>
      <text:p text:style-name="P242"><text:s text:c="2"/><text:span text:style-name="T105"><text:s/></text:span></text:p>
      <text:p text:style-name="P242"/>
      <text:p text:style-name="P196"><text:s text:c="4"/></text:p>
      <text:p text:style-name="P206"><text:s/></text:p>
      <text:p text:style-name="P240"/>
      <text:p text:style-name="P241"><text:s text:c="3"/></text:p>
      <text:p text:style-name="P242"/>
      <text:p text:style-name="P242"><text:s/></text:p>
      <text:p text:style-name="P196"><text:s text:c="4"/></text:p>
      <text:p text:style-name="P242"><text:s text:c="3"/><text:span text:style-name="T100"><text:s text:c="2"/></text:span></text:p>
      <text:p text:style-name="P207"/>
      <text:p text:style-name="P207"/>
      <text:p text:style-name="P260"><text:s/></text:p>
      <text:p text:style-name="P38"><text:s text:c="14"/></text:p>
      <text:p text:style-name="P38"><text:s text:c="13"/></text:p>
      <text:p text:style-name="P38"><text:s text:c="17"/></text:p>
      <text:p text:style-name="P196"><text:s text:c="5"/></text:p>
      <text:p text:style-name="P99"/>
      <text:p text:style-name="P242"/>
      <text:p text:style-name="P196"><text:s text:c="4"/><text:span text:style-name="T80"><text:s/></text:span></text:p>
      <text:p text:style-name="P259"><text:span text:style-name="T73"><text:s/></text:span><text:span text:style-name="T78"><text:s text:c="3"/></text:span><text:span text:style-name="T23"><text:s/></text:span></text:p>
      <text:p text:style-name="P242"><text:s text:c="5"/></text:p>
      <text:p text:style-name="P57"/>
      <text:p text:style-name="P38"><text:span text:style-name="T72"><text:s text:c="4"/></text:span><text:span text:style-name="T101"><text:s text:c="5"/></text:span><text:span text:style-name="T72"><text:s/></text:span></text:p>
      <text:p text:style-name="P35"><text:s text:c="13"/></text:p>
      <text:p text:style-name="P35"><text:s text:c="12"/></text:p>
      <text:p text:style-name="P35"><text:s text:c="12"/></text:p>
      <text:p text:style-name="P35"><text:s text:c="15"/></text:p>
      <text:p text:style-name="P35"><text:s text:c="11"/></text:p>
      <text:p text:style-name="P42"><text:s text:c="11"/><text:span text:style-name="T96"><text:s text:c="4"/></text:span><text:s text:c="2"/></text:p>
      <text:p text:style-name="P206"/>
      <text:p text:style-name="P210"><text:s text:c="2"/></text:p>
      <text:p text:style-name="P54"><text:s text:c="13"/></text:p>
      <text:p text:style-name="P35"><text:s text:c="17"/></text:p>
      <text:p text:style-name="P242"/>
      <text:p text:style-name="P242"><text:s/></text:p>
      <text:p text:style-name="P196"/>
      <text:p text:style-name="P38"><text:s text:c="12"/></text:p>
      <text:p text:style-name="P35"><text:s text:c="14"/></text:p>
      <text:p text:style-name="P38"/>
      <text:p text:style-name="P35"><text:s text:c="11"/></text:p>
      <text:p text:style-name="P245"/>
      <text:p text:style-name="P39"><text:s text:c="10"/></text:p>
      <text:p text:style-name="P245"/>
      <text:p text:style-name="P45"><text:s text:c="10"/></text:p>
      <text:p text:style-name="P42"/>
      <text:p text:style-name="P241"/>
      <text:p text:style-name="P38"/>
      <text:p text:style-name="P38"><text:s text:c="11"/><text:span text:style-name="T72"><text:s/></text:span></text:p>
      <text:p text:style-name="P39"><text:s text:c="9"/></text:p>
      <text:p text:style-name="P38"><text:s text:c="11"/></text:p>
      <text:p text:style-name="P35"><text:s text:c="10"/></text:p>
      <text:p text:style-name="P242"/>
      <text:p text:style-name="P245"><text:s text:c="3"/></text:p>
      <text:p text:style-name="P38"><text:s text:c="10"/></text:p>
      <text:p text:style-name="P35"><text:s text:c="13"/></text:p>
      <text:p text:style-name="P35"><text:s text:c="9"/></text:p>
      <text:p text:style-name="P38"><text:s text:c="11"/></text:p>
      <text:p text:style-name="P35"><text:s/><text:span text:style-name="T100"><text:s/></text:span><text:s text:c="12"/></text:p>
      <text:p text:style-name="P35"><text:s text:c="11"/></text:p>
      <text:p text:style-name="P210"/>
      <text:p text:style-name="P210"/>
      <text:p text:style-name="P210"/>
      <text:p text:style-name="P210"/>
      <text:p text:style-name="P244"/>
      <text:p text:style-name="P35"><text:s text:c="15"/></text:p>
      <text:p text:style-name="P38"><text:s text:c="12"/></text:p>
      <text:p text:style-name="P38"><text:s text:c="11"/></text:p>
      <text:p text:style-name="P35"><text:s text:c="11"/></text:p>
      <text:p text:style-name="P38"><text:s text:c="9"/></text:p>
      <text:p text:style-name="P35"><text:s text:c="12"/><text:span text:style-name="T1"><text:s text:c="3"/></text:span></text:p>
      <text:p text:style-name="P36"/>
      <text:p text:style-name="P35"><text:s text:c="12"/></text:p>
      <text:p text:style-name="P38"><text:s text:c="10"/></text:p>
      <text:p text:style-name="P36"><text:s text:c="9"/></text:p>
      <text:p text:style-name="P54"><text:s text:c="15"/></text:p>
      <text:p text:style-name="P242"><text:s text:c="9"/></text:p>
      <text:p text:style-name="P38"><text:s text:c="9"/><text:span text:style-name="T96"><text:s/></text:span></text:p>
      <text:p text:style-name="P41"><text:s text:c="10"/></text:p>
      <text:p text:style-name="P243"/>
      <text:p text:style-name="P36"/>
      <text:p text:style-name="P99"><text:s text:c="12"/></text:p>
      <text:p text:style-name="P35"><text:s text:c="12"/></text:p>
      <text:p text:style-name="P35"><text:s text:c="13"/><text:span text:style-name="T100"><text:s text:c="2"/></text:span></text:p>
      <text:p text:style-name="P41"><text:s text:c="9"/></text:p>
      <text:p text:style-name="P53"/>
      <text:p text:style-name="P35"><text:s text:c="12"/></text:p>
      <text:p text:style-name="P243"/>
      <text:p text:style-name="P41"><text:s text:c="10"/></text:p>
      <text:p text:style-name="P35"><text:s text:c="10"/><text:span text:style-name="T100"><text:s text:c="2"/></text:span></text:p>
      <text:p text:style-name="P35"><text:s text:c="12"/></text:p>
      <text:p text:style-name="P35"><text:s text:c="14"/></text:p>
      <text:p text:style-name="P41"><text:s text:c="12"/></text:p>
      <text:p text:style-name="P35"/>
      <text:p text:style-name="P35"><text:s text:c="16"/></text:p>
      <text:p text:style-name="P35"><text:s text:c="12"/></text:p>
      <text:p text:style-name="P35"><text:s text:c="13"/></text:p>
      <text:p text:style-name="P41"><text:s text:c="8"/></text:p>
      <text:p text:style-name="P35"><text:s text:c="14"/></text:p>
      <text:p text:style-name="P36"><text:s text:c="11"/></text:p>
      <text:p text:style-name="P35"/>
      <text:p text:style-name="P100"><text:s text:c="12"/><text:span text:style-name="T96"><text:s/></text:span></text:p>
      <text:p text:style-name="P35"/>
      <text:p text:style-name="P35"><text:s text:c="14"/></text:p>
      <text:p text:style-name="P35"/>
      <text:p text:style-name="P35"><text:s text:c="11"/></text:p>
      <text:p text:style-name="P35"><text:s text:c="15"/></text:p>
      <text:p text:style-name="P35"/>
      <text:p text:style-name="P35"><text:s text:c="18"/></text:p>
      <text:p text:style-name="P35"><text:s text:c="14"/></text:p>
      <text:p text:style-name="P35"><text:s text:c="10"/><text:span text:style-name="T100"><text:s/></text:span></text:p>
      <text:p text:style-name="P36"><text:s text:c="13"/></text:p>
      <text:p text:style-name="P43"/>
      <text:p text:style-name="P35"><text:s text:c="14"/></text:p>
      <text:p text:style-name="P244"><text:s/></text:p>
      <text:p text:style-name="P245"/>
      <text:p text:style-name="P38"/>
      <text:p text:style-name="P35"><text:s text:c="15"/></text:p>
      <text:p text:style-name="P35"><text:s text:c="12"/></text:p>
      <text:p text:style-name="P243"/>
      <text:p text:style-name="P258"><text:s text:c="4"/></text:p>
      <text:p text:style-name="P99"><text:s text:c="13"/></text:p>
      <text:p text:style-name="P38"><text:s text:c="15"/></text:p>
      <text:p text:style-name="P243"><text:s text:c="2"/></text:p>
      <text:p text:style-name="P35"><text:s text:c="15"/><text:span text:style-name="T1"><text:s text:c="2"/></text:span></text:p>
      <text:p text:style-name="P37"/>
      <text:p text:style-name="P36"><text:s text:c="13"/></text:p>
      <text:p text:style-name="P247"><text:s/></text:p>
      <text:p text:style-name="P35"/>
      <text:p text:style-name="P35"><text:s text:c="12"/></text:p>
      <text:p text:style-name="P35"><text:s text:c="16"/></text:p>
      <text:p text:style-name="P35"><text:s text:c="14"/><text:span text:style-name="T72"><text:s text:c="2"/></text:span></text:p>
      <text:p text:style-name="P42"><text:s text:c="7"/></text:p>
      <text:p text:style-name="P35"/>
      <text:p text:style-name="P35"><text:s text:c="14"/></text:p>
      <text:p text:style-name="P36"/>
      <text:p text:style-name="P35"><text:s text:c="12"/></text:p>
      <text:p text:style-name="P244"><text:s/></text:p>
      <text:p text:style-name="P41"><text:s text:c="10"/></text:p>
      <text:p text:style-name="P35"><text:s text:c="14"/></text:p>
      <text:p text:style-name="P35"><text:s text:c="9"/></text:p>
      <text:p text:style-name="P35"><text:s text:c="19"/></text:p>
      <text:p text:style-name="P35"><text:s text:c="12"/></text:p>
      <text:p text:style-name="P35"><text:s text:c="13"/></text:p>
      <text:p text:style-name="P102"><text:s text:c="15"/></text:p>
      <text:p text:style-name="P35"><text:s text:c="15"/></text:p>
      <text:p text:style-name="P35"><text:s text:c="15"/></text:p>
      <text:p text:style-name="P35"/>
      <text:p text:style-name="P35"><text:s text:c="13"/></text:p>
      <text:p text:style-name="P35"><text:s text:c="12"/></text:p>
      <text:p text:style-name="P35"><text:s text:c="15"/></text:p>
      <text:p text:style-name="P35"><text:s text:c="15"/></text:p>
      <text:p text:style-name="P35"><text:s text:c="13"/></text:p>
      <text:p text:style-name="P36"><text:s text:c="13"/></text:p>
      <text:p text:style-name="P35"><text:s text:c="15"/><text:span text:style-name="T101"><text:s/></text:span></text:p>
      <text:p text:style-name="P35"><text:s text:c="15"/></text:p>
      <text:p text:style-name="P41"><text:s text:c="13"/><text:span text:style-name="T96"><text:s text:c="2"/></text:span><text:span text:style-name="T97"><text:s/></text:span><text:span text:style-name="T72"><text:s/></text:span></text:p>
      <text:p text:style-name="P58"/>
      <text:p text:style-name="P35"><text:s text:c="11"/></text:p>
      <text:p text:style-name="P35"><text:s text:c="15"/></text:p>
      <text:p text:style-name="P245"><text:s text:c="3"/><text:span text:style-name="T1"><text:s text:c="2"/></text:span></text:p>
      <text:p text:style-name="P57"><text:s text:c="19"/></text:p>
      <text:p text:style-name="P35"><text:s text:c="17"/></text:p>
      <text:p text:style-name="P242"/>
      <text:p text:style-name="P42"><text:s text:c="9"/></text:p>
      <text:p text:style-name="P35"><text:s text:c="17"/></text:p>
      <text:p text:style-name="P38"><text:s text:c="10"/><text:span text:style-name="T72"><text:s/></text:span></text:p>
      <text:p text:style-name="P38"><text:s text:c="12"/></text:p>
      <text:p text:style-name="P38"><text:s text:c="13"/></text:p>
      <text:p text:style-name="P38"><text:s text:c="11"/></text:p>
      <text:p text:style-name="P196"/>
      <text:p text:style-name="P99"><text:s text:c="11"/></text:p>
      <text:p text:style-name="P35"><text:s text:c="11"/></text:p>
      <text:p text:style-name="P38"><text:s text:c="10"/></text:p>
      <text:p text:style-name="P35"><text:s text:c="9"/></text:p>
      <text:p text:style-name="P245"/>
      <text:p text:style-name="P36"><text:s text:c="12"/></text:p>
      <text:p text:style-name="P35"><text:s text:c="12"/></text:p>
      <text:p text:style-name="P38"><text:s text:c="11"/></text:p>
      <text:p text:style-name="P35"><text:s text:c="10"/></text:p>
      <text:p text:style-name="P35"><text:s text:c="10"/></text:p>
      <text:p text:style-name="P35"><text:s text:c="14"/></text:p>
      <text:p text:style-name="P39"><text:s text:c="7"/></text:p>
      <text:p text:style-name="P245"/>
      <text:p text:style-name="P241"><text:s text:c="2"/></text:p>
      <text:p text:style-name="P41"><text:s text:c="13"/><text:span text:style-name="T1"><text:s/></text:span></text:p>
      <text:p text:style-name="P99"/>
      <text:p text:style-name="P242"><text:s/></text:p>
      <text:p text:style-name="P211"/>
      <text:p text:style-name="P241"/>
      <text:p text:style-name="P211"/>
      <text:p text:style-name="P275"><text:s text:c="4"/></text:p>
      <text:p text:style-name="P55"/>
      <text:p text:style-name="P207"/>
      <text:p text:style-name="P242"/>
      <text:p text:style-name="P259"><text:span text:style-name="T74"><text:s text:c="4"/></text:span><text:span text:style-name="T79"><text:s/></text:span><text:span text:style-name="T78"><text:s text:c="14"/></text:span></text:p>
      <text:p text:style-name="P36"><text:s text:c="13"/></text:p>
      <text:p text:style-name="P206"><text:s text:c="3"/></text:p>
      <text:p text:style-name="P206"/>
      <text:p text:style-name="P206"><text:s text:c="2"/></text:p>
      <text:p text:style-name="P245"/>
      <text:p text:style-name="P241"><text:s text:c="3"/></text:p>
      <text:p text:style-name="P246"/>
      <text:p text:style-name="P240"/>
      <text:p text:style-name="P107"><text:s text:c="12"/></text:p>
      <text:p text:style-name="P242"/>
      <text:p text:style-name="P38"><text:s text:c="14"/></text:p>
      <text:p text:style-name="P212"/>
      <text:p text:style-name="P57"><text:s text:c="10"/></text:p>
      <text:p text:style-name="P35"><text:s text:c="14"/></text:p>
      <text:p text:style-name="P56"><text:s text:c="15"/></text:p>
      <text:p text:style-name="P38"><text:span text:style-name="T14"><text:s text:c="16"/></text:span><text:span text:style-name="T29"><text:s/></text:span></text:p>
      <text:p text:style-name="P38"><text:s text:c="12"/></text:p>
      <text:p text:style-name="P196"><text:s text:c="2"/></text:p>
      <text:p text:style-name="P196"><text:s text:c="2"/></text:p>
      <text:p text:style-name="P196"><text:s text:c="3"/></text:p>
      <text:p text:style-name="P241"><text:s text:c="3"/></text:p>
      <text:p text:style-name="P38"/>
      <text:p text:style-name="P41"><text:s text:c="12"/></text:p>
      <text:p text:style-name="P38"/>
      <text:p text:style-name="P38"><text:s text:c="12"/></text:p>
      <text:p text:style-name="P56"><text:s text:c="14"/></text:p>
      <text:p text:style-name="P241"><text:s/></text:p>
      <text:p text:style-name="P38"><text:s text:c="14"/></text:p>
      <text:p text:style-name="P38"><text:s text:c="17"/></text:p>
      <text:p text:style-name="P198"><text:s/></text:p>
      <text:p text:style-name="P197"/>
      <text:p text:style-name="P256"/>
      <text:p text:style-name="P196"><text:s/></text:p>
      <text:p text:style-name="P245"><text:s text:c="6"/></text:p>
      <text:p text:style-name="P245"><text:s text:c="3"/><text:span text:style-name="T1"><text:s text:c="2"/></text:span></text:p>
      <text:p text:style-name="P241"><text:s text:c="2"/></text:p>
      <text:p text:style-name="P36"><text:s text:c="11"/><text:span text:style-name="T7"><text:s text:c="2"/></text:span><text:span text:style-name="T30"><text:s/></text:span></text:p>
      <text:p text:style-name="P100"><text:s text:c="14"/></text:p>
      <text:p text:style-name="P245"/>
      <text:p text:style-name="P196"><text:s text:c="4"/></text:p>
      <text:p text:style-name="P196"><text:s text:c="3"/><text:span text:style-name="T100"><text:s text:c="2"/></text:span></text:p>
      <text:p text:style-name="P38"><text:s text:c="11"/><text:span text:style-name="T72"><text:s text:c="2"/></text:span></text:p>
      <text:p text:style-name="P98"/>
      <text:p text:style-name="P98"><text:s text:c="16"/></text:p>
      <text:p text:style-name="P36"><text:s text:c="12"/></text:p>
      <text:p text:style-name="P244"/>
      <text:p text:style-name="P206"><text:s text:c="3"/></text:p>
      <text:p text:style-name="P244"><text:s text:c="5"/></text:p>
      <text:p text:style-name="P35"><text:s text:c="14"/></text:p>
      <text:p text:style-name="P41"/>
      <text:p text:style-name="P35"><text:s text:c="12"/></text:p>
      <text:p text:style-name="P35"><text:s text:c="14"/></text:p>
      <text:p text:style-name="P98"><text:span text:style-name="T96"><text:s text:c="15"/></text:span><text:span text:style-name="T100"><text:s text:c="2"/></text:span></text:p>
      <text:p text:style-name="P243"/>
      <text:p text:style-name="P98"><text:span text:style-name="T72"><text:s text:c="11"/></text:span><text:span text:style-name="T97"><text:s text:c="4"/></text:span><text:span text:style-name="T101"><text:s/></text:span></text:p>
      <text:p text:style-name="P196"><text:s text:c="2"/></text:p>
      <text:p text:style-name="P35"><text:s text:c="12"/></text:p>
      <text:p text:style-name="P244"><text:s text:c="2"/></text:p>
      <text:p text:style-name="P44"><text:s text:c="7"/></text:p>
      <text:p text:style-name="P35"/>
      <text:p text:style-name="P35"><text:s text:c="12"/></text:p>
      <text:p text:style-name="P38"><text:span text:style-name="T96"><text:s text:c="13"/></text:span><text:span text:style-name="T97"><text:s/></text:span></text:p>
      <text:p text:style-name="P35"><text:s text:c="10"/></text:p>
      <text:p text:style-name="P38"><text:s text:c="11"/><text:span text:style-name="T96"><text:s text:c="2"/></text:span></text:p>
      <text:p text:style-name="P35"><text:s text:c="12"/></text:p>
      <text:p text:style-name="P38"/>
      <text:p text:style-name="P38"><text:s text:c="12"/></text:p>
      <text:p text:style-name="P83"><text:s text:c="14"/></text:p>
      <text:p text:style-name="P35"><text:s text:c="13"/></text:p>
      <text:p text:style-name="P196"><text:s/></text:p>
      <text:p text:style-name="P38"><text:s text:c="11"/></text:p>
      <text:p text:style-name="P35"><text:s text:c="12"/></text:p>
      <text:p text:style-name="P36"><text:s text:c="13"/></text:p>
      <text:p text:style-name="P216"><text:s/></text:p>
      <text:p text:style-name="P35"/>
      <text:p text:style-name="P35"><text:s text:c="12"/></text:p>
      <text:p text:style-name="P35"><text:s text:c="15"/></text:p>
      <text:p text:style-name="P38"><text:s text:c="12"/><text:span text:style-name="T96"><text:s text:c="4"/></text:span></text:p>
      <text:p text:style-name="P36"><text:s/></text:p>
      <text:p text:style-name="P243"><text:s text:c="2"/></text:p>
      <text:p text:style-name="P38"><text:s text:c="10"/></text:p>
      <text:p text:style-name="P84"><text:s text:c="15"/></text:p>
      <text:p text:style-name="P83"><text:s text:c="11"/></text:p>
      <text:p text:style-name="P35"><text:s text:c="15"/></text:p>
      <text:p text:style-name="P243"><text:s text:c="4"/></text:p>
      <text:p text:style-name="P39"><text:s text:c="10"/></text:p>
      <text:p text:style-name="P242"/>
      <text:p text:style-name="P36"><text:s text:c="7"/></text:p>
      <text:p text:style-name="P35"><text:s text:c="12"/></text:p>
      <text:p text:style-name="P35"><text:s text:c="14"/></text:p>
      <text:p text:style-name="P38"/>
      <text:p text:style-name="P38"><text:s text:c="11"/></text:p>
      <text:p text:style-name="P35"><text:s text:c="11"/></text:p>
      <text:p text:style-name="P196"/>
      <text:p text:style-name="P38"><text:s text:c="15"/></text:p>
      <text:p text:style-name="P241"/>
      <text:p text:style-name="P35"/>
      <text:p text:style-name="P35"><text:s text:c="12"/></text:p>
      <text:p text:style-name="P35"/>
      <text:p text:style-name="P35"><text:s text:c="12"/></text:p>
      <text:p text:style-name="P35"><text:s text:c="12"/></text:p>
      <text:p text:style-name="P35"><text:s text:c="12"/></text:p>
      <text:p text:style-name="P35"/>
      <text:p text:style-name="P35"><text:s text:c="10"/></text:p>
      <text:p text:style-name="P35"><text:s text:c="12"/></text:p>
      <text:p text:style-name="P35"><text:s text:c="12"/></text:p>
      <text:p text:style-name="P35"/>
      <text:p text:style-name="P35"><text:s text:c="11"/></text:p>
      <text:p text:style-name="P38"><text:s text:c="11"/></text:p>
      <text:p text:style-name="P35"/>
      <text:p text:style-name="P35"><text:s text:c="11"/></text:p>
      <text:p text:style-name="P196"/>
      <text:p text:style-name="P255"/>
      <text:p text:style-name="P38"><text:s text:c="10"/></text:p>
      <text:p text:style-name="P196"/>
      <text:p text:style-name="P243"><text:s/></text:p>
      <text:p text:style-name="P38"><text:s text:c="11"/></text:p>
      <text:p text:style-name="P198"/>
      <text:p text:style-name="P242"/>
      <text:p text:style-name="P241"/>
      <text:p text:style-name="P35"><text:s text:c="11"/></text:p>
      <text:p text:style-name="P196"/>
      <text:p text:style-name="P242"/>
      <text:p text:style-name="P196"/>
      <text:p text:style-name="P196"/>
      <text:p text:style-name="P241"/>
      <text:p text:style-name="P35"><text:s text:c="12"/></text:p>
      <text:p text:style-name="P35"><text:s text:c="12"/></text:p>
      <text:p text:style-name="P241"/>
      <text:p text:style-name="P35"><text:s text:c="11"/></text:p>
      <text:p text:style-name="P35"><text:s text:c="12"/></text:p>
      <text:p text:style-name="P35"><text:s/></text:p>
      <text:p text:style-name="P35"><text:s text:c="12"/></text:p>
      <text:p text:style-name="P35"><text:s text:c="12"/></text:p>
      <text:p text:style-name="P35"/>
      <text:p text:style-name="P35"><text:s text:c="11"/></text:p>
      <text:p text:style-name="P35"/>
      <text:p text:style-name="P35"><text:s text:c="12"/></text:p>
      <text:p text:style-name="P35"><text:s text:c="12"/></text:p>
      <text:p text:style-name="P35"><text:s text:c="11"/></text:p>
      <text:p text:style-name="P35"><text:s text:c="12"/></text:p>
      <text:p text:style-name="P35"><text:s text:c="12"/></text:p>
      <text:p text:style-name="P35"/>
      <text:p text:style-name="P35"><text:s text:c="12"/></text:p>
      <text:p text:style-name="P35"/>
      <text:p text:style-name="P35"><text:s text:c="2"/><text:span text:style-name="T72"><text:s text:c="9"/></text:span><text:s/></text:p>
      <text:p text:style-name="P35"><text:s text:c="11"/></text:p>
      <text:p text:style-name="P35"><text:s text:c="5"/></text:p>
      <text:p text:style-name="P206"/>
      <text:p text:style-name="P35"><text:s text:c="12"/></text:p>
      <text:p text:style-name="P35"><text:s text:c="12"/></text:p>
      <text:p text:style-name="P35"><text:s text:c="12"/></text:p>
      <text:p text:style-name="P206"/>
      <text:p text:style-name="P56"/>
      <text:p text:style-name="P35"><text:s text:c="12"/></text:p>
      <text:p text:style-name="P36"><text:s text:c="12"/></text:p>
      <text:p text:style-name="P241"/>
      <text:p text:style-name="P38"/>
      <text:p text:style-name="P35"><text:s text:c="11"/><text:span text:style-name="T7"><text:s/></text:span></text:p>
      <text:p text:style-name="P35"/>
      <text:p text:style-name="P35"><text:s text:c="12"/></text:p>
      <text:p text:style-name="P197"/>
      <text:p text:style-name="P203"/>
      <text:p text:style-name="P197"/>
      <text:p text:style-name="P196"/>
      <text:p text:style-name="P241"/>
      <text:p text:style-name="P38"><text:s text:c="12"/></text:p>
      <text:p text:style-name="P35"><text:s text:c="12"/></text:p>
      <text:p text:style-name="P35"/>
      <text:p text:style-name="P35"><text:s text:c="12"/></text:p>
      <text:p text:style-name="P35"><text:s text:c="11"/></text:p>
      <text:p text:style-name="P35"/>
      <text:p text:style-name="P35"><text:s text:c="11"/></text:p>
      <text:p text:style-name="P35"><text:s text:c="9"/></text:p>
      <text:p text:style-name="P35"><text:s text:c="11"/></text:p>
      <text:p text:style-name="P35"><text:s text:c="13"/></text:p>
      <text:p text:style-name="P35"><text:s text:c="12"/></text:p>
      <text:p text:style-name="P35"><text:s text:c="11"/></text:p>
      <text:p text:style-name="P35"/>
      <text:p text:style-name="P35"><text:s text:c="12"/></text:p>
      <text:p text:style-name="P35"><text:s text:c="12"/></text:p>
      <text:p text:style-name="P35"><text:s text:c="12"/></text:p>
      <text:p text:style-name="P35"><text:s text:c="11"/></text:p>
      <text:p text:style-name="P196"/>
      <text:p text:style-name="P196"/>
      <text:p text:style-name="P196"/>
      <text:p text:style-name="P196"/>
      <text:p text:style-name="P204"/>
      <text:p text:style-name="P196"/>
      <text:p text:style-name="P241"/>
      <text:p text:style-name="P35"><text:s text:c="12"/></text:p>
      <text:p text:style-name="P35"><text:s text:c="12"/></text:p>
      <text:p text:style-name="P35"><text:s text:c="11"/></text:p>
      <text:p text:style-name="P35"/>
      <text:p text:style-name="P35"><text:s text:c="12"/></text:p>
      <text:p text:style-name="P35"><text:s text:c="11"/></text:p>
      <text:p text:style-name="P35"><text:s text:c="12"/></text:p>
      <text:p text:style-name="P241"/>
      <text:p text:style-name="P35"><text:s text:c="7"/></text:p>
      <text:p text:style-name="P35"><text:s text:c="12"/></text:p>
      <text:p text:style-name="P206"/>
      <text:p text:style-name="P35"><text:s text:c="9"/><text:span text:style-name="T40"><text:s text:c="3"/></text:span></text:p>
      <text:p text:style-name="P35"><text:s text:c="12"/></text:p>
      <text:p text:style-name="P81"><text:s text:c="12"/></text:p>
      <text:p text:style-name="P35"><text:s text:c="11"/></text:p>
      <text:p text:style-name="P35"/>
      <text:p text:style-name="P35"><text:s text:c="12"/></text:p>
      <text:p text:style-name="P35"/>
      <text:p text:style-name="P35"><text:s text:c="9"/></text:p>
      <text:p text:style-name="P35"><text:s text:c="12"/><text:span text:style-name="T14"><text:s/></text:span></text:p>
      <text:p text:style-name="P35"><text:s text:c="13"/></text:p>
      <text:p text:style-name="P196"/>
      <text:p text:style-name="P244"/>
      <text:p text:style-name="P35"><text:s text:c="10"/></text:p>
      <text:p text:style-name="P240"/>
      <text:p text:style-name="P35"><text:s text:c="11"/></text:p>
      <text:p text:style-name="P39"><text:s text:c="11"/></text:p>
      <text:p text:style-name="P35"/>
      <text:p text:style-name="P35"><text:s text:c="12"/></text:p>
      <text:p text:style-name="P35"><text:s text:c="12"/></text:p>
      <text:p text:style-name="P35"/>
      <text:p text:style-name="P35"><text:s text:c="12"/></text:p>
      <text:p text:style-name="P35"/>
      <text:p text:style-name="P35"><text:s text:c="11"/></text:p>
      <text:p text:style-name="P35"/>
      <text:p text:style-name="P35"><text:s text:c="11"/></text:p>
      <text:p text:style-name="P35"><text:s text:c="10"/></text:p>
      <text:p text:style-name="P242"/>
      <text:p text:style-name="P35"/>
      <text:p text:style-name="P35"><text:s text:c="11"/></text:p>
      <text:p text:style-name="P196"/>
      <text:p text:style-name="P244"/>
      <text:p text:style-name="P241"/>
      <text:p text:style-name="P35"><text:s text:c="11"/></text:p>
      <text:p text:style-name="P205"/>
      <text:p text:style-name="P196"/>
      <text:p text:style-name="P196"/>
      <text:p text:style-name="P196"/>
      <text:p text:style-name="P19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7"/>
      <text:p text:style-name="P196"/>
      <text:p text:style-name="P197"/>
      <text:p text:style-name="P196"/>
      <text:p text:style-name="P197"/>
      <text:p text:style-name="P197"/>
      <text:p text:style-name="P196"/>
      <text:p text:style-name="P198"/>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7"/>
      <text:p text:style-name="P197"/>
      <text:p text:style-name="P198"/>
      <text:p text:style-name="P196"/>
      <text:p text:style-name="P196"/>
      <text:p text:style-name="P196"/>
      <text:p text:style-name="P196"/>
      <text:p text:style-name="P196"/>
      <text:p text:style-name="P196"/>
      <text:p text:style-name="P196"/>
      <text:p text:style-name="P196"/>
      <text:p text:style-name="P196"><text:s/></text:p>
      <text:p text:style-name="P196"/>
      <text:p text:style-name="P196"/>
      <text:p text:style-name="P196"/>
      <text:p text:style-name="P196"/>
      <text:p text:style-name="P196"/>
      <text:p text:style-name="P196"/>
      <text:p text:style-name="P196"/>
      <text:p text:style-name="P196"/>
      <text:p text:style-name="P196"/>
      <text:p text:style-name="P197"/>
      <text:p text:style-name="P196"/>
      <text:p text:style-name="P196"/>
      <text:p text:style-name="P196"/>
      <text:p text:style-name="P196"/>
      <text:p text:style-name="P196"/>
      <text:p text:style-name="P196"/>
      <text:p text:style-name="P196"/>
      <text:p text:style-name="P196"/>
      <text:p text:style-name="P196"/>
      <text:p text:style-name="P196"/>
      <text:p text:style-name="P196"><text:s/></text:p>
      <text:p text:style-name="P196"/>
      <text:p text:style-name="P200"/>
      <text:p text:style-name="P196"/>
      <text:p text:style-name="P196"/>
      <text:p text:style-name="P196"/>
      <text:p text:style-name="P241"/>
      <text:p text:style-name="P197"/>
      <text:p text:style-name="P196"/>
      <text:p text:style-name="P196"/>
      <text:p text:style-name="P197"/>
      <text:p text:style-name="P243"><text:s/></text:p>
      <text:p text:style-name="P196"/>
      <text:p text:style-name="P196"/>
      <text:p text:style-name="P196"/>
      <text:p text:style-name="P196"/>
      <text:p text:style-name="P196"/>
      <text:p text:style-name="P196"/>
      <text:p text:style-name="P197"/>
      <text:p text:style-name="P196"/>
      <text:p text:style-name="P196"/>
      <text:p text:style-name="P196"/>
      <text:p text:style-name="P196"/>
      <text:p text:style-name="P196"/>
      <text:p text:style-name="P196"/>
      <text:p text:style-name="P197"/>
      <text:p text:style-name="P196"/>
      <text:p text:style-name="P196"/>
      <text:p text:style-name="P197"/>
      <text:p text:style-name="P196"/>
      <text:p text:style-name="P196"/>
      <text:p text:style-name="P196"/>
      <text:p text:style-name="P204"/>
      <text:p text:style-name="P196"><text:s/></text:p>
      <text:p text:style-name="P204"/>
      <text:p text:style-name="P196"/>
      <text:p text:style-name="P196"/>
      <text:p text:style-name="P196"/>
      <text:p text:style-name="P196"/>
      <text:p text:style-name="P196"/>
      <text:p text:style-name="P19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4"/>
      <text:p text:style-name="P196"/>
      <text:p text:style-name="P197"/>
      <text:p text:style-name="P196"/>
      <text:p text:style-name="P196"/>
      <text:p text:style-name="P196"/>
      <text:p text:style-name="P197"/>
      <text:p text:style-name="P196"/>
      <text:p text:style-name="P196"/>
      <text:p text:style-name="P196"/>
      <text:p text:style-name="P197"/>
      <text:p text:style-name="P204"/>
      <text:p text:style-name="P203"/>
      <text:p text:style-name="P200"/>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4"/>
      <text:p text:style-name="P196"/>
      <text:p text:style-name="P196"/>
      <text:p text:style-name="P196"/>
      <text:p text:style-name="P196"/>
      <text:p text:style-name="P196"/>
      <text:p text:style-name="P196"/>
      <text:p text:style-name="P196"/>
      <text:p text:style-name="P196"/>
      <text:p text:style-name="P196"><text:s/></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7"/>
      <text:p text:style-name="P196"/>
      <text:p text:style-name="P196"/>
      <text:p text:style-name="P196"/>
      <text:p text:style-name="P203"/>
      <text:p text:style-name="P200"/>
      <text:p text:style-name="P196"><text:s/></text:p>
      <text:p text:style-name="P196"/>
      <text:p text:style-name="P196"/>
      <text:p text:style-name="P196"/>
      <text:p text:style-name="P196"/>
      <text:p text:style-name="P196"/>
      <text:p text:style-name="P19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text:s/></text:p>
      <text:p text:style-name="P196"/>
      <text:p text:style-name="P196"/>
      <text:p text:style-name="P196"/>
      <text:p text:style-name="P196"/>
      <text:p text:style-name="P196"/>
      <text:p text:style-name="P196"/>
      <text:p text:style-name="P196"/>
      <text:p text:style-name="P196"/>
      <text:p text:style-name="P196"/>
      <text:p text:style-name="P196"><text:s/></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text:s/></text:p>
      <text:p text:style-name="P196"/>
      <text:p text:style-name="P196"/>
      <text:p text:style-name="P196"/>
      <text:p text:style-name="P196"/>
      <text:p text:style-name="P196"><text:s text:c="2"/></text:p>
      <text:p text:style-name="P196"/>
      <text:p text:style-name="P196"><text:s text:c="3"/></text:p>
      <text:p text:style-name="P196"/>
      <text:p text:style-name="P196"/>
      <text:p text:style-name="P196"/>
      <text:p text:style-name="P143"/>
      <text:p text:style-name="P143"/>
      <text:p text:style-name="P143"/>
      <text:p text:style-name="P143"/>
      <text:p text:style-name="P143"/>
      <text:p text:style-name="P143"/>
      <text:p text:style-name="P143"/>
      <text:p text:style-name="P35"/>
      <text:p text:style-name="P35"><text:s text:c="12"/></text:p>
      <text:p text:style-name="P35"/>
      <text:p text:style-name="P35"><text:s text:c="16"/></text:p>
      <text:p text:style-name="P35"><text:s text:c="12"/></text:p>
      <text:p text:style-name="P35"/>
      <text:p text:style-name="P35"><text:s text:c="12"/></text:p>
      <text:p text:style-name="P35"/>
      <text:p text:style-name="P35"><text:s text:c="10"/></text:p>
      <text:p text:style-name="P35"><text:s text:c="12"/></text:p>
      <text:p text:style-name="P143"/>
      <text:p text:style-name="P35"><text:s text:c="12"/></text:p>
      <text:p text:style-name="P35"/>
      <text:p text:style-name="P35"><text:s text:c="10"/></text:p>
      <text:p text:style-name="P35"><text:s text:c="12"/></text:p>
      <text:p text:style-name="P35"/>
      <text:p text:style-name="P35"/>
      <text:p text:style-name="P35"><text:s text:c="12"/></text:p>
      <text:p text:style-name="P35"/>
      <text:p text:style-name="P35"><text:s text:c="16"/></text:p>
      <text:p text:style-name="P35"><text:s text:c="12"/></text:p>
      <text:p text:style-name="P35"><text:s text:c="8"/></text:p>
      <text:p text:style-name="P35"><text:s text:c="12"/></text:p>
      <text:p text:style-name="P35"><text:s/></text:p>
      <text:p text:style-name="P35"><text:s text:c="21"/></text:p>
      <text:p text:style-name="P35"/>
      <text:p text:style-name="P35"><text:s text:c="6"/></text:p>
      <text:p text:style-name="P143"/>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Jessop</meta:initial-creator>
    <meta:creation-date>2020-06-24T13:40:14.78</meta:creation-date>
    <dc:date>2024-06-10T01:03:21.80</dc:date>
    <dc:creator>David </dc:creator>
    <meta:editing-duration>P450DT5H14M37S</meta:editing-duration>
    <meta:editing-cycles>315</meta:editing-cycles>
    <meta:generator>OpenOffice/4.1.7$Win32 OpenOffice.org_project/417m1$Build-9800</meta:generator>
    <meta:document-statistic meta:table-count="0" meta:image-count="0" meta:object-count="0" meta:page-count="9" meta:paragraph-count="8556" meta:word-count="16452" meta:character-count="178105"/>
  </office:meta>
</office:document-meta>
</file>