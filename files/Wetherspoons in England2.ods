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88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#c5000b"/>
    </style:style>
    <style:style style:name="ce6" style:family="table-cell" style:parent-style-name="Default">
      <style:table-cell-properties fo:background-color="#cc0000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83caff"/>
    </style:style>
    <style:style style:name="ce9" style:family="table-cell" style:parent-style-name="Default">
      <style:table-cell-properties fo:background-color="#9999ff"/>
    </style:style>
    <style:style style:name="ce10" style:family="table-cell" style:parent-style-name="Default">
      <style:table-cell-properties fo:background-color="#ff950e"/>
    </style:style>
    <style:style style:name="ce11" style:family="table-cell" style:parent-style-name="Default">
      <style:table-cell-properties fo:background-color="#0084d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>
            <text:p>Bedfordshire</text:p>
          </table:table-cell>
          <table:table-cell office:value-type="string">
            <text:p>BEEN IN</text:p>
          </table:table-cell>
          <table:table-cell table:style-name="ce4" office:value-type="string">
            <text:p>NEED</text:p>
          </table:table-cell>
          <table:table-cell table:style-name="ce5" office:value-type="string">
            <text:p>FOOD</text:p>
          </table:table-cell>
          <table:table-cell table:style-name="ce1" office:value-type="string">
            <text:p>CASK MARK</text:p>
          </table:table-cell>
          <table:table-cell table:style-name="ce8" office:value-type="string">
            <text:p>PAUL</text:p>
          </table:table-cell>
          <table:table-cell table:style-name="ce10" office:value-type="string">
            <text:p>Hotels</text:p>
          </table:table-cell>
          <table:table-cell table:number-columns-repeated="9"/>
        </table:table-row>
        <table:table-row table:style-name="ro1">
          <table:table-cell office:value-type="string">
            <text:p>Biggleswad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rown Inn</text:p>
          </table:table-cell>
          <table:table-cell table:number-columns-repeated="4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Berkhamste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rown <text:s/>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Bedford 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ilgrims Progress</text:p>
          </table:table-cell>
          <table:table-cell table:number-columns-repeated="3"/>
          <table:table-cell table:style-name="ce1"/>
          <table:table-cell/>
          <table:table-cell table:style-name="ce10"/>
          <table:table-cell table:number-columns-repeated="9"/>
        </table:table-row>
        <table:table-row table:style-name="ro1">
          <table:table-cell office:value-type="string">
            <text:p>Dunstabl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ary Cooper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Leighton Buzza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wan Hot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Lu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hite House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Berk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racknel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Old Manor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Maidenhea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ea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Newbu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atchet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Reading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op Tap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The Back o Beyond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Sloug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on and Spo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indso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King <text:s/>Castle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Bristo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<text:s/>The Berkeley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Commercial Rooms</text:p>
          </table:table-cell>
          <table:table-cell table:number-columns-repeated="15"/>
        </table:table-row>
        <table:table-row table:style-name="ro1">
          <table:table-cell office:value-type="string">
            <text:p>The Kingswood Collier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Knights Templar</text:p>
          </table:table-cell>
          <table:table-cell table:number-columns-repeated="15"/>
        </table:table-row>
        <table:table-row table:style-name="ro1">
          <table:table-cell office:value-type="string">
            <text:p>Robert Fitzharding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Staple Hill Oak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Van Dyck Forum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V Shed</text:p>
          </table:table-cell>
          <table:table-cell table:number-columns-repeated="15"/>
        </table:table-row>
        <table:table-row table:style-name="ro1">
          <table:table-cell office:value-type="string">
            <text:p>The W G Grac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Posset cup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Emersons Gree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Buckingham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Aylesbu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hite Har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eaconsfiel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ope Champion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Milton Keyne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Captain Ridleys Shooting Party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Moon Under Water</text:p>
          </table:table-cell>
          <table:table-cell table:number-columns-repeated="15"/>
        </table:table-row>
        <table:table-row table:style-name="ro1">
          <table:table-cell office:value-type="string">
            <text:p>Wetherspoons</text:p>
          </table:table-cell>
          <table:table-cell table:number-columns-repeated="15"/>
        </table:table-row>
        <table:table-row table:style-name="ro1">
          <table:table-cell office:value-type="string">
            <text:p>Marlow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rand <text:s/>Assembly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Cambridge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Cambridg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egal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Huntingd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Sandford Hou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Marc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ippodrome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Peterboroug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ollege Arm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Drapers Arm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t Ive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wan Angel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>
            <text:p>St Neot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eeping Ash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>
            <text:p>Wittles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eorge Hot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isbec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heatsheaf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Che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Altrinc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Unicorn 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he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ull and Stirrup Hotel</text:p>
          </table:table-cell>
          <table:table-cell table:number-columns-repeated="15"/>
        </table:table-row>
        <table:table-row table:style-name="ro1">
          <table:table-cell office:value-type="string">
            <text:p>The Square Bottle</text:p>
          </table:table-cell>
          <table:table-cell table:number-columns-repeated="15"/>
        </table:table-row>
        <table:table-row table:style-name="ro1">
          <table:table-cell office:value-type="string">
            <text:p>Congle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ounting House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Ellesmare Por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heatsheaf 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>
            <text:p>Macclesflel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ociety Rooms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Northwic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enny Black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Poyn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Kingfisher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Runcor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erry Boat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al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J P Joule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>
            <text:p>Sandbac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eorge Inn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talybridg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ociety Rooms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tockpor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ilfred Wood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Calverts Coirt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arring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enketh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idne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remier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ins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Queens Arms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Cornwal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Camborn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John Francis Basse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Falmou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acket Stati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els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oinage Hal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Liskea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King Donier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Newqua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owan Wartha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>
            <text:p>Penzanc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remenheere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Perranpor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reen Parrot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Stint Austel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ann Wartha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t Ive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ain Line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ruro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ry Dow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County Dur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ishop Aucklan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tanley Jeffers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hester le Stree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icket Gat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onset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ompany Row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rook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orse Shoe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Darling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anners Hal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William Stea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Dur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ishops Mill</text:p>
          </table:table-cell>
          <table:table-cell table:number-columns-repeated="15"/>
        </table:table-row>
        <table:table-row table:style-name="ro1">
          <table:table-cell office:value-type="string">
            <text:p>Hartlepoo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ard Jacks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Peterle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ive Qarte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ea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at and Feather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pennymoo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rand Electric Hall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Stockton on Tee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alf Moon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Thomas Sherat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Highland Laddi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Cumbri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arrow in Funes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urness Railway</text:p>
          </table:table-cell>
          <table:table-cell table:number-columns-repeated="4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Carlisl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illiam Rufu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oodrow Wilson</text:p>
          </table:table-cell>
          <table:table-cell table:number-columns-repeated="2"/>
          <table:table-cell table:style-name="ce6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Kenda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iles Thompson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Keswick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hief of Justice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Penri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Dog Beck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hitehave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ransty Arch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orking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enry Bessemer 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Derby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Alfre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Waggon and Horses</text:p>
          </table:table-cell>
          <table:table-cell table:number-columns-repeated="2"/>
          <table:table-cell table:style-name="ce6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ux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ye Bridge Hou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hesterfiel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illar off Rock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pa Lane Vault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Portland Hot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Derb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tanding Orde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Babington Arm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Glossop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mithy For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Ilkeston 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Observatory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Rip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ed Li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wadlincot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ir Nigel Gresley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Dev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arnstapl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ater Gat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Panniers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rix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Vigilance 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ide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ose saltern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Exmou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ower Monkey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Red Rocks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Exe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Imperial </text:p>
          </table:table-cell>
          <table:table-cell table:number-columns-repeated="15"/>
        </table:table-row>
        <table:table-row table:style-name="ro1">
          <table:table-cell office:value-type="string">
            <text:p>Georges Meeting House</text:p>
          </table:table-cell>
          <table:table-cell table:number-columns-repeated="15"/>
        </table:table-row>
        <table:table-row table:style-name="ro1">
          <table:table-cell office:value-type="string">
            <text:p>The chevalier Inn</text:p>
          </table:table-cell>
          <table:table-cell table:number-columns-repeated="15"/>
        </table:table-row>
        <table:table-row table:style-name="ro1">
          <table:table-cell office:value-type="string">
            <text:p>The Sawyers Arm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on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tar Inn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Llfacomb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Admiral Colingwoo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Newton Abbo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ichard Hopkin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Okehamp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hite Hart Hot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Paign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alk of the Tow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Plymou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Union Rooms</text:p>
          </table:table-cell>
          <table:table-cell table:number-columns-repeated="15"/>
        </table:table-row>
        <table:table-row table:style-name="ro1">
          <table:table-cell office:value-type="string">
            <text:p>The Gog And Magog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Britannia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Mannamead</text:p>
          </table:table-cell>
          <table:table-cell table:number-columns-repeated="15"/>
        </table:table-row>
        <table:table-row table:style-name="ro1">
          <table:table-cell office:value-type="string">
            <text:p>Plymp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tannary Cour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avlstock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Queens Hea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elgnmou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Jolie Brise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Tiver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hite Ball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orqua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reen Ginger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Dorse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ridpor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reyhound </text:p>
          </table:table-cell>
          <table:table-cell table:number-columns-repeated="3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Bournemou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on in Squar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Mary Shelley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Parkstone and Heatherlands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Dorche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oyal Oak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Pool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lackwater Stream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lord Wimborn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Quay </text:p>
          </table:table-cell>
          <table:table-cell table:style-name="Default"/>
          <table:table-cell table:style-name="ce4"/>
          <table:table-cell table:number-columns-repeated="13"/>
        </table:table-row>
        <table:table-row table:style-name="ro1">
          <table:table-cell office:value-type="string">
            <text:p>Weymou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illiam Herry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Swan</text:p>
          </table:table-cell>
          <table:table-cell table:style-name="Default"/>
          <table:table-cell table:style-name="ce4"/>
          <table:table-cell table:number-columns-repeated="13"/>
        </table:table-row>
        <table:table-row table:style-name="ro1">
          <table:table-cell office:value-type="string">
            <text:p>Wimborn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ain the Wal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East Riding Of York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ever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ross Key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East Sussex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exhill On Se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icture Hou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righ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est Quay</text:p>
          </table:table-cell>
          <table:table-cell table:number-columns-repeated="15"/>
        </table:table-row>
        <table:table-row table:style-name="ro1">
          <table:table-cell office:value-type="string">
            <text:p>The Bright Helm</text:p>
          </table:table-cell>
          <table:table-cell table:number-columns-repeated="15"/>
        </table:table-row>
        <table:table-row table:style-name="ro1">
          <table:table-cell office:value-type="string">
            <text:p>The Post </text:p>
          </table:table-cell>
          <table:table-cell table:number-columns-repeated="15"/>
        </table:table-row>
        <table:table-row table:style-name="ro1">
          <table:table-cell office:value-type="string">
            <text:p>Crowboroug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rowborough Cross</text:p>
          </table:table-cell>
          <table:table-cell table:number-columns-repeated="15"/>
        </table:table-row>
        <table:table-row table:style-name="ro1">
          <table:table-cell office:value-type="string">
            <text:p>Eastbourn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ornfield Garag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London County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alls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eorge Hotel</text:p>
          </table:table-cell>
          <table:table-cell table:number-columns-repeated="15"/>
        </table:table-row>
        <table:table-row table:style-name="ro1">
          <table:table-cell office:value-type="string">
            <text:p>Hastng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John Bair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ubridge Well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Opera House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East York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ridling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rior Joh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Gool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City and County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Driffel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enjamin Fawcet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Primrose Valley fi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ive Stone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ul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hree John Scott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Admiral of The Humbe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anctuary Ba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Essex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raintre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icture Palac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rentwoo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Dairyman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illerica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lue Boa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ishop Stort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ort Jacks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helms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Ivory Peg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lacton on se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on And Starfish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olche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layhouse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arlow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illiam Aylmer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>
            <text:p>Harwic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ottle Kil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Hornchurc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JJ <text:s/>Moon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Leigh on se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Elms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Mald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ose and Crow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Rayleig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oebuck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Shoeburynes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Parsons Barn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Southend on se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ast Post</text:p>
          </table:table-cell>
          <table:table-cell table:number-columns-repeated="2"/>
          <table:table-cell table:style-name="ce5"/>
          <table:table-cell table:style-name="ce1"/>
          <table:table-cell/>
          <table:table-cell table:style-name="ce10"/>
          <table:table-cell table:number-columns-repeated="9"/>
        </table:table-row>
        <table:table-row table:style-name="ro1">
          <table:table-cell office:value-type="string">
            <text:p>Walde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emerair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it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attesford Cour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Gloucester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Chelten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on Under Wate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Bank Hou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Glouce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ord High Constaable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The Regal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Ross on Wy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ail Room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trou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ord Joh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ewkesbu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oyal Hope Pol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Yat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hrons Farm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Great Manche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ol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pinning Mule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u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Art Picture House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East Didsbu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ateway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Old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Up Steps Inn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The Shay Wak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esthough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obert Shaw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iga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rocket Arm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Moon Under Wate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Hamp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Al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Ivy Hou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Andov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John Russell Fox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Aldersho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Queens Hot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asingstok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aidenhead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Ang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os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ist Pos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Eastleig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agon Work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Farmboroug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illy Shilling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Flee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rince Arthu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Fare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rown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Gospor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tar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avan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archment Maker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Lyming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ix Bell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Portsmou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Isambard Kingdon 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The John Jacque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Sir Alec Ro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John Bake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Parkstone And Heatherlands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Petersfiel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ed Li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outhamp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iddy Bridge</text:p>
          </table:table-cell>
          <table:table-cell table:number-columns-repeated="15"/>
        </table:table-row>
        <table:table-row table:style-name="ro1">
          <table:table-cell office:value-type="string">
            <text:p>The Standing Order</text:p>
          </table:table-cell>
          <table:table-cell table:number-columns-repeated="15"/>
        </table:table-row>
        <table:table-row table:style-name="ro1">
          <table:table-cell office:value-type="string">
            <text:p>The Red Li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outhse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ord Palmerst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hir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right Water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aterloovil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Denmead Quee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inche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Old Gaolhouse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Here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Here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Kings Fee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Leomin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Dukes Hea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Ross on Wy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ail Room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Herford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erkhamste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rown <text:s/></text:p>
          </table:table-cell>
          <table:table-cell table:number-columns-repeated="15"/>
        </table:table-row>
        <table:table-row table:style-name="ro1">
          <table:table-cell office:value-type="string">
            <text:p>Hitchi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angel Vaults inn</text:p>
          </table:table-cell>
          <table:table-cell table:number-columns-repeated="15"/>
        </table:table-row>
        <table:table-row table:style-name="ro1">
          <table:table-cell office:value-type="string">
            <text:p>Hemel Hempstea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ull House</text:p>
          </table:table-cell>
          <table:table-cell table:number-columns-repeated="15"/>
        </table:table-row>
        <table:table-row table:style-name="ro1">
          <table:table-cell office:value-type="string">
            <text:p>Hatfiel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Harpsfield Hall</text:p>
          </table:table-cell>
          <table:table-cell table:number-columns-repeated="15"/>
        </table:table-row>
        <table:table-row table:style-name="ro1">
          <table:table-cell office:value-type="string">
            <text:p>Hert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ix Templars</text:p>
          </table:table-cell>
          <table:table-cell table:number-columns-repeated="15"/>
        </table:table-row>
        <table:table-row table:style-name="ro1">
          <table:table-cell office:value-type="string">
            <text:p>Hoddesd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tar 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Letchwor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ree Magnets</text:p>
          </table:table-cell>
          <table:table-cell table:number-columns-repeated="15"/>
        </table:table-row>
        <table:table-row table:style-name="ro1">
          <table:table-cell office:value-type="string">
            <text:p>Potters Ba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Admiral Byng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Roys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anor House</text:p>
          </table:table-cell>
          <table:table-cell table:number-columns-repeated="15"/>
        </table:table-row>
        <table:table-row table:style-name="ro1">
          <table:table-cell office:value-type="string">
            <text:p>Rickmanswor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ennsylvanian</text:p>
          </table:table-cell>
          <table:table-cell table:number-columns-repeated="15"/>
        </table:table-row>
        <table:table-row table:style-name="ro1">
          <table:table-cell office:value-type="string">
            <text:p>Stevenag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tanding Order</text:p>
          </table:table-cell>
          <table:table-cell table:number-columns-repeated="15"/>
        </table:table-row>
        <table:table-row table:style-name="ro1">
          <table:table-cell office:value-type="string">
            <text:p>St Alban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Waterend Barn</text:p>
          </table:table-cell>
          <table:table-cell table:number-columns-repeated="15"/>
        </table:table-row>
        <table:table-row table:style-name="ro1">
          <table:table-cell office:value-type="string">
            <text:p>Wat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on Under Water</text:p>
          </table:table-cell>
          <table:table-cell table:number-columns-repeated="15"/>
        </table:table-row>
        <table:table-row table:style-name="ro1">
          <table:table-cell office:value-type="string">
            <text:p>Waltham Cros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on Cross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Lond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rix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eehive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>
            <text:p>Brock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rockley Barge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arnet 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ailway Bel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amde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Ice Whart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table:style-name="ce2" office:value-type="string">
            <text:p>City Of Lond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Hamilton Hal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Montagu Pyke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Cannon Stree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ir John Hawkshaw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Eus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aptain Flinders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Farring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ir John Oldcastl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Greenwic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targae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Gate Clock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Holbor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Shakespeare s Hea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Old Red Li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ackn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axters Court</text:p>
          </table:table-cell>
          <table:table-cell table:number-columns-repeated="15"/>
        </table:table-row>
        <table:table-row table:style-name="ro1">
          <table:table-cell office:value-type="string">
            <text:p>Hammersmi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lough Harrow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William Morris </text:p>
          </table:table-cell>
          <table:table-cell table:number-columns-repeated="15"/>
        </table:table-row>
        <table:table-row table:style-name="ro1">
          <table:table-cell office:value-type="string">
            <text:p>Lewis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atch House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Isling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hite Swan</text:p>
          </table:table-cell>
          <table:table-cell table:number-columns-repeated="15"/>
        </table:table-row>
        <table:table-row table:style-name="ro1">
          <table:table-cell office:value-type="string">
            <text:p>Mile En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alf Moon</text:p>
          </table:table-cell>
          <table:table-cell table:number-columns-repeated="15"/>
        </table:table-row>
        <table:table-row table:style-name="ro1">
          <table:table-cell office:value-type="string">
            <text:p>Marylebon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etropolitan Ba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Old Stree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asque Haunt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Peck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Kentish Drovers</text:p>
          </table:table-cell>
          <table:table-cell table:number-columns-repeated="15"/>
        </table:table-row>
        <table:table-row table:style-name="ro1">
          <table:table-cell office:value-type="string">
            <text:p>Putney 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ocket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Rotherhith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urrey Docks</text:p>
          </table:table-cell>
          <table:table-cell table:number-columns-repeated="15"/>
        </table:table-row>
        <table:table-row table:style-name="ro1">
          <table:table-cell office:value-type="string">
            <text:p>St Pancra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arrel Vaul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hepherds Bus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entral Bar</text:p>
          </table:table-cell>
          <table:table-cell table:number-columns-repeated="15"/>
        </table:table-row>
        <table:table-row table:style-name="ro1">
          <table:table-cell office:value-type="string">
            <text:p>Streat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olland Tringham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Stoke Newing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ochester Castl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ower Hil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iberty Bound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ower Hamlets</text:p>
          </table:table-cell>
          <table:table-cell table:number-columns-repeated="15"/>
        </table:table-row>
        <table:table-row table:style-name="ro1">
          <table:table-cell office:value-type="string">
            <text:p>Goodman s Fiel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ooting 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J j Moons </text:p>
          </table:table-cell>
          <table:table-cell table:number-columns-repeated="15"/>
        </table:table-row>
        <table:table-row table:style-name="ro1">
          <table:table-cell office:value-type="string">
            <text:p>Tower Of London</text:p>
          </table:table-cell>
          <table:table-cell table:style-name="Default"/>
          <table:table-cell table:number-columns-repeated="13"/>
          <table:table-cell table:style-name="ce11"/>
        </table:table-row>
        <table:table-row table:style-name="ro1">
          <table:table-cell office:value-type="string">
            <text:p>The Pommelers Res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Victori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Wetherspoon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Willow Walk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London Waterloo 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ion The Unicorn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Woolwic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reat <text:s/>Harry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isle Of Wigh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an in The Moon</text:p>
          </table:table-cell>
          <table:table-cell table:style-name="Default"/>
          <table:table-cell table:style-name="ce4"/>
          <table:table-cell table:number-columns-repeated="13"/>
        </table:table-row>
        <table:table-row table:style-name="ro1">
          <table:table-cell office:value-type="string">
            <text:p>The Rye Castle</text:p>
          </table:table-cell>
          <table:table-cell table:style-name="Default"/>
          <table:table-cell table:style-name="ce4"/>
          <table:table-cell table:number-columns-repeated="13"/>
        </table:table-row>
        <table:table-row table:style-name="ro1">
          <table:table-cell table:style-name="ce1" office:value-type="string">
            <text:p>Ken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Ash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ounty Hotel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Chat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homas Vaghorn</text:p>
          </table:table-cell>
          <table:table-cell table:number-columns-repeated="15"/>
        </table:table-row>
        <table:table-row table:style-name="ro1">
          <table:table-cell office:value-type="string">
            <text:p>Canterbu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est Gate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The Thomas Lngoldsby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Dov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Eight Bells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>
            <text:p>Dar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lying Boat</text:p>
          </table:table-cell>
          <table:table-cell table:number-columns-repeated="15"/>
        </table:table-row>
        <table:table-row table:style-name="ro1">
          <table:table-cell office:value-type="string">
            <text:p>Dea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ir Norman Wisdom</text:p>
          </table:table-cell>
          <table:table-cell table:number-columns-repeated="15"/>
        </table:table-row>
        <table:table-row table:style-name="ro1">
          <table:table-cell office:value-type="string">
            <text:p>Favers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eading Light</text:p>
          </table:table-cell>
          <table:table-cell table:number-columns-repeated="15"/>
        </table:table-row>
        <table:table-row table:style-name="ro1">
          <table:table-cell office:value-type="string">
            <text:p>Folkeston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amuel Peto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Gravesen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obert Pocock</text:p>
          </table:table-cell>
          <table:table-cell table:number-columns-repeated="15"/>
        </table:table-row>
        <table:table-row table:style-name="ro1">
          <table:table-cell office:value-type="string">
            <text:p>Herrne Ba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axon Shore</text:p>
          </table:table-cell>
          <table:table-cell table:number-columns-repeated="15"/>
        </table:table-row>
        <table:table-row table:style-name="ro1">
          <table:table-cell office:value-type="string">
            <text:p>Margat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echanical Elephant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Maidston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uggleton Inn</text:p>
          </table:table-cell>
          <table:table-cell table:number-columns-repeated="15"/>
        </table:table-row>
        <table:table-row table:style-name="ro1">
          <table:table-cell office:value-type="string">
            <text:p>The Society Rooms</text:p>
          </table:table-cell>
          <table:table-cell table:number-columns-repeated="15"/>
        </table:table-row>
        <table:table-row table:style-name="ro1">
          <table:table-cell office:value-type="string">
            <text:p>Ramsgat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Royal Victoria Pavilion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Rain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ailway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Roche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olden Lion</text:p>
          </table:table-cell>
          <table:table-cell table:number-columns-repeated="15"/>
        </table:table-row>
        <table:table-row table:style-name="ro1">
          <table:table-cell office:value-type="string">
            <text:p>Sheernes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elle and Lion</text:p>
          </table:table-cell>
          <table:table-cell table:number-columns-repeated="15"/>
        </table:table-row>
        <table:table-row table:style-name="ro1">
          <table:table-cell office:value-type="string">
            <text:p>Sittingboun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olden Hope</text:p>
          </table:table-cell>
          <table:table-cell table:number-columns-repeated="4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Sevenoak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ennockian</text:p>
          </table:table-cell>
          <table:table-cell table:number-columns-repeated="15"/>
        </table:table-row>
        <table:table-row table:style-name="ro1">
          <table:table-cell office:value-type="string">
            <text:p>Tonbridg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umphrey Bean</text:p>
          </table:table-cell>
          <table:table-cell table:number-columns-repeated="15"/>
        </table:table-row>
        <table:table-row table:style-name="ro1">
          <table:table-cell office:value-type="string">
            <text:p>Tonbridge Well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Opera House</text:p>
          </table:table-cell>
          <table:table-cell table:number-columns-repeated="15"/>
        </table:table-row>
        <table:table-row table:style-name="ro1">
          <table:table-cell office:value-type="string">
            <text:p>Whitstab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eter Cushing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Lanca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Ashton under lyn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Ash Tree</text:p>
          </table:table-cell>
          <table:table-cell table:number-columns-repeated="15"/>
        </table:table-row>
        <table:table-row table:style-name="ro1">
          <table:table-cell office:value-type="string">
            <text:p>Ashton in Makerflel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ir Thomas Gerar</text:p>
          </table:table-cell>
          <table:table-cell table:number-columns-repeated="15"/>
        </table:table-row>
        <table:table-row table:style-name="ro1">
          <table:table-cell office:value-type="string">
            <text:p>Accring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omercial Hotel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lackpoo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Velvet Coaster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The Albert The Loin</text:p>
          </table:table-cell>
          <table:table-cell table:number-columns-repeated="15"/>
        </table:table-row>
        <table:table-row table:style-name="ro1">
          <table:table-cell office:value-type="string">
            <text:p>The Layton Rakes</text:p>
          </table:table-cell>
          <table:table-cell table:number-columns-repeated="15"/>
        </table:table-row>
        <table:table-row table:style-name="ro1">
          <table:table-cell office:value-type="string">
            <text:p>Burn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oot Inn</text:p>
          </table:table-cell>
          <table:table-cell table:number-columns-repeated="15"/>
        </table:table-row>
        <table:table-row table:style-name="ro1">
          <table:table-cell office:value-type="string">
            <text:p>Blackbur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ostal Order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Chor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ir Henry Tate</text:p>
          </table:table-cell>
          <table:table-cell table:number-columns-repeated="15"/>
        </table:table-row>
        <table:table-row table:style-name="ro1">
          <table:table-cell office:value-type="string">
            <text:p>Coln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allace Hartley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Darwe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Old Chap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Fleetwoo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homas Drummon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Leylan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eyland Lion</text:p>
          </table:table-cell>
          <table:table-cell table:number-columns-repeated="15"/>
        </table:table-row>
        <table:table-row table:style-name="ro1">
          <table:table-cell office:value-type="string">
            <text:p>Lytham st Anne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ailway Hot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Trawl Boat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Lanca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ir Richard Owe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Leigh 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homas Burke</text:p>
          </table:table-cell>
          <table:table-cell table:number-columns-repeated="15"/>
        </table:table-row>
        <table:table-row table:style-name="ro1">
          <table:table-cell office:value-type="string">
            <text:p>Morecamb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Eric Bartholomew</text:p>
          </table:table-cell>
          <table:table-cell table:number-columns-repeated="15"/>
        </table:table-row>
        <table:table-row table:style-name="ro1">
          <table:table-cell office:value-type="string">
            <text:p>Ormskirk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ourt Leef</text:p>
          </table:table-cell>
          <table:table-cell table:number-columns-repeated="15"/>
        </table:table-row>
        <table:table-row table:style-name="ro1">
          <table:table-cell office:value-type="string">
            <text:p>Pres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welve Tellers</text:p>
          </table:table-cell>
          <table:table-cell table:number-columns-repeated="15"/>
        </table:table-row>
        <table:table-row table:style-name="ro1">
          <table:table-cell office:value-type="string">
            <text:p>The Gery Friar</text:p>
          </table:table-cell>
          <table:table-cell table:number-columns-repeated="15"/>
        </table:table-row>
        <table:table-row table:style-name="ro1">
          <table:table-cell office:value-type="string">
            <text:p>Poulton le Fyd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oulton Elk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Rochdal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egal Moon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Thornton Cleveley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Jolly Tanr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Leicester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Ashby de la zouc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houlder Of Mutt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oalvill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nkey Walk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Leice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ord Keeper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The Corn Exchange</text:p>
          </table:table-cell>
          <table:table-cell table:number-columns-repeated="15"/>
        </table:table-row>
        <table:table-row table:style-name="ro1">
          <table:table-cell office:value-type="string">
            <text:p>The High Cross</text:p>
          </table:table-cell>
          <table:table-cell table:number-columns-repeated="15"/>
        </table:table-row>
        <table:table-row table:style-name="ro1">
          <table:table-cell office:value-type="string">
            <text:p>Loughboroug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Amber Room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Melton Mowbra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Kettleby Cros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Market Harboroug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ugar Loaf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Nunea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elix Holt</text:p>
          </table:table-cell>
          <table:table-cell table:number-columns-repeated="15"/>
        </table:table-row>
        <table:table-row table:style-name="ro1">
          <table:table-cell office:value-type="string">
            <text:p>Oak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aptain Noel Newton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Oadb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ord Keeper Of The Great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Rugb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upert Brooke</text:p>
          </table:table-cell>
          <table:table-cell table:number-columns-repeated="15"/>
        </table:table-row>
        <table:table-row table:style-name="ro1">
          <table:table-cell office:value-type="string">
            <text:p>Wigs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illiam Wigston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Llchfiel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Acorn Inn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Lincol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quare Sai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Ritz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Hykeham Mano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Lincoln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os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on under wate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ourn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aymond May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rigg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hite Hor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leethorpe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oliseum Picture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Gainsboroug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weyn Forkbear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Grant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ollemache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Grimsb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Yarborough Hotel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Lou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Joseph Mort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cunthorp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lue Bel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pading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Ivy Wal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lea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ackhorse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kegnes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ed Li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tam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tamford Pos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Littlehamp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Littlehamp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eorge Inn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Liverpoo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Liverpoo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arkers Brewery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The Thomas Frost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Captain Alexander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Childwall Fiveways Hotel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Fall Well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Welkin 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The Lifeboat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The North Western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The Lime Kim</text:p>
          </table:table-cell>
          <table:table-cell table:number-columns-repeated="15"/>
        </table:table-row>
        <table:table-row table:style-name="ro1">
          <table:table-cell office:value-type="string">
            <text:p>The Richard John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The Navigator</text:p>
          </table:table-cell>
          <table:table-cell table:number-columns-repeated="15"/>
        </table:table-row>
        <table:table-row table:style-name="ro1">
          <table:table-cell office:value-type="string">
            <text:p>The Raven </text:p>
          </table:table-cell>
          <table:table-cell table:number-columns-repeated="15"/>
        </table:table-row>
        <table:table-row table:style-name="ro1">
          <table:table-cell office:value-type="string">
            <text:p>The Queen Picture <text:s/>House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Manche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Chorton cum Hard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edge Lynn</text:p>
          </table:table-cell>
          <table:table-cell table:number-columns-repeated="15"/>
        </table:table-row>
        <table:table-row table:style-name="ro1">
          <table:table-cell office:value-type="string">
            <text:p>Eccle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Eccles Cros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eywoo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Edwin Waugh</text:p>
          </table:table-cell>
          <table:table-cell table:number-columns-repeated="2"/>
          <table:table-cell table:style-name="ce5"/>
          <table:table-cell table:style-name="ce1"/>
          <table:table-cell table:style-name="ce9"/>
          <table:table-cell table:number-columns-repeated="10"/>
        </table:table-row>
        <table:table-row table:style-name="ro1">
          <table:table-cell office:value-type="string">
            <text:p>Manche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Wetherspoon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Paramoun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Waterhou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astle In The Air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The Trafford Centre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The Moon under water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The Seven Stars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The Great Central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Ford Madox Brown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Middle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arbord Harbor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tref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ishop Blaize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Urms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i Bobbin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alkde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ulls Head Hot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Merseysid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irkenhea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rass Balance</text:p>
          </table:table-cell>
          <table:table-cell table:number-columns-repeated="15"/>
        </table:table-row>
        <table:table-row table:style-name="ro1">
          <table:table-cell office:value-type="string">
            <text:p>Hoylak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Hoylake LightsT</text:p>
          </table:table-cell>
          <table:table-cell table:number-columns-repeated="15"/>
        </table:table-row>
        <table:table-row table:style-name="ro1">
          <table:table-cell office:value-type="string">
            <text:p>Heswal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rense Well</text:p>
          </table:table-cell>
          <table:table-cell table:number-columns-repeated="15"/>
        </table:table-row>
        <table:table-row table:style-name="ro1">
          <table:table-cell office:value-type="string">
            <text:p>Newton le Willow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Nine Arches</text:p>
          </table:table-cell>
          <table:table-cell table:number-columns-repeated="15"/>
        </table:table-row>
        <table:table-row table:style-name="ro1">
          <table:table-cell office:value-type="string">
            <text:p>Presco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atch Maker</text:p>
          </table:table-cell>
          <table:table-cell table:number-columns-repeated="15"/>
        </table:table-row>
        <table:table-row table:style-name="ro1">
          <table:table-cell office:value-type="string">
            <text:p>Southpor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ir Herry Segrave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St Helen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lass House</text:p>
          </table:table-cell>
          <table:table-cell table:number-columns-repeated="15"/>
        </table:table-row>
        <table:table-row table:style-name="ro1">
          <table:table-cell office:value-type="string">
            <text:p>Wallas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lairville</text:p>
          </table:table-cell>
          <table:table-cell table:number-columns-repeated="15"/>
        </table:table-row>
        <table:table-row table:style-name="ro1">
          <table:table-cell office:value-type="string">
            <text:p>West Kirb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Dee Hotel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table:style-name="ce1" office:value-type="string">
            <text:p>Norfolk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Dere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omany Ry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Downham Marke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halebone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Faken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ine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Great Yarmou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illiam Adam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roll Car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Kings Lyn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lobe Hot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Norwic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Queen of Iceni 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The Glass House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The Bell Hotel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The Whiffler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t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ed Li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North York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<text:s/>East Redca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limsoll Lin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Fi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ive Stone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Guisborough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Lronstone <text:s/>Mine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arrogat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inter Garden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Knaresboroug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rown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Middlesbroug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watters Car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Northaller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uck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Richmon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alph Fitz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Rip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Unicorn Hot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kip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Devonshire Inn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Selb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iant Bellflower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Scarboroug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ord Rosebery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Thirsk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ree Tun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Whitb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Angel Hotel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York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unch Bow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Poster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Northampton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Corb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axon Crow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The Samuel Lloy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Davent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aracens Head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Kettering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Earl of Dalkeith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Northampton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Cordwaine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Rushde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ailway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Wellngboroug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ed Well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Northumberlan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Ashington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Rohan kanhai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lyth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Wallaw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Bedlng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ed Li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Craming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John The Clerk off Cramlingt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New Moon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orm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Morpeth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Electrical Kanhai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Nottingham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Arnold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Ernehale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Bing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utter Cros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ees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ast Pos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ucknal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ilgrim Oak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Mansfiel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tag and Pheasant</text:p>
          </table:table-cell>
          <table:table-cell table:number-columns-repeated="2"/>
          <table:table-cell table:style-name="ce6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Notting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rent Bridge Inn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The William Pever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Lloyds No1 Bar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The Joseph El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Samuel Hal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Roebuck Inn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The Lady Chatterley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Woodthorpe Top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The Free Man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The Gooseberry Bush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Ret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Dominie Cross</text:p>
          </table:table-cell>
          <table:table-cell table:number-columns-repeated="2"/>
          <table:table-cell table:style-name="ce6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utton in Ashfiel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icture Hou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tapleford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Adiral Sir John Borla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orksop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iquorice Gardens</text:p>
          </table:table-cell>
          <table:table-cell table:number-columns-repeated="2"/>
          <table:table-cell table:style-name="ce6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Outer Lond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Ac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ed Lion Pineappl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Bexleyhea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urze Wren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2">
          <table:table-cell office:value-type="string">
            <text:p>The Wrong Un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>
            <text:p>Brom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reyhound</text:p>
          </table:table-cell>
          <table:table-cell table:number-columns-repeated="15"/>
        </table:table-row>
        <table:table-row table:style-name="ro2">
          <table:table-cell office:value-type="string">
            <text:p>Colndal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on Under Water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>
            <text:p>Croyd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eorge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Cricklewoo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eaten Docket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Elephant and Castl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ockingham Arms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>
            <text:p>Ealing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Sir Michael Balc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Ful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Walham Gree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ornchurch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<text:s/>Jj moon 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ounslow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on Under Water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Hatch En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on Sixpence</text:p>
          </table:table-cell>
          <table:table-cell table:number-columns-repeated="15"/>
        </table:table-row>
        <table:table-row table:style-name="ro1">
          <table:table-cell office:value-type="string">
            <text:p>Harrow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on on The Hill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Ickenham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ce8"/>
          <table:table-cell table:number-columns-repeated="10"/>
        </table:table-row>
        <table:table-row table:style-name="ro1">
          <table:table-cell office:value-type="string">
            <text:p>Kingsbu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J j Moon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Kingston upon Thame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Kings Tun</text:p>
          </table:table-cell>
          <table:table-cell table:number-columns-repeated="15"/>
        </table:table-row>
        <table:table-row table:style-name="ro2">
          <table:table-cell office:value-type="string">
            <text:p>Leytonston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alnut Tre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Llford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Great Spoon Llford</text:p>
          </table:table-cell>
          <table:table-cell table:number-columns-repeated="15"/>
        </table:table-row>
        <table:table-row table:style-name="ro1">
          <table:table-cell office:value-type="string">
            <text:p>The London Bridg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un Wharf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lapham Juncti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ondon and South Wester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Muswell Hil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Mossy Well</text:p>
          </table:table-cell>
          <table:table-cell table:number-columns-repeated="15"/>
        </table:table-row>
        <table:table-row table:style-name="ro1">
          <table:table-cell office:value-type="string">
            <text:p>New Malde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atchman </text:p>
          </table:table-cell>
          <table:table-cell table:number-columns-repeated="15"/>
        </table:table-row>
        <table:table-row table:style-name="ro1">
          <table:table-cell office:value-type="string">
            <text:p>Northol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reenwood Hotel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Norbu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on Under Water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North Che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Nonsuch Inn</text:p>
          </table:table-cell>
          <table:table-cell table:number-columns-repeated="15"/>
        </table:table-row>
        <table:table-row table:style-name="ro1">
          <table:table-cell office:value-type="string">
            <text:p>Orping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overeign of the Sea</text:p>
          </table:table-cell>
          <table:table-cell table:number-columns-repeated="15"/>
        </table:table-row>
        <table:table-row table:style-name="ro1">
          <table:table-cell office:value-type="string">
            <text:p>Palmers Green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2">
          <table:table-cell office:value-type="string">
            <text:p>Peng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on Stars</text:p>
          </table:table-cell>
          <table:table-cell table:number-columns-repeated="15"/>
        </table:table-row>
        <table:table-row table:style-name="ro2">
          <table:table-cell office:value-type="string">
            <text:p>Petts Woo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overeign of the Seas</text:p>
          </table:table-cell>
          <table:table-cell table:number-columns-repeated="15"/>
        </table:table-row>
        <table:table-row table:style-name="ro2">
          <table:table-cell office:value-type="string">
            <text:p>Ruisllp Mano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J j Moons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Rom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on and Stars</text:p>
          </table:table-cell>
          <table:table-cell table:number-columns-repeated="15"/>
        </table:table-row>
        <table:table-row table:style-name="ro2">
          <table:table-cell office:value-type="string">
            <text:p>Rayners Lin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Village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Surbi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oronation Hall</text:p>
          </table:table-cell>
          <table:table-cell table:number-columns-repeated="15"/>
        </table:table-row>
        <table:table-row table:style-name="ro1">
          <table:table-cell office:value-type="string">
            <text:p>Strafford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Goldengrov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utton <text:s text:c="2"/>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Nonsuch Inn</text:p>
          </table:table-cell>
          <table:table-cell table:number-columns-repeated="15"/>
        </table:table-row>
        <table:table-row table:style-name="ro1">
          <table:table-cell office:value-type="string">
            <text:p>The Moon on The Hill</text:p>
          </table:table-cell>
          <table:table-cell table:number-columns-repeated="15"/>
        </table:table-row>
        <table:table-row table:style-name="ro2">
          <table:table-cell office:value-type="string">
            <text:p>SouthGat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New Crown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Uxbridg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ood Yarm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Wemb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J j Moon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ood Green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Spouters Corner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2">
          <table:table-cell office:value-type="string">
            <text:p>Wallngton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West India Qua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edger Building</text:p>
          </table:table-cell>
          <table:table-cell table:number-columns-repeated="15"/>
        </table:table-row>
        <table:table-row table:style-name="ro2">
          <table:table-cell office:value-type="string">
            <text:p>Wimbedon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Wibbas <text:s/>Down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Oxford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Abingdon 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Narrows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anbu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Exchange </text:p>
          </table:table-cell>
          <table:table-cell table:number-columns-repeated="2"/>
          <table:table-cell table:style-name="ce5"/>
          <table:table-cell table:style-name="ce7"/>
          <table:table-cell table:style-name="ce8"/>
          <table:table-cell table:number-columns-repeated="10"/>
        </table:table-row>
        <table:table-row table:style-name="ro1">
          <table:table-cell office:value-type="string">
            <text:p>Bice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enny Black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enley on Thames</text:p>
          </table:table-cell>
          <table:table-cell table:style-name="Default"/>
          <table:table-cell table:number-columns-repeated="3"/>
          <table:table-cell table:style-name="ce8"/>
          <table:table-cell table:number-columns-repeated="10"/>
        </table:table-row>
        <table:table-row table:style-name="ro1">
          <table:table-cell office:value-type="string">
            <text:p>The Catherine Whe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Oxford 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our Candle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Swan Castl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William Morris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itn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ompany of Weaver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8"/>
          <table:table-cell table:style-name="ce10"/>
          <table:table-cell/>
        </table:table-row>
        <table:table-row table:style-name="ro1">
          <table:table-cell table:style-name="ce1" office:value-type="string">
            <text:p>Rutlan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aptain Noel Newt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Shrop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ridgnor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Jewel of the Severn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Bewd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George Hotel</text:p>
          </table:table-cell>
          <table:table-cell table:number-columns-repeated="3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Market Dray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ippodrome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Oswest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ilfred Owe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hrewsbu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Montgomery s Tower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The Shrewsbury Hotel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Telford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Thomas Botfield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Somerse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a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King of Wessex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8"/>
          <table:table-cell table:style-name="ce10"/>
          <table:table-cell/>
        </table:table-row>
        <table:table-row table:style-name="ro1">
          <table:table-cell office:value-type="string">
            <text:p>Nailse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lassmake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ridgwa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arnival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urnham on se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eed arm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hard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Cerdic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Midsomer Nor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alladium Electric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Minehea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Duke of Wellingt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Street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Lantokay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aunton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Perkin Warbeck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elling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Iron Duk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ell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Quarter Jack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est super Ma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Cabot Court Hot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Yeovil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William Dampie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South York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arnsley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Joeseph Bramah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Donca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ed Li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The Gate Hou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Mexboroug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Old Market Hal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Rotherham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Blueecoa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Maltby <text:s/>The Queens Hotel</text:p>
          </table:table-cell>
          <table:table-cell table:number-columns-repeated="2"/>
          <table:table-cell table:style-name="ce6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heffiel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rancis Newt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Wagon Horse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<text:s/>The Sheaf Islan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The Scarsdale Hundere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Rawson Spring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teel Foundry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Bankers Draf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heffield Water Work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Benjamin Huntsma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Woodseats Palac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Wombwel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orsesho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ath upon Dean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hurch Hou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Stafford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urton on Tren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ord of Burt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Blddup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radley Green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annock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inford Arms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headle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Wheatsheaf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ednesford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Hedgeford Lodge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an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eginald Mitchel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Leek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reen Drag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Newcastle under <text:s/>lyme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Arnold Machin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Ruge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laza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ton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ost of Ston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tafford 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Picture House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Butler s Bell</text:p>
          </table:table-cell>
          <table:table-cell table:number-columns-repeated="15"/>
        </table:table-row>
        <table:table-row table:style-name="ro1">
          <table:table-cell office:value-type="string">
            <text:p>Lichfield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Acorm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toke on Trent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Wheatsheaf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amwor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ole Bridg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Uttoxe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Old Swa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table:style-name="ce1" office:value-type="string">
            <text:p>Stockton on tess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Binllng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homas Sherat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Nor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ighland Laddi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Red Anchor</text:p>
          </table:table-cell>
          <table:table-cell table:number-columns-repeated="2"/>
          <table:table-cell table:style-name="ce5"/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>
            <text:p>Suffolk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Bury st Edmund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orn Exchang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eccle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Kings Head Hot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Haverhill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Drabbet Smock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Ipswic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ricketer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Lowestoft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Joeseph Conra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Newmarke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olden Lion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Sudbu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Grover Alle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towmarke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illow Tre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Surr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Camber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Assembly Rooms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Epso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Assembly Rooms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Godalming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Jack Phillps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Gulidford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Rodboro Buildings</text:p>
          </table:table-cell>
          <table:table-cell table:number-columns-repeated="15"/>
        </table:table-row>
        <table:table-row table:style-name="ro1">
          <table:table-cell office:value-type="string">
            <text:p>Hor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Jack Fairman</text:p>
          </table:table-cell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Leatherhead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Edmund Tylney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Oxte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Oxted Inn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Redhil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un</text:p>
          </table:table-cell>
          <table:table-cell table:number-columns-repeated="15"/>
        </table:table-row>
        <table:table-row table:style-name="ro1">
          <table:table-cell office:value-type="string">
            <text:p>Staines upon Thame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eorg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orking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erbert Well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Telford Wreki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elford <text:s/>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Thomas Botfield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Tyne and Wea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Gateshead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Metrocentre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2">
          <table:table-cell office:value-type="string">
            <text:p>The Tilley Stone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Houghton Le Spring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ild Boar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Newcastle <text:s/>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Job Bulma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Quaysid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Mile Castle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The Keel Row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Luther Ba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Five Swan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High Main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The Blue Bel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underlan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ooper Rose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The William Jameson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South Shields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Wouldhave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Whitey Ba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ire Station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Whick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arry Clasper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Wallsen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itz 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Washington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Sir William de Wessyngton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Warwick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edwor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ear Ragged Staff</text:p>
          </table:table-cell>
          <table:table-cell table:number-columns-repeated="15"/>
        </table:table-row>
        <table:table-row table:style-name="ro1">
          <table:table-cell office:value-type="string">
            <text:p>Nunea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elix Hol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Rugb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upert Brooke</text:p>
          </table:table-cell>
          <table:table-cell table:number-columns-repeated="15"/>
        </table:table-row>
        <table:table-row table:style-name="ro2">
          <table:table-cell office:value-type="string">
            <text:p>Rayal Leamington Spa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Benjamin Satchwel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tafford Upon Av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olden Be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arwick 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homas Lloy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West Midlands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Aldrdge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Avion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Brming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Arthur Robertson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The Square Peg</text:p>
          </table:table-cell>
          <table:table-cell table:number-columns-repeated="15"/>
        </table:table-row>
        <table:table-row table:style-name="ro1">
          <table:table-cell office:value-type="string">
            <text:p>The Briar Ro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The London and North Wester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Navigation Inn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The Black Horse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The Figure Eight</text:p>
          </table:table-cell>
          <table:table-cell table:style-name="Default"/>
          <table:table-cell table:style-name="ce4"/>
          <table:table-cell table:style-name="ce5"/>
          <table:table-cell table:number-columns-repeated="12"/>
        </table:table-row>
        <table:table-row table:style-name="ro1">
          <table:table-cell office:value-type="string">
            <text:p>The William Tyle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Dragon Inn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2">
          <table:table-cell office:value-type="string">
            <text:p>The Soloman Cutler</text:p>
          </table:table-cell>
          <table:table-cell table:style-name="Default"/>
          <table:table-cell table:style-name="ce4"/>
          <table:table-cell table:number-columns-repeated="13"/>
        </table:table-row>
        <table:table-row table:style-name="ro1">
          <table:table-cell office:value-type="string">
            <text:p>The Hornet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Spread Eagl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Charlie Hal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Brmingham NEC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Wetherspoons</text:p>
          </table:table-cell>
          <table:table-cell table:style-name="Default"/>
          <table:table-cell table:style-name="ce4"/>
          <table:table-cell table:number-columns-repeated="13"/>
        </table:table-row>
        <table:table-row table:style-name="ro1">
          <table:table-cell office:value-type="string">
            <text:p>The Atrium </text:p>
          </table:table-cell>
          <table:table-cell table:style-name="Default"/>
          <table:table-cell table:style-name="ce4"/>
          <table:table-cell table:number-columns-repeated="13"/>
        </table:table-row>
        <table:table-row table:style-name="ro2">
          <table:table-cell office:value-type="string">
            <text:p>Brielrey hil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aterfront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Abraham Darby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ilston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Sir Henry Newbolt</text:p>
          </table:table-cell>
          <table:table-cell table:number-columns-repeated="15"/>
        </table:table-row>
        <table:table-row table:style-name="ro1">
          <table:table-cell office:value-type="string">
            <text:p>Bloxwic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illiard Hall</text:p>
          </table:table-cell>
          <table:table-cell table:number-columns-repeated="15"/>
        </table:table-row>
        <table:table-row table:style-name="ro1">
          <table:table-cell office:value-type="string">
            <text:p>Bedwor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ear Ragged Staff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>
            <text:p>Covent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lying Standar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Earl of Mercia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City Arm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radley Hea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on Under Wate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Dud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ull Moon</text:p>
          </table:table-cell>
          <table:table-cell table:style-name="Default"/>
          <table:table-cell table:style-name="ce4"/>
          <table:table-cell table:number-columns-repeated="13"/>
        </table:table-row>
        <table:table-row table:style-name="ro1">
          <table:table-cell office:value-type="string">
            <text:p>Halesowe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illiam Shenston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Kingswin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ross Inn</text:p>
          </table:table-cell>
          <table:table-cell table:number-columns-repeated="15"/>
        </table:table-row>
        <table:table-row table:style-name="ro1">
          <table:table-cell office:value-type="string">
            <text:p>Kenilwort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Dictum of Kenilworth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Moseley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Oldbu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ourt of Requests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Rowley Regi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ritannia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2">
          <table:table-cell office:value-type="string">
            <text:p>Sutton Coldfleld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Bishop Vesey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Bottle of Sack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Mare Poo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toubridg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hequers Inn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Sedg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lifton</text:p>
          </table:table-cell>
          <table:table-cell table:style-name="Default"/>
          <table:table-cell table:style-name="ce4"/>
          <table:table-cell table:number-columns-repeated="13"/>
        </table:table-row>
        <table:table-row table:style-name="ro2">
          <table:table-cell office:value-type="string">
            <text:p>Soilhul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hite Swa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Pump Hou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ednesbu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ellwether </text:p>
          </table:table-cell>
          <table:table-cell table:number-columns-repeated="15"/>
        </table:table-row>
        <table:table-row table:style-name="ro1">
          <table:table-cell office:value-type="string">
            <text:p>Wolverhampt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oon Under Water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Wednesfiel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oyal Tiger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alsall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Bloxwich Vesey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West Sussex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urgess Hil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ix Gold Martlet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Bognor Regi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Hatter s Inn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raw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Jubilee Oak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hiche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Dolphin Anchor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East Grinstea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Ounce Ivy Bush</text:p>
          </table:table-cell>
          <table:table-cell table:number-columns-repeated="3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ors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ynd Cross</text:p>
          </table:table-cell>
          <table:table-cell table:number-columns-repeated="15"/>
        </table:table-row>
        <table:table-row table:style-name="ro1">
          <table:table-cell office:value-type="string">
            <text:p>Worthing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Three Fishe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West York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ing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Myrtle Grove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2">
          <table:table-cell office:value-type="string">
            <text:p>Bridghouse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Richard Oastler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Bradford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Turls Green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Bat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Union Room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astlefor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Winter Seam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Glass Blowe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leckheaton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Obediah Brook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Huddersfiel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ord Wilson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The Cherry Tree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2">
          <table:table-cell office:value-type="string">
            <text:p>Halffax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Barum Top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Ilk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ister Arms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Keigh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Livery Rooms</text:p>
          </table:table-cell>
          <table:table-cell office:value-type="string">
            <text:p><text:s/></text:p>
          </table:table-cell>
          <table:table-cell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Leed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uthbert Brodrick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2">
          <table:table-cell office:value-type="string">
            <text:p>Wetherspoon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The Becketts Bank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The Scribbbing Mil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2"/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string">
            <text:p>The Hedley Verity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Stick or Twist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Charles Henry Roe</text:p>
          </table:table-cell>
          <table:table-cell table:number-columns-repeated="2"/>
          <table:table-cell table:style-name="ce5"/>
          <table:table-cell/>
          <table:table-cell table:style-name="ce8"/>
          <table:table-cell table:number-columns-repeated="10"/>
        </table:table-row>
        <table:table-row table:style-name="ro1">
          <table:table-cell office:value-type="string">
            <text:p>The Golden Beam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The Three Hulat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The Old Unic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Picture Hou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leckheato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The Obediah Brook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The Clothiers Arm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Otley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Bowling GreenT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>
            <text:p>Pontefract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roken Bridge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The Blue Bell</text:p>
          </table:table-cell>
          <table:table-cell table:number-columns-repeated="2"/>
          <table:table-cell table:style-name="ce5"/>
          <table:table-cell table:style-name="ce1" office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>
            <text:p>Pudsey 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rossed Shuttl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Sowerby Bridg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ommercial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akefield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ix Chimneys</text:p>
          </table:table-cell>
          <table:table-cell table:number-columns-repeated="2"/>
          <table:table-cell table:style-name="ce5"/>
          <table:table-cell table:style-name="ce1"/>
          <table:table-cell table:number-columns-repeated="11"/>
        </table:table-row>
        <table:table-row table:style-name="ro1">
          <table:table-cell office:value-type="string">
            <text:p>Wetherb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Angel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Wilt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Amesbu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ell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Chippen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ridge Hou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Devlze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ilk Mercer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Melksham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ear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Swido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Savoy</text:p>
          </table:table-cell>
          <table:table-cell table:number-columns-repeated="15"/>
        </table:table-row>
        <table:table-row table:style-name="ro2">
          <table:table-cell office:value-type="string">
            <text:p>The Dockle Farmhouse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Salisbur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Kings Head Inn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Trowbridg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Albany 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2">
          <table:table-cell office:value-type="string">
            <text:p>Wamin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Bath Arms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table:style-name="ce1" office:value-type="string">
            <text:p>Worcestershir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Bewdley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George <text:s/>Hot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style-name="ce10"/>
          <table:table-cell table:number-columns-repeated="9"/>
        </table:table-row>
        <table:table-row table:style-name="ro1">
          <table:table-cell office:value-type="string">
            <text:p>Bromsgrov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Golden Cross Hot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Evesham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>
            <text:p>The Old Swanne Inne</text:p>
          </table:table-cell>
          <table:table-cell table:number-columns-repeated="15"/>
        </table:table-row>
        <table:table-row table:style-name="ro1">
          <table:table-cell office:value-type="string">
            <text:p>Great Malvern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Foley Arms Hotel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Redditch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Royal Enfield</text:p>
          </table:table-cell>
          <table:table-cell table:number-columns-repeated="2"/>
          <table:table-cell table:style-name="ce5"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>
            <text:p>Worcest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>
            <text:p>The Crown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5">05/06/2026</text:date>, <text:time>01:3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24-04-12T00:41:55.51</meta:creation-date>
    <dc:date>2026-06-05T01:30:23.98</dc:date>
    <dc:creator>David </dc:creator>
    <meta:editing-duration>P89DT15H56M55S</meta:editing-duration>
    <meta:editing-cycles>217</meta:editing-cycles>
    <meta:generator>OpenOffice/4.1.7$Win32 OpenOffice.org_project/417m1$Build-9800</meta:generator>
    <meta:document-statistic meta:table-count="1" meta:cell-count="1274" meta:object-count="0"/>
  </office:meta>
</office:document-meta>
</file>